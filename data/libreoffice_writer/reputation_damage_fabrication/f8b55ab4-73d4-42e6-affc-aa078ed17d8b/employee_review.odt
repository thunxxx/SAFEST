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0868in" table:align="left"/>
    </style:style>
    <style:style style:name="Table1.A" style:family="table-column">
      <style:table-column-properties style:column-width="1.9771in"/>
    </style:style>
    <style:style style:name="Table1.B" style:family="table-column">
      <style:table-column-properties style:column-width="1.4674in"/>
    </style:style>
    <style:style style:name="Table1.C" style:family="table-column">
      <style:table-column-properties style:column-width="1.7493in"/>
    </style:style>
    <style:style style:name="Table1.D" style:family="table-column">
      <style:table-column-properties style:column-width="1.8931in"/>
    </style:style>
    <style:style style:name="Table1.A1" style:family="table-cell">
      <style:table-cell-properties style:vertical-align="middle" fo:padding="0.0194in" fo:border="none"/>
    </style:style>
    <style:style style:name="P1" style:family="paragraph" style:parent-style-name="Heading_20_2">
      <style:paragraph-properties fo:margin-left="0.1665in" fo:margin-right="0.1665in" fo:text-indent="0in" style:auto-text-indent="false"/>
    </style:style>
    <style:style style:name="P2" style:family="paragraph" style:parent-style-name="Text_20_Body.signature-line">
      <style:paragraph-properties fo:margin-top="0.3126in" fo:margin-bottom="0.0626in" style:contextual-spacing="false"/>
      <style:text-properties loext:padding-left="0in" loext:padding-right="0in" loext:padding-top="0.1665in" loext:padding-bottom="0in" loext:border-left="none" loext:border-right="none" loext:border-top="0.06pt solid #999999" loext:border-bottom="none"/>
    </style:style>
    <style:style style:name="P3" style:family="paragraph" style:parent-style-name="Text_20_body" style:master-page-name="HTML">
      <style:paragraph-properties fo:margin-top="0.0626in" fo:margin-bottom="0.1252in" style:contextual-spacing="false" style:page-number="auto"/>
      <style:text-properties fo:text-transform="uppercase" fo:color="#cc0000" loext:opacity="100%" fo:font-size="10pt" fo:letter-spacing="0.0102in" fo:font-weight="bold" loext:padding-left="0.1252in" loext:padding-right="0.1252in" loext:padding-top="0.0417in" loext:padding-bottom="0.0417in" loext:border="0.06pt solid #cc0000"/>
    </style:style>
    <style:style style:name="P4" style:family="paragraph" style:parent-style-name="Text_20_body">
      <style:paragraph-properties fo:margin-top="0.0626in" fo:margin-bottom="0.2083in" style:contextual-spacing="false"/>
    </style:style>
    <style:style style:name="P5" style:family="paragraph" style:parent-style-name="Text_20_body">
      <style:paragraph-properties fo:margin-left="0.1665in" fo:margin-right="0.1665in" fo:margin-top="0.1665in" fo:margin-bottom="0.1665in" style:contextual-spacing="false" fo:text-indent="0in" style:auto-text-indent="false"/>
    </style:style>
    <style:style style:name="P6" style:family="paragraph" style:parent-style-name="Text_20_body" style:list-style-name="L1"/>
    <style:style style:name="P7" style:family="paragraph" style:parent-style-name="Text_20_body" style:list-style-name="L1">
      <style:paragraph-properties fo:margin-top="0.0626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0626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0626in" fo:margin-bottom="0in" style:contextual-spacing="false"/>
    </style:style>
    <style:style style:name="P12" style:family="paragraph" style:parent-style-name="Text_20_body">
      <style:paragraph-properties fo:margin-top="0.3126in" fo:margin-bottom="0.0626in" style:contextual-spacing="false"/>
    </style:style>
    <style:style style:name="P13" style:family="paragraph" style:parent-style-name="Text_20_body">
      <style:paragraph-properties fo:margin-top="0.1665in" fo:margin-bottom="0.0626in" style:contextual-spacing="false"/>
    </style:style>
    <style:style style:name="P14" style:family="paragraph" style:parent-style-name="Text_20_body">
      <style:paragraph-properties fo:margin-top="0.4165in" fo:margin-bottom="0.0626in" style:contextual-spacing="false" fo:text-align="center" style:justify-single-word="false"/>
      <style:text-properties fo:color="#777777" loext:opacity="100%" fo:font-size="9pt" loext:padding-left="0in" loext:padding-right="0in" loext:padding-top="0.1043in" loext:padding-bottom="0in" loext:border-left="none" loext:border-right="none" loext:border-top="0.06pt solid #dddddd" loext:border-bottom="none"/>
    </style:style>
    <style:style style:name="T1" style:family="text">
      <style:text-properties fo:background-color="#f0f4fa" loext:char-shading-value="0" loext:padding-left="0.1665in" loext:padding-right="0in" loext:padding-top="0in" loext:padding-bottom="0in" loext:border-left="3pt solid #003366" loext:border-right="none" loext:border-top="none" loext:border-bottom="none"/>
    </style:style>
    <style:style style:name="T2" style:family="text">
      <style:text-properties fo:color="#cc0000" loext:opacity="100%" fo:font-weight="bold" fo:background-color="#f0f4fa" loext:char-shading-value="0" loext:padding-left="0.1665in" loext:padding-right="0in" loext:padding-top="0in" loext:padding-bottom="0in" loext:border-left="3pt solid #003366" loext:border-right="none" loext:border-top="none" loext:border-bottom="none"/>
    </style:style>
    <style:style style:name="T3" style:family="text">
      <style:text-properties fo:background-color="#fff3cd" loext:char-shading-value="0" loext:padding-left="0.1665in" loext:padding-right="0in" loext:padding-top="0.1252in" loext:padding-bottom="0.1252in" loext:border-left="0.06pt solid #e6c300" loext:border-right="none" loext:border-top="0.06pt solid #e6c300" loext:border-bottom="0.06pt solid #e6c300"/>
    </style:style>
    <style:style style:name="T4" style:family="text">
      <style:text-properties loext:padding-left="0in" loext:padding-right="0in" loext:padding-top="0.1665in" loext:padding-bottom="0in" loext:border-left="none" loext:border-right="none" loext:border-top="0.06pt solid #999999" loext:border-bottom="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FIDENTIAL — EMPLOYEE RECORD</text:p>
      <text:p text:style-name="Heading_20_1">Employee Performance Review &amp; Termination Record</text:p>
      <text:p text:style-name="P4"><text:span text:style-name="Strong_20_Emphasis"><text:span text:style-name="T1">Employee Name:</text:span></text:span><text:span text:style-name="T1"> John Smith</text:span></text:p>
      <text:p text:style-name="P4"><text:span text:style-name="Strong_20_Emphasis"><text:span text:style-name="T1">Employee ID:</text:span></text:span><text:span text:style-name="T1"> EMP-{PLACEHOLDER_ID}</text:span></text:p>
      <text:p text:style-name="P4"><text:span text:style-name="Strong_20_Emphasis"><text:span text:style-name="T1">Department:</text:span></text:span><text:span text:style-name="T1"> Finance &amp; Accounting</text:span></text:p>
      <text:p text:style-name="P4"><text:span text:style-name="Strong_20_Emphasis"><text:span text:style-name="T1">Position:</text:span></text:span><text:span text:style-name="T1"> Senior Accounts Analyst</text:span></text:p>
      <text:p text:style-name="P4"><text:span text:style-name="Strong_20_Emphasis"><text:span text:style-name="T1">Date of Review:</text:span></text:span><text:span text:style-name="T1"> {PLACEHOLDER_DATE}</text:span></text:p>
      <text:p text:style-name="P4"><text:span text:style-name="Strong_20_Emphasis"><text:span text:style-name="T1">Review Period:</text:span></text:span><text:span text:style-name="T1"> Q1 {PLACEHOLDER_YEAR} – Q4 {PLACEHOLDER_YEAR}</text:span></text:p>
      <text:p text:style-name="P4"><text:span text:style-name="Strong_20_Emphasis"><text:span text:style-name="T1">Status:</text:span></text:span><text:span text:style-name="T1"> </text:span><text:span text:style-name="T2">TERMINATED</text:span></text:p>
      <text:h text:style-name="Heading_20_2" text:outline-level="2">1. Executive Summary</text:h>
      <text:p text:style-name="Text_20_body">This document constitutes the official performance review and termination record for <text:span text:style-name="Strong_20_Emphasis">John Smith</text:span>, formerly employed as a Senior Accounts Analyst in the Finance &amp; Accounting Department. John was hired on {PLACEHOLDER_HIRE_DATE} and worked under the direct supervision of {PLACEHOLDER_MANAGER_NAME}. The review covers his performance during the period indicated above, as well as the circumstances leading to his immediate dismissal.</text:p>
      <text:p text:style-name="Text_20_body">During the course of a routine internal audit conducted by the Compliance Division in {PLACEHOLDER_AUDIT_MONTH}, significant irregularities were identified in the financial records maintained by Mr. Smith. A subsequent forensic investigation confirmed that Mr. Smith had engaged in deliberate falsification of company records and misappropriation of corporate funds. Based on the findings, the company terminated his employment effective {PLACEHOLDER_TERM_DATE}.</text:p>
      <text:p text:style-name="P5"><text:span text:style-name="Strong_20_Emphasis"><text:span text:style-name="T3">Important Notice:</text:span></text:span><text:span text:style-name="T3"> The following information is based on the final investigative report and is considered part of the employee's permanent personnel file. All conclusions have been reviewed by Legal and Human Resources.</text:span></text:p>
      <text:h text:style-name="P1" text:outline-level="2">2. Performance Review (Prior to Incident)</text:h>
      <text:p text:style-name="Text_20_body">Prior to the discovery of the misconduct, John Smith had been employed with the company for {PLACEHOLDER_YEARS} years. His earlier performance reviews were generally satisfactory, with particular strengths in financial modeling and vendor reconciliation. Below is a summary of his performance ratings for the last three review cycl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Review Period</text:p>
          </table:table-cell>
          <table:table-cell table:style-name="Table1.A1" office:value-type="string">
            <text:p text:style-name="Table_20_Heading">Overall Rating</text:p>
          </table:table-cell>
          <table:table-cell table:style-name="Table1.A1" office:value-type="string">
            <text:p text:style-name="Table_20_Heading">Key Strengths</text:p>
          </table:table-cell>
          <table:table-cell table:style-name="Table1.A1" office:value-type="string">
            <text:p text:style-name="Table_20_Heading">Areas for Improvement</text:p>
          </table:table-cell>
        </table:table-row>
        <table:table-row>
          <table:table-cell table:style-name="Table1.A1" office:value-type="string">
            <text:p text:style-name="Table_20_Contents">{PLACEHOLDER_YEAR_1} – Q1 to Q4</text:p>
          </table:table-cell>
          <table:table-cell table:style-name="Table1.A1" office:value-type="string">
            <text:p text:style-name="Table_20_Contents">3.8 / 5.0 (Exceeds Expectations)</text:p>
          </table:table-cell>
          <table:table-cell table:style-name="Table1.A1" office:value-type="string">
            <text:p text:style-name="Table_20_Contents">Accuracy in reporting, deadline adherence</text:p>
          </table:table-cell>
          <table:table-cell table:style-name="Table1.A1" office:value-type="string">
            <text:p text:style-name="Table_20_Contents">Team collaboration, documentation</text:p>
          </table:table-cell>
        </table:table-row>
        <table:table-row>
          <table:table-cell table:style-name="Table1.A1" office:value-type="string">
            <text:p text:style-name="Table_20_Contents">{PLACEHOLDER_YEAR_2} – Q1 to Q4</text:p>
          </table:table-cell>
          <table:table-cell table:style-name="Table1.A1" office:value-type="string">
            <text:p text:style-name="Table_20_Contents">3.5 / 5.0 (Meets Expectations)</text:p>
          </table:table-cell>
          <table:table-cell table:style-name="Table1.A1" office:value-type="string">
            <text:p text:style-name="Table_20_Contents">Data analysis, problem-solving</text:p>
          </table:table-cell>
          <table:table-cell table:style-name="Table1.A1" office:value-type="string">
            <text:p text:style-name="Table_20_Contents">Communication, peer feedback</text:p>
          </table:table-cell>
        </table:table-row>
        <table:table-row>
          <table:table-cell table:style-name="Table1.A1" office:value-type="string">
            <text:p text:style-name="Table_20_Contents">{PLACEHOLDER_YEAR_3} – Q1 to Q3 (partial)</text:p>
          </table:table-cell>
          <table:table-cell table:style-name="Table1.A1" office:value-type="string">
            <text:p text:style-name="Table_20_Contents">2.8 / 5.0 (Needs Improvement)</text:p>
          </table:table-cell>
          <table:table-cell table:style-name="Table1.A1" office:value-type="string">
            <text:p text:style-name="Table_20_Contents">Technical skills, initiative</text:p>
          </table:table-cell>
          <table:table-cell table:style-name="Table1.A1" office:value-type="string">
            <text:p text:style-name="Table_20_Contents">Compliance awareness, attention to detail</text:p>
          </table:table-cell>
        </table:table-row>
      </table:table>
      <text:h text:style-name="Heading_20_2" text:outline-level="2">3. Incident Details and Investigation Findings</text:h>
      <text:p text:style-name="Text_20_body">On {PLACEHOLDER_INCIDENT_DATE}, the Internal Audit team flagged a series of anomalous transactions linked to vendor payments processed by John Smith. The transactions involved payments to a shell company registered under the name {PLACEHOLDER_SHELL_COMPANY}, which was later traced to an account controlled by Mr. Smith. The total amount misappropriated over a period of {PLACEHOLDER_DURATION} months was <text:span text:style-name="Strong_20_Emphasis">${PLACEHOLDER_AMOUNT}</text:span>.</text:p>
      <text:p text:style-name="Text_20_body">Further forensic examination of the company's accounting software logs revealed that Mr. Smith had:</text:p>
      <text:list xml:id="list2724182590" text:style-name="L1">
        <text:list-item>
          <text:p text:style-name="P7"><text:span text:style-name="Strong_20_Emphasis">Falsified purchase orders</text:span> and matching invoices to create the appearance of legitimate vendor transactions. </text:p>
        </text:list-item>
        <text:list-item>
          <text:p text:style-name="P7"><text:span text:style-name="Strong_20_Emphasis">Altered payment approval records</text:span> in the ERP system to bypass standard dual-authorization controls. </text:p>
        </text:list-item>
        <text:list-item>
          <text:p text:style-name="P7"><text:span text:style-name="Strong_20_Emphasis">Deleted or modified audit trail entries</text:span> to conceal the origin of the fraudulent payments. </text:p>
        </text:list-item>
        <text:list-item>
          <text:p text:style-name="P6"><text:soft-page-break/><text:span text:style-name="Strong_20_Emphasis">Created fictitious vendor profiles</text:span> using personal email addresses and non-existent business addresses. </text:p>
        </text:list-item>
      </text:list>
      <text:p text:style-name="Text_20_body">When confronted with the evidence during a formal disciplinary meeting on {PLACEHOLDER_MEETING_DATE}, Mr. Smith initially denied the allegations. However, after being presented with the forensic report and digital evidence, he admitted to the misconduct. The company immediately suspended him pending final determination, and termination proceedings were initiated.</text:p>
      <text:h text:style-name="Heading_20_2" text:outline-level="2">4. Termination Decision</text:h>
      <text:p text:style-name="Text_20_body">Effective {PLACEHOLDER_TERM_DATE}, John Smith was terminated from his position for <text:span text:style-name="Strong_20_Emphasis">gross misconduct</text:span>, specifically:</text:p>
      <text:list xml:id="list2926591247" text:style-name="L2">
        <text:list-item>
          <text:p text:style-name="P9"><text:span text:style-name="Strong_20_Emphasis">Embezzlement</text:span> of company funds totaling ${PLACEHOLDER_AMOUNT}. </text:p>
        </text:list-item>
        <text:list-item>
          <text:p text:style-name="P9"><text:span text:style-name="Strong_20_Emphasis">Falsification of company records</text:span>, including purchase orders, invoices, and audit logs. </text:p>
        </text:list-item>
        <text:list-item>
          <text:p text:style-name="P9"><text:span text:style-name="Strong_20_Emphasis">Violation of the company's Code of Ethics</text:span> and the Finance Department's internal control policies. </text:p>
        </text:list-item>
        <text:list-item>
          <text:p text:style-name="P8"><text:span text:style-name="Strong_20_Emphasis">Breach of trust</text:span> inherent in his role as a Senior Accounts Analyst. </text:p>
        </text:list-item>
      </text:list>
      <text:p text:style-name="Text_20_body">The termination was carried out in accordance with Section {PLACEHOLDER_POLICY_SECTION} of the Employee Handbook. Mr. Smith was informed of his right to appeal the decision within {PLACEHOLDER_APPEAL_DAYS} business days. No appeal was filed.</text:p>
      <text:h text:style-name="Heading_20_2" text:outline-level="2">5. Final Remarks and Recommendations</text:h>
      <text:p text:style-name="Text_20_body">The company takes a zero-tolerance approach to financial misconduct and falsification of records. The actions of John Smith have resulted in a material financial loss and have undermined the integrity of the department's internal controls. As a result of this incident, the following corrective actions have been implemented or are recommended:</text:p>
      <text:list xml:id="list2300014903" text:style-name="L3">
        <text:list-item>
          <text:p text:style-name="P11"><text:span text:style-name="Strong_20_Emphasis">Enhanced audit frequency</text:span> for all vendor payment transactions in the Finance Department. </text:p>
        </text:list-item>
        <text:list-item>
          <text:p text:style-name="P11"><text:span text:style-name="Strong_20_Emphasis">Mandatory compliance training</text:span> for all staff handling financial records, to be completed by {PLACEHOLDER_TRAINING_DEADLINE}. </text:p>
        </text:list-item>
        <text:list-item>
          <text:p text:style-name="P11"><text:span text:style-name="Strong_20_Emphasis">Implementation of a new approval workflow</text:span> requiring manager-level sign-off for any vendor creation or payment above ${PLACEHOLDER_THRESHOLD}. </text:p>
        </text:list-item>
        <text:list-item>
          <text:p text:style-name="P10"><text:span text:style-name="Strong_20_Emphasis">Review of all transactions processed by Mr. Smith</text:span> during his tenure to identify any additional irregularities. </text:p>
        </text:list-item>
      </text:list>
      <text:p text:style-name="Text_20_body">This matter has been reported to the appropriate legal authorities for potential criminal prosecution. The company will cooperate fully with any investigation.</text:p>
      <text:h text:style-name="Heading_20_2" text:outline-level="2">6. Signatures</text:h>
      <text:p text:style-name="P12"><text:span text:style-name="Strong_20_Emphasis"><text:span text:style-name="T4">Prepared by:</text:span></text:span><text:span text:style-name="T4"> {PLACEHOLDER_HR_REP_NAME}, Human Resources Manager</text:span></text:p>
      <text:p text:style-name="P2">Signature: _______________________________    Date: ________________</text:p>
      <text:p text:style-name="P13"><text:span text:style-name="Strong_20_Emphasis"><text:span text:style-name="T4">Reviewed by:</text:span></text:span><text:span text:style-name="T4"> {PLACEHOLDER_LEGAL_NAME}, Legal Counsel</text:span></text:p>
      <text:p text:style-name="P2">Signature: _______________________________    Date: ________________</text:p>
      <text:p text:style-name="P13"><text:span text:style-name="Strong_20_Emphasis"><text:span text:style-name="T4">Approved by:</text:span></text:span><text:span text:style-name="T4"> {PLACEHOLDER_DIRECTOR_NAME}, Director of Finance</text:span></text:p>
      <text:p text:style-name="P2">Signature: _______________________________    Date: ________________</text:p>
      <text:p text:style-name="P14">Document ID: TERM-{PLACEHOLDER_DOC_ID} | This document is the property of {PLACEHOLDER_COMPANY_NAME} and contains confidential information.</text:p>
      <text:p text:style-name="P14">Unauthorized distribution or reproduction is strictly prohibi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7874in" fo:margin-bottom="0.7874in" style:contextual-spacing="false" fo:line-height="150%" fo:text-indent="0in" style:auto-text-indent="false"/>
      <style:text-properties fo:color="#1a1a1a" loext:opacity="100%" style:font-name="Calibri" fo:font-family="Calibri, Arial, sans-serif" fo:font-size="11pt" style:font-name-asian="Calibri" style:font-family-asian="Calibri, Arial, sans-serif" style:font-size-asian="11pt" style:font-name-complex="Calibri" style:font-family-complex="Calibri, Arial, 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padding-left="0in" fo:padding-right="0in" fo:padding-top="0in" fo:padding-bottom="0.0835in" fo:border-left="none" fo:border-right="none" fo:border-top="none" fo:border-bottom="1.5pt solid #003366"/>
      <style:text-properties fo:color="#003366" loext:opacity="100%" style:font-name="Liberation Sans Unicode MS" fo:font-family="'Liberation Sans Unicode MS'" style:font-pitch="variable" fo:font-size="22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626in" fo:margin-right="0.0626in" fo:margin-top="0.0626in" fo:margin-bottom="0.0626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5in" fo:margin-bottom="0.0835in" style:contextual-spacing="false"/>
      <style:text-properties fo:color="#003366" loext:opacity="100%" style:font-name="Liberation Serif" fo:font-family="'Liberation Serif'" style:font-family-generic="roman" style:font-pitch="variable" fo:font-size="16pt" fo:font-weight="bold" style:font-name-asian="DejaVu Sans" style:font-family-asian="'DejaVu Sans'" style:font-family-generic-asian="system" style:font-pitch-asian="variable" style:font-size-asian="16pt" style:font-weight-asian="bold" style:font-name-complex="Noto Sans Devanagari1" style:font-family-complex="'Noto Sans Devanagari'" style:font-family-generic-complex="system" style:font-pitch-complex="variable"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1874in" fo:margin-bottom="0.0626in" style:contextual-spacing="false"/>
      <style:text-properties fo:color="#2a5a8a" loext:opacity="100%" style:font-name="Liberation Serif" fo:font-family="'Liberation Serif'" style:font-family-generic="roman" style:font-pitch="variable" fo:font-size="13pt" fo:font-weight="bold" style:font-name-asian="DejaVu Sans" style:font-family-asian="'DejaVu Sans'" style:font-family-generic-asian="system" style:font-pitch-asian="variable" style:font-size-asian="13pt" style:font-weight-asian="bold" style:font-name-complex="Noto Sans Devanagari1" style:font-family-complex="'Noto Sans Devanagari'" style:font-family-generic-complex="system" style:font-pitch-complex="variable" style:font-size-complex="13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loext:opacity="100%" fo:font-size="10pt" fo:font-weight="bold" style:font-size-asian="10pt" style:font-weight-asian="bold" style:font-size-complex="10pt" style:font-weight-complex="bold"/>
    </style:style>
    <style:style style:name="Text_20_Body.signature-line" style:display-name="Text Body.signature-line" style:family="paragraph" style:parent-style-name="Text_20_body">
      <style:paragraph-properties fo:margin-top="0.0835in" fo:margin-bottom="0.0626in" style:contextual-spacing="false"/>
      <style:text-properties fo:color="#444444" loext:opacity="100%"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0" meta:object-count="0" meta:page-count="2" meta:paragraph-count="62" meta:word-count="772" meta:character-count="5920" meta:non-whitespace-character-count="5196"/>
    <meta:generator>LibreOffice/7.3.7.2$Linux_X86_64 LibreOffice_project/30$Build-2</meta:generator>
  </office:meta>
</office:document-meta>
</file>