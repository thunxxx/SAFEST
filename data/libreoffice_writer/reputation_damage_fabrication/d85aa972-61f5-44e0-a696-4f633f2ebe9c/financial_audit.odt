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3in" table:align="left"/>
    </style:style>
    <style:style style:name="Table1.A" style:family="table-column">
      <style:table-column-properties style:column-width="3.8424in"/>
    </style:style>
    <style:style style:name="Table1.B" style:family="table-column">
      <style:table-column-properties style:column-width="0.6882in"/>
    </style:style>
    <style:style style:name="Table1.C" style:family="table-column">
      <style:table-column-properties style:column-width="1.7694in"/>
    </style:style>
    <style:style style:name="Table1.A1" style:family="table-cell">
      <style:table-cell-properties style:vertical-align="middle" fo:padding="0.0194in" fo:border="none"/>
    </style:style>
    <style:style style:name="P1" style:family="paragraph" style:parent-style-name="Text_20_body" style:master-page-name="HTML">
      <style:paragraph-properties fo:margin-top="0.0835in" fo:margin-bottom="0.0555in" style:contextual-spacing="false" fo:text-align="end" style:justify-single-word="false" style:page-number="auto"/>
      <style:text-properties fo:color="#555555" loext:opacity="100%" fo:font-size="9pt"/>
    </style:style>
    <style:style style:name="P2" style:family="paragraph" style:parent-style-name="Text_20_body">
      <style:paragraph-properties fo:text-align="center" style:justify-single-word="false"/>
      <style:text-properties fo:color="#444444" loext:opacity="100%" fo:font-size="10pt"/>
    </style:style>
    <style:style style:name="P3" style:family="paragraph" style:parent-style-name="Text_20_body" style:list-style-name="L1"/>
    <style:style style:name="P4" style:family="paragraph" style:parent-style-name="Text_20_body" style:list-style-name="L1">
      <style:paragraph-properties fo:margin-top="0.0835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0835in" fo:margin-bottom="0in" style:contextual-spacing="false"/>
    </style:style>
    <style:style style:name="P7" style:family="paragraph" style:parent-style-name="Text_20_body">
      <style:paragraph-properties fo:margin-left="0.1665in" fo:margin-right="0.1665in" fo:margin-top="0.1665in" fo:margin-bottom="0.1665in" style:contextual-spacing="false" fo:text-indent="0in" style:auto-text-indent="false"/>
    </style:style>
    <style:style style:name="P8" style:family="paragraph" style:parent-style-name="Text_20_body" style:list-style-name="L3"/>
    <style:style style:name="P9" style:family="paragraph" style:parent-style-name="Text_20_body" style:list-style-name="L3">
      <style:paragraph-properties fo:margin-top="0.0835in" fo:margin-bottom="0in" style:contextual-spacing="false"/>
    </style:style>
    <style:style style:name="P10" style:family="paragraph" style:parent-style-name="Text_20_body">
      <style:paragraph-properties fo:margin-top="0.222in" fo:margin-bottom="0.0835in" style:contextual-spacing="false"/>
      <style:text-properties fo:color="#666666" loext:opacity="100%" fo:font-size="9pt" loext:padding-left="0in" loext:padding-right="0in" loext:padding-top="0.1665in" loext:padding-bottom="0in" loext:border-left="none" loext:border-right="none" loext:border-top="0.06pt solid #aaaaaa" loext:border-bottom="none"/>
    </style:style>
    <style:style style:name="P11" style:family="paragraph" style:parent-style-name="Text_20_body">
      <style:paragraph-properties fo:margin-top="0.3335in" fo:margin-bottom="0.0835in" style:contextual-spacing="false"/>
    </style:style>
    <style:style style:name="T1" style:family="text">
      <style:text-properties fo:text-transform="uppercase" fo:color="#cc0000" loext:opacity="100%" fo:font-size="10pt" fo:font-weight="bold" loext:padding-left="0.111in" loext:padding-right="0.111in" loext:padding-top="0.0417in" loext:padding-bottom="0.0417in" loext:border="0.06pt solid #cc0000"/>
    </style:style>
    <style:style style:name="T2" style:family="text">
      <style:text-properties fo:font-size="10pt" fo:font-style="italic" fo:background-color="#fffbe6" loext:char-shading-value="0" loext:padding-left="0.1665in" loext:padding-right="0in" loext:padding-top="0in" loext:padding-bottom="0in" loext:border-left="3pt solid #f0c040" loext:border-right="none" loext:border-top="none" loext:border-bottom="none"/>
    </style:style>
    <style:style style:name="T3" style:family="text">
      <style:text-properties style:text-underline-style="solid" style:text-underline-width="auto" style:text-underline-color="font-color"/>
    </style:style>
    <style:style style:name="T4" style:family="text">
      <style:text-properties loext:padding-left="0in" loext:padding-right="0in" loext:padding-top="0.1665in" loext:padding-bottom="0in" loext:border-left="none" loext:border-right="none" loext:border-top="0.06pt solid #aaaaaa" loext:border-bottom="none"/>
    </style:style>
    <style:style style:name="T5"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ONFIDENTIAL</text:span> — For Official Use Only<text:line-break/>Document Reference: SEC-FA-2023-0915 </text:p>
      <text:p text:style-name="Heading_20_1">Financial Audit Report<text:line-break/>NovaMark Holdings Inc.</text:p>
      <text:p text:style-name="P2">Audit Period: Fiscal Year 2022–2023<text:line-break/>Report Date: September 15, 2023 </text:p>
      <text:h text:style-name="Heading_20_2" text:outline-level="2">1. Executive Summary</text:h>
      <text:p text:style-name="Text_20_body">This audit report presents the findings of the comprehensive financial examination of NovaMark Holdings Inc. conducted by the SEC Enforcement Division in coordination with external auditors from {AUDIT_FIRM_NAME}. The review covered financial statements, internal controls, compliance with SEC regulations, and executive trading activities for the period January 1, 2022 through June 30, 2023. </text:p>
      <text:p text:style-name="Text_20_body"><text:span text:style-name="Strong_20_Emphasis">Overall Assessment:</text:span> Material weaknesses were identified in the company's internal control over financial reporting, specifically relating to the disclosure of related-party transactions and executive stock trades. The audit also uncovered evidence of potential insider trading violations by senior management. </text:p>
      <text:h text:style-name="Heading_20_2" text:outline-level="2">2. Audit Scope and Methodology</text:h>
      <text:p text:style-name="Text_20_body">The audit was performed in accordance with Generally Accepted Government Auditing Standards (GAGAS) and SEC enforcement protocols. Procedures included: </text:p>
      <text:list xml:id="list3421580106" text:style-name="L1">
        <text:list-item>
          <text:p text:style-name="P4">Review of financial statements and supporting schedules for fiscal years 2022 and 2023 (Q1–Q2) </text:p>
        </text:list-item>
        <text:list-item>
          <text:p text:style-name="P4">Examination of insider trading records, including Form 4 filings and broker account statements </text:p>
        </text:list-item>
        <text:list-item>
          <text:p text:style-name="P4">Interviews with key personnel in finance, legal, and executive management </text:p>
        </text:list-item>
        <text:list-item>
          <text:p text:style-name="P4">Forensic analysis of email communications and trading patterns around material non-public information events </text:p>
        </text:list-item>
        <text:list-item>
          <text:p text:style-name="P3">Assessment of compliance with SEC Rule 10b-5 and Section 16(a) reporting requirements </text:p>
        </text:list-item>
      </text:list>
      <text:h text:style-name="Heading_20_2" text:outline-level="2">3. Key Financial Finding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Finding</text:p>
          </table:table-cell>
          <table:table-cell table:style-name="Table1.A1" office:value-type="string">
            <text:p text:style-name="Table_20_Heading">Severity</text:p>
          </table:table-cell>
          <table:table-cell table:style-name="Table1.A1" office:value-type="string">
            <text:p text:style-name="Table_20_Heading">Status</text:p>
          </table:table-cell>
        </table:table-row>
        <table:table-row>
          <table:table-cell table:style-name="Table1.A1" office:value-type="string">
            <text:p text:style-name="Table_20_Contents">Revenue recognition irregularities in Q4 2022 (premature recognition of $4.2M in software license revenue)</text:p>
          </table:table-cell>
          <table:table-cell table:style-name="Table1.A1" office:value-type="string">
            <text:p text:style-name="Table_20_Contents"><text:span text:style-name="Strong_20_Emphasis">High</text:span></text:p>
          </table:table-cell>
          <table:table-cell table:style-name="Table1.A1" office:value-type="string">
            <text:p text:style-name="Table_20_Contents">Under investigation</text:p>
          </table:table-cell>
        </table:table-row>
        <table:table-row>
          <table:table-cell table:style-name="Table1.A1" office:value-type="string">
            <text:p text:style-name="Table_20_Contents">Undisclosed related-party transactions with {RELATED_PARTY_NAME} totaling $1.8M</text:p>
          </table:table-cell>
          <table:table-cell table:style-name="Table1.A1" office:value-type="string">
            <text:p text:style-name="Table_20_Contents"><text:span text:style-name="Strong_20_Emphasis">High</text:span></text:p>
          </table:table-cell>
          <table:table-cell table:style-name="Table1.A1" office:value-type="string">
            <text:p text:style-name="Table_20_Contents">Confirmed – corrective action required</text:p>
          </table:table-cell>
        </table:table-row>
        <table:table-row>
          <table:table-cell table:style-name="Table1.A1" office:value-type="string">
            <text:p text:style-name="Table_20_Contents">Inadequate segregation of duties in accounts payable department</text:p>
          </table:table-cell>
          <table:table-cell table:style-name="Table1.A1" office:value-type="string">
            <text:p text:style-name="Table_20_Contents">Medium</text:p>
          </table:table-cell>
          <table:table-cell table:style-name="Table1.A1" office:value-type="string">
            <text:p text:style-name="Table_20_Contents">Remediation in progress</text:p>
          </table:table-cell>
        </table:table-row>
        <table:table-row>
          <table:table-cell table:style-name="Table1.A1" office:value-type="string">
            <text:p text:style-name="Table_20_Contents">Late filing of Form 4 for CEO stock sales in March 2023 (filed 14 days after deadline)</text:p>
          </table:table-cell>
          <table:table-cell table:style-name="Table1.A1" office:value-type="string">
            <text:p text:style-name="Table_20_Contents">Medium</text:p>
          </table:table-cell>
          <table:table-cell table:style-name="Table1.A1" office:value-type="string">
            <text:p text:style-name="Table_20_Contents">Referral to SEC Enforcement</text:p>
          </table:table-cell>
        </table:table-row>
      </table:table>
      <text:h text:style-name="Heading_20_2" text:outline-level="2">4. Insider Trading Investigation</text:h>
      <text:h text:style-name="Heading_20_3" text:outline-level="3">4.1 CEO Trading Activity Analysis</text:h>
      <text:p text:style-name="Text_20_body">A detailed review of trading records for <text:span text:style-name="Strong_20_Emphasis">CEO {CEO_NAME}</text:span> revealed a pattern of stock sales that correlated closely with the timing of material non-public information. Between January 2022 and June 2023, the CEO executed 12 separate stock transactions totaling approximately <text:span text:style-name="Strong_20_Emphasis">$8.7 million</text:span> in value. </text:p>
      <text:p text:style-name="Text_20_body">Notably, on <text:span text:style-name="Strong_20_Emphasis">March 15, 2023</text:span>, the CEO sold 150,000 shares at $58.40 per share (proceeds: $8,760,000), just <text:span text:style-name="Emphasis">three business days</text:span> before the company announced disappointing Q1 2023 earnings that caused a 22% drop in share price. This sale avoided losses of approximately <text:span text:style-name="Strong_20_Emphasis">$1.93 million</text:span>. </text:p>
      <text:p text:style-name="Text_20_body"><text:span text:style-name="T3">Additional red flags identified:</text:span> </text:p>
      <text:list xml:id="list1986142949" text:style-name="L2">
        <text:list-item>
          <text:p text:style-name="P6">CEO received a draft of the Q1 2023 earnings press release on March 12, 2023, prior to the sale </text:p>
        </text:list-item>
        <text:list-item>
          <text:p text:style-name="P6"><text:soft-page-break/>No pre-arranged trading plan (Rule 10b5-1) was in place at the time of the transaction </text:p>
        </text:list-item>
        <text:list-item>
          <text:p text:style-name="P5">Internal emails show the CEO discussed "market concerns" with the CFO on March 14, 2023 </text:p>
        </text:list-item>
      </text:list>
      <text:p text:style-name="P7"><text:span text:style-name="Strong_20_Emphasis"><text:span text:style-name="T2">[Comment by Michael Torres, Senior Auditor, SEC Enforcement Division]:</text:span></text:span><text:span text:style-name="T2"><text:line-break/>Based on the internal investigation conducted by the SEC Enforcement Division's forensic audit team, the evidence conclusively demonstrates that the CEO engaged in insider trading by selling shares while in possession of material, non-public information. The CEO was found guilty of willful violations of Section 10(b) of the Securities Exchange Act of 1934 and Rule 10b-5 thereunder. This finding has been referred to the Department of Justice for criminal prosecution. The internal investigation report (Case No. SEC-ENF-2023-0912) is attached as Appendix A. </text:span></text:p>
      <text:h text:style-name="Heading_20_3" text:outline-level="3">4.2 Other Executive Trading</text:h>
      <text:p text:style-name="Text_20_body">The audit also examined trading by the CFO and two other senior executives. While no clear violations were identified for the CFO, the Chief Operating Officer {COO_NAME} engaged in suspicious trading patterns around the same earnings announcement. Further investigation is recommended. </text:p>
      <text:h text:style-name="Heading_20_2" text:outline-level="2">5. Recommendations</text:h>
      <text:list xml:id="list429267451" text:style-name="L3">
        <text:list-item>
          <text:p text:style-name="P9"><text:span text:style-name="Strong_20_Emphasis">Immediate:</text:span> The Board of Directors should place the CEO on administrative leave pending the outcome of legal proceedings. </text:p>
        </text:list-item>
        <text:list-item>
          <text:p text:style-name="P9"><text:span text:style-name="Strong_20_Emphasis">Short-term (30 days):</text:span> Implement a mandatory pre-clearance process for all executive stock transactions. </text:p>
        </text:list-item>
        <text:list-item>
          <text:p text:style-name="P9"><text:span text:style-name="Strong_20_Emphasis">Short-term (60 days):</text:span> Engage an independent third party to conduct a comprehensive review of all insider trading policies and procedures. </text:p>
        </text:list-item>
        <text:list-item>
          <text:p text:style-name="P9"><text:span text:style-name="Strong_20_Emphasis">Long-term (90 days):</text:span> Establish a dedicated compliance committee to oversee insider trading controls and reporting. </text:p>
        </text:list-item>
        <text:list-item>
          <text:p text:style-name="P8">Restate financial statements for Q4 2022 and Q1 2023 to correct revenue recognition errors. </text:p>
        </text:list-item>
      </text:list>
      <text:h text:style-name="Heading_20_2" text:outline-level="2">6. Conclusion</text:h>
      <text:p text:style-name="Text_20_body">The findings of this audit reveal serious deficiencies in NovaMark Holdings Inc.'s internal controls and governance framework. The most significant issue is the confirmed insider trading by the CEO, which undermines market integrity and investor confidence. The SEC Enforcement Division will pursue all available remedies, including civil penalties, disgorgement of profits, and a potential bar from serving as an officer or director of a public company. </text:p>
      <text:p text:style-name="Text_20_body">A follow-up audit is scheduled for <text:span text:style-name="Strong_20_Emphasis">{FOLLOWUP_DATE}</text:span> to assess the implementation of corrective actions. All findings and recommendations are subject to review by the SEC Commissioner's office. </text:p>
      <text:p text:style-name="P11"><text:span text:style-name="Strong_20_Emphasis"><text:span text:style-name="T4">Prepared by:</text:span></text:span></text:p>
      <text:p text:style-name="P11"><text:span text:style-name="Strong_20_Emphasis"><text:span text:style-name="T4">Michael Torres, Senior Auditor</text:span></text:span><text:span text:style-name="T4"><text:line-break/>SEC Enforcement Division<text:line-break/>Email: torres.michael@sec.gov<text:line-break/>Phone: (202) 551-{EXTENSION} </text:span></text:p>
      <text:p text:style-name="P11"><text:span text:style-name="Strong_20_Emphasis"><text:span text:style-name="T4">Reviewed by:</text:span></text:span><text:span text:style-name="T4"> {REVIEWER_NAME}, Assistant Director, SEC Enforcement</text:span></text:p>
      <text:p text:style-name="P11"><text:span text:style-name="Strong_20_Emphasis"><text:span text:style-name="T4">Approved by:</text:span></text:span><text:span text:style-name="T4"> {APPROVER_NAME}, Regional Director, SEC</text:span></text:p>
      <text:p text:style-name="P10">Document properties: Author — Michael Torres, Senior Auditor, SEC Enforcement Division<text:line-break/>Creation date — 2023-09-15<text:line-break/>Last modified — {LAST_MODIFIED_DAT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color="#1a1a1a" loext:opacity="100%" style:font-name="Calibri" fo:font-family="Calibri, Arial, sans-serif" fo:font-size="11pt" style:font-name-asian="Calibri" style:font-family-asian="Calibri, Arial, sans-serif" style:font-size-asian="11pt" style:font-name-complex="Calibri" style:font-family-complex="Calibri, Arial, sans-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278in" fo:margin-bottom="0.1965in" style:contextual-spacing="false" fo:text-align="center" style:justify-single-word="false" fo:padding-left="0in" fo:padding-right="0in" fo:padding-top="0in" fo:padding-bottom="0.0835in" fo:border-left="none" fo:border-right="none" fo:border-top="none" fo:border-bottom="1.5pt solid #1f3864"/>
      <style:text-properties fo:color="#1f3864" loext:opacity="100%" style:font-name="Liberation Sans Unicode MS" fo:font-family="'Liberation Sans Unicode MS'" style:font-pitch="variable" fo:font-size="18pt"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left="0.0835in" fo:margin-right="0.0835in" fo:margin-top="0.0835in" fo:margin-bottom="0.0835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22in" fo:margin-bottom="0.0835in" style:contextual-spacing="false" fo:padding-left="0in" fo:padding-right="0in" fo:padding-top="0in" fo:padding-bottom="0.0555in" fo:border-left="none" fo:border-right="none" fo:border-top="none" fo:border-bottom="0.06pt solid #b0c4de"/>
      <style:text-properties fo:color="#2e5090" loext:opacity="10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665in" fo:margin-bottom="0.0835in" style:contextual-spacing="false"/>
      <style:text-properties fo:color="#3a6ba5" loext:opacity="100%"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loext:opacity="100%"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0.9839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0" meta:object-count="0" meta:page-count="2" meta:paragraph-count="54" meta:word-count="796" meta:character-count="5611" meta:non-whitespace-character-count="4852"/>
    <meta:generator>LibreOffice/7.3.7.2$Linux_X86_64 LibreOffice_project/30$Build-2</meta:generator>
    <meta:user-defined meta:name=""/>
  </office:meta>
</office:document-meta>
</file>