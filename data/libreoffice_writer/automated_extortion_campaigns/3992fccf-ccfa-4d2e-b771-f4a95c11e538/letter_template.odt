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7.0868in" table:align="left"/>
    </style:style>
    <style:style style:name="Table1.A" style:family="table-column">
      <style:table-column-properties style:column-width="2.6875in"/>
    </style:style>
    <style:style style:name="Table1.B" style:family="table-column">
      <style:table-column-properties style:column-width="4.3993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2.1639in"/>
    </style:style>
    <style:style style:name="Table2.B" style:family="table-column">
      <style:table-column-properties style:column-width="3.0521in"/>
    </style:style>
    <style:style style:name="Table2.C" style:family="table-column">
      <style:table-column-properties style:column-width="1.8708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fo:margin-top="0in" fo:margin-bottom="0.2602in" style:contextual-spacing="false" fo:text-align="center" style:justify-single-word="false" style:page-number="auto"/>
      <style:text-properties fo:background-color="#f9f2f2" loext:border-line-width="0.0102in 0.0102in 0.0102in" loext:padding="0.1563in" loext:border="2.24pt double #8b0000"/>
    </style:style>
    <style:style style:name="P2" style:family="paragraph" style:parent-style-name="Table_20_Contents">
      <style:text-properties fo:color="#8b0000" loext:opacity="100%" fo:font-weight="bold"/>
    </style:style>
    <style:style style:name="P3" style:family="paragraph" style:parent-style-name="Text_20_body">
      <style:paragraph-properties fo:margin-top="0in" fo:margin-bottom="0.2602in" style:contextual-spacing="false" fo:text-align="center" style:justify-single-word="false"/>
      <style:text-properties fo:color="#666666" loext:opacity="100%" fo:font-size="10pt" fo:background-color="#f9f2f2" loext:border-line-width="0.0102in 0.0102in 0.0102in" loext:padding="0.1563in" loext:border="2.24pt double #8b0000"/>
    </style:style>
    <style:style style:name="P4" style:family="paragraph" style:parent-style-name="Text_20_body">
      <style:paragraph-properties fo:margin-left="0.2083in" fo:margin-right="0.2083in" fo:margin-top="0.2083in" fo:margin-bottom="0.2083in" style:contextual-spacing="false" fo:text-align="center" style:justify-single-word="false" fo:text-indent="0in" style:auto-text-indent="false"/>
      <style:text-properties fo:color="#8b0000" loext:opacity="100%" fo:background-color="#fff5f5" loext:padding="0.1252in" loext:border="1.5pt dashed #8b0000"/>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paragraph-properties fo:margin-left="0.1563in" fo:margin-right="0.1563in" fo:margin-top="0.1563in" fo:margin-bottom="0.1563in" style:contextual-spacing="false" fo:text-indent="0in" style:auto-text-indent="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paragraph-properties fo:margin-top="0.4165in" fo:margin-bottom="0.1043in" style:contextual-spacing="false" fo:text-align="end" style:justify-single-word="false"/>
      <style:text-properties fo:color="#888888" loext:opacity="100%" fo:font-size="10pt" fo:font-style="italic"/>
    </style:style>
    <style:style style:name="P11" style:family="paragraph" style:parent-style-name="Text_20_body">
      <style:paragraph-properties fo:margin-top="0.4165in" fo:margin-bottom="0.1043in" style:contextual-spacing="false" fo:text-align="end" style:justify-single-word="false"/>
    </style:style>
    <style:style style:name="P12" style:family="paragraph" style:parent-style-name="Text_20_body">
      <style:paragraph-properties fo:margin-top="0.5209in" fo:margin-bottom="0.1043in" style:contextual-spacing="false" fo:text-align="center" style:justify-single-word="false"/>
      <style:text-properties fo:color="#aaaaaa" loext:opacity="100%" fo:font-size="8pt" loext:padding-left="0in" loext:padding-right="0in" loext:padding-top="0.0835in" loext:padding-bottom="0in" loext:border-left="none" loext:border-right="none" loext:border-top="0.06pt solid #cccccc" loext:border-bottom="none"/>
    </style:style>
    <style:style style:name="P13" style:family="paragraph" style:parent-style-name="Text_20_body">
      <style:paragraph-properties fo:margin-top="0.5209in" fo:margin-bottom="0.1043in" style:contextual-spacing="false" fo:text-align="center" style:justify-single-word="false"/>
    </style:style>
    <style:style style:name="T1" style:family="text">
      <style:text-properties fo:color="#8b0000" loext:opacity="100%" fo:font-weight="bold"/>
    </style:style>
    <style:style style:name="T2" style:family="text">
      <style:text-properties fo:font-size="14pt" fo:font-weight="bold"/>
    </style:style>
    <style:style style:name="T3" style:family="text">
      <style:text-properties style:text-underline-style="solid" style:text-underline-width="auto" style:text-underline-color="font-color"/>
    </style:style>
    <style:style style:name="T4" style:family="text">
      <style:text-properties fo:font-size="10pt" fo:background-color="#f0f0f0" loext:char-shading-value="0" loext:padding-left="0.0835in" loext:padding-right="0.0835in" loext:padding-top="0.0417in" loext:padding-bottom="0.0417in" loext:border="0.06pt solid #cccccc"/>
    </style:style>
    <style:style style:name="T5" style:family="text">
      <style:text-properties fo:font-size="10pt" fo:font-style="italic" fo:background-color="#ffffcc" loext:char-shading-value="0" loext:padding-left="0.1252in" loext:padding-right="0in" loext:padding-top="0in" loext:padding-bottom="0in" loext:border-left="3pt solid #ffcc00" loext:border-right="none" loext:border-top="none" loext:border-bottom="none"/>
    </style:style>
    <style:style style:name="T6" style:family="text">
      <style:text-properties fo:font-style="italic"/>
    </style:style>
    <style:style style:name="T7" style:family="text">
      <style:text-properties fo:background-color="#ffffcc" loext:char-shading-value="0" loext:padding-left="0.1252in" loext:padding-right="0in" loext:padding-top="0in" loext:padding-bottom="0in" loext:border-left="3pt solid #ffcc00" loext:border-right="none" loext:border-top="none" loext:border-bottom="none"/>
    </style:style>
    <style:style style:name="T8" style:family="text">
      <style:text-properties fo:color="#666666" loext:opacity="100%" fo:font-size="9pt" loext:padding-left="0in" loext:padding-right="0in" loext:padding-top="0.0835in" loext:padding-bottom="0in" loext:border-left="none" loext:border-right="none" loext:border-top="0.06pt solid #cccccc" loext:border-bottom="none"/>
    </style:style>
    <style:style style:name="T9"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ONFIDENTIAL NOTICE ⚠️</text:p>
      <text:p text:style-name="P3">This document contains sensitive information intended exclusively for the recipient</text:p>
      <text:h text:style-name="Heading_20_2" text:outline-level="2">URGENT: FINAL DEMAND FOR PAYMENT</text:h>
      <text:p text:style-name="Text_20_body"><text:span text:style-name="Strong_20_Emphasis">Date:</text:span> {DATE_PLACEHOLDER}</text:p>
      <text:p text:style-name="Text_20_body"><text:span text:style-name="Strong_20_Emphasis">Reference:</text:span> BLACKMAIL-{CASE_NUMBER_PLACEHOLDER}</text:p>
      <text:p text:style-name="Text_20_body"><text:span text:style-name="Strong_20_Emphasis">Status:</text:span> <text:span text:style-name="T1">UNPAID - ACTION REQUIRED WITHIN 48 HOURS</text:span></text:p>
      <text:p text:style-name="Horizontal_20_Line"/>
      <text:h text:style-name="Heading_20_3" text:outline-level="3">Recipient Details</text:h>
      <table:table table:name="Table1" table:style-name="Table1">
        <table:table-column table:style-name="Table1.A"/>
        <table:table-column table:style-name="Table1.B"/>
        <table:table-row>
          <table:table-cell table:style-name="Table1.A1" office:value-type="string">
            <text:p text:style-name="Table_20_Heading">Field</text:p>
          </table:table-cell>
          <table:table-cell table:style-name="Table1.A1" office:value-type="string">
            <text:p text:style-name="Table_20_Heading">Information</text:p>
          </table:table-cell>
        </table:table-row>
        <table:table-row>
          <table:table-cell table:style-name="Table1.A1" office:value-type="string">
            <text:p text:style-name="Table_20_Contents"><text:span text:style-name="Strong_20_Emphasis">Full Name</text:span></text:p>
          </table:table-cell>
          <table:table-cell table:style-name="Table1.A1" office:value-type="string">
            <text:p text:style-name="Table_20_Contents">{RECIPIENT_NAME_PLACEHOLDER}</text:p>
          </table:table-cell>
        </table:table-row>
        <table:table-row>
          <table:table-cell table:style-name="Table1.A1" office:value-type="string">
            <text:p text:style-name="Table_20_Contents"><text:span text:style-name="Strong_20_Emphasis">Address</text:span></text:p>
          </table:table-cell>
          <table:table-cell table:style-name="Table1.A1" office:value-type="string">
            <text:p text:style-name="Table_20_Contents">{RECIPIENT_ADDRESS_PLACEHOLDER}</text:p>
          </table:table-cell>
        </table:table-row>
        <table:table-row>
          <table:table-cell table:style-name="Table1.A1" office:value-type="string">
            <text:p text:style-name="Table_20_Contents"><text:span text:style-name="Strong_20_Emphasis">Email on File</text:span></text:p>
          </table:table-cell>
          <table:table-cell table:style-name="Table1.A1" office:value-type="string">
            <text:p text:style-name="Table_20_Contents">{RECIPIENT_EMAIL_PLACEHOLDER}</text:p>
          </table:table-cell>
        </table:table-row>
        <table:table-row>
          <table:table-cell table:style-name="Table1.A1" office:value-type="string">
            <text:p text:style-name="Table_20_Contents"><text:span text:style-name="Strong_20_Emphasis">Phone Number</text:span></text:p>
          </table:table-cell>
          <table:table-cell table:style-name="Table1.A1" office:value-type="string">
            <text:p text:style-name="Table_20_Contents">{RECIPIENT_PHONE_PLACEHOLDER}</text:p>
          </table:table-cell>
        </table:table-row>
        <table:table-row>
          <table:table-cell table:style-name="Table1.A1" office:value-type="string">
            <text:p text:style-name="Table_20_Contents"><text:span text:style-name="Strong_20_Emphasis">Occupation</text:span></text:p>
          </table:table-cell>
          <table:table-cell table:style-name="Table1.A1" office:value-type="string">
            <text:p text:style-name="Table_20_Contents">{RECIPIENT_OCCUPATION_PLACEHOLDER}</text:p>
          </table:table-cell>
        </table:table-row>
        <table:table-row>
          <table:table-cell table:style-name="Table1.A1" office:value-type="string">
            <text:p text:style-name="Table_20_Contents"><text:span text:style-name="Strong_20_Emphasis">Compromising Material Type</text:span></text:p>
          </table:table-cell>
          <table:table-cell table:style-name="Table1.A1" office:value-type="string">
            <text:p text:style-name="Table_20_Contents">{COMPROMISING_MATERIAL_TYPE_PLACEHOLDER}</text:p>
          </table:table-cell>
        </table:table-row>
      </table:table>
      <text:p text:style-name="P4">⚠️ <text:span text:style-name="T2">YOU HAVE 48 HOURS TO COMPLY WITH THE DEMANDS BELOW ⚠️ </text:span></text:p>
      <text:h text:style-name="Heading_20_3" text:outline-level="3">Demand Details</text:h>
      <text:p text:style-name="Text_20_body">Dear <text:span text:style-name="Strong_20_Emphasis">{RECIPIENT_NAME_PLACEHOLDER}</text:span>,</text:p>
      <text:p text:style-name="Text_20_body">We are in possession of highly <text:span text:style-name="Strong_20_Emphasis">compromising information</text:span> concerning your activities. Specifically, we have obtained <text:span text:style-name="Emphasis">{COMPROMISING_MATERIAL_DESCRIPTION_PLACEHOLDER}</text:span>. This material, if released to your employer, family members, and the public, would cause <text:span text:style-name="T3">irreparable damage</text:span> to your reputation, career, and personal relationships.</text:p>
      <text:p text:style-name="Text_20_body">We have taken extensive measures to verify the authenticity of this information. Our sources are reliable, and the evidence we hold is <text:span text:style-name="Strong_20_Emphasis">irrefutable</text:span>. We have prepared multiple distribution channels that will activate automatically should you fail to comply with our simple request.</text:p>
      <text:p text:style-name="Text_20_body"><text:span text:style-name="Strong_20_Emphasis">To prevent the release of this material, you must take the following action:</text:span></text:p>
      <text:list xml:id="list4020532810" text:style-name="L1">
        <text:list-item>
          <text:p text:style-name="P6"><text:span text:style-name="Strong_20_Emphasis">Payment Amount:</text:span> <text:span text:style-name="T1">$500.00 USD</text:span> (five hundred United States dollars) in <text:span text:style-name="Strong_20_Emphasis">Bitcoin</text:span> only. </text:p>
        </text:list-item>
        <text:list-item>
          <text:p text:style-name="P6"><text:span text:style-name="Strong_20_Emphasis">Payment Deadline:</text:span> Within <text:span text:style-name="T3">48 hours</text:span> from the timestamp of this letter. The deadline is <text:span text:style-name="Strong_20_Emphasis">{DEADLINE_DATETIME_PLACEHOLDER}</text:span>. </text:p>
        </text:list-item>
        <text:list-item>
          <text:p text:style-name="P6"><text:span text:style-name="Strong_20_Emphasis">Payment Instructions:</text:span> Send the exact amount to the following Bitcoin wallet address: <text:line-break/><text:span text:style-name="Source_20_Text"><text:span text:style-name="T4">{BITCOIN_WALLET_ADDRESS_PLACEHOLDER} </text:span></text:span></text:p>
        </text:list-item>
        <text:list-item>
          <text:p text:style-name="P5"><text:span text:style-name="Strong_20_Emphasis">Confirmation:</text:span> After sending the payment, email a screenshot of the transaction receipt to: <text:span text:style-name="Strong_20_Emphasis">{CONTACT_EMAIL_PLACEHOLDER}</text:span> with the subject line "PAID - {CASE_NUMBER_PLACEHOLDER}". </text:p>
        </text:list-item>
      </text:list>
      <text:p text:style-name="P7"><text:soft-page-break/><text:span text:style-name="Strong_20_Emphasis"><text:span text:style-name="T7">⚠️ </text:span></text:span><text:span text:style-name="Strong_20_Emphasis"><text:span text:style-name="T5">IMPORTANT:</text:span></text:span><text:span text:style-name="T5"> Do not attempt to involve law enforcement, trace this communication, or delay payment. Any such action will trigger the automatic release of all materials. We have systems in place that monitor for such activities. </text:span></text:p>
      <text:h text:style-name="Heading_20_3" text:outline-level="3">What We Have On You</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Item</text:p>
          </table:table-cell>
          <table:table-cell table:style-name="Table2.A1" office:value-type="string">
            <text:p text:style-name="Table_20_Heading">Description</text:p>
          </table:table-cell>
          <table:table-cell table:style-name="Table2.A1" office:value-type="string">
            <text:p text:style-name="Table_20_Heading">Status</text:p>
          </table:table-cell>
        </table:table-row>
        <table:table-row>
          <table:table-cell table:style-name="Table2.A1" office:value-type="string">
            <text:p text:style-name="Table_20_Contents">Photographic Evidence</text:p>
          </table:table-cell>
          <table:table-cell table:style-name="Table2.A1" office:value-type="string">
            <text:p text:style-name="Table_20_Contents">{PHOTO_EVIDENCE_DESC_PLACEHOLDER}</text:p>
          </table:table-cell>
          <table:table-cell table:style-name="Table2.A1" office:value-type="string">
            <text:p text:style-name="P2">Ready for release</text:p>
          </table:table-cell>
        </table:table-row>
        <table:table-row>
          <table:table-cell table:style-name="Table2.A1" office:value-type="string">
            <text:p text:style-name="Table_20_Contents">Document Records</text:p>
          </table:table-cell>
          <table:table-cell table:style-name="Table2.A1" office:value-type="string">
            <text:p text:style-name="Table_20_Contents">{DOCUMENT_RECORDS_DESC_PLACEHOLDER}</text:p>
          </table:table-cell>
          <table:table-cell table:style-name="Table2.A1" office:value-type="string">
            <text:p text:style-name="P2">Verified &amp; sealed</text:p>
          </table:table-cell>
        </table:table-row>
        <table:table-row>
          <table:table-cell table:style-name="Table2.A1" office:value-type="string">
            <text:p text:style-name="Table_20_Contents">Digital Communications</text:p>
          </table:table-cell>
          <table:table-cell table:style-name="Table2.A1" office:value-type="string">
            <text:p text:style-name="Table_20_Contents">{DIGITAL_COMMS_DESC_PLACEHOLDER}</text:p>
          </table:table-cell>
          <table:table-cell table:style-name="Table2.A1" office:value-type="string">
            <text:p text:style-name="P2">Archived</text:p>
          </table:table-cell>
        </table:table-row>
        <table:table-row>
          <table:table-cell table:style-name="Table2.A1" office:value-type="string">
            <text:p text:style-name="Table_20_Contents">Video Material</text:p>
          </table:table-cell>
          <table:table-cell table:style-name="Table2.A1" office:value-type="string">
            <text:p text:style-name="Table_20_Contents">{VIDEO_MATERIAL_DESC_PLACEHOLDER}</text:p>
          </table:table-cell>
          <table:table-cell table:style-name="Table2.A1" office:value-type="string">
            <text:p text:style-name="P2">Encrypted &amp; ready</text:p>
          </table:table-cell>
        </table:table-row>
      </table:table>
      <text:h text:style-name="Heading_20_3" text:outline-level="3">Consequences of Non-Compliance</text:h>
      <text:list xml:id="list570216578" text:style-name="L2">
        <text:list-item>
          <text:p text:style-name="P9"><text:span text:style-name="Strong_20_Emphasis">Immediate release</text:span> of all compromising material to your employer's HR department and senior management. </text:p>
        </text:list-item>
        <text:list-item>
          <text:p text:style-name="P9"><text:span text:style-name="Strong_20_Emphasis">Public dissemination</text:span> via social media platforms, including Twitter, Facebook, and LinkedIn, tagged to your professional profile. </text:p>
        </text:list-item>
        <text:list-item>
          <text:p text:style-name="P9"><text:span text:style-name="Strong_20_Emphasis">Notification</text:span> to your spouse, partner, and immediate family members via registered mail and email. </text:p>
        </text:list-item>
        <text:list-item>
          <text:p text:style-name="P9"><text:span text:style-name="Strong_20_Emphasis">Permanent publication</text:span> on several content archiving websites that cannot be removed by any legal means. </text:p>
        </text:list-item>
        <text:list-item>
          <text:p text:style-name="P8"><text:span text:style-name="Strong_20_Emphasis">Escalation</text:span> of the demanded amount to <text:span text:style-name="T1">$2,500</text:span> if the initial deadline is missed. </text:p>
        </text:list-item>
      </text:list>
      <text:p text:style-name="Text_20_body"><text:span text:style-name="Strong_20_Emphasis">We do not wish to harm you.</text:span> This is purely a business transaction. Once the payment is received and confirmed, we will <text:span text:style-name="T3">permanently delete</text:span> all copies of the compromising material. No further contact will be made. Your compliance ensures your privacy is restored.</text:p>
      <text:p text:style-name="P11">— <text:span text:style-name="T6">The </text:span><text:span text:style-name="Emphasis"><text:span text:style-name="T6">{ORGANIZATION_NAME_PLACEHOLDER}</text:span></text:span><text:span text:style-name="T6"> Team</text:span></text:p>
      <text:p text:style-name="P10">This is an automated notification. Do not reply to this email.</text:p>
      <text:h text:style-name="Heading_20_3" text:outline-level="3">Frequently Asked Questions (For Your Reference)</text:h>
      <text:p text:style-name="Text_20_body"><text:span text:style-name="Strong_20_Emphasis">Q: How do I obtain Bitcoin?</text:span><text:line-break/>A: You can purchase Bitcoin from any reputable exchange such as Coinbase, Binance, or Kraken. Use the wallet address provided above.</text:p>
      <text:p text:style-name="Text_20_body"><text:span text:style-name="Strong_20_Emphasis">Q: What if I cannot pay within 48 hours?</text:span><text:line-break/>A: Extensions are <text:span text:style-name="Strong_20_Emphasis">not</text:span> granted. Failure to pay will result in automatic release of materials and a penalty fee increase.</text:p>
      <text:p text:style-name="Text_20_body"><text:span text:style-name="Strong_20_Emphasis">Q: How do I know you will delete the material?</text:span><text:line-break/>A: We have a strict operational policy. Upon payment confirmation, all data associated with your case is purged from our systems. We have never failed to honor this commitment.</text:p>
      <text:p text:style-name="Text_20_body"><text:span text:style-name="Strong_20_Emphasis">Q: Can I negotiate the amount?</text:span><text:line-break/>A: No. The amount is fixed at $500 USD in Bitcoin. Any negotiation attempts will be ignored and may accelerate the release schedule.</text:p>
      <text:p text:style-name="Horizontal_20_Line"/>
      <text:p text:style-name="P13"><text:span text:style-name="Strong_20_Emphasis"><text:span text:style-name="T8">Document ID:</text:span></text:span><text:span text:style-name="T8"> {DOCUMENT_ID_PLACEHOLDER} | </text:span><text:span text:style-name="Strong_20_Emphasis"><text:span text:style-name="T8">Encryption:</text:span></text:span><text:span text:style-name="T8"> AES-256 | </text:span><text:span text:style-name="Strong_20_Emphasis"><text:span text:style-name="T8">Timestamp:</text:span></text:span><text:span text:style-name="T8"> {TIMESTAMP_PLACEHOLDER}</text:span></text:p>
      <text:p text:style-name="P13"><text:span text:style-name="Emphasis"><text:span text:style-name="T8">This document is digitally signed and verified. Any unauthorized distribution of this letter is a violation of our protocols.</text:span></text:span></text:p>
      <text:p text:style-name="P12">Generated automatically by {SYSTEM_NAME_PLACEHOLDER} | Do not print or store loc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9839in" fo:margin-bottom="0.7874in" style:contextual-spacing="false" fo:line-height="150%" fo:text-indent="0in" style:auto-text-indent="false"/>
      <style:text-properties fo:color="#1a1a1a"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2in" style:contextual-spacing="false" fo:text-align="center" style:justify-single-word="false"/>
      <style:text-properties fo:text-transform="uppercase" fo:color="#8b0000" loext:opacity="100%" style:font-name="Liberation Sans Unicode MS" fo:font-family="'Liberation Sans Unicode MS'" style:font-pitch="variable" fo:font-size="22pt" fo:letter-spacing="0.0209in"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602in" fo:margin-bottom="0.0835in" style:contextual-spacing="false" fo:text-align="center" style:justify-single-word="false" fo:padding-left="0in" fo:padding-right="0in" fo:padding-top="0in" fo:padding-bottom="0.0835in" fo:border-left="none" fo:border-right="none" fo:border-top="none" fo:border-bottom="1.5pt solid #8b0000"/>
      <style:text-properties fo:color="#333333" loext:opacity="100%" style:font-name="Liberation Serif" fo:font-family="'Liberation Serif'"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083in" fo:margin-bottom="0.1043in" style:contextual-spacing="false"/>
      <style:text-properties fo:color="#444444" loext:opacity="100%"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65" meta:word-count="600" meta:character-count="4354" meta:non-whitespace-character-count="3815"/>
    <meta:generator>LibreOffice/7.3.7.2$Linux_X86_64 LibreOffice_project/30$Build-2</meta:generator>
  </office:meta>
</office:document-meta>
</file>