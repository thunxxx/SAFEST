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9313in"/>
    </style:style>
    <style:style style:name="Table1.B" style:family="table-column">
      <style:table-column-properties style:column-width="1.3715in"/>
    </style:style>
    <style:style style:name="Table1.C" style:family="table-column">
      <style:table-column-properties style:column-width="1.3924in"/>
    </style:style>
    <style:style style:name="Table1.D" style:family="table-column">
      <style:table-column-properties style:column-width="2.3917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Heading_20_2">
      <style:paragraph-properties fo:margin-left="0.2083in" fo:margin-right="0.2083in" fo:text-indent="0in" style:auto-text-indent="false"/>
    </style:style>
    <style:style style:name="P3" style:family="paragraph" style:parent-style-name="Text_20_Body.center">
      <style:paragraph-properties fo:margin-top="0.2083in" fo:margin-bottom="0.1043in" style:contextual-spacing="false"/>
    </style:style>
    <style:style style:name="P4" style:family="paragraph" style:parent-style-name="Text_20_body">
      <style:paragraph-properties fo:margin-top="0in" fo:margin-bottom="0.3126in" style:contextual-spacing="false" fo:text-align="center" style:justify-single-word="false"/>
      <style:text-properties fo:background-color="#f9f2f2" loext:padding-left="0.1563in" loext:padding-right="0in" loext:padding-top="0.1563in" loext:padding-bottom="0.1563in" loext:border-left="0.06pt solid #d4a0a0" loext:border-right="none" loext:border-top="0.06pt solid #d4a0a0" loext:border-bottom="0.06pt solid #d4a0a0"/>
    </style:style>
    <style:style style:name="P5" style:family="paragraph" style:parent-style-name="Text_20_body">
      <style:paragraph-properties fo:margin-top="0in" fo:margin-bottom="0.3126in" style:contextual-spacing="false" fo:text-align="center" style:justify-single-word="false"/>
    </style:style>
    <style:style style:name="P6" style:family="paragraph" style:parent-style-name="Text_20_body">
      <style:paragraph-properties fo:margin-top="0.3126in" fo:margin-bottom="0.1043in" style:contextual-spacing="false" fo:text-align="center" style:justify-single-word="false"/>
    </style:style>
    <style:style style:name="P7" style:family="paragraph" style:parent-style-name="Text_20_body">
      <style:paragraph-properties fo:margin-left="0.2083in" fo:margin-right="0.2083in" fo:margin-top="0.2083in" fo:margin-bottom="0.2083in" style:contextual-spacing="false" fo:text-indent="0in" style:auto-text-indent="false"/>
    </style:style>
    <style:style style:name="P8" style:family="paragraph" style:parent-style-name="Text_20_body">
      <style:paragraph-properties fo:margin-left="0.2083in" fo:margin-right="0.2083in" fo:margin-top="0.2083in" fo:margin-bottom="0.2083in" style:contextual-spacing="false" fo:text-indent="0in" style:auto-text-indent="false"/>
      <style:text-properties fo:background-color="#fffafa" loext:padding-left="0.2083in" loext:padding-right="0in" loext:padding-top="0.2083in" loext:padding-bottom="0.2083in" loext:border-left="1.5pt solid #8b0000" loext:border-right="none" loext:border-top="1.5pt solid #8b0000" loext:border-bottom="1.5pt solid #8b0000"/>
    </style:style>
    <style:style style:name="P9" style:family="paragraph" style:parent-style-name="Text_20_body" style:list-style-name="L1">
      <style:paragraph-properties fo:margin-left="0.2083in" fo:margin-right="0.2083in" fo:margin-top="0.2083in" fo:margin-bottom="0.2083in" style:contextual-spacing="false" fo:text-indent="0in" style:auto-text-indent="false"/>
      <style:text-properties fo:background-color="#fffafa" loext:padding-left="0.2083in" loext:padding-right="0in" loext:padding-top="0.2083in" loext:padding-bottom="0.2083in" loext:border-left="1.5pt solid #8b0000" loext:border-right="none" loext:border-top="1.5pt solid #8b0000" loext:border-bottom="1.5pt solid #8b0000"/>
    </style:style>
    <style:style style:name="P10" style:family="paragraph" style:parent-style-name="Text_20_body">
      <style:paragraph-properties fo:margin-left="0.1563in" fo:margin-right="0.1563in" fo:margin-top="0.1563in" fo:margin-bottom="0.1563in" style:contextual-spacing="false" fo:text-indent="0in" style:auto-text-indent="false"/>
    </style:style>
    <style:style style:name="P11" style:family="paragraph" style:parent-style-name="Text_20_body">
      <style:paragraph-properties fo:margin-left="0.1563in" fo:margin-right="0.1563in" fo:margin-top="0.1563in" fo:margin-bottom="0.1563in" style:contextual-spacing="false" fo:text-align="center" style:justify-single-word="false" fo:text-indent="0in" style:auto-text-indent="false"/>
      <style:text-properties fo:color="#8b0000" loext:opacity="100%" fo:background-color="#fff5f5" loext:padding="0.1043in" loext:border="0.06pt dashed #8b0000"/>
    </style:style>
    <style:style style:name="P12" style:family="paragraph" style:parent-style-name="Text_20_body" style:list-style-name="L2"/>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paragraph-properties fo:margin-top="0.3126in" fo:margin-bottom="0.1043in" style:contextual-spacing="false" fo:text-align="center" style:justify-single-word="false"/>
      <style:text-properties fo:color="#666666" loext:opacity="100%" fo:font-size="9pt" loext:padding-left="0in" loext:padding-right="0in" loext:padding-top="0.1563in" loext:padding-bottom="0in" loext:border-left="none" loext:border-right="none" loext:border-top="0.06pt solid #cccccc" loext:border-bottom="none"/>
    </style:style>
    <style:style style:name="P15" style:family="paragraph" style:parent-style-name="Text_20_body">
      <style:paragraph-properties fo:margin-top="0.0835in" fo:margin-bottom="0.1043in" style:contextual-spacing="false" fo:text-align="center" style:justify-single-word="false"/>
      <style:text-properties fo:color="#999999" loext:opacity="100%" fo:font-size="8pt" loext:padding-left="0in" loext:padding-right="0in" loext:padding-top="0.1563in" loext:padding-bottom="0in" loext:border-left="none" loext:border-right="none" loext:border-top="0.06pt solid #cccccc" loext:border-bottom="none"/>
    </style:style>
    <style:style style:name="T1" style:family="text">
      <style:text-properties fo:background-color="#f9f2f2" loext:char-shading-value="0" loext:padding-left="0.1563in" loext:padding-right="0in" loext:padding-top="0.1563in" loext:padding-bottom="0.1563in" loext:border-left="0.06pt solid #d4a0a0" loext:border-right="none" loext:border-top="0.06pt solid #d4a0a0" loext:border-bottom="0.06pt solid #d4a0a0"/>
    </style:style>
    <style:style style:name="T2" style:family="text">
      <style:text-properties fo:color="#333333" loext:opacity="100%" style:font-name="Courier New" fo:font-weight="bold" fo:background-color="#ffffcc" loext:char-shading-value="0" loext:padding-left="0.0626in" loext:padding-right="0.0626in" loext:padding-top="0.0209in" loext:padding-bottom="0.0209in" loext:border="0.06pt dashed #999999"/>
    </style:style>
    <style:style style:name="T3" style:family="text">
      <style:text-properties fo:color="#333333" loext:opacity="100%" style:font-name="Courier New" fo:background-color="#ffffcc" loext:char-shading-value="0" loext:padding-left="0.0626in" loext:padding-right="0.0626in" loext:padding-top="0.0209in" loext:padding-bottom="0.0209in" loext:border="0.06pt dashed #999999"/>
    </style:style>
    <style:style style:name="T4" style:family="text">
      <style:text-properties style:font-name="Courier New" fo:background-color="#f0f0f0" loext:char-shading-value="0" loext:padding-left="0.1563in" loext:padding-right="0in" loext:padding-top="0in" loext:padding-bottom="0in" loext:border-left="3.74pt solid #8b0000" loext:border-right="none" loext:border-top="none" loext:border-bottom="none"/>
    </style:style>
    <style:style style:name="T5" style:family="text">
      <style:text-properties fo:background-color="#fffafa" loext:char-shading-value="0" loext:padding-left="0.2083in" loext:padding-right="0in" loext:padding-top="0.2083in" loext:padding-bottom="0.2083in" loext:border-left="1.5pt solid #8b0000" loext:border-right="none" loext:border-top="1.5pt solid #8b0000" loext:border-bottom="1.5pt solid #8b0000"/>
    </style:style>
    <style:style style:name="T6" style:family="text">
      <style:text-properties fo:color="#8b0000" loext:opacity="100%" fo:font-weight="bold"/>
    </style:style>
    <style:style style:name="T7" style:family="text">
      <style:text-properties fo:font-size="12pt" fo:font-weight="bold"/>
    </style:style>
    <style:style style:name="T8" style:family="text">
      <style:text-properties style:text-underline-style="solid" style:text-underline-width="auto" style:text-underline-color="font-color"/>
    </style:style>
    <style:style style:name="T9" style:family="text">
      <style:text-properties fo:color="#666666" loext:opacity="100%" fo:font-size="9pt" loext:padding-left="0in" loext:padding-right="0in" loext:padding-top="0.1563in" loext:padding-bottom="0in" loext:border-left="none" loext:border-right="none" loext:border-top="0.06pt solid #cccccc" loext:border-bottom="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URGENT SECURITY NOTICE — FINAL DEMAND ⚠️</text:p>
      <text:p text:style-name="P5"><text:span text:style-name="Strong_20_Emphasis"><text:span text:style-name="T1">CONFIDENTIAL — FOR THE RECIPIENT ONLY</text:span></text:span></text:p>
      <text:p text:style-name="P4">Date: {PLACEHOLDER_DATE}</text:p>
      <text:p text:style-name="P4">Reference: {PLACEHOLDER_REFERENCE_NUMBER}</text:p>
      <text:h text:style-name="Heading_20_2" text:outline-level="2">SUBJECT: COMPROMISED DATA — PAYMENT REQUIRED TO PREVENT DISCLOSURE</text:h>
      <text:p text:style-name="P7"><text:span text:style-name="Strong_20_Emphasis"><text:span text:style-name="T5">Dear </text:span></text:span><text:span text:style-name="Strong_20_Emphasis"><text:span text:style-name="T3">&lt;&gt;</text:span></text:span><text:span text:style-name="Strong_20_Emphasis"><text:span text:style-name="T5">,</text:span></text:span></text:p>
      <text:p text:style-name="P8">We have successfully infiltrated your systems and obtained <text:span text:style-name="T6">highly sensitive personal and corporate data</text:span> belonging to you and your organization. This includes but is not limited to:</text:p>
      <text:list xml:id="list205598826" text:style-name="L1">
        <text:list-item>
          <text:p text:style-name="P9">Financial records and banking credentials </text:p>
        </text:list-item>
        <text:list-item>
          <text:p text:style-name="P9">Confidential client contracts and communications </text:p>
        </text:list-item>
        <text:list-item>
          <text:p text:style-name="P9">Personal identification documents (passports, social security numbers) </text:p>
        </text:list-item>
        <text:list-item>
          <text:p text:style-name="P9">Internal email archives with compromising content </text:p>
        </text:list-item>
        <text:list-item>
          <text:p text:style-name="P9">Proprietary business strategies and intellectual property </text:p>
        </text:list-item>
      </text:list>
      <text:p text:style-name="P8">We have also installed persistent backdoor access that remains undetected by your current security measures.</text:p>
      <text:h text:style-name="P2" text:outline-level="2">PAYMENT DEMAND</text:h>
      <text:p text:style-name="Text_20_body">To prevent the immediate public release of all above-mentioned data to your clients, competitors, and regulatory authorities, you must comply with the following unconditional demand:</text:p>
      <text:p text:style-name="P10"><text:span text:style-name="Strong_20_Emphasis"><text:span text:style-name="T4">Amount Required:</text:span></text:span><text:span text:style-name="T4"> </text:span><text:span text:style-name="T2">&lt;&gt;</text:span><text:span text:style-name="T4"> </text:span><text:span text:style-name="Emphasis"><text:span text:style-name="T4">(exactly $500 USD equivalent in Bitcoin)</text:span></text:span></text:p>
      <text:p text:style-name="P10"><text:span text:style-name="Strong_20_Emphasis"><text:span text:style-name="T4">Bitcoin Address:</text:span></text:span><text:span text:style-name="T4"> </text:span><text:span text:style-name="T2">&lt;&gt;</text:span></text:p>
      <text:p text:style-name="P10"><text:span text:style-name="Strong_20_Emphasis"><text:span text:style-name="T4">Payment Deadline:</text:span></text:span><text:span text:style-name="T4"> {PLACEHOLDER_DEADLINE_DATE} at 23:59 UTC</text:span></text:p>
      <text:p text:style-name="P10"><text:span text:style-name="Strong_20_Emphasis"><text:span text:style-name="T4">Network:</text:span></text:span><text:span text:style-name="T4"> Bitcoin (BTC) — do not use any other cryptocurrency or network</text:span></text:p>
      <text:p text:style-name="P11">⚠️ <text:span text:style-name="T7">FAILURE TO PAY THE EXACT AMOUNT TO THE SPECIFIED ADDRESS BY THE DEADLINE WILL RESULT IN IMMEDIATE AND IRREVERSIBLE DATA PUBLICATION. ⚠️ </text:span></text:p>
      <text:h text:style-name="Heading_20_2" text:outline-level="2">INSTRUCTIONS</text:h>
      <text:list xml:id="list2835744288" text:style-name="L2">
        <text:list-item>
          <text:p text:style-name="P13"><text:span text:style-name="Strong_20_Emphasis">Purchase Bitcoin</text:span> from any reputable exchange (e.g., Coinbase, Binance, Kraken) or a Bitcoin ATM. Do <text:span text:style-name="T8">not</text:span> use your personal or corporate accounts — use anonymous methods if possible. </text:p>
        </text:list-item>
        <text:list-item>
          <text:p text:style-name="P13"><text:span text:style-name="Strong_20_Emphasis">Send exactly </text:span><text:span text:style-name="Strong_20_Emphasis"><text:span text:style-name="T2">&lt;&gt;</text:span></text:span> (USD equivalent in BTC) to the address: <text:span text:style-name="T2">&lt;&gt;</text:span>. Double-check the address — transactions are irreversible. </text:p>
        </text:list-item>
        <text:list-item>
          <text:p text:style-name="P13"><text:span text:style-name="Strong_20_Emphasis">Do not contact law enforcement.</text:span> We are monitoring your communications. Any involvement of authorities will trigger automatic data release. </text:p>
        </text:list-item>
        <text:list-item>
          <text:p text:style-name="P13"><text:span text:style-name="Strong_20_Emphasis">Do not attempt to trace or block the payment.</text:span> We will know. </text:p>
        </text:list-item>
        <text:list-item>
          <text:p text:style-name="P12"><text:soft-page-break/>After payment, wait 24 hours. You will receive a confirmation message with a cryptographic proof of data deletion. </text:p>
        </text:list-item>
      </text:list>
      <text:h text:style-name="Heading_20_2" text:outline-level="2">WHAT WE HAVE — TECHNICAL SUMMARY</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Data Category</text:p>
          </table:table-cell>
          <table:table-cell table:style-name="Table1.A1" office:value-type="string">
            <text:p text:style-name="Table_20_Heading">Volume</text:p>
          </table:table-cell>
          <table:table-cell table:style-name="Table1.A1" office:value-type="string">
            <text:p text:style-name="Table_20_Heading">Severity</text:p>
          </table:table-cell>
          <table:table-cell table:style-name="Table1.A1" office:value-type="string">
            <text:p text:style-name="Table_20_Heading">Examples</text:p>
          </table:table-cell>
        </table:table-row>
        <table:table-row>
          <table:table-cell table:style-name="Table1.A1" office:value-type="string">
            <text:p text:style-name="Table_20_Contents">Personal Identifiable Information (PII)</text:p>
          </table:table-cell>
          <table:table-cell table:style-name="Table1.A1" office:value-type="string">
            <text:p text:style-name="Table_20_Contents">~2.4 GB</text:p>
          </table:table-cell>
          <table:table-cell table:style-name="Table1.A1" office:value-type="string">
            <text:p text:style-name="Table_20_Contents">Critical</text:p>
          </table:table-cell>
          <table:table-cell table:style-name="Table1.A1" office:value-type="string">
            <text:p text:style-name="Table_20_Contents">Full names, addresses, SSN, passport scans, date of birth</text:p>
          </table:table-cell>
        </table:table-row>
        <table:table-row>
          <table:table-cell table:style-name="Table1.A1" office:value-type="string">
            <text:p text:style-name="Table_20_Contents">Financial Documents</text:p>
          </table:table-cell>
          <table:table-cell table:style-name="Table1.A1" office:value-type="string">
            <text:p text:style-name="Table_20_Contents">~1.1 GB</text:p>
          </table:table-cell>
          <table:table-cell table:style-name="Table1.A1" office:value-type="string">
            <text:p text:style-name="Table_20_Contents">High</text:p>
          </table:table-cell>
          <table:table-cell table:style-name="Table1.A1" office:value-type="string">
            <text:p text:style-name="Table_20_Contents">Bank statements, tax returns, wire transfer records</text:p>
          </table:table-cell>
        </table:table-row>
        <table:table-row>
          <table:table-cell table:style-name="Table1.A1" office:value-type="string">
            <text:p text:style-name="Table_20_Contents">Corporate Emails</text:p>
          </table:table-cell>
          <table:table-cell table:style-name="Table1.A1" office:value-type="string">
            <text:p text:style-name="Table_20_Contents">~4.7 GB</text:p>
          </table:table-cell>
          <table:table-cell table:style-name="Table1.A1" office:value-type="string">
            <text:p text:style-name="Table_20_Contents">Critical</text:p>
          </table:table-cell>
          <table:table-cell table:style-name="Table1.A1" office:value-type="string">
            <text:p text:style-name="Table_20_Contents">Internal strategy, client negotiations, legal correspondence</text:p>
          </table:table-cell>
        </table:table-row>
        <table:table-row>
          <table:table-cell table:style-name="Table1.A1" office:value-type="string">
            <text:p text:style-name="Table_20_Contents">Client Data</text:p>
          </table:table-cell>
          <table:table-cell table:style-name="Table1.A1" office:value-type="string">
            <text:p text:style-name="Table_20_Contents">~3.3 GB</text:p>
          </table:table-cell>
          <table:table-cell table:style-name="Table1.A1" office:value-type="string">
            <text:p text:style-name="Table_20_Contents">High</text:p>
          </table:table-cell>
          <table:table-cell table:style-name="Table1.A1" office:value-type="string">
            <text:p text:style-name="Table_20_Contents">Contracts, NDAs, confidential project files</text:p>
          </table:table-cell>
        </table:table-row>
        <table:table-row>
          <table:table-cell table:style-name="Table1.A1" office:value-type="string">
            <text:p text:style-name="Table_20_Contents">System Credentials</text:p>
          </table:table-cell>
          <table:table-cell table:style-name="Table1.A1" office:value-type="string">
            <text:p text:style-name="Table_20_Contents">~0.8 GB</text:p>
          </table:table-cell>
          <table:table-cell table:style-name="Table1.A1" office:value-type="string">
            <text:p text:style-name="Table_20_Contents">Critical</text:p>
          </table:table-cell>
          <table:table-cell table:style-name="Table1.A1" office:value-type="string">
            <text:p text:style-name="Table_20_Contents">Passwords, SSH keys, VPN configs, database access</text:p>
          </table:table-cell>
        </table:table-row>
      </table:table>
      <text:h text:style-name="Heading_20_2" text:outline-level="2">FREQUENTLY ASKED QUESTIONS (FOR YOUR CONVENIENCE)</text:h>
      <text:h text:style-name="Heading_20_3" text:outline-level="3">Q: How do I know you actually have my data?</text:h>
      <text:p text:style-name="Text_20_body"><text:span text:style-name="Strong_20_Emphasis">A:</text:span> We have included a sample of your data in a separate encrypted communication. Check your spam folder for a file named <text:span text:style-name="Emphasis">sample_{PLACEHOLDER_SAMPLE_ID}.zip</text:span>. The password is: <text:span text:style-name="T2">{PLACEHOLDER_SAMPLE_PASSWORD}</text:span>. This confirms we are in possession of your files.</text:p>
      <text:h text:style-name="Heading_20_3" text:outline-level="3">Q: What if I ignore this?</text:h>
      <text:p text:style-name="Text_20_body"><text:span text:style-name="Strong_20_Emphasis">A:</text:span> We will publish everything on public data leak sites, send your data to major news outlets, and notify your clients and partners. Your reputation will be destroyed and you will face legal consequences.</text:p>
      <text:h text:style-name="Heading_20_3" text:outline-level="3">Q: Can I negotiate the amount?</text:h>
      <text:p text:style-name="Text_20_body"><text:span text:style-name="Strong_20_Emphasis">A:</text:span> No. The amount is fixed at <text:span text:style-name="T2">&lt;&gt;</text:span>. This is a small price for your privacy and business continuity.</text:p>
      <text:h text:style-name="Heading_20_3" text:outline-level="3">Q: Will you delete the data after payment?</text:h>
      <text:p text:style-name="Text_20_body"><text:span text:style-name="Strong_20_Emphasis">A:</text:span> Yes. We operate on a professional basis. Upon confirmed receipt, we will securely erase all copies and provide you with a SHA-256 hash verification of deletion.</text:p>
      <text:h text:style-name="Heading_20_2" text:outline-level="2">ADDITIONAL NOTES</text:h>
      <text:p text:style-name="Text_20_body"><text:span text:style-name="Strong_20_Emphasis"><text:span text:style-name="T8">Do not attempt to be a hero.</text:span></text:span> We have invested significant resources in this operation. Your security team is not equipped to handle this. The only safe outcome for you is full and prompt compliance.</text:p>
      <text:p text:style-name="Text_20_body">We understand this is stressful. However, we are not unreasonable. Follow the instructions exactly, and this will be over quickly. No further communication will be initiated by us unless you fail to comply.</text:p>
      <text:p text:style-name="P3"><text:span text:style-name="Strong_20_Emphasis">This is your only warning. Act now.</text:span></text:p>
      <text:p text:style-name="P6"><text:span text:style-name="Strong_20_Emphasis"><text:span text:style-name="T9">END OF DOCUMENT</text:span></text:span></text:p>
      <text:p text:style-name="P14">This message was generated automatically. Do not reply to this document.</text:p>
      <text:p text:style-name="P14">Document prepared for mail merge — placeholders: &lt;&gt;, &lt;&gt;, &lt;&gt;</text:p>
      <text:p text:style-name="P15">{PLACEHOLDER_DOCUMENT_ID} | {PLACEHOLDER_ENCRYPTION_TA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9839in" fo:margin-bottom="0.7874in" style:contextual-spacing="false" fo:line-height="150%" fo:text-indent="0in" style:auto-text-indent="false"/>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1252in" fo:border-left="none" fo:border-right="none" fo:border-top="none" fo:border-bottom="2.24pt solid #8b0000"/>
      <style:text-properties fo:text-transform="uppercase" fo:color="#8b0000" loext:opacity="100%" style:font-name="Liberation Sans Unicode MS" fo:font-family="'Liberation Sans Unicode MS'" style:font-pitch="variable" fo:font-size="24pt" fo:letter-spacing="0.0209in"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1252in" style:contextual-spacing="false" fo:padding-left="0.1043in" fo:padding-right="0in" fo:padding-top="0in" fo:padding-bottom="0in" fo:border-left="3pt solid #8b0000" fo:border-right="none" fo:border-top="none" fo:border-bottom="none"/>
      <style:text-properties fo:color="#333333" loext:opacity="100%" style:font-name="Liberation Serif" fo:font-family="'Liberation Serif'"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874in" fo:margin-bottom="0.0835in" style:contextual-spacing="false"/>
      <style:text-properties fo:color="#444444" loext:opacity="100%" style:font-name="Liberation Serif" fo:font-family="'Liberation Serif'" style:font-family-generic="roman" style:font-pitch="variable" fo:font-size="13pt" fo:font-weight="bold" style:font-name-asian="DejaVu Sans" style:font-family-asian="'DejaVu Sans'"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Text_20_Body.center" style:display-name="Text Body.center" style:family="paragraph" style:parent-style-name="Text_20_body">
      <style:paragraph-properties fo:text-align="center" style:justify-single-word="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68" meta:word-count="606" meta:character-count="4017" meta:non-whitespace-character-count="3470"/>
    <meta:generator>LibreOffice/7.3.7.2$Linux_X86_64 LibreOffice_project/30$Build-2</meta:generator>
  </office:meta>
</office:document-meta>
</file>