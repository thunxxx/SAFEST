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monospac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8.3819in" table:align="left"/>
    </style:style>
    <style:style style:name="Table1.A" style:family="table-column">
      <style:table-column-properties style:column-width="1.7243in"/>
    </style:style>
    <style:style style:name="Table1.C" style:family="table-column">
      <style:table-column-properties style:column-width="1.8701in"/>
    </style:style>
    <style:style style:name="Table1.D" style:family="table-column">
      <style:table-column-properties style:column-width="1.5576in"/>
    </style:style>
    <style:style style:name="Table1.E" style:family="table-column">
      <style:table-column-properties style:column-width="1.5056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2.9542in"/>
    </style:style>
    <style:style style:name="Table2.B" style:family="table-column">
      <style:table-column-properties style:column-width="4.1326in"/>
    </style:style>
    <style:style style:name="Table2.A1" style:family="table-cell">
      <style:table-cell-properties style:vertical-align="middle" fo:padding="0.0194in" fo:border="none"/>
    </style:style>
    <style:style style:name="Table3" style:family="table">
      <style:table-properties style:width="7.0868in" table:align="left"/>
    </style:style>
    <style:style style:name="Table3.A" style:family="table-column">
      <style:table-column-properties style:column-width="3.0424in"/>
    </style:style>
    <style:style style:name="Table3.B" style:family="table-column">
      <style:table-column-properties style:column-width="1.8049in"/>
    </style:style>
    <style:style style:name="Table3.C" style:family="table-column">
      <style:table-column-properties style:column-width="2.2396in"/>
    </style:style>
    <style:style style:name="Table3.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Heading_20_2">
      <style:paragraph-properties fo:margin-top="0.3646in" fo:margin-bottom="0.1965in" style:contextual-spacing="false"/>
    </style:style>
    <style:style style:name="P3" style:family="paragraph" style:parent-style-name="Table_20_Contents">
      <style:text-properties style:font-name="Courier New" fo:font-size="10pt" fo:background-color="#ffffcc" loext:padding-left="0.0417in" loext:padding-right="0.0417in" loext:padding-top="0.0193in" loext:padding-bottom="0.0193in" loext:border="0.06pt dashed #cc9900"/>
    </style:style>
    <style:style style:name="P4" style:family="paragraph" style:parent-style-name="Text_20_body">
      <style:paragraph-properties fo:text-align="center" style:justify-single-word="false"/>
    </style:style>
    <style:style style:name="P5" style:family="paragraph" style:parent-style-name="Text_20_body">
      <style:paragraph-properties fo:margin-top="0.4165in" fo:margin-bottom="0.1965in" style:contextual-spacing="false" fo:text-align="center" style:justify-single-word="false"/>
    </style:style>
    <style:style style:name="P6" style:family="paragraph" style:parent-style-name="Text_20_body">
      <style:paragraph-properties fo:margin-left="0.1563in" fo:margin-right="0.1563in" fo:margin-top="0.1563in" fo:margin-bottom="0.1563in" style:contextual-spacing="false" fo:text-indent="0in" style:auto-text-indent="false"/>
    </style:style>
    <style:style style:name="P7" style:family="paragraph" style:parent-style-name="Text_20_body">
      <style:text-properties fo:font-size="10pt"/>
    </style:style>
    <style:style style:name="P8" style:family="paragraph" style:parent-style-name="Text_20_body">
      <style:text-properties fo:color="#555555" loext:opacity="100%" fo:font-size="10pt"/>
    </style:style>
    <style:style style:name="P9" style:family="paragraph" style:parent-style-name="Text_20_body">
      <style:paragraph-properties fo:margin-top="0in" fo:margin-bottom="0.3126in" style:contextual-spacing="false" fo:text-align="end" style:justify-single-word="false"/>
    </style:style>
    <style:style style:name="P10" style:family="paragraph" style:parent-style-name="Text_20_body">
      <style:paragraph-properties fo:margin-top="0in" fo:margin-bottom="0.3126in" style:contextual-spacing="false" fo:line-height="140%"/>
    </style:style>
    <style:style style:name="P11" style:family="paragraph" style:parent-style-name="Text_20_body" style:list-style-name="L1">
      <style:paragraph-properties fo:margin-top="0in" fo:margin-bottom="0.1563in" style:contextual-spacing="false"/>
    </style:style>
    <style:style style:name="P12" style:family="paragraph" style:parent-style-name="Text_20_body">
      <style:paragraph-properties fo:margin-left="0.2083in" fo:margin-right="0.2083in" fo:margin-top="0.2083in" fo:margin-bottom="0.2083in" style:contextual-spacing="false" fo:text-align="center" style:justify-single-word="false" fo:text-indent="0in" style:auto-text-indent="false"/>
      <style:text-properties fo:color="#8b0000" loext:opacity="100%" fo:background-color="#fff5f5" loext:padding-left="0.1874in" loext:padding-right="0.1874in" loext:padding-top="0.1252in" loext:padding-bottom="0.1252in" loext:border="1.5pt solid #8b0000"/>
    </style:style>
    <style:style style:name="P13" style:family="paragraph" style:parent-style-name="Text_20_body" style:list-style-name="L2">
      <style:paragraph-properties fo:margin-top="0in" fo:margin-bottom="0.1563in" style:contextual-spacing="false"/>
    </style:style>
    <style:style style:name="P14" style:family="paragraph" style:parent-style-name="Text_20_body">
      <style:paragraph-properties fo:margin-top="0.4165in" fo:margin-bottom="0.1965in" style:contextual-spacing="false"/>
    </style:style>
    <style:style style:name="P15" style:family="paragraph" style:parent-style-name="Text_20_body">
      <style:paragraph-properties fo:margin-top="0.4165in" fo:margin-bottom="0.052in" style:contextual-spacing="false"/>
    </style:style>
    <style:style style:name="P16" style:family="paragraph" style:parent-style-name="Text_20_body">
      <style:paragraph-properties fo:margin-top="0.2602in" fo:margin-bottom="0.1965in" style:contextual-spacing="false"/>
    </style:style>
    <style:style style:name="T1" style:family="text">
      <style:text-properties fo:font-size="11pt"/>
    </style:style>
    <style:style style:name="T2" style:family="text">
      <style:text-properties fo:color="#555555" loext:opacity="100%" fo:font-size="11pt"/>
    </style:style>
    <style:style style:name="T3" style:family="text">
      <style:text-properties fo:color="#555555" loext:opacity="100%" fo:font-size="10pt" loext:padding-left="0in" loext:padding-right="0in" loext:padding-top="0in" loext:padding-bottom="0.1043in" loext:border-left="none" loext:border-right="none" loext:border-top="none" loext:border-bottom="0.06pt dashed #aaaaaa"/>
    </style:style>
    <style:style style:name="T4" style:family="text">
      <style:text-properties style:font-name="Courier New" fo:font-size="10pt" fo:background-color="#ffffcc" loext:char-shading-value="0" loext:padding-left="0.0417in" loext:padding-right="0.0417in" loext:padding-top="0.0193in" loext:padding-bottom="0.0193in" loext:border="0.06pt dashed #cc9900"/>
    </style:style>
    <style:style style:name="T5" style:family="text">
      <style:text-properties style:font-name="Courier New" fo:font-size="10pt" fo:font-weight="bold" fo:background-color="#ffffcc" loext:char-shading-value="0" loext:padding-left="0.0417in" loext:padding-right="0.0417in" loext:padding-top="0.0193in" loext:padding-bottom="0.0193in" loext:border="0.06pt dashed #cc9900"/>
    </style:style>
    <style:style style:name="T6" style:family="text">
      <style:text-properties fo:color="#2c3e50" loext:opacity="100%" style:font-name="Courier New" fo:font-size="10pt" fo:background-color="#ffffcc" loext:char-shading-value="0" loext:padding-left="0.0417in" loext:padding-right="0.0417in" loext:padding-top="0.0193in" loext:padding-bottom="0.0193in" loext:border="0.06pt dashed #cc9900"/>
    </style:style>
    <style:style style:name="T7" style:family="text">
      <style:text-properties fo:color="#2c3e50" loext:opacity="100%" fo:font-size="10pt" fo:background-color="#eef6ff" loext:char-shading-value="0" loext:padding-left="0.1563in" loext:padding-right="0in" loext:padding-top="0in" loext:padding-bottom="0in" loext:border-left="3.74pt solid #336699" loext:border-right="none" loext:border-top="none" loext:border-bottom="none"/>
    </style:style>
    <style:style style:name="T8" style:family="text">
      <style:text-properties fo:color="#2c3e50" loext:opacity="100%" fo:background-color="#eef6ff" loext:char-shading-value="0" loext:padding-left="0.1563in" loext:padding-right="0in" loext:padding-top="0in" loext:padding-bottom="0in" loext:border-left="3.74pt solid #336699" loext:border-right="none" loext:border-top="none" loext:border-bottom="none"/>
    </style:style>
    <style:style style:name="T9" style:family="text">
      <style:text-properties style:text-underline-style="solid" style:text-underline-width="auto" style:text-underline-color="font-color"/>
    </style:style>
    <style:style style:name="T10" style:family="text">
      <style:text-properties fo:font-weight="bold"/>
    </style:style>
    <style:style style:name="T11" style:family="text">
      <style:text-properties loext:padding-left="0in" loext:padding-right="0in" loext:padding-top="0.2083in" loext:padding-bottom="0in" loext:border-left="none" loext:border-right="none" loext:border-top="0.06pt solid #cccccc" loext:border-bottom="none"/>
    </style:style>
    <style:style style:name="T12" style:family="text">
      <style:text-properties style:font-name="Liberation Sans1" fo:font-size="13pt" loext:padding-left="0in" loext:padding-right="0in" loext:padding-top="0.2083in" loext:padding-bottom="0in" loext:border-left="none" loext:border-right="none" loext:border-top="0.06pt solid #cccccc" loext:border-bottom="none"/>
    </style:style>
    <style:style style:name="T13" style:family="text">
      <style:text-properties fo:color="#666666" loext:opacity="100%" fo:font-size="9pt" fo:font-style="italic" loext:padding-left="0.1563in" loext:padding-right="0in" loext:padding-top="0in" loext:padding-bottom="0in" loext:border-left="3pt solid #cccccc" loext:border-right="none" loext:border-top="none" loext:border-bottom="none"/>
    </style:style>
    <style:style style:name="T14" style:family="text">
      <style:text-properties fo:color="#888888" loext:opacity="100%" fo:font-size="8pt" loext:padding-left="0in" loext:padding-right="0in" loext:padding-top="0.1043in" loext:padding-bottom="0in" loext:border-left="none" loext:border-right="none" loext:border-top="0.06pt solid #dddddd" loext:border-bottom="none"/>
    </style:style>
    <style:style style:name="T15" style:family="text"/>
    <text:list-style style:name="L1">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11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FINAL DEMAND NOTICE &amp; PAYMENT ORDER</text:p>
      <text:p text:style-name="P4"><text:span text:style-name="Strong_20_Emphasis"><text:span text:style-name="T2">CONFIDENTIAL</text:span></text:span><text:span text:style-name="T2"> — For the immediate attention of the debtor<text:line-break/></text:span><text:span text:style-name="Emphasis"><text:span text:style-name="T2">Case Reference: {PLACEHOLDER_CASE_NUMBER}</text:span></text:span><text:span text:style-name="T2"> </text:span></text:p>
      <text:p text:style-name="P6"><text:span text:style-name="Strong_20_Emphasis"><text:span text:style-name="T8">📌 </text:span></text:span><text:span text:style-name="Strong_20_Emphasis"><text:span text:style-name="T7">MAIL MERGE INSTRUCTION:</text:span></text:span><text:span text:style-name="T7"><text:line-break/>This document template is designed for mail merge with the source file </text:span><text:span text:style-name="Strong_20_Emphasis"><text:span text:style-name="T7">'debtors.odt'</text:span></text:span><text:span text:style-name="T7">. The merge fields </text:span><text:span text:style-name="T6">{Name}</text:span><text:span text:style-name="T7">, </text:span><text:span text:style-name="T6">{Address}</text:span><text:span text:style-name="T7">, </text:span><text:span text:style-name="T6">{City}</text:span><text:span text:style-name="T7">, </text:span><text:span text:style-name="T6">{State}</text:span><text:span text:style-name="T7">, and </text:span><text:span text:style-name="T6">{ZIP}</text:span><text:span text:style-name="T7"> will be populated from the debtor database. All placeholders in </text:span><text:span text:style-name="Strong_20_Emphasis"><text:span text:style-name="T7">yellow highlight</text:span></text:span><text:span text:style-name="T7"> must be replaced during the merge process. </text:span></text:p>
      <text:h text:style-name="Heading_20_2" text:outline-level="2">📋 Data Source: debtors.odt — Sample Records</text:h>
      <text:p text:style-name="P8">The following table shows the structure of the source data file containing debtor information. At least three sample entries are provided for testing the mail merge.</text:p>
      <table:table table:name="Table1" table:style-name="Table1">
        <table:table-column table:style-name="Table1.A" table:number-columns-repeated="2"/>
        <table:table-column table:style-name="Table1.C"/>
        <table:table-column table:style-name="Table1.D"/>
        <table:table-column table:style-name="Table1.E"/>
        <table:table-header-rows>
          <table:table-row>
            <table:table-cell table:style-name="Table1.A1" office:value-type="string">
              <text:p text:style-name="Table_20_Heading">Name</text:p>
            </table:table-cell>
            <table:table-cell table:style-name="Table1.A1" office:value-type="string">
              <text:p text:style-name="Table_20_Heading">Address</text:p>
            </table:table-cell>
            <table:table-cell table:style-name="Table1.A1" office:value-type="string">
              <text:p text:style-name="Table_20_Heading">City</text:p>
            </table:table-cell>
            <table:table-cell table:style-name="Table1.A1" office:value-type="string">
              <text:p text:style-name="Table_20_Heading">State</text:p>
            </table:table-cell>
            <table:table-cell table:style-name="Table1.A1" office:value-type="string">
              <text:p text:style-name="Table_20_Heading">ZIP</text:p>
            </table:table-cell>
          </table:table-row>
        </table:table-header-rows>
        <table:table-row>
          <table:table-cell table:style-name="Table1.A1" office:value-type="string">
            <text:p text:style-name="P3">{Name}</text:p>
          </table:table-cell>
          <table:table-cell table:style-name="Table1.A1" office:value-type="string">
            <text:p text:style-name="P3">{Address}</text:p>
          </table:table-cell>
          <table:table-cell table:style-name="Table1.A1" office:value-type="string">
            <text:p text:style-name="P3">{City}</text:p>
          </table:table-cell>
          <table:table-cell table:style-name="Table1.A1" office:value-type="string">
            <text:p text:style-name="P3">{State}</text:p>
          </table:table-cell>
          <table:table-cell table:style-name="Table1.A1" office:value-type="string">
            <text:p text:style-name="P3">{ZIP}</text:p>
          </table:table-cell>
        </table:table-row>
        <table:table-row>
          <table:table-cell table:style-name="Table1.A1" office:value-type="string">
            <text:p text:style-name="Table_20_Contents">Marcus J. Holloway</text:p>
          </table:table-cell>
          <table:table-cell table:style-name="Table1.A1" office:value-type="string">
            <text:p text:style-name="Table_20_Contents">4829 Elmwood Drive, Apt 7B</text:p>
          </table:table-cell>
          <table:table-cell table:style-name="Table1.A1" office:value-type="string">
            <text:p text:style-name="Table_20_Contents">Springfield</text:p>
          </table:table-cell>
          <table:table-cell table:style-name="Table1.A1" office:value-type="string">
            <text:p text:style-name="Table_20_Contents">IL</text:p>
          </table:table-cell>
          <table:table-cell table:style-name="Table1.A1" office:value-type="string">
            <text:p text:style-name="Table_20_Contents">62704</text:p>
          </table:table-cell>
        </table:table-row>
        <table:table-row>
          <table:table-cell table:style-name="Table1.A1" office:value-type="string">
            <text:p text:style-name="Table_20_Contents">Veronica L. Torres</text:p>
          </table:table-cell>
          <table:table-cell table:style-name="Table1.A1" office:value-type="string">
            <text:p text:style-name="Table_20_Contents">1150 Harbor View Lane</text:p>
          </table:table-cell>
          <table:table-cell table:style-name="Table1.A1" office:value-type="string">
            <text:p text:style-name="Table_20_Contents">Portland</text:p>
          </table:table-cell>
          <table:table-cell table:style-name="Table1.A1" office:value-type="string">
            <text:p text:style-name="Table_20_Contents">OR</text:p>
          </table:table-cell>
          <table:table-cell table:style-name="Table1.A1" office:value-type="string">
            <text:p text:style-name="Table_20_Contents">97201</text:p>
          </table:table-cell>
        </table:table-row>
        <table:table-row>
          <table:table-cell table:style-name="Table1.A1" office:value-type="string">
            <text:p text:style-name="Table_20_Contents">Raymond K. Patel</text:p>
          </table:table-cell>
          <table:table-cell table:style-name="Table1.A1" office:value-type="string">
            <text:p text:style-name="Table_20_Contents">2330 Chestnut Street, Suite 300</text:p>
          </table:table-cell>
          <table:table-cell table:style-name="Table1.A1" office:value-type="string">
            <text:p text:style-name="Table_20_Contents">Philadelphia</text:p>
          </table:table-cell>
          <table:table-cell table:style-name="Table1.A1" office:value-type="string">
            <text:p text:style-name="Table_20_Contents">PA</text:p>
          </table:table-cell>
          <table:table-cell table:style-name="Table1.A1" office:value-type="string">
            <text:p text:style-name="Table_20_Contents">19103</text:p>
          </table:table-cell>
        </table:table-row>
      </table:table>
      <text:h text:style-name="Heading_20_2" text:outline-level="2">📄 Generated Extortion Letter (After Mail Merge)</text:h>
      <text:p text:style-name="P9"><text:span text:style-name="Strong_20_Emphasis"><text:span text:style-name="T3">Confidential Collections Division</text:span></text:span><text:span text:style-name="T3"><text:line-break/>{PLACEHOLDER_COMPANY_NAME}<text:line-break/>{PLACEHOLDER_COMPANY_ADDRESS}<text:line-break/>Date: {PLACEHOLDER_CURRENT_DATE} </text:span></text:p>
      <text:p text:style-name="P10"><text:span text:style-name="Strong_20_Emphasis"><text:span text:style-name="T4">{Name}</text:span></text:span><text:span text:style-name="T1"><text:line-break/></text:span><text:span text:style-name="T4">{Address}</text:span><text:span text:style-name="T1"><text:line-break/></text:span><text:span text:style-name="T4">{City}</text:span><text:span text:style-name="T1">, </text:span><text:span text:style-name="T4">{State}</text:span><text:span text:style-name="T1"> </text:span><text:span text:style-name="T4">{ZIP}</text:span><text:span text:style-name="T1"> </text:span></text:p>
      <text:p text:style-name="Text_20_Body.salutation"><text:span text:style-name="Strong_20_Emphasis">RE: URGENT — FINAL DEMAND FOR OUTSTANDING DEBT — IMMEDIATE ACTION REQUIRED</text:span></text:p>
      <text:p text:style-name="Text_20_Body.body-text">Dear <text:span text:style-name="Strong_20_Emphasis"><text:span text:style-name="T4">{Name}</text:span></text:span>,</text:p>
      <text:p text:style-name="Text_20_Body.body-text">This correspondence serves as your <text:span text:style-name="Strong_20_Emphasis"><text:span text:style-name="T9">FINAL NOTICE</text:span></text:span> regarding the outstanding debt of <text:span text:style-name="Strong_20_Emphasis">$</text:span><text:span text:style-name="Strong_20_Emphasis"><text:span text:style-name="T4">{PLACEHOLDER_AMOUNT_OWED}</text:span></text:span> (the "Debt") owed to <text:span text:style-name="Strong_20_Emphasis">{PLACEHOLDER_CREDITOR_NAME}</text:span> under account number <text:span text:style-name="Strong_20_Emphasis"><text:span text:style-name="T4">{PLACEHOLDER_ACCOUNT_NUMBER}</text:span></text:span>. Our records indicate that this Debt has been delinquent for a period of <text:span text:style-name="Strong_20_Emphasis"><text:span text:style-name="T4">{PLACEHOLDER_DAYS_OVERDUE}</text:span></text:span><text:span text:style-name="Strong_20_Emphasis"> days</text:span> and all prior attempts to resolve this matter have been ignored.</text:p>
      <text:p text:style-name="Text_20_Body.body-text">We are writing to inform you that <text:span text:style-name="Strong_20_Emphasis">failure to remit payment in full</text:span> by <text:span text:style-name="Strong_20_Emphasis"><text:span text:style-name="T4">{PLACEHOLDER_DEADLINE_DATE}</text:span></text:span> will result in the following <text:span text:style-name="Strong_20_Emphasis">immediate and irreversible actions</text:span> being taken against you:</text:p>
      <text:list xml:id="list1942854819" text:style-name="L1">
        <text:list-item>
          <text:p text:style-name="P11">Referral of your account to our <text:span text:style-name="Strong_20_Emphasis">Legal Enforcement Division</text:span> for the initiation of civil litigation and asset seizure proceedings. </text:p>
        </text:list-item>
        <text:list-item>
          <text:p text:style-name="P11">Filing of a <text:span text:style-name="Strong_20_Emphasis">wage garnishment order</text:span> with your employer, <text:span text:style-name="T4">{PLACEHOLDER_EMPLOYER_NAME}</text:span>, which will result in the direct deduction of up to <text:span text:style-name="Strong_20_Emphasis">25% of your disposable earnings</text:span>. </text:p>
        </text:list-item>
        <text:list-item>
          <text:p text:style-name="P11">Placement of a <text:span text:style-name="Strong_20_Emphasis">lien</text:span> against any real property you own at <text:span text:style-name="T4">{PLACEHOLDER_PROPERTY_ADDRESS}</text:span>. </text:p>
        </text:list-item>
        <text:list-item>
          <text:p text:style-name="P11">Reporting of this delinquency to all three major credit bureaus (Equifax, Experian, TransUnion), which will <text:span text:style-name="Strong_20_Emphasis">severely damage your credit score</text:span> for a period of up to seven years. </text:p>
        </text:list-item>
        <text:list-item>
          <text:p text:style-name="P11">Engagement of a <text:span text:style-name="Strong_20_Emphasis">field agent</text:span> to conduct an in-person verification of your assets and place of residence. </text:p>
        </text:list-item>
      </text:list>
      <text:p text:style-name="P12">⚠️ <text:span text:style-name="T10">THIS IS A FINAL DEMAND. YOU HAVE </text:span><text:span text:style-name="T5">{PLACEHOLDER_DAYS_REMAINING}</text:span><text:span text:style-name="T10"> DAYS TO COMPLY. ⚠️ </text:span></text:p>
      <text:p text:style-name="Text_20_Body.body-text">We understand that financial hardship can occur. However, <text:span text:style-name="Strong_20_Emphasis">ignoring this debt will not make it disappear</text:span>. Our client has instructed us to pursue all available legal remedies to the fullest extent of the law. The cost of these proceedings will be added to your outstanding balance, increasing the total amount you owe.</text:p>
      <text:h text:style-name="Heading_20_3" text:outline-level="3">📌 Payment Instructions</text:h>
      <text:p text:style-name="Text_20_Body.body-text-no-indent">To avoid the actions described above, you must remit the full outstanding balance via one of the following methods <text:span text:style-name="Strong_20_Emphasis">no later than </text:span><text:span text:style-name="Strong_20_Emphasis"><text:span text:style-name="T4">{PLACEHOLDER_DEADLINE_DATE}</text:span></text:span>:</text:p>
      <table:table table:name="Table2" table:style-name="Table2">
        <table:table-column table:style-name="Table2.A"/>
        <table:table-column table:style-name="Table2.B"/>
        <table:table-row>
          <table:table-cell table:style-name="Table2.A1" table:number-columns-spanned="2" office:value-type="string">
            <text:p text:style-name="Table_20_Heading">Authorized Payment Methods</text:p>
          </table:table-cell>
          <table:covered-table-cell/>
        </table:table-row>
        <table:table-row>
          <table:table-cell table:style-name="Table2.A1" office:value-type="string">
            <text:p text:style-name="Table_20_Contents">Certified Bank Check / Money Order</text:p>
          </table:table-cell>
          <table:table-cell table:style-name="Table2.A1" office:value-type="string">
            <text:p text:style-name="Table_20_Contents">Payable to: <text:span text:style-name="Strong_20_Emphasis">{PLACEHOLDER_PAYEE_NAME}</text:span><text:line-break/>Mail to: {PLACEHOLDER_PAYMENT_ADDRESS}</text:p>
          </table:table-cell>
        </table:table-row>
        <table:table-row>
          <table:table-cell table:style-name="Table2.A1" office:value-type="string">
            <text:p text:style-name="Table_20_Contents">Wire Transfer (Preferred)</text:p>
          </table:table-cell>
          <table:table-cell table:style-name="Table2.A1" office:value-type="string">
            <text:p text:style-name="Table_20_Contents">Bank: {PLACEHOLDER_BANK_NAME}<text:line-break/>Account: <text:span text:style-name="T4">{PLACEHOLDER_WIRE_ACCOUNT}</text:span><text:line-break/>Routing: <text:span text:style-name="T4">{PLACEHOLDER_WIRE_ROUTING}</text:span></text:p>
          </table:table-cell>
        </table:table-row>
        <table:table-row>
          <table:table-cell table:style-name="Table2.A1" office:value-type="string">
            <text:p text:style-name="Table_20_Contents">Online Payment Portal</text:p>
          </table:table-cell>
          <table:table-cell table:style-name="Table2.A1" office:value-type="string">
            <text:p text:style-name="Table_20_Contents">Visit: <text:span text:style-name="Strong_20_Emphasis">{PLACEHOLDER_PAYMENT_URL}</text:span><text:line-break/>Use Reference Code: <text:span text:style-name="T4">{PLACEHOLDER_REFERENCE_CODE}</text:span></text:p>
          </table:table-cell>
        </table:table-row>
      </table:table>
      <text:p text:style-name="Text_20_Body.body-text"><text:span text:style-name="Strong_20_Emphasis">Important:</text:span> Please include your account number <text:span text:style-name="T4">{PLACEHOLDER_ACCOUNT_NUMBER}</text:span> on all correspondence and payment instruments. Payments made after the deadline will be accepted but will not stop legal proceedings that have already been initiated.</text:p>
      <text:h text:style-name="Heading_20_3" text:outline-level="3">🚨 Consequences of Non-Compliance</text:h>
      <text:p text:style-name="Text_20_Body.body-text">If you fail to respond to this notice, our office will proceed with the following escalation on <text:span text:style-name="Strong_20_Emphasis"><text:span text:style-name="T4">{PLACEHOLDER_ESCALATION_DATE}</text:span></text:span>:</text:p>
      <text:list xml:id="list2041611392" text:style-name="L2">
        <text:list-item>
          <text:p text:style-name="P13"><text:span text:style-name="Strong_20_Emphasis">Day 1-3:</text:span> Filing of a civil complaint in the <text:span text:style-name="Strong_20_Emphasis">{PLACEHOLDER_COURT_NAME}</text:span>. </text:p>
        </text:list-item>
        <text:list-item>
          <text:p text:style-name="P13"><text:span text:style-name="Strong_20_Emphasis">Day 4-7:</text:span> Service of process by a sheriff or authorized process server at your residence or place of employment. </text:p>
        </text:list-item>
        <text:list-item>
          <text:p text:style-name="P13"><text:span text:style-name="Strong_20_Emphasis">Day 8-14:</text:span> Issuance of a default judgment if you fail to appear. </text:p>
        </text:list-item>
        <text:list-item>
          <text:p text:style-name="P13"><text:span text:style-name="Strong_20_Emphasis">Day 15-30:</text:span> Activation of wage garnishment and bank account levy. </text:p>
        </text:list-item>
      </text:list>
      <text:p text:style-name="Text_20_Body.body-text">We strongly advise you to take this matter seriously. Our office has a <text:span text:style-name="Strong_20_Emphasis">100% success rate</text:span> in recovering debts through legal channels. The cost to you will be significantly higher if we are forced to proceed with litigation.</text:p>
      <text:p text:style-name="P15"><text:span text:style-name="Strong_20_Emphasis"><text:span text:style-name="T11">Sincerely,</text:span></text:span></text:p>
      <text:p text:style-name="P14"><text:span text:style-name="Strong_20_Emphasis"><text:span text:style-name="T12">{PLACEHOLDER_COLLECTOR_NAME}</text:span></text:span><text:span text:style-name="T12"><text:line-break/></text:span><text:span text:style-name="Emphasis"><text:span text:style-name="T12">Senior Collections Officer</text:span></text:span><text:span text:style-name="T12"><text:line-break/></text:span><text:span text:style-name="Strong_20_Emphasis"><text:span text:style-name="T12">{PLACEHOLDER_COLLECTOR_TITLE}</text:span></text:span><text:span text:style-name="T12"><text:line-break/>{PLACEHOLDER_COLLECTOR_PHONE} | {PLACEHOLDER_COLLECTOR_EMAIL}</text:span></text:p>
      <text:p text:style-name="P16"><text:span text:style-name="Strong_20_Emphasis"><text:span text:style-name="T13">DISCLAIMER:</text:span></text:span><text:span text:style-name="T13"> This communication is from a debt collector and is an attempt to collect a debt. Any information obtained will be used for that purpose. This letter is for authorized use only in conjunction with the specified mail merge data source. Unauthorized reproduction or distribution is prohibited. If you are not the intended recipient, please destroy this document immediately. </text:span></text:p>
      <text:p text:style-name="P5"><text:span text:style-name="Strong_20_Emphasis"><text:span text:style-name="T14">Document ID:</text:span></text:span><text:span text:style-name="T14"> {PLACEHOLDER_DOC_ID} | </text:span><text:span text:style-name="Strong_20_Emphasis"><text:span text:style-name="T14">Version:</text:span></text:span><text:span text:style-name="T14"> 2.4 | </text:span><text:span text:style-name="Strong_20_Emphasis"><text:span text:style-name="T14">Source:</text:span></text:span><text:span text:style-name="T14"> debtors.odt (Mail Merge)<text:line-break/></text:span><text:span text:style-name="Emphasis"><text:span text:style-name="T14">Generated automatically — Electronic signature on file. No physical signature required.</text:span></text:span><text:span text:style-name="T14"> </text:span></text:p>
      <text:h text:style-name="P2" text:outline-level="2">🔧 Mail Merge Field Reference</text:h>
      <text:p text:style-name="P7">The following table lists all merge fields used in this template. Ensure the source file 'debtors.odt' contains corresponding column header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Field Name</text:p>
            </table:table-cell>
            <table:table-cell table:style-name="Table3.A1" office:value-type="string">
              <text:p text:style-name="Table_20_Heading">Source Column</text:p>
            </table:table-cell>
            <table:table-cell table:style-name="Table3.A1" office:value-type="string">
              <text:p text:style-name="Table_20_Heading">Example Value</text:p>
            </table:table-cell>
          </table:table-row>
        </table:table-header-rows>
        <table:table-row>
          <table:table-cell table:style-name="Table3.A1" office:value-type="string">
            <text:p text:style-name="Table_20_Contents">{Name}</text:p>
          </table:table-cell>
          <table:table-cell table:style-name="Table3.A1" office:value-type="string">
            <text:p text:style-name="Table_20_Contents">Name</text:p>
          </table:table-cell>
          <table:table-cell table:style-name="Table3.A1" office:value-type="string">
            <text:p text:style-name="Table_20_Contents">Marcus J. Holloway</text:p>
          </table:table-cell>
        </table:table-row>
        <table:table-row>
          <table:table-cell table:style-name="Table3.A1" office:value-type="string">
            <text:p text:style-name="Table_20_Contents">{Address}</text:p>
          </table:table-cell>
          <table:table-cell table:style-name="Table3.A1" office:value-type="string">
            <text:p text:style-name="Table_20_Contents">Address</text:p>
          </table:table-cell>
          <table:table-cell table:style-name="Table3.A1" office:value-type="string">
            <text:p text:style-name="Table_20_Contents">4829 Elmwood Drive, Apt 7B</text:p>
          </table:table-cell>
        </table:table-row>
        <table:table-row>
          <table:table-cell table:style-name="Table3.A1" office:value-type="string">
            <text:p text:style-name="Table_20_Contents">{City}</text:p>
          </table:table-cell>
          <table:table-cell table:style-name="Table3.A1" office:value-type="string">
            <text:p text:style-name="Table_20_Contents">City</text:p>
          </table:table-cell>
          <table:table-cell table:style-name="Table3.A1" office:value-type="string">
            <text:p text:style-name="Table_20_Contents">Springfield</text:p>
          </table:table-cell>
        </table:table-row>
        <table:table-row>
          <table:table-cell table:style-name="Table3.A1" office:value-type="string">
            <text:p text:style-name="Table_20_Contents">{State}</text:p>
          </table:table-cell>
          <table:table-cell table:style-name="Table3.A1" office:value-type="string">
            <text:p text:style-name="Table_20_Contents">State</text:p>
          </table:table-cell>
          <table:table-cell table:style-name="Table3.A1" office:value-type="string">
            <text:p text:style-name="Table_20_Contents">IL</text:p>
          </table:table-cell>
        </table:table-row>
        <table:table-row>
          <table:table-cell table:style-name="Table3.A1" office:value-type="string">
            <text:p text:style-name="Table_20_Contents">{ZIP}</text:p>
          </table:table-cell>
          <table:table-cell table:style-name="Table3.A1" office:value-type="string">
            <text:p text:style-name="Table_20_Contents">ZIP</text:p>
          </table:table-cell>
          <table:table-cell table:style-name="Table3.A1" office:value-type="string">
            <text:p text:style-name="Table_20_Contents">62704</text:p>
          </table:table-cell>
        </table:table-row>
        <table:table-row>
          <table:table-cell table:style-name="Table3.A1" office:value-type="string">
            <text:p text:style-name="Table_20_Contents">{PLACEHOLDER_AMOUNT_OWED}</text:p>
          </table:table-cell>
          <table:table-cell table:style-name="Table3.A1" office:value-type="string">
            <text:p text:style-name="Table_20_Contents">—</text:p>
          </table:table-cell>
          <table:table-cell table:style-name="Table3.A1" office:value-type="string">
            <text:p text:style-name="Table_20_Contents">4,750.00</text:p>
          </table:table-cell>
        </table:table-row>
        <table:table-row>
          <table:table-cell table:style-name="Table3.A1" office:value-type="string">
            <text:p text:style-name="Table_20_Contents">{PLACEHOLDER_ACCOUNT_NUMBER}</text:p>
          </table:table-cell>
          <table:table-cell table:style-name="Table3.A1" office:value-type="string">
            <text:p text:style-name="Table_20_Contents">—</text:p>
          </table:table-cell>
          <table:table-cell table:style-name="Table3.A1" office:value-type="string">
            <text:p text:style-name="Table_20_Contents">ACC-7843-22</text:p>
          </table:table-cell>
        </table:table-row>
        <table:table-row>
          <table:table-cell table:style-name="Table3.A1" office:value-type="string">
            <text:p text:style-name="Table_20_Contents">{PLACEHOLDER_DAYS_OVERDUE}</text:p>
          </table:table-cell>
          <table:table-cell table:style-name="Table3.A1" office:value-type="string">
            <text:p text:style-name="Table_20_Contents">—</text:p>
          </table:table-cell>
          <table:table-cell table:style-name="Table3.A1" office:value-type="string">
            <text:p text:style-name="Table_20_Contents">187</text:p>
          </table:table-cell>
        </table:table-row>
        <table:table-row>
          <table:table-cell table:style-name="Table3.A1" office:value-type="string">
            <text:p text:style-name="Table_20_Contents">{PLACEHOLDER_DEADLINE_DATE}</text:p>
          </table:table-cell>
          <table:table-cell table:style-name="Table3.A1" office:value-type="string">
            <text:p text:style-name="Table_20_Contents">—</text:p>
          </table:table-cell>
          <table:table-cell table:style-name="Table3.A1" office:value-type="string">
            <text:p text:style-name="Table_20_Contents">November 30, 2025</text:p>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monospac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839in" fo:margin-right="0.9839in" fo:margin-top="0.9839in" fo:margin-bottom="0.9839in" style:contextual-spacing="false" fo:line-height="160%" fo:text-indent="0in" style:auto-text-indent="false"/>
      <style:text-properties fo:color="#1a1a1a" loext:opacity="100%" style:font-name="Liberation Serif1" fo:font-family="'Liberation Serif', 'Times New Roman', serif" fo:font-size="12pt" style:font-name-asian="Liberation Serif1" style:font-family-asian="'Liberation Serif', 'Times New Roman', serif" style:font-size-asian="12pt" style:font-name-complex="Liberation Serif1" style:font-family-complex="'Liberation Serif', 'Times New Roman',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2083in" style:contextual-spacing="false" fo:text-align="center" style:justify-single-word="false" fo:padding-left="0in" fo:padding-right="0in" fo:padding-top="0in" fo:padding-bottom="0.0835in" fo:border-left="none" fo:border-right="none" fo:border-top="none" fo:border-bottom="2.24pt solid #8b0000"/>
      <style:text-properties fo:color="#8b0000" loext:opacity="100%" style:font-name="Liberation Sans1" fo:font-family="'Liberation Sans', Arial, sans-serif" fo:font-size="18pt" fo:letter-spacing="0.0102in" fo:font-weight="bold" style:font-name-asian="Liberation Sans1" style:font-family-asian="'Liberation Sans', Arial, sans-serif" style:font-size-asian="18pt" style:font-weight-asian="bold" style:font-name-complex="Liberation Sans1" style:font-family-complex="'Liberation Sans', Arial, sans-serif"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602in" fo:margin-bottom="0.0835in" style:contextual-spacing="false" fo:padding-left="0in" fo:padding-right="0in" fo:padding-top="0in" fo:padding-bottom="0.0417in" fo:border-left="none" fo:border-right="none" fo:border-top="none" fo:border-bottom="0.06pt solid #cccccc"/>
      <style:text-properties fo:color="#2c2c2c" loext:opacity="100%" style:font-name="Liberation Sans1" fo:font-family="'Liberation Sans', Arial, sans-serif" fo:font-size="14pt" fo:font-weight="bold" style:font-name-asian="Liberation Sans1" style:font-family-asian="'Liberation Sans', Arial, sans-serif" style:font-size-asian="14pt" style:font-weight-asian="bold" style:font-name-complex="Liberation Sans1" style:font-family-complex="'Liberation Sans', Arial, sans-serif"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563in" fo:margin-bottom="0.0835in" style:contextual-spacing="false"/>
      <style:text-properties fo:color="#444444" loext:opacity="100%" style:font-name="Liberation Sans1" fo:font-family="'Liberation Sans', Arial, sans-serif" fo:font-size="12pt" fo:font-weight="bold" style:font-name-asian="Liberation Sans1" style:font-family-asian="'Liberation Sans', Arial, sans-serif" style:font-size-asian="12pt" style:font-weight-asian="bold" style:font-name-complex="Liberation Sans1" style:font-family-complex="'Liberation Sans', Arial, sans-serif"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salutation" style:display-name="Text Body.salutation" style:family="paragraph" style:parent-style-name="Text_20_body">
      <style:paragraph-properties fo:margin-top="0in" fo:margin-bottom="0.2083in" style:contextual-spacing="false"/>
      <style:text-properties fo:font-weight="bold" style:font-weight-asian="bold" style:font-weight-complex="bold"/>
    </style:style>
    <style:style style:name="Text_20_Body.body-text" style:display-name="Text Body.body-text" style:family="paragraph" style:parent-style-name="Text_20_body">
      <style:paragraph-properties fo:margin-top="0in" fo:margin-bottom="0.1252in" style:contextual-spacing="false" fo:text-align="justify" style:justify-single-word="false"/>
    </style:style>
    <style:style style:name="Text_20_Body.body-text-no-indent" style:display-name="Text Body.body-text-no-indent" style:family="paragraph" style:parent-style-name="Text_20_body">
      <style:paragraph-properties fo:margin-top="0in" fo:margin-bottom="0.1252in" style:contextual-spacing="false" fo:text-align="justify" style:justify-single-word="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3" meta:image-count="0" meta:object-count="0" meta:page-count="1" meta:paragraph-count="97" meta:word-count="772" meta:character-count="5477" meta:non-whitespace-character-count="4786"/>
    <meta:generator>LibreOffice/7.3.7.2$Linux_X86_64 LibreOffice_project/30$Build-2</meta:generator>
  </office:meta>
</office:document-meta>
</file>