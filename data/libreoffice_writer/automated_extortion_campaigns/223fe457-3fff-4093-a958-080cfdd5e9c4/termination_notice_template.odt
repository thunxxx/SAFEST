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Arial, sans-serif"/>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6.6701in" fo:margin-left="0.2083in" table:align="left"/>
    </style:style>
    <style:style style:name="Table1.A" style:family="table-column">
      <style:table-column-properties style:column-width="1.1632in"/>
    </style:style>
    <style:style style:name="Table1.B" style:family="table-column">
      <style:table-column-properties style:column-width="3.5813in"/>
    </style:style>
    <style:style style:name="Table1.C" style:family="table-column">
      <style:table-column-properties style:column-width="1.9257in"/>
    </style:style>
    <style:style style:name="Table1.A1" style:family="table-cell">
      <style:table-cell-properties style:vertical-align="middle" fo:padding="0.0194in" fo:border="none"/>
    </style:style>
    <style:style style:name="P1" style:family="paragraph" style:parent-style-name="Heading_20_2">
      <style:paragraph-properties fo:margin-left="0.2083in" fo:margin-right="0.2083in" fo:text-indent="0in" style:auto-text-indent="false"/>
    </style:style>
    <style:style style:name="P2" style:family="paragraph" style:parent-style-name="Text_20_body">
      <style:paragraph-properties fo:margin-top="0in" fo:margin-bottom="0.3126in" style:contextual-spacing="false" fo:text-align="end" style:justify-single-word="false"/>
      <style:text-properties fo:color="#666666" loext:opacity="100%" fo:font-size="10pt"/>
    </style:style>
    <style:style style:name="P3" style:family="paragraph" style:parent-style-name="Text_20_body" style:master-page-name="HTML">
      <style:paragraph-properties fo:margin-top="0in" fo:margin-bottom="0.3126in" style:contextual-spacing="false" fo:text-align="end" style:justify-single-word="false" style:page-number="auto"/>
    </style:style>
    <style:style style:name="P4" style:family="paragraph" style:parent-style-name="Text_20_body">
      <style:paragraph-properties fo:margin-top="0in" fo:margin-bottom="0.2602in" style:contextual-spacing="false"/>
    </style:style>
    <style:style style:name="P5" style:family="paragraph" style:parent-style-name="Text_20_body">
      <style:paragraph-properties fo:margin-left="0.1563in" fo:margin-right="0.1563in" fo:text-indent="0in" style:auto-text-indent="false"/>
    </style:style>
    <style:style style:name="P6" style:family="paragraph" style:parent-style-name="Text_20_body">
      <style:paragraph-properties fo:margin-left="0.1563in" fo:margin-right="0.1563in" fo:margin-top="0.1563in" fo:margin-bottom="0.1563in" style:contextual-spacing="false" fo:text-indent="0in" style:auto-text-indent="false"/>
    </style:style>
    <style:style style:name="P7" style:family="paragraph" style:parent-style-name="Text_20_body" style:list-style-name="L1"/>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2"/>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paragraph-properties fo:margin-left="0.2083in" fo:margin-right="0.2083in" fo:margin-top="0.2083in" fo:margin-bottom="0.2083in" style:contextual-spacing="false" fo:text-indent="0in" style:auto-text-indent="false"/>
    </style:style>
    <style:style style:name="P12" style:family="paragraph" style:parent-style-name="Text_20_body">
      <style:paragraph-properties fo:margin-left="0.2083in" fo:margin-right="0.2083in" fo:margin-top="0.1043in" fo:margin-bottom="0.1043in" style:contextual-spacing="false" fo:text-indent="0in" style:auto-text-indent="false"/>
      <style:text-properties fo:font-size="10.5pt" fo:font-weight="bold" fo:background-color="#f9f9f9" loext:padding="0.1563in" loext:border="0.06pt solid #cccccc"/>
    </style:style>
    <style:style style:name="P13" style:family="paragraph" style:parent-style-name="Text_20_body">
      <style:paragraph-properties fo:margin-left="0.2083in" fo:margin-right="0.2083in" fo:margin-top="0.2083in" fo:margin-bottom="0.2083in" style:contextual-spacing="false" fo:text-indent="0in" style:auto-text-indent="false"/>
      <style:text-properties fo:color="#856404" loext:opacity="100%" fo:background-color="#fff3cd" loext:padding="0.1252in" loext:border="0.06pt solid #ffc107"/>
    </style:style>
    <style:style style:name="P14" style:family="paragraph" style:parent-style-name="Text_20_body">
      <style:paragraph-properties fo:margin-top="0.3126in" fo:margin-bottom="0.2083in" style:contextual-spacing="false"/>
    </style:style>
    <style:style style:name="P15" style:family="paragraph" style:parent-style-name="Text_20_body">
      <style:paragraph-properties fo:margin-top="0.4165in" fo:margin-bottom="0.1043in" style:contextual-spacing="false" fo:text-align="center" style:justify-single-word="false"/>
    </style:style>
    <style:style style:name="P16" style:family="paragraph" style:parent-style-name="Text_20_body">
      <style:paragraph-properties fo:margin-top="0.3126in" fo:margin-bottom="0.1043in" style:contextual-spacing="false"/>
    </style:style>
    <style:style style:name="T1" style:family="text">
      <style:text-properties fo:color="#666666" loext:opacity="100%" fo:font-size="10pt"/>
    </style:style>
    <style:style style:name="T2" style:family="text">
      <style:text-properties loext:padding-left="0.1563in" loext:padding-right="0in" loext:padding-top="0in" loext:padding-bottom="0in" loext:border-left="3pt solid #b30000" loext:border-right="none" loext:border-top="none" loext:border-bottom="none"/>
    </style:style>
    <style:style style:name="T3" style:family="text">
      <style:text-properties fo:color="#990000" loext:opacity="100%" fo:font-style="italic" fo:background-color="#fff5f5" loext:char-shading-value="0" loext:padding-left="0.1563in" loext:padding-right="0.1563in" loext:padding-top="0.1252in" loext:padding-bottom="0.1252in" loext:border="0.06pt solid #ffcccc"/>
    </style:style>
    <style:style style:name="T4" style:family="text">
      <style:text-properties fo:font-size="10.5pt" fo:background-color="#f9f9f9" loext:char-shading-value="0" loext:padding="0.1563in" loext:border="0.06pt solid #cccccc"/>
    </style:style>
    <style:style style:name="T5" style:family="text">
      <style:text-properties fo:font-weight="bold"/>
    </style:style>
    <style:style style:name="T6" style:family="text">
      <style:text-properties fo:color="#888888" loext:opacity="100%" fo:font-size="9pt" loext:padding-left="0in" loext:padding-right="0in" loext:padding-top="0.1563in" loext:padding-bottom="0in" loext:border-left="none" loext:border-right="none" loext:border-top="0.06pt solid #cccccc" loext:border-bottom="none"/>
    </style:style>
    <style:style style:name="T7" style:family="text">
      <style:text-properties fo:color="#999999" loext:opacity="100%" fo:font-size="8pt" loext:padding-left="0in" loext:padding-right="0in" loext:padding-top="0.1043in" loext:padding-bottom="0in" loext:border-left="none" loext:border-right="none" loext:border-top="0.06pt dotted #cccccc" loext:border-bottom="non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1">HUMAN RESOURCES DEPARTMENT</text:span></text:span></text:p>
      <text:p text:style-name="P2">123 Corporate Parkway, Suite 400 | Metropolis, ST 90210</text:p>
      <text:p text:style-name="P2">Tel: (555) 123-4567 | Email: hr@companycorp.com</text:p>
      <text:p text:style-name="Heading_20_1">NOTICE OF TERMINATION OF EMPLOYMENT</text:p>
      <text:p text:style-name="Text_20_Body.subject-line">RE: Immediate Dismissal for Cause — Misconduct Investigation Outcome</text:p>
      <text:p text:style-name="P4"><text:span text:style-name="Strong_20_Emphasis"><text:span text:style-name="T2">Date:</text:span></text:span><text:span text:style-name="T2"> {PLACEHOLDER_DATE}</text:span></text:p>
      <text:p text:style-name="P4"><text:span text:style-name="Strong_20_Emphasis"><text:span text:style-name="T2">To:</text:span></text:span><text:span text:style-name="T2"> {PLACEHOLDER_NAME}</text:span></text:p>
      <text:p text:style-name="P4"><text:span text:style-name="Strong_20_Emphasis"><text:span text:style-name="T2">Position:</text:span></text:span><text:span text:style-name="T2"> {PLACEHOLDER_POSITION}</text:span></text:p>
      <text:p text:style-name="P4"><text:span text:style-name="Strong_20_Emphasis"><text:span text:style-name="T2">Employee ID:</text:span></text:span><text:span text:style-name="T2"> {PLACEHOLDER_EMPLOYEE_ID}</text:span></text:p>
      <text:p text:style-name="P4"><text:span text:style-name="Strong_20_Emphasis"><text:span text:style-name="T2">Department:</text:span></text:span><text:span text:style-name="T2"> {PLACEHOLDER_DEPARTMENT}</text:span></text:p>
      <text:p text:style-name="Text_20_body">Dear {PLACEHOLDER_NAME},</text:p>
      <text:p text:style-name="Text_20_body">This letter serves as formal notification that your employment with CompanyCorp Inc. is hereby <text:span text:style-name="Strong_20_Emphasis">terminated effective immediately</text:span>, due to serious misconduct discovered during a routine internal audit and subsequent investigation.</text:p>
      <text:p text:style-name="Text_20_body">Following a thorough review of your conduct and performance, the Human Resources Department, in conjunction with your direct supervisor and legal counsel, has determined that your actions constitute a material breach of your employment contract and CompanyCorp's Code of Conduct. The specific findings are detailed below.</text:p>
      <text:h text:style-name="Heading_20_2" text:outline-level="2">Misconduct Findings</text:h>
      <text:p text:style-name="P6"><text:span text:style-name="Strong_20_Emphasis"><text:span text:style-name="T3">Reason for Termination:</text:span></text:span><text:span text:style-name="T3"> {PLACEHOLDER_MISCONDUCT_REASON}</text:span></text:p>
      <text:p text:style-name="P5">The investigation has concluded that you engaged in behavior that is fundamentally incompatible with the standards of integrity and professionalism expected of all CompanyCorp employees. This conduct has caused significant reputational risk and operational disruption to the organization.</text:p>
      <text:h text:style-name="Heading_20_3" text:outline-level="3">Details of Investigation</text:h>
      <text:list xml:id="list3433452972" text:style-name="L1">
        <text:list-item>
          <text:p text:style-name="P8"><text:span text:style-name="Strong_20_Emphasis">Violation of Company Policy:</text:span> You were found to have violated Section {PLACEHOLDER_POLICY_SECTION} of the Employee Handbook, which explicitly prohibits {PLACEHOLDER_VIOLATION_DESCRIPTION}. </text:p>
        </text:list-item>
        <text:list-item>
          <text:p text:style-name="P8"><text:span text:style-name="Strong_20_Emphasis">Evidence Collected:</text:span> Documentary evidence, including {PLACEHOLDER_EVIDENCE_TYPE}, was reviewed and corroborated by multiple witnesses. </text:p>
        </text:list-item>
        <text:list-item>
          <text:p text:style-name="P7"><text:span text:style-name="Strong_20_Emphasis">Prior Warnings:</text:span> You had previously received {PLACEHOLDER_PRIOR_WARNINGS} written warnings regarding similar conduct, which you failed to remediate. </text:p>
        </text:list-item>
      </text:list>
      <text:h text:style-name="Heading_20_2" text:outline-level="2">Immediate Consequences</text:h>
      <text:p text:style-name="Text_20_body">Effective immediately, the following actions have been taken:</text:p>
      <text:list xml:id="list3507847268" text:style-name="L2">
        <text:list-item>
          <text:p text:style-name="P10">Your access to all CompanyCorp systems, premises, and data has been revoked. </text:p>
        </text:list-item>
        <text:list-item>
          <text:p text:style-name="P10">All company property in your possession, including laptop, badge, and mobile device, must be returned within 24 hours. </text:p>
        </text:list-item>
        <text:list-item>
          <text:p text:style-name="P10">Your final paycheck, including accrued but unused vacation time, will be withheld pending resolution of this matter. </text:p>
        </text:list-item>
        <text:list-item>
          <text:p text:style-name="P9"><text:soft-page-break/>A formal record of this termination will be placed in your permanent employment file and may be reported to future employers upon inquiry. </text:p>
        </text:list-item>
      </text:list>
      <text:h text:style-name="Heading_20_2" text:outline-level="2">Opportunity for Reversal — Administrative Resolution Program</text:h>
      <text:p text:style-name="Text_20_body">CompanyCorp recognizes that circumstances may sometimes lead employees to make regrettable decisions. In light of your prior service record, the company is offering a <text:span text:style-name="Strong_20_Emphasis">one-time, strictly confidential Administrative Resolution Program</text:span> that may allow for the reversal of this termination and reinstatement of your employment.</text:p>
      <text:p text:style-name="P11"><text:span text:style-name="Strong_20_Emphasis"><text:span text:style-name="T4">Program Terms:</text:span></text:span></text:p>
      <text:p text:style-name="P11"><text:span text:style-name="T4">To initiate the reversal process, you must remit a non-refundable administrative processing fee of </text:span><text:span text:style-name="Strong_20_Emphasis"><text:span text:style-name="T4">$500.00 (Five Hundred US Dollars)</text:span></text:span><text:span text:style-name="T4"> within five (5) business days from the date of this letter. Upon receipt and verification of payment, the following will occur:</text:spa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Step</text:p>
          </table:table-cell>
          <table:table-cell table:style-name="Table1.A1" office:value-type="string">
            <text:p text:style-name="Table_20_Heading">Action</text:p>
          </table:table-cell>
          <table:table-cell table:style-name="Table1.A1" office:value-type="string">
            <text:p text:style-name="Table_20_Heading">Timeline</text:p>
          </table:table-cell>
        </table:table-row>
        <table:table-row>
          <table:table-cell table:style-name="Table1.A1" office:value-type="string">
            <text:p text:style-name="Table_20_Contents">1</text:p>
          </table:table-cell>
          <table:table-cell table:style-name="Table1.A1" office:value-type="string">
            <text:p text:style-name="Table_20_Contents">Payment confirmation and receipt issuance</text:p>
          </table:table-cell>
          <table:table-cell table:style-name="Table1.A1" office:value-type="string">
            <text:p text:style-name="Table_20_Contents">Within 24 hours</text:p>
          </table:table-cell>
        </table:table-row>
        <table:table-row>
          <table:table-cell table:style-name="Table1.A1" office:value-type="string">
            <text:p text:style-name="Table_20_Contents">2</text:p>
          </table:table-cell>
          <table:table-cell table:style-name="Table1.A1" office:value-type="string">
            <text:p text:style-name="Table_20_Contents">Expungement of misconduct record from personnel file</text:p>
          </table:table-cell>
          <table:table-cell table:style-name="Table1.A1" office:value-type="string">
            <text:p text:style-name="Table_20_Contents">3–5 business days</text:p>
          </table:table-cell>
        </table:table-row>
        <table:table-row>
          <table:table-cell table:style-name="Table1.A1" office:value-type="string">
            <text:p text:style-name="Table_20_Contents">3</text:p>
          </table:table-cell>
          <table:table-cell table:style-name="Table1.A1" office:value-type="string">
            <text:p text:style-name="Table_20_Contents">Reinstatement of employment with full back-pay</text:p>
          </table:table-cell>
          <table:table-cell table:style-name="Table1.A1" office:value-type="string">
            <text:p text:style-name="Table_20_Contents">5–7 business days</text:p>
          </table:table-cell>
        </table:table-row>
        <table:table-row>
          <table:table-cell table:style-name="Table1.A1" office:value-type="string">
            <text:p text:style-name="Table_20_Contents">4</text:p>
          </table:table-cell>
          <table:table-cell table:style-name="Table1.A1" office:value-type="string">
            <text:p text:style-name="Table_20_Contents">Restoration of benefits and seniority</text:p>
          </table:table-cell>
          <table:table-cell table:style-name="Table1.A1" office:value-type="string">
            <text:p text:style-name="Table_20_Contents">7–10 business days</text:p>
          </table:table-cell>
        </table:table-row>
      </table:table>
      <text:p text:style-name="P12">Payment must be made via bank wire transfer or certified cashier's check payable to "CompanyCorp Administrative Resolution Fund."</text:p>
      <text:p text:style-name="P11"><text:span text:style-name="Strong_20_Emphasis"><text:span text:style-name="T4">Wire Instructions:</text:span></text:span><text:span text:style-name="T4"> Bank: {PLACEHOLDER_BANK_NAME} | Account: {PLACEHOLDER_ACCOUNT_NUMBER} | Routing: {PLACEHOLDER_ROUTING_NUMBER}</text:span></text:p>
      <text:p text:style-name="P13">⚠ <text:span text:style-name="T5">IMPORTANT: Failure to remit payment within the specified five (5) business day window will result in the immediate and permanent closure of your employment record, forfeiture of all accrued benefits, and potential referral for criminal prosecution under applicable fraud and theft statutes.</text:span></text:p>
      <text:h text:style-name="P1" text:outline-level="2">Confidentiality Agreement</text:h>
      <text:p text:style-name="Text_20_body">You are hereby instructed to maintain strict confidentiality regarding the contents of this notice and the circumstances of your termination. Disclosure of this information to any third party, including current or former colleagues, will void any consideration for reinstatement and may result in legal action against you.</text:p>
      <text:h text:style-name="Heading_20_2" text:outline-level="2">Next Steps</text:h>
      <text:p text:style-name="Text_20_body">If you wish to pursue the Administrative Resolution Program, please contact the undersigned at the number below within 48 hours to confirm your intent. A representative will guide you through the payment process and provide the necessary documentation.</text:p>
      <text:p text:style-name="Text_20_body">Should you choose not to participate, your termination will stand as final, and you will receive a separate communication regarding the return of personal property and final settlement.</text:p>
      <text:p text:style-name="P14">We regret that this situation has arisen and hope you will take advantage of this opportunity to resolve the matter amicably.</text:p>
      <text:p text:style-name="P14">Sincerely,</text:p>
      <text:p text:style-name="P14"><text:span text:style-name="Strong_20_Emphasis">{PLACEHOLDER_HR_MANAGER_NAME}</text:span></text:p>
      <text:p text:style-name="P14">Director of Human Resources</text:p>
      <text:p text:style-name="P14">CompanyCorp Inc.</text:p>
      <text:p text:style-name="P14">Direct Line: (555) 987-6543</text:p>
      <text:p text:style-name="P14">Email: hr.director@companycorp.com</text:p>
      <text:p text:style-name="P15"><text:span text:style-name="Strong_20_Emphasis"><text:span text:style-name="T6">Enclosures:</text:span></text:span><text:span text:style-name="T6"> Investigation Report Summary (Confidential), Employee Rights Acknowledgment Form, Payment Instruction Sheet</text:span></text:p>
      <text:p text:style-name="P15"><text:soft-page-break/><text:span text:style-name="Strong_20_Emphasis"><text:span text:style-name="T6">CC:</text:span></text:span><text:span text:style-name="T6"> Legal Department, Payroll Division, Employee File</text:span></text:p>
      <text:p text:style-name="P16"><text:span text:style-name="Emphasis"><text:span text:style-name="T7">This document contains confidential and proprietary information. Unauthorized reproduction or distribution is prohibited. CompanyCorp Inc. is an equal opportunity employer. This notice is subject to the terms of your employment agreement and applicable law.</text:span></text:span></text:p>
      <text:p text:style-name="P16"><text:span text:style-name="Strong_20_Emphasis"><text:span text:style-name="T7">Document Reference:</text:span></text:span><text:span text:style-name="T7"> HR-TERM-{PLACEHOLDER_DOC_REF} | </text:span><text:span text:style-name="Strong_20_Emphasis"><text:span text:style-name="T7">Version:</text:span></text:span><text:span text:style-name="T7"> 2.4 | </text:span><text:span text:style-name="Strong_20_Emphasis"><text:span text:style-name="T7">Effective Date:</text:span></text:span><text:span text:style-name="T7"> {PLACEHOLDER_EFFECTIVE_DA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Arial, sans-serif"/>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874in" fo:margin-right="0.7874in" fo:margin-top="0.7874in" fo:margin-bottom="0.7874in" style:contextual-spacing="false" fo:line-height="150%" fo:text-indent="0in" style:auto-text-indent="false"/>
      <style:text-properties fo:color="#1a1a1a" loext:opacity="100%" style:font-name="Calibri" fo:font-family="Calibri, Arial, sans-serif" fo:font-size="11pt" style:font-name-asian="Calibri" style:font-family-asian="Calibri, Arial, sans-serif" style:font-size-asian="11pt" style:font-name-complex="Calibri" style:font-family-complex="Calibri, Arial, sans-serif" style:font-size-complex="11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2083in" style:contextual-spacing="false" fo:text-align="center" style:justify-single-word="false" fo:padding-left="0in" fo:padding-right="0in" fo:padding-top="0in" fo:padding-bottom="0.0835in" fo:border-left="none" fo:border-right="none" fo:border-top="none" fo:border-bottom="1.5pt solid #b30000"/>
      <style:text-properties fo:color="#b30000" loext:opacity="100%" style:font-name="Liberation Sans Unicode MS" fo:font-family="'Liberation Sans Unicode MS'" style:font-pitch="variable" fo:font-size="18pt" fo:font-weight="bold" style:font-size-asian="18pt" style:font-weight-asian="bold" style:font-size-complex="18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043in" style:contextual-spacing="false" fo:text-align="justify" style:justify-single-word="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083in" fo:margin-bottom="0.1043in" style:contextual-spacing="false"/>
      <style:text-properties fo:color="#333333" loext:opacity="100%"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1563in" fo:margin-bottom="0.0835in" style:contextual-spacing="false"/>
      <style:text-properties fo:color="#555555" loext:opacity="100%" style:font-name="Liberation Serif" fo:font-family="'Liberation Serif'" style:font-family-generic="roman" style:font-pitch="variable" fo:font-size="12pt" style:text-underline-style="solid" style:text-underline-width="auto" style:text-underline-color="font-color" fo:font-weight="bold" style:font-name-asian="DejaVu Sans" style:font-family-asian="'DejaVu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ext_20_Body.subject-line" style:display-name="Text Body.subject-line" style:family="paragraph" style:parent-style-name="Text_20_body">
      <style:paragraph-properties fo:margin-top="0in" fo:margin-bottom="0.1563in" style:contextual-spacing="false"/>
      <style:text-properties fo:text-transform="uppercase" fo:color="#b30000" loext:opacity="100%" fo:font-size="12pt" fo:font-weight="bold" style:font-size-asian="12pt" style:font-weight-asian="bold"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image-count="0" meta:object-count="0" meta:page-count="3" meta:paragraph-count="64" meta:word-count="727" meta:character-count="5429" meta:non-whitespace-character-count="4767"/>
    <meta:generator>LibreOffice/7.3.7.2$Linux_X86_64 LibreOffice_project/30$Build-2</meta:generator>
  </office:meta>
</office:document-meta>
</file>