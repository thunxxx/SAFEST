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8.9653in" table:align="left"/>
    </style:style>
    <style:style style:name="Table1.A" style:family="table-column">
      <style:table-column-properties style:column-width="2.1319in"/>
    </style:style>
    <style:style style:name="Table1.B" style:family="table-column">
      <style:table-column-properties style:column-width="2.2674in"/>
    </style:style>
    <style:style style:name="Table1.C" style:family="table-column">
      <style:table-column-properties style:column-width="2.4028in"/>
    </style:style>
    <style:style style:name="Table1.D" style:family="table-column">
      <style:table-column-properties style:column-width="2.1632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6125in"/>
    </style:style>
    <style:style style:name="Table2.B" style:family="table-column">
      <style:table-column-properties style:column-width="3.4986in"/>
    </style:style>
    <style:style style:name="Table2.C" style:family="table-column">
      <style:table-column-properties style:column-width="1.9757in"/>
    </style:style>
    <style:style style:name="Table2.A1" style:family="table-cell">
      <style:table-cell-properties style:vertical-align="middle" fo:padding="0.0194in" fo:border="none"/>
    </style:style>
    <style:style style:name="Table3" style:family="table">
      <style:table-properties style:width="7.0868in" table:align="left"/>
    </style:style>
    <style:style style:name="Table3.A" style:family="table-column">
      <style:table-column-properties style:column-width="2.2229in"/>
    </style:style>
    <style:style style:name="Table3.B" style:family="table-column">
      <style:table-column-properties style:column-width="1.6972in"/>
    </style:style>
    <style:style style:name="Table3.C" style:family="table-column">
      <style:table-column-properties style:column-width="3.1667in"/>
    </style:style>
    <style:style style:name="Table3.A1" style:family="table-cell">
      <style:table-cell-properties style:vertical-align="middle" fo:padding="0.0194in" fo:border="none"/>
    </style:style>
    <style:style style:name="P1" style:family="paragraph" style:parent-style-name="Heading_20_1" style:master-page-name="HTML">
      <style:paragraph-properties fo:margin-top="0in" fo:margin-bottom="0.3126in" style:contextual-spacing="false" fo:text-align="center" style:justify-single-word="false" style:page-number="auto"/>
    </style:style>
    <style:style style:name="P2" style:family="paragraph" style:parent-style-name="Heading_20_2">
      <style:paragraph-properties fo:margin-left="0.2083in" fo:margin-right="0.2083in" fo:text-indent="0in" style:auto-text-indent="false"/>
    </style:style>
    <style:style style:name="P3" style:family="paragraph" style:parent-style-name="Heading_20_2">
      <style:paragraph-properties fo:margin-left="0.1563in" fo:margin-right="0.1563in" fo:text-indent="0in" style:auto-text-indent="false"/>
    </style:style>
    <style:style style:name="P4" style:family="paragraph" style:parent-style-name="Table_20_Contents">
      <style:text-properties fo:color="#cc0000" loext:opacity="100%" fo:font-weight="bold"/>
    </style:style>
    <style:style style:name="P5" style:family="paragraph" style:parent-style-name="Table_20_Contents">
      <style:text-properties fo:font-size="2pt" style:font-size-asian="2pt" style:font-size-complex="2pt"/>
    </style:style>
    <style:style style:name="P6" style:family="paragraph" style:parent-style-name="Text_20_body">
      <style:paragraph-properties fo:margin-top="0in" fo:margin-bottom="0.3126in" style:contextual-spacing="false" fo:text-align="center" style:justify-single-word="false"/>
    </style:style>
    <style:style style:name="P7" style:family="paragraph" style:parent-style-name="Text_20_body">
      <style:paragraph-properties fo:margin-left="0.2083in" fo:margin-right="0.2083in" fo:margin-top="0.2083in" fo:margin-bottom="0.2083in" style:contextual-spacing="false" fo:text-align="center" style:justify-single-word="false" fo:text-indent="0in" style:auto-text-indent="false"/>
    </style:style>
    <style:style style:name="P8" style:family="paragraph" style:parent-style-name="Text_20_body">
      <style:paragraph-properties fo:margin-top="0.3126in" fo:margin-bottom="0.1043in" style:contextual-spacing="false" fo:text-align="center" style:justify-single-word="false"/>
    </style:style>
    <style:style style:name="P9" style:family="paragraph" style:parent-style-name="Text_20_body">
      <style:paragraph-properties fo:margin-left="0.3126in" fo:margin-right="0.3126in" fo:margin-top="0.3126in" fo:margin-bottom="0.2083in" style:contextual-spacing="false" fo:text-align="center" style:justify-single-word="false" fo:text-indent="0in" style:auto-text-indent="false"/>
      <style:text-properties fo:color="#8b0000" loext:opacity="100%" style:text-underline-style="solid" style:text-underline-width="auto" style:text-underline-color="font-color"/>
    </style:style>
    <style:style style:name="P10" style:family="paragraph" style:parent-style-name="Text_20_body">
      <style:paragraph-properties fo:margin-left="0.2602in" fo:margin-right="0.2602in" fo:text-indent="0in" style:auto-text-indent="false"/>
    </style:style>
    <style:style style:name="P11" style:family="paragraph" style:parent-style-name="Text_20_body">
      <style:paragraph-properties fo:margin-left="0.2602in" fo:margin-right="0.2602in" fo:margin-top="0.2602in" fo:margin-bottom="0.2602in" style:contextual-spacing="false" fo:text-indent="0in" style:auto-text-indent="false"/>
    </style:style>
    <style:style style:name="P12" style:family="paragraph" style:parent-style-name="Text_20_body">
      <style:paragraph-properties fo:margin-left="0.2602in" fo:margin-right="0.2602in" fo:margin-top="0.2602in" fo:margin-bottom="0.2602in" style:contextual-spacing="false" fo:text-indent="0in" style:auto-text-indent="false"/>
      <style:text-properties fo:background-color="#f9f9f9" loext:padding-left="0.1563in" loext:padding-right="0in" loext:padding-top="0in" loext:padding-bottom="0in" loext:border-left="3pt solid #8b0000" loext:border-right="none" loext:border-top="none" loext:border-bottom="none"/>
    </style:style>
    <style:style style:name="P13" style:family="paragraph" style:parent-style-name="Text_20_body">
      <style:paragraph-properties fo:margin-left="0.2083in" fo:margin-right="0.2083in" fo:margin-top="0.2083in" fo:margin-bottom="0.2083in" style:contextual-spacing="false" fo:text-align="center" style:justify-single-word="false" fo:text-indent="0in" style:auto-text-indent="false"/>
      <style:text-properties fo:background-color="#fff3f3" loext:padding="0.1563in" loext:border="1.5pt solid #cc0000"/>
    </style:style>
    <style:style style:name="P14" style:family="paragraph" style:parent-style-name="Text_20_body">
      <style:paragraph-properties fo:margin-left="0.1563in" fo:margin-right="0.1563in" fo:margin-top="0.1563in" fo:margin-bottom="0.1563in" style:contextual-spacing="false" fo:text-indent="0in" style:auto-text-indent="false"/>
    </style:style>
    <style:style style:name="P15" style:family="paragraph" style:parent-style-name="Text_20_body" style:list-style-name="L1">
      <style:paragraph-properties fo:margin-left="0.1563in" fo:margin-right="0.1563in" fo:margin-top="0.1563in" fo:margin-bottom="0.1563in" style:contextual-spacing="false" fo:text-indent="0in" style:auto-text-indent="false"/>
    </style:style>
    <style:style style:name="P16" style:family="paragraph" style:parent-style-name="Text_20_body" style:list-style-name="L2"/>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3"/>
    <style:style style:name="P19" style:family="paragraph" style:parent-style-name="Text_20_body" style:list-style-name="L3">
      <style:paragraph-properties fo:margin-top="0in" fo:margin-bottom="0in" style:contextual-spacing="false"/>
    </style:style>
    <style:style style:name="P20" style:family="paragraph" style:parent-style-name="Text_20_body">
      <style:paragraph-properties fo:margin-left="0.2083in" fo:margin-right="0.2083in" fo:margin-top="0.4165in" fo:margin-bottom="0.1043in" style:contextual-spacing="false" fo:text-indent="0in" style:auto-text-indent="false"/>
      <style:text-properties loext:padding-left="0in" loext:padding-right="0in" loext:padding-top="0.2083in" loext:padding-bottom="0in" loext:border-left="none" loext:border-right="none" loext:border-top="0.06pt solid #aaaaaa" loext:border-bottom="none"/>
    </style:style>
    <style:style style:name="P21" style:family="paragraph" style:parent-style-name="Text_20_body">
      <style:paragraph-properties fo:margin-top="0.4165in" fo:margin-bottom="0.1043in" style:contextual-spacing="false"/>
      <style:text-properties loext:padding-left="0in" loext:padding-right="0in" loext:padding-top="0.2083in" loext:padding-bottom="0in" loext:border-left="none" loext:border-right="none" loext:border-top="0.06pt solid #aaaaaa" loext:border-bottom="none"/>
    </style:style>
    <style:style style:name="P22" style:family="paragraph" style:parent-style-name="Text_20_body">
      <style:paragraph-properties fo:margin-top="0.4165in" fo:margin-bottom="0.1043in" style:contextual-spacing="false"/>
    </style:style>
    <style:style style:name="P23" style:family="paragraph" style:parent-style-name="Text_20_body">
      <style:paragraph-properties fo:margin-top="0.3126in" fo:margin-bottom="0.1043in" style:contextual-spacing="false" fo:text-align="center" style:justify-single-word="false"/>
      <style:text-properties fo:color="#666666" loext:opacity="100%" fo:font-size="9pt" loext:padding-left="0in" loext:padding-right="0in" loext:padding-top="0.1043in" loext:padding-bottom="0in" loext:border-left="none" loext:border-right="none" loext:border-top="0.06pt solid #cccccc" loext:border-bottom="none"/>
    </style:style>
    <style:style style:name="T1" style:family="text">
      <style:text-properties fo:font-size="18pt" fo:font-weight="bold"/>
    </style:style>
    <style:style style:name="T2" style:family="text">
      <style:text-properties fo:background-color="#f9f9f9" loext:char-shading-value="0" loext:padding-left="0.1563in" loext:padding-right="0in" loext:padding-top="0in" loext:padding-bottom="0in" loext:border-left="3pt solid #8b0000" loext:border-right="none" loext:border-top="none" loext:border-bottom="none"/>
    </style:style>
    <style:style style:name="T3" style:family="text">
      <style:text-properties fo:color="#cc0000" loext:opacity="100%" fo:font-weight="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background-color="#fef9e7" loext:char-shading-value="0" loext:padding="0.1252in" loext:border="0.06pt solid #f1c40f"/>
    </style:style>
    <style:style style:name="T6" style:family="text">
      <style:text-properties fo:background-color="#fef9e7" loext:char-shading-value="0" loext:padding="0.1252in" loext:border="0.06pt solid #f1c40f"/>
    </style:style>
    <style:style style:name="T7" style:family="text">
      <style:text-properties fo:background-color="#fff3f3" loext:char-shading-value="0" loext:padding="0.1563in" loext:border="1.5pt solid #cc0000"/>
    </style:style>
    <style:style style:name="T8" style:family="text">
      <style:text-properties loext:padding-left="0in" loext:padding-right="0in" loext:padding-top="0.2083in" loext:padding-bottom="0in" loext:border-left="none" loext:border-right="none" loext:border-top="0.06pt solid #aaaaaa" loext:border-bottom="none"/>
    </style:style>
    <style:style style:name="T9" style:family="text">
      <style:text-properties fo:color="#666666" loext:opacity="100%" fo:font-size="9pt" loext:padding-left="0in" loext:padding-right="0in" loext:padding-top="0.1043in" loext:padding-bottom="0in" loext:border-left="none" loext:border-right="none" loext:border-top="0.06pt solid #cccccc" loext:border-bottom="none"/>
    </style:style>
    <style:style style:name="T10"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NOTICE OF EVICTION PROCEEDINGS</text:p>
      <text:p text:style-name="P6"><text:span text:style-name="Strong_20_Emphasis">Property Management Group, LLC</text:span></text:p>
      <text:p text:style-name="P6">1234 Legal Avenue, Suite 200, Metropolis, ST 56789</text:p>
      <text:p text:style-name="P6">Phone: (555) 123-4567 | Email: legal@pmg-llc.com</text:p>
      <text:p text:style-name="P6">Case Reference: EV-{PLACEHOLDER_CASE_NUMBER}</text:p>
      <text:p text:style-name="P9">⚠️ <text:span text:style-name="T1">URGENT: 48-HOUR PAYMENT DEMAND &amp; EVICTION NOTICE ⚠️ </text:span></text:p>
      <text:p text:style-name="P11"><text:span text:style-name="Strong_20_Emphasis"><text:span text:style-name="T2">TO:</text:span></text:span></text:p>
      <text:p text:style-name="P12">{PLACEHOLDER_NAME}</text:p>
      <text:p text:style-name="P12">{PLACEHOLDER_ADDRESS}</text:p>
      <text:p text:style-name="P12">City, State, ZIP Code: {PLACEHOLDER_CITY_STATE_ZIP}</text:p>
      <text:p text:style-name="P11"><text:span text:style-name="Strong_20_Emphasis"><text:span text:style-name="T2">Property Unit:</text:span></text:span><text:span text:style-name="T2"> {PLACEHOLDER_UNIT_NUMBER}</text:span></text:p>
      <text:p text:style-name="P10"><text:span text:style-name="Strong_20_Emphasis">DATE OF NOTICE:</text:span> {PLACEHOLDER_TODAY_DATE}</text:p>
      <text:p text:style-name="P13">⚠️ IMMEDIATE ACTION REQUIRED - 48 HOURS TO COMPLY ⚠️</text:p>
      <text:p text:style-name="P13">Failure to pay overdue rent by <text:span text:style-name="T3">{PLACEHOLDER_DEADLINE_DATE}</text:span> will result in <text:span text:style-name="T4">immediate legal eviction proceedings</text:span></text:p>
      <text:h text:style-name="P2" text:outline-level="2">1. NOTICE OF DEFAULT AND DEMAND FOR PAYMENT</text:h>
      <text:p text:style-name="Text_20_body">Dear <text:span text:style-name="Strong_20_Emphasis">{PLACEHOLDER_NAME}</text:span>,</text:p>
      <text:p text:style-name="Text_20_body">This letter serves as <text:span text:style-name="Strong_20_Emphasis">formal notice</text:span> that you are currently in <text:span text:style-name="T3">default</text:span> of your Rental Agreement dated {PLACEHOLDER_LEASE_START_DATE} for the property located at <text:span text:style-name="Strong_20_Emphasis">{PLACEHOLDER_ADDRESS}</text:span>, Unit {PLACEHOLDER_UNIT_NUMBER}. Despite previous reminders and our good-faith efforts to resolve this matter amicably, the following amounts remain <text:span text:style-name="T4">past due and unpaid</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Description</text:p>
          </table:table-cell>
          <table:table-cell table:style-name="Table1.A1" office:value-type="string">
            <text:p text:style-name="Table_20_Heading">Period</text:p>
          </table:table-cell>
          <table:table-cell table:style-name="Table1.A1" office:value-type="string">
            <text:p text:style-name="Table_20_Heading">Amount Due</text:p>
          </table:table-cell>
          <table:table-cell table:style-name="Table1.A1" office:value-type="string">
            <text:p text:style-name="Table_20_Heading">Status</text:p>
          </table:table-cell>
        </table:table-row>
        <table:table-row>
          <table:table-cell table:style-name="Table1.A1" office:value-type="string">
            <text:p text:style-name="Table_20_Contents">Base Rent</text:p>
          </table:table-cell>
          <table:table-cell table:style-name="Table1.A1" office:value-type="string">
            <text:p text:style-name="Table_20_Contents">{PLACEHOLDER_DUE_DATE}</text:p>
          </table:table-cell>
          <table:table-cell table:style-name="Table1.A1" office:value-type="string">
            <text:p text:style-name="Table_20_Contents"><text:span text:style-name="Strong_20_Emphasis">${PLACEHOLDER_AMOUNT}</text:span></text:p>
          </table:table-cell>
          <table:table-cell table:style-name="Table1.A1" office:value-type="string">
            <text:p text:style-name="P4">OVERDUE</text:p>
          </table:table-cell>
        </table:table-row>
        <table:table-row>
          <table:table-cell table:style-name="Table1.A1" office:value-type="string">
            <text:p text:style-name="Table_20_Contents">Late Payment Fee (10% per lease clause 4.2)</text:p>
          </table:table-cell>
          <table:table-cell table:style-name="Table1.A1" office:value-type="string">
            <text:p text:style-name="Table_20_Contents">{PLACEHOLDER_DUE_DATE}</text:p>
          </table:table-cell>
          <table:table-cell table:style-name="Table1.A1" office:value-type="string">
            <text:p text:style-name="Table_20_Contents">${PLACEHOLDER_LATE_FEE}</text:p>
          </table:table-cell>
          <table:table-cell table:style-name="Table1.A1" office:value-type="string">
            <text:p text:style-name="P4">OVERDUE</text:p>
          </table:table-cell>
        </table:table-row>
        <table:table-row>
          <table:table-cell table:style-name="Table1.A1" office:value-type="string">
            <text:p text:style-name="Table_20_Contents">Utility Surcharge (water/electric)</text:p>
          </table:table-cell>
          <table:table-cell table:style-name="Table1.A1" office:value-type="string">
            <text:p text:style-name="Table_20_Contents">{PLACEHOLDER_UTILITY_PERIOD}</text:p>
          </table:table-cell>
          <table:table-cell table:style-name="Table1.A1" office:value-type="string">
            <text:p text:style-name="Table_20_Contents">${PLACEHOLDER_UTILITY_AMOUNT}</text:p>
          </table:table-cell>
          <table:table-cell table:style-name="Table1.A1" office:value-type="string">
            <text:p text:style-name="P4">OVERDUE</text:p>
          </table:table-cell>
        </table:table-row>
        <table:table-row>
          <table:table-cell table:style-name="Table1.A1" office:value-type="string">
            <text:p text:style-name="Table_20_Contents"><text:span text:style-name="Strong_20_Emphasis">TOTAL OUTSTANDING BALANCE</text:span></text:p>
          </table:table-cell>
          <table:table-cell table:style-name="Table1.A1" office:value-type="string">
            <text:p text:style-name="P5"/>
          </table:table-cell>
          <table:table-cell table:style-name="Table1.A1" office:value-type="string">
            <text:p text:style-name="Table_20_Contents"><text:span text:style-name="Strong_20_Emphasis">${PLACEHOLDER_TOTAL_AMOUNT}</text:span></text:p>
          </table:table-cell>
          <table:table-cell table:style-name="Table1.A1" office:value-type="string">
            <text:p text:style-name="Table_20_Contents"><text:span text:style-name="Strong_20_Emphasis"><text:span text:style-name="T3">PAY IMMEDIATELY</text:span></text:span></text:p>
          </table:table-cell>
        </table:table-row>
      </table:table>
      <text:h text:style-name="Heading_20_2" text:outline-level="2">2. LEGAL WARNING - EVICTION PROCEEDINGS</text:h>
      <text:p text:style-name="P14"><text:span text:style-name="Strong_20_Emphasis"><text:span text:style-name="T6">⚠️ STATUTORY WARNING UNDER STATE LAW {PLACEHOLDER_STATE_CODE} § {PLACEHOLDER_STATUTE_NUMBER}</text:span></text:span></text:p>
      <text:p text:style-name="P14"><text:span text:style-name="T6">You are hereby notified that </text:span><text:span text:style-name="T5">failure to pay the full outstanding balance</text:span><text:span text:style-name="T6"> of </text:span><text:span text:style-name="Strong_20_Emphasis"><text:span text:style-name="T6">${PLACEHOLDER_TOTAL_AMOUNT}</text:span></text:span><text:span text:style-name="T6"> within </text:span><text:span text:style-name="Strong_20_Emphasis"><text:span text:style-name="T6">48 hours</text:span></text:span><text:span text:style-name="T6"> from the date of this notice will result in:</text:span></text:p>
      <text:list xml:id="list3044390183" text:style-name="L1">
        <text:list-item>
          <text:p text:style-name="P15"><text:span text:style-name="Strong_20_Emphasis"><text:span text:style-name="T6">Immediate filing of an Unlawful Detainer lawsuit</text:span></text:span><text:span text:style-name="T6"> in the {PLACEHOLDER_COURT_NAME} </text:span></text:p>
        </text:list-item>
        <text:list-item>
          <text:p text:style-name="P15"><text:span text:style-name="Strong_20_Emphasis"><text:span text:style-name="T6">Court-ordered eviction</text:span></text:span><text:span text:style-name="T6"> and removal of all persons and belongings from the premises </text:span></text:p>
        </text:list-item>
        <text:list-item>
          <text:p text:style-name="P15"><text:span text:style-name="Strong_20_Emphasis"><text:span text:style-name="T6">Additional costs</text:span></text:span><text:span text:style-name="T6"> including court filing fees (approx. ${PLACEHOLDER_COURT_FEES}), attorney fees, and sheriff service fees </text:span></text:p>
        </text:list-item>
        <text:list-item>
          <text:p text:style-name="P15"><text:span text:style-name="Strong_20_Emphasis"><text:span text:style-name="T6">Negative credit reporting</text:span></text:span><text:span text:style-name="T6"> to all major credit bureaus (Equifax, Experian, TransUnion) </text:span></text:p>
        </text:list-item>
        <text:list-item>
          <text:p text:style-name="P15"><text:span text:style-name="Strong_20_Emphasis"><text:span text:style-name="T6">Potential wage garnishment</text:span></text:span><text:span text:style-name="T6"> and bank levy to collect the judgment amount </text:span></text:p>
        </text:list-item>
        <text:list-item>
          <text:p text:style-name="P15"><text:span text:style-name="Strong_20_Emphasis"><text:span text:style-name="T6">Permanent record</text:span></text:span><text:span text:style-name="T6"> on tenant screening databases, affecting future rental applications </text:span></text:p>
        </text:list-item>
      </text:list>
      <text:h text:style-name="P3" text:outline-level="2">3. PAYMENT OPTIONS AND DEADLINES</text:h>
      <text:p text:style-name="Text_20_body">To avoid legal action, you must submit <text:span text:style-name="Strong_20_Emphasis">full payment</text:span> of <text:span text:style-name="T3">${PLACEHOLDER_TOTAL_AMOUNT}</text:span> by <text:span text:style-name="Strong_20_Emphasis">{PLACEHOLDER_DEADLINE_DATE}</text:span> at <text:span text:style-name="Strong_20_Emphasis">5:00 PM</text:span> local time. Acceptable payment method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Payment Method</text:p>
          </table:table-cell>
          <table:table-cell table:style-name="Table2.A1" office:value-type="string">
            <text:p text:style-name="Table_20_Heading">Instructions</text:p>
          </table:table-cell>
          <table:table-cell table:style-name="Table2.A1" office:value-type="string">
            <text:p text:style-name="Table_20_Heading">Processing Time</text:p>
          </table:table-cell>
        </table:table-row>
        <table:table-row>
          <table:table-cell table:style-name="Table2.A1" office:value-type="string">
            <text:p text:style-name="Table_20_Contents"><text:span text:style-name="Strong_20_Emphasis">Online Portal</text:span></text:p>
          </table:table-cell>
          <table:table-cell table:style-name="Table2.A1" office:value-type="string">
            <text:p text:style-name="Table_20_Contents">Pay via tenant portal at <text:span text:style-name="T4">www.pmg-llc.com/pay</text:span> (reference account #{PLACEHOLDER_ACCOUNT_NUMBER})</text:p>
          </table:table-cell>
          <table:table-cell table:style-name="Table2.A1" office:value-type="string">
            <text:p text:style-name="Table_20_Contents">Instant</text:p>
          </table:table-cell>
        </table:table-row>
        <table:table-row>
          <table:table-cell table:style-name="Table2.A1" office:value-type="string">
            <text:p text:style-name="Table_20_Contents"><text:span text:style-name="Strong_20_Emphasis">Certified Bank Check</text:span></text:p>
          </table:table-cell>
          <table:table-cell table:style-name="Table2.A1" office:value-type="string">
            <text:p text:style-name="Table_20_Contents">Deliver in person or mail to our office (address above) - <text:span text:style-name="Emphasis">must be received by deadline</text:span></text:p>
          </table:table-cell>
          <table:table-cell table:style-name="Table2.A1" office:value-type="string">
            <text:p text:style-name="Table_20_Contents">1-2 business days</text:p>
          </table:table-cell>
        </table:table-row>
        <table:table-row>
          <table:table-cell table:style-name="Table2.A1" office:value-type="string">
            <text:p text:style-name="Table_20_Contents"><text:span text:style-name="Strong_20_Emphasis">Money Order</text:span></text:p>
          </table:table-cell>
          <table:table-cell table:style-name="Table2.A1" office:value-type="string">
            <text:p text:style-name="Table_20_Contents">Obtain from any post office or convenience store, payable to "PMG LLC"</text:p>
          </table:table-cell>
          <table:table-cell table:style-name="Table2.A1" office:value-type="string">
            <text:p text:style-name="Table_20_Contents">Same day if hand-delivered</text:p>
          </table:table-cell>
        </table:table-row>
        <table:table-row>
          <table:table-cell table:style-name="Table2.A1" office:value-type="string">
            <text:p text:style-name="Table_20_Contents"><text:span text:style-name="Strong_20_Emphasis">Wire Transfer</text:span></text:p>
          </table:table-cell>
          <table:table-cell table:style-name="Table2.A1" office:value-type="string">
            <text:p text:style-name="Table_20_Contents">Bank: {PLACEHOLDER_BANK_NAME}, Routing: {PLACEHOLDER_ROUTING_NUMBER}, Account: {PLACEHOLDER_ACCOUNT_NUMBER}</text:p>
          </table:table-cell>
          <table:table-cell table:style-name="Table2.A1" office:value-type="string">
            <text:p text:style-name="Table_20_Contents">Same day if before 2 PM</text:p>
          </table:table-cell>
        </table:table-row>
      </table:table>
      <text:p text:style-name="Text_20_body"><text:span text:style-name="Strong_20_Emphasis">⚠️ IMPORTANT:</text:span> Personal checks will <text:span text:style-name="T4">not</text:span> be accepted at this stage due to previous returned payments. Only certified funds will be accepted.</text:p>
      <text:h text:style-name="Heading_20_2" text:outline-level="2">4. TENANT RIGHTS AND RESPONSIBILITIES</text:h>
      <text:p text:style-name="Text_20_body">As a tenant, you have the following rights under {PLACEHOLDER_STATE_NAME} law:</text:p>
      <text:list xml:id="list3064860643" text:style-name="L2">
        <text:list-item>
          <text:p text:style-name="P17"><text:span text:style-name="Strong_20_Emphasis">Right to cure:</text:span> You may avoid eviction by paying the full amount due before the deadline stated above. </text:p>
        </text:list-item>
        <text:list-item>
          <text:p text:style-name="P17"><text:span text:style-name="Strong_20_Emphasis">Right to contest:</text:span> If you believe this notice is in error, you may file a written response with our office within 24 hours. Supporting documentation will be required. </text:p>
        </text:list-item>
        <text:list-item>
          <text:p text:style-name="P17"><text:span text:style-name="Strong_20_Emphasis">Right to legal representation:</text:span> You may consult with an attorney or contact {PLACEHOLDER_LEGAL_AID_NAME} at {PLACEHOLDER_LEGAL_AID_PHONE} for free legal assistance. </text:p>
        </text:list-item>
        <text:list-item>
          <text:p text:style-name="P16"><text:span text:style-name="Strong_20_Emphasis">Right to a hearing:</text:span> If eviction is filed, you will have the opportunity to present your case in court. </text:p>
        </text:list-item>
      </text:list>
      <text:p text:style-name="Text_20_body"><text:span text:style-name="Strong_20_Emphasis">Your responsibilities:</text:span></text:p>
      <text:list xml:id="list72760425" text:style-name="L3">
        <text:list-item>
          <text:p text:style-name="P19">Pay all outstanding rent and fees immediately. </text:p>
        </text:list-item>
        <text:list-item>
          <text:p text:style-name="P19">Maintain the property in good condition during the notice period. </text:p>
        </text:list-item>
        <text:list-item>
          <text:p text:style-name="P19">Do not remove any fixtures or appliances from the premises. </text:p>
        </text:list-item>
        <text:list-item>
          <text:p text:style-name="P18">Cooperate with any inspection or walkthrough requested by management. </text:p>
        </text:list-item>
      </text:list>
      <text:h text:style-name="Heading_20_2" text:outline-level="2">5. CONSEQUENCES OF NON-COMPLIANCE</text:h>
      <text:p text:style-name="Text_20_body">If you fail to pay the full amount by the deadline, the following actions will be taken <text:span text:style-name="Strong_20_Emphasis">without further notice to you</text:span>:</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Action</text:p>
          </table:table-cell>
          <table:table-cell table:style-name="Table3.A1" office:value-type="string">
            <text:p text:style-name="Table_20_Heading">Timeline</text:p>
          </table:table-cell>
          <table:table-cell table:style-name="Table3.A1" office:value-type="string">
            <text:p text:style-name="Table_20_Heading">Estimated Cost to You</text:p>
          </table:table-cell>
        </table:table-row>
        <table:table-row>
          <table:table-cell table:style-name="Table3.A1" office:value-type="string">
            <text:p text:style-name="Table_20_Contents">File Unlawful Detainer Complaint</text:p>
          </table:table-cell>
          <table:table-cell table:style-name="Table3.A1" office:value-type="string">
            <text:p text:style-name="Table_20_Contents">Day 1 after deadline</text:p>
          </table:table-cell>
          <table:table-cell table:style-name="Table3.A1" office:value-type="string">
            <text:p text:style-name="Table_20_Contents">${PLACEHOLDER_COURT_FEES}</text:p>
          </table:table-cell>
        </table:table-row>
        <table:table-row>
          <table:table-cell table:style-name="Table3.A1" office:value-type="string">
            <text:p text:style-name="Table_20_Contents">Service of Summons &amp; Complaint</text:p>
          </table:table-cell>
          <table:table-cell table:style-name="Table3.A1" office:value-type="string">
            <text:p text:style-name="Table_20_Contents">Days 2-5</text:p>
          </table:table-cell>
          <table:table-cell table:style-name="Table3.A1" office:value-type="string">
            <text:p text:style-name="Table_20_Contents">${PLACEHOLDER_SERVICE_FEES}</text:p>
          </table:table-cell>
        </table:table-row>
        <table:table-row>
          <table:table-cell table:style-name="Table3.A1" office:value-type="string">
            <text:p text:style-name="Table_20_Contents">Court Hearing (if contested)</text:p>
          </table:table-cell>
          <table:table-cell table:style-name="Table3.A1" office:value-type="string">
            <text:p text:style-name="Table_20_Contents">Days 15-25</text:p>
          </table:table-cell>
          <table:table-cell table:style-name="Table3.A1" office:value-type="string">
            <text:p text:style-name="Table_20_Contents">${PLACEHOLDER_ATTORNEY_FEES} (minimum)</text:p>
          </table:table-cell>
        </table:table-row>
        <table:table-row>
          <table:table-cell table:style-name="Table3.A1" office:value-type="string">
            <text:p text:style-name="Table_20_Contents">Writ of Possession &amp; Sheriff Eviction</text:p>
          </table:table-cell>
          <table:table-cell table:style-name="Table3.A1" office:value-type="string">
            <text:p text:style-name="Table_20_Contents">Days 30-45</text:p>
          </table:table-cell>
          <table:table-cell table:style-name="Table3.A1" office:value-type="string">
            <text:p text:style-name="Table_20_Contents">${PLACEHOLDER_SHERRIF_FEES} + storage costs</text:p>
          </table:table-cell>
        </table:table-row>
        <table:table-row>
          <table:table-cell table:style-name="Table3.A1" office:value-type="string">
            <text:p text:style-name="Table_20_Contents"><text:span text:style-name="Strong_20_Emphasis">Total Potential Liability</text:span></text:p>
          </table:table-cell>
          <table:table-cell table:style-name="Table3.A1" office:value-type="string">
            <text:p text:style-name="P5"/>
          </table:table-cell>
          <table:table-cell table:style-name="Table3.A1" office:value-type="string">
            <text:p text:style-name="Table_20_Contents"><text:span text:style-name="Strong_20_Emphasis">${PLACEHOLDER_TOTAL_POTENTIAL_COSTS}</text:span></text:p>
          </table:table-cell>
        </table:table-row>
      </table:table>
      <text:p text:style-name="P7"><text:span text:style-name="T7">⏰ </text:span><text:span text:style-name="Strong_20_Emphasis"><text:span text:style-name="T7">YOU HAVE 48 HOURS TO PAY ${PLACEHOLDER_TOTAL_AMOUNT}</text:span></text:span><text:span text:style-name="T7"> ⏰</text:span></text:p>
      <text:p text:style-name="P7"><text:span text:style-name="T7">Deadline: </text:span><text:span text:style-name="Strong_20_Emphasis"><text:span text:style-name="T7">{PLACEHOLDER_DEADLINE_DATE} at 5:00 PM</text:span></text:span></text:p>
      <text:p text:style-name="P20">This notice is sent in good faith and in compliance with {PLACEHOLDER_STATE_NAME} landlord-tenant law. We urge you to take immediate action to resolve this matter and avoid the serious consequences of eviction.</text:p>
      <text:p text:style-name="P21">Sincerely,</text:p>
      <text:p text:style-name="P22"><text:span text:style-name="Strong_20_Emphasis"><text:span text:style-name="T8">{PLACEHOLDER_MANAGER_NAME}</text:span></text:span></text:p>
      <text:p text:style-name="P22"><text:span text:style-name="Emphasis"><text:span text:style-name="T8">Property Manager, PMG LLC</text:span></text:span></text:p>
      <text:p text:style-name="P21">License #: {PLACEHOLDER_MANAGER_LICENSE}</text:p>
      <text:p text:style-name="P22"><text:span text:style-name="Strong_20_Emphasis"><text:span text:style-name="T8">CC:</text:span></text:span><text:span text:style-name="T8"> {PLACEHOLDER_ATTORNEY_NAME}, Legal Counsel | {PLACEHOLDER_COURT_NAME} | Tenant File #{PLACEHOLDER_FILE_NUMBER}</text:span></text:p>
      <text:p text:style-name="P8"><text:span text:style-name="Strong_20_Emphasis"><text:span text:style-name="T9">DISCLAIMER:</text:span></text:span><text:span text:style-name="T9"> This document is an official legal notice. If you are experiencing financial hardship, please contact our office immediately to discuss possible payment arrangements before the deadline. No extensions will be granted after the 48-hour period expires.</text:span></text:p>
      <text:p text:style-name="P23">Document ID: {PLACEHOLDER_DOCUMENT_ID} | Generated: {PLACEHOLDER_GENERATION_DATE} | Page 1 of 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50%" fo:text-indent="0in" style:auto-text-indent="false"/>
      <style:text-properties fo:color="#1a1a1a"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083in" style:contextual-spacing="false" fo:text-align="center" style:justify-single-word="false" fo:padding-left="0in" fo:padding-right="0in" fo:padding-top="0in" fo:padding-bottom="0.0835in" fo:border-left="none" fo:border-right="none" fo:border-top="none" fo:border-bottom="2.24pt solid #8b0000"/>
      <style:text-properties fo:text-transform="uppercase" fo:color="#8b0000" loext:opacity="100%" style:font-name="Liberation Sans1" fo:font-family="'Liberation Sans', Arial, sans-serif" fo:font-size="22pt" fo:letter-spacing="0.0209in" fo:font-weight="bold" style:font-name-asian="Liberation Sans1" style:font-family-asian="'Liberation Sans', Arial, sans-serif" style:font-size-asian="22pt" style:font-weight-asian="bold" style:font-name-complex="Liberation Sans1" style:font-family-complex="'Liberation Sans', Arial, sans-serif"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043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602in" fo:margin-bottom="0.1043in" style:contextual-spacing="false" fo:padding-left="0.1043in" fo:padding-right="0in" fo:padding-top="0in" fo:padding-bottom="0in" fo:border-left="3.74pt solid #8b0000" fo:border-right="none" fo:border-top="none" fo:border-bottom="none"/>
      <style:text-properties fo:color="#2c3e50" loext:opacity="100%" style:font-name="Liberation Sans1" fo:font-family="'Liberation Sans', Arial, sans-serif" fo:font-size="16pt" fo:font-weight="bold" style:font-name-asian="Liberation Sans1" style:font-family-asian="'Liberation Sans', Arial, sans-serif" style:font-size-asian="16pt" style:font-weight-asian="bold" style:font-name-complex="Liberation Sans1" style:font-family-complex="'Liberation Sans', Arial, sans-serif"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1563in" fo:margin-bottom="0.0835in" style:contextual-spacing="false"/>
      <style:text-properties fo:color="#34495e" loext:opacity="100%" style:font-name="Liberation Sans1" fo:font-family="'Liberation Sans', Arial, sans-serif" fo:font-size="13pt" fo:font-weight="bold" style:font-name-asian="Liberation Sans1" style:font-family-asian="'Liberation Sans', Arial, sans-serif" style:font-size-asian="13pt" style:font-weight-asian="bold" style:font-name-complex="Liberation Sans1" style:font-family-complex="'Liberation Sans', Arial, sans-serif" style:font-size-complex="13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3" meta:image-count="0" meta:object-count="0" meta:page-count="1" meta:paragraph-count="103" meta:word-count="729" meta:character-count="5422" meta:non-whitespace-character-count="4795"/>
    <meta:generator>LibreOffice/7.3.7.2$Linux_X86_64 LibreOffice_project/30$Build-2</meta:generator>
  </office:meta>
</office:document-meta>
</file>