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4.6056in" table:align="left"/>
    </style:style>
    <style:style style:name="Table1.A" style:family="table-column">
      <style:table-column-properties style:column-width="1.6778in"/>
    </style:style>
    <style:style style:name="Table1.B" style:family="table-column">
      <style:table-column-properties style:column-width="2.9278in"/>
    </style:style>
    <style:style style:name="Table1.A1" style:family="table-cell">
      <style:table-cell-properties style:vertical-align="middle" fo:padding="0.0194in" fo:border="none"/>
    </style:style>
    <style:style style:name="Table2" style:family="table">
      <style:table-properties style:width="6.3in" table:align="left"/>
    </style:style>
    <style:style style:name="Table2.A" style:family="table-column">
      <style:table-column-properties style:column-width="0.1674in"/>
    </style:style>
    <style:style style:name="Table2.B" style:family="table-column">
      <style:table-column-properties style:column-width="1.3063in"/>
    </style:style>
    <style:style style:name="Table2.C" style:family="table-column">
      <style:table-column-properties style:column-width="4.8264in"/>
    </style:style>
    <style:style style:name="Table2.A1" style:family="table-cell">
      <style:table-cell-properties style:vertical-align="middle" fo:padding="0.0194in" fo:border="none"/>
    </style:style>
    <style:style style:name="P1" style:family="paragraph" style:parent-style-name="Heading_20_1" style:master-page-name="HTML">
      <style:paragraph-properties fo:margin-top="0in" fo:margin-bottom="0.2083in" style:contextual-spacing="false" fo:text-align="center" style:justify-single-word="false" style:page-number="auto"/>
      <style:text-properties loext:border-line-width-bottom="0.0102in 0.0102in 0.0102in" loext:padding-left="0in" loext:padding-right="0in" loext:padding-top="0in" loext:padding-bottom="0.1252in" loext:border-left="none" loext:border-right="none" loext:border-top="none" loext:border-bottom="2.24pt double #222222"/>
    </style:style>
    <style:style style:name="P2" style:family="paragraph" style:parent-style-name="Heading_20_2">
      <style:text-properties fo:color="#8b0000" loext:opacity="100%" fo:font-size="14pt"/>
    </style:style>
    <style:style style:name="P3" style:family="paragraph" style:parent-style-name="Heading_20_3">
      <style:paragraph-properties fo:margin-left="0.1665in" fo:margin-right="0.1665in" fo:text-indent="0in" style:auto-text-indent="false" fo:padding-left="0in" fo:padding-right="0in" fo:padding-top="0in" fo:padding-bottom="0.0417in" fo:border-left="none" fo:border-right="none" fo:border-top="none" fo:border-bottom="0.06pt solid #cccccc"/>
      <style:text-properties fo:color="#333333" loext:opacity="100%"/>
    </style:style>
    <style:style style:name="P4" style:family="paragraph" style:parent-style-name="Heading_20_3">
      <style:paragraph-properties fo:padding-left="0in" fo:padding-right="0in" fo:padding-top="0in" fo:padding-bottom="0.0417in" fo:border-left="none" fo:border-right="none" fo:border-top="none" fo:border-bottom="0.06pt solid #cccccc"/>
      <style:text-properties fo:color="#333333" loext:opacity="100%"/>
    </style:style>
    <style:style style:name="P5" style:family="paragraph" style:parent-style-name="Text_20_Body.subject-line">
      <style:paragraph-properties fo:margin-left="0.2083in" fo:margin-right="0.2083in" fo:text-indent="0in" style:auto-text-indent="false"/>
    </style:style>
    <style:style style:name="P6" style:family="paragraph" style:parent-style-name="Text_20_body">
      <style:paragraph-properties fo:margin-top="0in" fo:margin-bottom="0.2083in" style:contextual-spacing="false" fo:text-align="center" style:justify-single-word="false"/>
      <style:text-properties loext:border-line-width-bottom="0.0102in 0.0102in 0.0102in" loext:padding-left="0in" loext:padding-right="0in" loext:padding-top="0in" loext:padding-bottom="0.1252in" loext:border-left="none" loext:border-right="none" loext:border-top="none" loext:border-bottom="2.24pt double #222222"/>
    </style:style>
    <style:style style:name="P7" style:family="paragraph" style:parent-style-name="Text_20_body">
      <style:paragraph-properties fo:margin-top="0in" fo:margin-bottom="0.1665in" style:contextual-spacing="false" fo:text-align="end" style:justify-single-word="false"/>
      <style:text-properties fo:font-size="11pt" fo:font-weight="bold" fo:background-color="#f2f2f2" loext:padding-left="0.0835in" loext:padding-right="0in" loext:padding-top="0in" loext:padding-bottom="0in" loext:border-left="3pt solid #cc0000" loext:border-right="none" loext:border-top="none" loext:border-bottom="none"/>
    </style:style>
    <style:style style:name="P8" style:family="paragraph" style:parent-style-name="Text_20_body">
      <style:paragraph-properties fo:margin-left="0.2083in" fo:margin-right="0.2083in" fo:margin-top="0.2083in" fo:margin-bottom="0.25in" style:contextual-spacing="false" fo:text-indent="0in" style:auto-text-indent="false"/>
    </style:style>
    <style:style style:name="P9" style:family="paragraph" style:parent-style-name="Text_20_body">
      <style:paragraph-properties fo:margin-left="0.1665in" fo:margin-right="0.1665in" fo:margin-top="0.1665in" fo:margin-bottom="0.1665in" style:contextual-spacing="false" fo:text-indent="0in" style:auto-text-indent="false"/>
    </style:style>
    <style:style style:name="P10" style:family="paragraph" style:parent-style-name="Text_20_body">
      <style:paragraph-properties fo:margin-left="0.1665in" fo:margin-right="0.1665in" fo:margin-top="0.1665in" fo:margin-bottom="0.1665in" style:contextual-spacing="false" fo:text-indent="0in" style:auto-text-indent="false"/>
      <style:text-properties fo:background-color="#fff3f3" loext:padding-left="0.1457in" loext:padding-right="0in" loext:padding-top="0in" loext:padding-bottom="0in" loext:border-left="3pt solid #cc0000" loext:border-right="none" loext:border-top="none" loext:border-bottom="none"/>
    </style:style>
    <style:style style:name="P11" style:family="paragraph" style:parent-style-name="Text_20_body">
      <style:paragraph-properties fo:margin-left="0.1874in" fo:margin-right="0.1874in" fo:margin-top="0.1874in" fo:margin-bottom="0.1874in" style:contextual-spacing="false" fo:text-align="center" style:justify-single-word="false" fo:text-indent="0in" style:auto-text-indent="false"/>
    </style:style>
    <style:style style:name="P12" style:family="paragraph" style:parent-style-name="Text_20_body" style:list-style-name="L1"/>
    <style:style style:name="P13" style:family="paragraph" style:parent-style-name="Text_20_body" style:list-style-name="L1">
      <style:paragraph-properties fo:margin-top="0in" fo:margin-bottom="0in" style:contextual-spacing="false"/>
    </style:style>
    <style:style style:name="P14" style:family="paragraph" style:parent-style-name="Text_20_body" style:list-style-name="L2"/>
    <style:style style:name="P15" style:family="paragraph" style:parent-style-name="Text_20_body" style:list-style-name="L2">
      <style:paragraph-properties fo:margin-top="0in" fo:margin-bottom="0in" style:contextual-spacing="false"/>
    </style:style>
    <style:style style:name="P16" style:family="paragraph" style:parent-style-name="Text_20_body">
      <style:paragraph-properties fo:margin-top="0.3335in" fo:margin-bottom="0.1965in" style:contextual-spacing="false"/>
    </style:style>
    <style:style style:name="P17" style:family="paragraph" style:parent-style-name="Text_20_body">
      <style:paragraph-properties fo:margin-top="0.2917in" fo:margin-bottom="0.1965in" style:contextual-spacing="false" fo:line-height="140%"/>
    </style:style>
    <style:style style:name="P18" style:family="paragraph" style:parent-style-name="Text_20_body">
      <style:paragraph-properties fo:margin-top="0.2083in" fo:margin-bottom="0.1965in" style:contextual-spacing="false"/>
      <style:text-properties fo:color="#666666" loext:opacity="100%" loext:padding-left="0in" loext:padding-right="0in" loext:padding-top="0.0835in" loext:padding-bottom="0in" loext:border-left="none" loext:border-right="none" loext:border-top="0.06pt dotted #aaaaaa" loext:border-bottom="none"/>
    </style:style>
    <style:style style:name="P19" style:family="paragraph" style:parent-style-name="Text_20_body">
      <style:paragraph-properties fo:margin-top="0.2083in" fo:margin-bottom="0.1965in" style:contextual-spacing="false"/>
      <style:text-properties fo:color="#666666" loext:opacity="100%" fo:font-size="8.5pt" fo:font-style="italic" loext:padding-left="0in" loext:padding-right="0in" loext:padding-top="0.0835in" loext:padding-bottom="0in" loext:border-left="none" loext:border-right="none" loext:border-top="0.06pt dotted #aaaaaa" loext:border-bottom="none"/>
    </style:style>
    <style:style style:name="T1" style:family="text">
      <style:text-properties fo:color="#cc0000" loext:opacity="100%"/>
    </style:style>
    <style:style style:name="T2" style:family="text">
      <style:text-properties fo:color="#cc0000" loext:opacity="100%" fo:font-weight="bold"/>
    </style:style>
    <style:style style:name="T3" style:family="text">
      <style:text-properties style:text-underline-style="solid" style:text-underline-width="auto" style:text-underline-color="font-color"/>
    </style:style>
    <style:style style:name="T4" style:family="text">
      <style:text-properties fo:background-color="#fff3f3" loext:char-shading-value="0" loext:padding-left="0.1457in" loext:padding-right="0in" loext:padding-top="0in" loext:padding-bottom="0in" loext:border-left="3pt solid #cc0000" loext:border-right="none" loext:border-top="none" loext:border-bottom="none"/>
    </style:style>
    <style:style style:name="T5" style:family="text">
      <style:text-properties fo:font-size="10pt" fo:background-color="#fff8f8" loext:char-shading-value="0" loext:padding="0.1252in" loext:border="1.5pt solid #cc0000"/>
    </style:style>
    <style:style style:name="T6" style:family="text">
      <style:text-properties fo:background-color="#fff8f8" loext:char-shading-value="0" loext:padding="0.1252in" loext:border="1.5pt solid #cc0000"/>
    </style:style>
    <style:style style:name="T7" style:family="text">
      <style:text-properties fo:color="#444444" loext:opacity="100%" fo:font-size="9pt" loext:padding-left="0in" loext:padding-right="0in" loext:padding-top="0.1457in" loext:padding-bottom="0in" loext:border-left="none" loext:border-right="none" loext:border-top="0.06pt solid #666666" loext:border-bottom="none"/>
    </style:style>
    <style:style style:name="T8" style:family="text">
      <style:text-properties fo:font-size="8.5pt" fo:font-style="italic"/>
    </style:style>
    <style:style style:name="T9"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GAL RECOVERY SERVICES, INC.</text:p>
      <text:p text:style-name="P6">Suite 1200 • 400 Commerce Boulevard • Metro City, ST 90210</text:p>
      <text:p text:style-name="P6">Phone: (555) 234-8900 • Fax: (555) 234-8901 • Email: collections@lrs-legal.example.com</text:p>
      <text:p text:style-name="P7">CASE NUMBER: <text:span text:style-name="T1">{PLACEHOLDER_CASE_NUMBER}</text:span> </text:p>
      <text:p text:style-name="P8"><text:span text:style-name="Strong_20_Emphasis">{PLACEHOLDER_NAME}</text:span></text:p>
      <text:p text:style-name="P8">{PLACEHOLDER_ADDRESS_LINE1}</text:p>
      <text:p text:style-name="P8">{PLACEHOLDER_ADDRESS_LINE2}</text:p>
      <text:p text:style-name="P8">{PLACEHOLDER_CITY}, {PLACEHOLDER_STATE} {PLACEHOLDER_ZIP}</text:p>
      <text:p text:style-name="P5">RE: FINAL NOTICE OF INTENDED LEGAL ACTION — DELINQUENT ACCOUNT</text:p>
      <text:p text:style-name="Text_20_body"><text:span text:style-name="Strong_20_Emphasis">Date:</text:span> {PLACEHOLDER_TODAY_DATE}</text:p>
      <text:p text:style-name="Text_20_body"><text:span text:style-name="Strong_20_Emphasis">Response Deadline:</text:span> <text:span text:style-name="T2">{PLACEHOLDER_DEADLINE_DATE}</text:span> (7 calendar days from date above)</text:p>
      <text:h text:style-name="P2" text:outline-level="2">FINAL DEMAND FOR PAYMENT</text:h>
      <text:p text:style-name="Text_20_body">Dear <text:span text:style-name="Strong_20_Emphasis">{PLACEHOLDER_NAME}</text:span>,</text:p>
      <text:p text:style-name="Text_20_body">This letter constitutes your <text:span text:style-name="Strong_20_Emphasis"><text:span text:style-name="T3">FINAL NOTICE</text:span></text:span> regarding the outstanding balance on account <text:span text:style-name="Strong_20_Emphasis">{PLACEHOLDER_CASE_NUMBER}</text:span>. Despite multiple prior attempts to contact you by mail and telephone, the amount of <text:span text:style-name="Strong_20_Emphasis">$2,000.00 (Two Thousand Dollars and Zero Cents)</text:span> remains unpaid and is now significantly past due.</text:p>
      <text:p text:style-name="P10">⚠ IMMEDIATE ACTION REQUIRED — LEGAL PROCEEDINGS WILL COMMENCE</text:p>
      <text:p text:style-name="P9"><text:span text:style-name="T4">Unless full payment is received by </text:span><text:span text:style-name="Strong_20_Emphasis"><text:span text:style-name="T4">{PLACEHOLDER_DEADLINE_DATE}</text:span></text:span><text:span text:style-name="T4">, we will file a civil lawsuit against you without further notice. This may result in wage garnishment, bank account levies, and liens against your property.</text:span></text:p>
      <text:h text:style-name="P3" text:outline-level="3">Summary of Delinquent Account</text:h>
      <table:table table:name="Table1" table:style-name="Table1">
        <table:table-column table:style-name="Table1.A"/>
        <table:table-column table:style-name="Table1.B"/>
        <table:table-row>
          <table:table-cell table:style-name="Table1.A1" office:value-type="string">
            <text:p text:style-name="Table_20_Heading">Description</text:p>
          </table:table-cell>
          <table:table-cell table:style-name="Table1.A1" office:value-type="string">
            <text:p text:style-name="Table_20_Heading">Details</text:p>
          </table:table-cell>
        </table:table-row>
        <table:table-row>
          <table:table-cell table:style-name="Table1.A1" office:value-type="string">
            <text:p text:style-name="Table_20_Contents">Account / Case Number</text:p>
          </table:table-cell>
          <table:table-cell table:style-name="Table1.A1" office:value-type="string">
            <text:p text:style-name="Table_20_Contents"><text:span text:style-name="Strong_20_Emphasis">{PLACEHOLDER_CASE_NUMBER}</text:span></text:p>
          </table:table-cell>
        </table:table-row>
        <table:table-row>
          <table:table-cell table:style-name="Table1.A1" office:value-type="string">
            <text:p text:style-name="Table_20_Contents">Debtor Name</text:p>
          </table:table-cell>
          <table:table-cell table:style-name="Table1.A1" office:value-type="string">
            <text:p text:style-name="Table_20_Contents">{PLACEHOLDER_NAME}</text:p>
          </table:table-cell>
        </table:table-row>
        <table:table-row>
          <table:table-cell table:style-name="Table1.A1" office:value-type="string">
            <text:p text:style-name="Table_20_Contents">Original Creditor</text:p>
          </table:table-cell>
          <table:table-cell table:style-name="Table1.A1" office:value-type="string">
            <text:p text:style-name="Table_20_Contents">Premier Financial Services Corp.</text:p>
          </table:table-cell>
        </table:table-row>
        <table:table-row>
          <table:table-cell table:style-name="Table1.A1" office:value-type="string">
            <text:p text:style-name="Table_20_Contents">Principal Balance Due</text:p>
          </table:table-cell>
          <table:table-cell table:style-name="Table1.A1" office:value-type="string">
            <text:p text:style-name="Table_20_Contents"><text:span text:style-name="Strong_20_Emphasis">$2,000.00</text:span></text:p>
          </table:table-cell>
        </table:table-row>
        <table:table-row>
          <table:table-cell table:style-name="Table1.A1" office:value-type="string">
            <text:p text:style-name="Table_20_Contents">Accrued Interest &amp; Fees</text:p>
          </table:table-cell>
          <table:table-cell table:style-name="Table1.A1" office:value-type="string">
            <text:p text:style-name="Table_20_Contents">$0.00 (waived if paid in full by deadline)</text:p>
          </table:table-cell>
        </table:table-row>
        <table:table-row>
          <table:table-cell table:style-name="Table1.A1" office:value-type="string">
            <text:p text:style-name="Table_20_Contents"><text:span text:style-name="Strong_20_Emphasis">Total Amount Due</text:span></text:p>
          </table:table-cell>
          <table:table-cell table:style-name="Table1.A1" office:value-type="string">
            <text:p text:style-name="Table_20_Contents"><text:span text:style-name="Strong_20_Emphasis"><text:span text:style-name="T1">$2,000.00</text:span></text:span></text:p>
          </table:table-cell>
        </table:table-row>
      </table:table>
      <text:p text:style-name="P11"><text:span text:style-name="Strong_20_Emphasis"><text:span text:style-name="T6">⏰ FINAL DEADLINE: {PLACEHOLDER_DEADLINE_DATE} at 5:00 PM EST</text:span></text:span><text:span text:style-name="T6"><text:line-break/></text:span><text:span text:style-name="T5">No extensions will be granted. No partial payments will be accepted after this date.</text:span><text:span text:style-name="T6"> </text:span></text:p>
      <text:h text:style-name="P4" text:outline-level="3"><text:soft-page-break/>Available Payment Methods</text:h>
      <text:list xml:id="list160279410" text:style-name="L1">
        <text:list-item>
          <text:p text:style-name="P13"><text:span text:style-name="Strong_20_Emphasis">Online:</text:span> Visit <text:span text:style-name="T3">https://payments.lrs-legal.example.com</text:span> and reference Case #{PLACEHOLDER_CASE_NUMBER} </text:p>
        </text:list-item>
        <text:list-item>
          <text:p text:style-name="P13"><text:span text:style-name="Strong_20_Emphasis">Phone:</text:span> Call (555) 234-8900, option 3, to pay by credit/debit card or electronic check </text:p>
        </text:list-item>
        <text:list-item>
          <text:p text:style-name="P13"><text:span text:style-name="Strong_20_Emphasis">Certified Check or Money Order:</text:span> Make payable to "Legal Recovery Services, Inc." and mail to the address above. <text:span text:style-name="Emphasis">Personal checks will not be accepted at this stage.</text:span> </text:p>
        </text:list-item>
        <text:list-item>
          <text:p text:style-name="P12"><text:span text:style-name="Strong_20_Emphasis">In Person:</text:span> Visit our office during business hours (Mon–Fri, 8:30 AM – 5:00 PM). Cash, cashier's check, or money order only. </text:p>
        </text:list-item>
      </text:list>
      <text:h text:style-name="P4" text:outline-level="3">Legal Consequences of Non-Payment</text:h>
      <text:p text:style-name="Text_20_body">If you fail to remit the full $2,000.00 by the deadline stated above, the following actions will be taken <text:span text:style-name="Strong_20_Emphasis">without any additional notice</text:span>:</text:p>
      <text:list xml:id="list4137983474" text:style-name="L2">
        <text:list-item>
          <text:p text:style-name="P15">A civil complaint will be filed in the <text:span text:style-name="Strong_20_Emphasis">Superior Court of {PLACEHOLDER_COUNTY}</text:span> against you. </text:p>
        </text:list-item>
        <text:list-item>
          <text:p text:style-name="P15">We will seek judgment for the full amount plus court costs, filing fees, and statutory interest at the maximum legal rate. </text:p>
        </text:list-item>
        <text:list-item>
          <text:p text:style-name="P15">Upon obtaining judgment, we will pursue all available collection remedies including but not limited to: </text:p>
          <text:list>
            <text:list-item>
              <text:p text:style-name="P15">Wage garnishment (up to 25% of disposable earnings) </text:p>
            </text:list-item>
            <text:list-item>
              <text:p text:style-name="P15">Bank account levy and seizure of funds </text:p>
            </text:list-item>
            <text:list-item>
              <text:p text:style-name="P15">Real property lien filing </text:p>
            </text:list-item>
            <text:list-item>
              <text:p text:style-name="P15">Personal property seizure by sheriff or marshal </text:p>
            </text:list-item>
          </text:list>
        </text:list-item>
        <text:list-item>
          <text:p text:style-name="P14">A negative credit report will be filed with all major credit bureaus, which may remain on your credit history for up to seven (7) years. </text:p>
        </text:list-item>
      </text:list>
      <text:h text:style-name="P4" text:outline-level="3">Your Options to Avoid Legal Action</text:h>
      <text:p text:style-name="Text_20_body">You have only the following options available at this time:</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text:p>
          </table:table-cell>
          <table:table-cell table:style-name="Table2.A1" office:value-type="string">
            <text:p text:style-name="Table_20_Heading">Option</text:p>
          </table:table-cell>
          <table:table-cell table:style-name="Table2.A1" office:value-type="string">
            <text:p text:style-name="Table_20_Heading">Requirement</text:p>
          </table:table-cell>
        </table:table-row>
        <table:table-row>
          <table:table-cell table:style-name="Table2.A1" office:value-type="string">
            <text:p text:style-name="Table_20_Contents">1</text:p>
          </table:table-cell>
          <table:table-cell table:style-name="Table2.A1" office:value-type="string">
            <text:p text:style-name="Table_20_Contents"><text:span text:style-name="Strong_20_Emphasis">Pay in Full</text:span></text:p>
          </table:table-cell>
          <table:table-cell table:style-name="Table2.A1" office:value-type="string">
            <text:p text:style-name="Table_20_Contents">Pay $2,000.00 by {PLACEHOLDER_DEADLINE_DATE}. Case will be closed and no legal action taken.</text:p>
          </table:table-cell>
        </table:table-row>
        <table:table-row>
          <table:table-cell table:style-name="Table2.A1" office:value-type="string">
            <text:p text:style-name="Table_20_Contents">2</text:p>
          </table:table-cell>
          <table:table-cell table:style-name="Table2.A1" office:value-type="string">
            <text:p text:style-name="Table_20_Contents"><text:span text:style-name="Strong_20_Emphasis">Certified Dispute</text:span></text:p>
          </table:table-cell>
          <table:table-cell table:style-name="Table2.A1" office:value-type="string">
            <text:p text:style-name="Table_20_Contents">If you believe this debt is not yours or the amount is incorrect, you must submit a <text:span text:style-name="T3">written, notarized dispute</text:span> by the deadline. Supporting documentation required.</text:p>
          </table:table-cell>
        </table:table-row>
        <table:table-row>
          <table:table-cell table:style-name="Table2.A1" office:value-type="string">
            <text:p text:style-name="Table_20_Contents">3</text:p>
          </table:table-cell>
          <table:table-cell table:style-name="Table2.A1" office:value-type="string">
            <text:p text:style-name="Table_20_Contents"><text:span text:style-name="Strong_20_Emphasis">Legal Representation</text:span></text:p>
          </table:table-cell>
          <table:table-cell table:style-name="Table2.A1" office:value-type="string">
            <text:p text:style-name="Table_20_Contents">You may have your attorney contact our legal department at (555) 234-8999 before the deadline. No further extensions will be granted.</text:p>
          </table:table-cell>
        </table:table-row>
      </table:table>
      <text:p text:style-name="Text_20_body"><text:span text:style-name="Strong_20_Emphasis"><text:span text:style-name="T3">Important:</text:span></text:span> Telephone calls or verbal promises to pay do not stop the legal process. Only receipt of full payment or a properly notarized written dispute by the deadline will halt proceedings.</text:p>
      <text:p text:style-name="P16">Sincerely,</text:p>
      <text:p text:style-name="P16"/>
      <text:p text:style-name="P16"><text:span text:style-name="Strong_20_Emphasis">Margaret R. Hollister</text:span></text:p>
      <text:p text:style-name="P16">Senior Collections Counsel</text:p>
      <text:p text:style-name="P16"><text:soft-page-break/>Legal Recovery Services, Inc.</text:p>
      <text:p text:style-name="P16">Bar Number: {PLACEHOLDER_BAR_NUMBER}</text:p>
      <text:p text:style-name="P17"><text:span text:style-name="Strong_20_Emphasis"><text:span text:style-name="T7">DISCLAIMER:</text:span></text:span><text:span text:style-name="T7"> This communication is from a debt collector. This is an attempt to collect a debt, and any information obtained will be used for that purpose. This letter is not a legal notice from any court, but a final demand for payment prior to litigation.</text:span></text:p>
      <text:p text:style-name="P17"><text:span text:style-name="Strong_20_Emphasis"><text:span text:style-name="T7">STATE LICENSING:</text:span></text:span><text:span text:style-name="T7"> Licensed by the Department of Financial Services in all states where required. Collection agency license numbers available upon request.</text:span></text:p>
      <text:p text:style-name="P17"><text:span text:style-name="Strong_20_Emphasis"><text:span text:style-name="T7">PRIVACY NOTICE:</text:span></text:span><text:span text:style-name="T7"> This communication contains confidential information intended only for the named recipient. If you have received this letter in error, please notify us immediately and destroy all copies.</text:span></text:p>
      <text:p text:style-name="P18">† <text:span text:style-name="T8">Pursuant to the Fair Debt Collection Practices Act (FDCPA), you have the right to request validation of this debt within 30 days of receipt of this notice. However, please be advised that this final notice supersedes all prior communications and the 7-day payment deadline remains in effect regardless of any validation request. If you dispute the debt in writing within 30 days, we will provide verification. Failure to dispute within 30 days may result in the debt being assumed valid.</text:span></text:p>
      <text:p text:style-name="P19">This letter is a template generated for mail merge. Fields marked with {PLACEHOLDER_*} will be populated from the data source 'delinquents.csv' during the merge process in LibreOffice Writ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color="#1a1a1a" loext:opacity="100%" style:font-name="Liberation Serif1" fo:font-family="'Liberation Serif', 'Times New Roman', serif" fo:font-size="12pt" style:font-name-asian="Liberation Serif1" style:font-family-asian="'Liberation Serif', 'Times New Roman', serif" style:font-size-asian="12pt" style:font-name-complex="Liberation Serif1" style:font-family-complex="'Liberation Serif', 'Times New Roman',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Text_20_Body.subject-line" style:display-name="Text Body.subject-line" style:family="paragraph" style:parent-style-name="Text_20_body">
      <style:paragraph-properties fo:margin-top="0in" fo:margin-bottom="0.1665in" style:contextual-spacing="false"/>
      <style:text-properties fo:font-size="13pt" style:text-underline-style="solid" style:text-underline-width="auto" style:text-underline-color="font-color" fo:font-weight="bold"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0.9839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3" meta:paragraph-count="72" meta:word-count="754" meta:character-count="5029" meta:non-whitespace-character-count="4343"/>
    <meta:generator>LibreOffice/7.3.7.2$Linux_X86_64 LibreOffice_project/30$Build-2</meta:generator>
  </office:meta>
</office:document-meta>
</file>