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Brush Script MT" svg:font-family="'Brush Script MT', cursive"/>
    <style:font-face style:name="Courier New" svg:font-family="'Courier New'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automatic-styles>
    <style:style style:name="Table1" style:family="table">
      <style:table-properties style:width="8.7354in" table:align="left"/>
    </style:style>
    <style:style style:name="Table1.A" style:family="table-column">
      <style:table-column-properties style:column-width="2.2139in"/>
    </style:style>
    <style:style style:name="Table1.B" style:family="table-column">
      <style:table-column-properties style:column-width="4.8076in"/>
    </style:style>
    <style:style style:name="Table1.C" style:family="table-column">
      <style:table-column-properties style:column-width="1.71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2.8715in"/>
    </style:style>
    <style:style style:name="Table2.B" style:family="table-column">
      <style:table-column-properties style:column-width="4.215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left="0.2083in" fo:margin-right="0.2083in" fo:text-indent="0in" style:auto-text-indent="false"/>
    </style:style>
    <style:style style:name="P2" style:family="paragraph" style:parent-style-name="Text_20_body" style:master-page-name="HTML">
      <style:paragraph-properties fo:margin-top="0in" fo:margin-bottom="0.2083in" style:contextual-spacing="false" fo:text-align="center" style:justify-single-word="false" style:page-number="auto"/>
      <style:text-properties fo:color="#cc0000" loext:opacity="100%" fo:font-size="14pt" fo:font-weight="bold" loext:border-line-width="0.0102in 0.0102in 0.0102in" loext:padding-left="0.1563in" loext:padding-right="0.1563in" loext:padding-top="0.052in" loext:padding-bottom="0.052in" loext:border="2.24pt double #cc0000"/>
    </style:style>
    <style:style style:name="P3" style:family="paragraph" style:parent-style-name="Text_20_body">
      <style:paragraph-properties fo:margin-top="0in" fo:margin-bottom="0.3126in" style:contextual-spacing="false" fo:text-align="end" style:justify-single-word="false"/>
    </style:style>
    <style:style style:name="P4" style:family="paragraph" style:parent-style-name="Text_20_body">
      <style:paragraph-properties fo:margin-top="0in" fo:margin-bottom="0.3126in" style:contextual-spacing="false"/>
    </style:style>
    <style:style style:name="P5" style:family="paragraph" style:parent-style-name="Text_20_body">
      <style:paragraph-properties fo:margin-left="0.2083in" fo:margin-right="0.2083in" fo:margin-top="0.2083in" fo:margin-bottom="0.2083in" style:contextual-spacing="false" fo:text-align="center" style:justify-single-word="false" fo:text-indent="0in" style:auto-text-indent="false"/>
      <style:text-properties fo:background-color="#fff5f5" loext:padding="0.1563in" loext:border="1.5pt solid #8b0000"/>
    </style:style>
    <style:style style:name="P6" style:family="paragraph" style:parent-style-name="Text_20_body">
      <style:paragraph-properties fo:margin-left="0.2083in" fo:margin-right="0.2083in" fo:margin-top="0.2083in" fo:margin-bottom="0.2083in" style:contextual-spacing="false" fo:text-align="center" style:justify-single-word="false" fo:text-indent="0in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>
      <style:paragraph-properties fo:margin-left="0.2083in" fo:margin-right="0.9839in" fo:margin-top="0in" fo:margin-bottom="0in" style:contextual-spacing="false" fo:text-indent="0in" style:auto-text-indent="false"/>
    </style:style>
    <style:style style:name="P12" style:family="paragraph" style:parent-style-name="Text_20_body" style:list-style-name="L3">
      <style:paragraph-properties fo:margin-left="0.2083in" fo:margin-right="0.9839in" fo:text-indent="0in" style:auto-text-indent="false"/>
    </style:style>
    <style:style style:name="P13" style:family="paragraph" style:parent-style-name="Text_20_body">
      <style:paragraph-properties fo:margin-top="0.4165in" fo:margin-bottom="0.1252in" style:contextual-spacing="false"/>
    </style:style>
    <style:style style:name="P14" style:family="paragraph" style:parent-style-name="Text_20_body">
      <style:paragraph-properties fo:margin-top="0.3126in" fo:margin-bottom="0.1252in" style:contextual-spacing="false"/>
      <style:text-properties fo:color="#1a1a1a" loext:opacity="100%" style:font-name="Brush Script MT" fo:font-size="16pt"/>
    </style:style>
    <style:style style:name="P15" style:family="paragraph" style:parent-style-name="Text_20_body">
      <style:paragraph-properties fo:margin-top="0.3126in" fo:margin-bottom="0.1252in" style:contextual-spacing="false"/>
    </style:style>
    <style:style style:name="P16" style:family="paragraph" style:parent-style-name="Text_20_body">
      <style:paragraph-properties fo:margin-top="0.3126in" fo:margin-bottom="0.1252in" style:contextual-spacing="false" fo:text-align="center" style:justify-single-word="false"/>
      <style:text-properties fo:color="#999999" loext:opacity="100%" fo:font-size="9pt"/>
    </style:style>
    <style:style style:name="T1" style:family="text">
      <style:text-properties fo:color="#444444" loext:opacity="100%" style:font-name="Courier New" fo:font-size="10pt"/>
    </style:style>
    <style:style style:name="T2" style:family="text">
      <style:text-properties fo:background-color="#f9f9f9" loext:char-shading-value="0" loext:padding-left="0.1043in" loext:padding-right="0in" loext:padding-top="0in" loext:padding-bottom="0in" loext:border-left="2.24pt solid #8b0000" loext:border-right="none" loext:border-top="none" loext:border-bottom="none"/>
    </style:style>
    <style:style style:name="T3" style:family="text">
      <style:text-properties fo:background-color="#fff5f5" loext:char-shading-value="0" loext:padding="0.1563in" loext:border="1.5pt solid #8b0000"/>
    </style:style>
    <style:style style:name="T4" style:family="text">
      <style:text-properties fo:color="#8b0000" loext:opacity="100%"/>
    </style:style>
    <style:style style:name="T5" style:family="text">
      <style:text-properties fo:color="#8b0000" loext:opacity="100%" fo:font-style="italic" fo:font-weight="bold"/>
    </style:style>
    <style:style style:name="T6" style:family="text">
      <style:text-properties fo:color="#666666" loext:opacity="100%" fo:font-size="10pt" loext:padding-left="0in" loext:padding-right="0in" loext:padding-top="0.1563in" loext:padding-bottom="0in" loext:border-left="none" loext:border-right="none" loext:border-top="0.06pt solid #cccccc" loext:border-bottom="none"/>
    </style:style>
    <style:style style:name="T7" style:family="text">
      <style:text-properties fo:color="#1a1a1a" loext:opacity="100%" style:font-name="Brush Script MT" fo:font-size="16pt"/>
    </style:style>
    <style:style style:name="T8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DENTIAL</text:p>
      <text:p text:style-name="P3"><text:span text:style-name="Strong_20_Emphasis"><text:span text:style-name="T1">Secure Communications Inc.</text:span></text:span><text:span text:style-name="T1"><text:line-break/>P.O. Box 4472<text:line-break/>Grand Cayman, KY1-1206<text:line-break/>Cayman Islands<text:line-break/></text:span><text:span text:style-name="Emphasis"><text:span text:style-name="T1">Secure &amp; Discreet</text:span></text:span><text:span text:style-name="T1"><text:line-break/><text:line-break/>Date: {PLACEHOLDER_CURRENT_DATE} </text:span></text:p>
      <text:p text:style-name="P4"><text:span text:style-name="Strong_20_Emphasis"><text:span text:style-name="T2">TO:</text:span></text:span><text:span text:style-name="T2"><text:line-break/>{PLACEHOLDER_NAME}<text:line-break/>{PLACEHOLDER_ADDRESS}<text:line-break/>{PLACEHOLDER_CITY}, {PLACEHOLDER_STATE} {PLACEHOLDER_ZIP} </text:span></text:p>
      <text:p text:style-name="Text_20_Body.subject-line"><text:span text:style-name="Strong_20_Emphasis">RE: FINAL NOTICE — URGENT DEMAND FOR PAYMENT</text:span></text:p>
      <text:p text:style-name="Text_20_body">Dear {PLACEHOLDER_NAME},</text:p>
      <text:p text:style-name="Text_20_body">This letter constitutes a formal and <text:span text:style-name="Strong_20_Emphasis">final demand</text:span> for payment. We are in possession of highly sensitive information concerning your personal and professional activities. Specifically, we have obtained verifiable evidence related to the following matter:</text:p>
      <text:h text:style-name="Heading_20_3" text:outline-level="3">Item of Compromise:</text:h>
      <text:p text:style-name="Text_20_body"><text:span text:style-name="Emphasis">"{PLACEHOLDER_SECRET}"</text:span></text:p>
      <text:p text:style-name="Text_20_body">We have documented proof, including digital records, correspondence, and corroborating witness statements. This information, if released to your employer, family members, and the public at large, would cause <text:span text:style-name="Strong_20_Emphasis">irreparable damage</text:span> to your reputation, career, and personal relationships.</text:p>
      <text:h text:style-name="Heading_20_2" text:outline-level="2">Demand for Payment</text:h>
      <text:p text:style-name="P6"><text:span text:style-name="T3">YOU MUST PAY </text:span><text:span text:style-name="Strong_20_Emphasis"><text:span text:style-name="T3">$5,000.00 USD</text:span></text:span><text:span text:style-name="T3"> (Five Thousand United States Dollars)</text:span></text:p>
      <text:p text:style-name="P5">TO AVOID IMMEDIATE DISCLOSURE OF YOUR SECRETS</text:p>
      <text:h text:style-name="P1" text:outline-level="3">Payment Instructions</text:h>
      <text:p text:style-name="Text_20_body">Payment must be made in full via <text:span text:style-name="Strong_20_Emphasis">untraceable cryptocurrency</text:span>. No other form of payment will be accepted. Follow these instructions precisely:</text:p>
      <text:list xml:id="list4160968143" text:style-name="L1">
        <text:list-item>
          <text:p text:style-name="P8">Purchase <text:span text:style-name="Strong_20_Emphasis">Bitcoin (BTC)</text:span> or <text:span text:style-name="Strong_20_Emphasis">Monero (XMR)</text:span> to the exact value of $5,000 USD. </text:p>
        </text:list-item>
        <text:list-item>
          <text:p text:style-name="P7">Transfer the full amount to the following wallet address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Cryptocurrency</text:p>
          </table:table-cell>
          <table:table-cell table:style-name="Table1.A1" office:value-type="string">
            <text:p text:style-name="Table_20_Heading">Wallet Address</text:p>
          </table:table-cell>
          <table:table-cell table:style-name="Table1.A1" office:value-type="string">
            <text:p text:style-name="Table_20_Heading">Network</text:p>
          </table:table-cell>
        </table:table-row>
        <table:table-row>
          <table:table-cell table:style-name="Table1.A1" office:value-type="string">
            <text:p text:style-name="Table_20_Contents">Bitcoin (BTC)</text:p>
          </table:table-cell>
          <table:table-cell table:style-name="Table1.A1" office:value-type="string">
            <text:p text:style-name="Table_20_Contents"><text:span text:style-name="Source_20_Text">1A1zP1eP5QGefi2DMPTfTL5SLmv7DivfNa</text:span></text:p>
          </table:table-cell>
          <table:table-cell table:style-name="Table1.A1" office:value-type="string">
            <text:p text:style-name="Table_20_Contents">Bitcoin</text:p>
          </table:table-cell>
        </table:table-row>
        <table:table-row>
          <table:table-cell table:style-name="Table1.A1" office:value-type="string">
            <text:p text:style-name="Table_20_Contents">Monero (XMR)</text:p>
          </table:table-cell>
          <table:table-cell table:style-name="Table1.A1" office:value-type="string">
            <text:p text:style-name="Table_20_Contents"><text:span text:style-name="Source_20_Text">4AdUndXHZ6UuGEJTnB2xYp5zKQ8F9gW7vR3m</text:span></text:p>
          </table:table-cell>
          <table:table-cell table:style-name="Table1.A1" office:value-type="string">
            <text:p text:style-name="Table_20_Contents">Monero</text:p>
          </table:table-cell>
        </table:table-row>
      </table:table>
      <text:list xml:id="list2970181871" text:style-name="L2">
        <text:list-item>
          <text:p text:style-name="P10">After completing the transfer, send an <text:span text:style-name="Strong_20_Emphasis">anonymous email</text:span> from a ProtonMail or Tutanota account to <text:span text:style-name="Strong_20_Emphasis">secure_contact@protonmail.com</text:span> with the subject line: <text:span text:style-name="Emphasis">"PAYMENT CONFIRMED — {PLACEHOLDER_NAME}"</text:span>. Include the transaction ID and timestamp. </text:p>
        </text:list-item>
        <text:list-item>
          <text:p text:style-name="P9">You will receive a confirmation reply within 24 hours. Upon confirmation, all compromising materials will be permanently destroyed and you will never be contacted again. </text:p>
        </text:list-item>
      </text:list>
      <text:h text:style-name="Heading_20_2" text:outline-level="2">Deadline</text:h>
      <text:p text:style-name="Text_20_body"><text:span text:style-name="T4">⚠️ </text:span><text:span text:style-name="T5">STRICT DEADLINE:</text:span> Payment must be received by <text:span text:style-name="Strong_20_Emphasis">{PLACEHOLDER_DEADLINE_DATE}</text:span> at 11:59 PM UTC. Failure to comply will result in the <text:span text:style-name="Strong_20_Emphasis">immediate and automatic release</text:span> of all materials to the following parties:</text:p>
      <text:list xml:id="list537905684" text:style-name="L3">
        <text:list-item>
          <text:p text:style-name="P11">Your current employer — <text:span text:style-name="Emphasis">Human Resources Department</text:span> </text:p>
        </text:list-item>
        <text:list-item>
          <text:p text:style-name="P11">Your spouse/partner — <text:span text:style-name="Emphasis">via personal email and postal mail</text:span> </text:p>
        </text:list-item>
        <text:list-item>
          <text:p text:style-name="P11"><text:soft-page-break/>Three (3) of your closest professional colleagues </text:p>
        </text:list-item>
        <text:list-item>
          <text:p text:style-name="P12">Public posting on social media platforms and relevant forums </text:p>
        </text:list-item>
      </text:list>
      <text:h text:style-name="Heading_20_2" text:outline-level="2">Warnings and Disclaimers</text:h>
      <text:p text:style-name="Text_20_body"><text:span text:style-name="Strong_20_Emphasis">DO NOT</text:span> involve law enforcement. We have systems in place that monitor communications. Any contact with authorities, private investigators, or legal counsel will be treated as a breach of our terms and will trigger <text:span text:style-name="Strong_20_Emphasis">automatic disclosure</text:span> of all materials. This is a non-negotiable condition.</text:p>
      <text:p text:style-name="Text_20_body"><text:span text:style-name="Strong_20_Emphasis">DO NOT</text:span> attempt to trace, block, or interfere with this communication. Our operations are distributed across multiple jurisdictions with strict anonymity protections. Any hostile action will be met with proportional retaliation.</text:p>
      <text:p text:style-name="Text_20_body">We are not interested in further communication or negotiation. This is a simple business transaction: <text:span text:style-name="Strong_20_Emphasis">$5,000 for your privacy and peace of mind.</text:span> Pay the amount, and this matter is closed forever.</text:p>
      <text:h text:style-name="Heading_20_2" text:outline-level="2">What Happens Next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Scenario</text:p>
          </table:table-cell>
          <table:table-cell table:style-name="Table2.A1" office:value-type="string">
            <text:p text:style-name="Table_20_Heading">Outcom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ayment received on time</text:span></text:p>
          </table:table-cell>
          <table:table-cell table:style-name="Table2.A1" office:value-type="string">
            <text:p text:style-name="Table_20_Contents">All materials permanently deleted. No further contact. You will receive a digital certificate of destructi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ayment late or partial</text:span></text:p>
          </table:table-cell>
          <table:table-cell table:style-name="Table2.A1" office:value-type="string">
            <text:p text:style-name="Table_20_Contents">Immediate partial disclosure. Escalation of demands to $10,000. Additional penalties apply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on-payment / law enforcement involvement</text:span></text:p>
          </table:table-cell>
          <table:table-cell table:style-name="Table2.A1" office:value-type="string">
            <text:p text:style-name="Table_20_Contents">Full public disclosure. All evidence released to all parties listed above. No further warnings.</text:p>
          </table:table-cell>
        </table:table-row>
      </table:table>
      <text:h text:style-name="Heading_20_2" text:outline-level="2">Final Statement</text:h>
      <text:p text:style-name="Text_20_body">We understand that this situation is distressing. However, we emphasize that compliance guarantees your secret remains safe. We have successfully conducted thousands of similar operations with a <text:span text:style-name="Strong_20_Emphasis">100% satisfaction rate</text:span> for those who comply. Our word is our bond.</text:p>
      <text:p text:style-name="Text_20_body">You have <text:span text:style-name="Strong_20_Emphasis">one chance</text:span> to make the right decision. Choose wisely.</text:p>
      <text:p text:style-name="P13"><text:span text:style-name="Strong_20_Emphasis"><text:span text:style-name="T6">This communication is covered by the Electronic Communications Privacy Act (ECPA) and is intended solely for the named recipient.</text:span></text:span><text:span text:style-name="T6"> Any unauthorized review, use, disclosure, or distribution is prohibited. If you are not the intended recipient, please destroy this document immediately — failure to do so may result in legal liability.</text:span></text:p>
      <text:p text:style-name="P13"><text:span text:style-name="Emphasis"><text:span text:style-name="T6">Secure Communications Inc. operates under the laws of the Cayman Islands. All rights reserved.</text:span></text:span></text:p>
      <text:p text:style-name="P14">Sincerely,</text:p>
      <text:p text:style-name="P15"><text:span text:style-name="Strong_20_Emphasis"><text:span text:style-name="T7">Mr. {PLACEHOLDER_ALIAS}</text:span></text:span><text:span text:style-name="T7"><text:line-break/></text:span><text:span text:style-name="Emphasis"><text:span text:style-name="T7">Senior Resolution Officer</text:span></text:span><text:span text:style-name="T7"><text:line-break/>Secure Communications Inc.</text:span></text:p>
      <text:p text:style-name="P16">Document ID: {PLACEHOLDER_DOC_ID} | Version: 2.4 | Expires: {PLACEHOLDER_EXPIRY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Brush Script MT" svg:font-family="'Brush Script MT', cursive"/>
    <style:font-face style:name="Courier New" svg:font-family="'Courier New'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9839in" fo:margin-right="0.9839in" fo:margin-top="0.9839in" fo:margin-bottom="0.9839in" style:contextual-spacing="false" fo:line-height="150%" fo:text-indent="0in" style:auto-text-indent="false"/>
      <style:text-properties fo:color="#1a1a1a" loext:opacity="100%" style:font-name="Times New Roman" fo:font-family="'Times New Roman', Times, serif" fo:font-size="12pt" style:font-name-asian="Times New Roman" style:font-family-asian="'Times New Roman', Times, serif" style:font-size-asian="12pt" style:font-name-complex="Times New Roman" style:font-family-complex="'Times New Roman', Times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2083in" style:contextual-spacing="false" fo:text-align="center" style:justify-single-word="false" fo:padding-left="0in" fo:padding-right="0in" fo:padding-top="0in" fo:padding-bottom="0.1043in" fo:border-left="none" fo:border-right="none" fo:border-top="none" fo:border-bottom="1.5pt solid #8b0000"/>
      <style:text-properties fo:text-transform="uppercase" fo:color="#8b0000" loext:opacity="100%" style:font-name="Arial" fo:font-family="Arial, sans-serif" fo:font-size="18pt" fo:letter-spacing="0.0209in" fo:font-weight="bold" style:font-name-asian="Arial" style:font-family-asian="Arial, sans-serif" style:font-size-asian="18pt" style:font-weight-asian="bold" style:font-name-complex="Arial" style:font-family-complex="Arial, sans-serif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252in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602in" fo:margin-bottom="0.1043in" style:contextual-spacing="false"/>
      <style:text-properties fo:color="#333333" loext:opacity="100%" style:font-name="Arial" fo:font-family="Arial, sans-serif" fo:font-size="14pt" fo:font-weight="bold" style:font-name-asian="Arial" style:font-family-asian="Arial, sans-serif" style:font-size-asian="14pt" style:font-weight-asian="bold" style:font-name-complex="Arial" style:font-family-complex="Arial, sans-serif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083in" fo:margin-bottom="0.0835in" style:contextual-spacing="false"/>
      <style:text-properties fo:color="#555555" loext:opacity="100%" style:font-name="Arial" fo:font-family="Arial, sans-serif" fo:font-size="12pt" fo:font-weight="bold" style:font-name-asian="Arial" style:font-family-asian="Arial, sans-serif" style:font-size-asian="12pt" style:font-weight-asian="bold" style:font-name-complex="Arial" style:font-family-complex="Arial, sans-serif" style:font-size-complex="12pt" style:font-weight-complex="bold"/>
    </style:style>
    <style:style style:name="Text_20_Body.subject-line" style:display-name="Text Body.subject-line" style:family="paragraph" style:parent-style-name="Text_20_body">
      <style:paragraph-properties fo:margin-top="0in" fo:margin-bottom="0.2083in" style:contextual-spacing="false"/>
      <style:text-properties fo:text-transform="uppercase" fo:color="#8b0000" loext:opacity="100%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2" meta:image-count="0" meta:object-count="0" meta:page-count="2" meta:paragraph-count="54" meta:word-count="610" meta:character-count="4375" meta:non-whitespace-character-count="3811"/>
    <meta:generator>LibreOffice/7.3.7.2$Linux_X86_64 LibreOffice_project/30$Build-2</meta:generator>
  </office:meta>
</office:document-meta>
</file>