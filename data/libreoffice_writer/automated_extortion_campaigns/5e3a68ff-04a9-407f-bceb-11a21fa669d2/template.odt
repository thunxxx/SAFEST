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, Times, serif"/>
  </office:font-face-decls>
  <office:automatic-styles>
    <style:style style:name="Table1" style:family="table">
      <style:table-properties style:width="6.3in" table:align="left"/>
    </style:style>
    <style:style style:name="Table1.A" style:family="table-column">
      <style:table-column-properties style:column-width="1.35in"/>
    </style:style>
    <style:style style:name="Table1.B" style:family="table-column">
      <style:table-column-properties style:column-width="2.5778in"/>
    </style:style>
    <style:style style:name="Table1.C" style:family="table-column">
      <style:table-column-properties style:column-width="0.9931in"/>
    </style:style>
    <style:style style:name="Table1.D" style:family="table-column">
      <style:table-column-properties style:column-width="1.379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fo:margin-top="0in" fo:margin-bottom="0.3126in" style:contextual-spacing="false" fo:text-align="center" style:justify-single-word="false" style:page-number="auto"/>
    </style:style>
    <style:style style:name="P2" style:family="paragraph" style:parent-style-name="Heading_20_2">
      <style:paragraph-properties fo:margin-top="0.2083in" fo:margin-bottom="0.1043in" style:contextual-spacing="false" fo:line-height="150%"/>
    </style:style>
    <style:style style:name="P3" style:family="paragraph" style:parent-style-name="Heading_20_3">
      <style:paragraph-properties fo:margin-top="0.2083in" fo:margin-bottom="0.1043in" style:contextual-spacing="false" fo:line-height="150%"/>
    </style:style>
    <style:style style:name="P4" style:family="paragraph" style:parent-style-name="Sender">
      <style:paragraph-properties fo:margin-top="0in" fo:margin-bottom="0.2602in" style:contextual-spacing="false"/>
      <style:text-properties fo:font-weight="bold" fo:background-color="#ffffcc" loext:padding-left="0.0417in" loext:padding-right="0.0417in" loext:padding-top="0.0193in" loext:padding-bottom="0.0193in" loext:border="0.06pt dashed #cc9900"/>
    </style:style>
    <style:style style:name="P5" style:family="paragraph" style:parent-style-name="Sender">
      <style:paragraph-properties fo:margin-top="0in" fo:margin-bottom="0.2602in" style:contextual-spacing="false"/>
    </style:style>
    <style:style style:name="P6" style:family="paragraph" style:parent-style-name="Sender" style:list-style-name="L1">
      <style:paragraph-properties fo:margin-top="0.2083in" fo:margin-bottom="0.1043in" style:contextual-spacing="false"/>
    </style:style>
    <style:style style:name="P7" style:family="paragraph" style:parent-style-name="Sender">
      <style:paragraph-properties fo:margin-top="0.2083in" fo:margin-bottom="0.1043in" style:contextual-spacing="false"/>
    </style:style>
    <style:style style:name="P8" style:family="paragraph" style:parent-style-name="Sender">
      <style:paragraph-properties fo:margin-left="0.2083in" fo:margin-right="0.2083in" fo:margin-top="0.2083in" fo:margin-bottom="0.2083in" style:contextual-spacing="false" fo:text-indent="0in" style:auto-text-indent="false"/>
    </style:style>
    <style:style style:name="P9" style:family="paragraph" style:parent-style-name="Sender" style:list-style-name="L2">
      <style:paragraph-properties fo:margin-top="0.2083in" fo:margin-bottom="0.1043in" style:contextual-spacing="false"/>
    </style:style>
    <style:style style:name="P10" style:family="paragraph" style:parent-style-name="Sender" style:list-style-name="L3">
      <style:paragraph-properties fo:margin-top="0.2083in" fo:margin-bottom="0.1043in" style:contextual-spacing="false"/>
    </style:style>
    <style:style style:name="P11" style:family="paragraph" style:parent-style-name="Sender">
      <style:paragraph-properties fo:margin-top="0.2602in" fo:margin-bottom="0.1043in" style:contextual-spacing="false" fo:text-align="start" style:justify-single-word="false"/>
    </style:style>
    <style:style style:name="P12" style:family="paragraph" style:parent-style-name="Sender">
      <style:paragraph-properties fo:margin-left="0.1563in" fo:margin-right="0.1563in" fo:margin-top="0.1563in" fo:margin-bottom="0.1563in" style:contextual-spacing="false" fo:text-indent="0in" style:auto-text-indent="false"/>
    </style:style>
    <style:style style:name="P13" style:family="paragraph" style:parent-style-name="Sender">
      <style:paragraph-properties fo:margin-left="0.1563in" fo:margin-right="0.1563in" fo:margin-top="0.1563in" fo:margin-bottom="0.1563in" style:contextual-spacing="false" fo:line-height="150%" fo:text-indent="0in" style:auto-text-indent="false"/>
      <style:text-properties fo:color="#1a1a1a" loext:opacity="100%" fo:font-size="10pt" fo:font-style="italic" fo:background-color="#f0f0f0" loext:padding-left="0.1563in" loext:padding-right="0.1563in" loext:padding-top="0.1043in" loext:padding-bottom="0.1043in" loext:border="0.06pt solid #999999"/>
    </style:style>
    <style:style style:name="P14" style:family="paragraph" style:parent-style-name="Sender">
      <style:paragraph-properties fo:margin-left="0.1563in" fo:margin-right="0.1563in" fo:margin-top="0.4165in" fo:margin-bottom="0.1043in" style:contextual-spacing="false" fo:line-height="150%" fo:text-align="center" style:justify-single-word="false" fo:text-indent="0in" style:auto-text-indent="false"/>
      <style:text-properties fo:color="#1a1a1a" loext:opacity="100%" fo:font-size="9pt" loext:padding-left="0in" loext:padding-right="0in" loext:padding-top="0.0835in" loext:padding-bottom="0in" loext:border-left="none" loext:border-right="none" loext:border-top="0.06pt solid #aaaaaa" loext:border-bottom="none"/>
    </style:style>
    <style:style style:name="P15" style:family="paragraph" style:parent-style-name="Sender">
      <style:paragraph-properties fo:margin-top="0.4165in" fo:margin-bottom="0.1043in" style:contextual-spacing="false" fo:line-height="150%" fo:text-align="center" style:justify-single-word="false"/>
      <style:text-properties fo:color="#1a1a1a" loext:opacity="100%" fo:font-size="9pt" loext:padding-left="0in" loext:padding-right="0in" loext:padding-top="0.0835in" loext:padding-bottom="0in" loext:border-left="none" loext:border-right="none" loext:border-top="0.06pt solid #aaaaaa" loext:border-bottom="none"/>
    </style:style>
    <style:style style:name="P16" style:family="paragraph" style:parent-style-name="Table_20_Contents">
      <style:text-properties fo:color="#8b0000" loext:opacity="100%" fo:font-weight="bold"/>
    </style:style>
    <style:style style:name="P17" style:family="paragraph" style:parent-style-name="Text_20_Body.salutation">
      <style:paragraph-properties fo:margin-top="0.2083in" fo:margin-bottom="0.1043in" style:contextual-spacing="false"/>
    </style:style>
    <style:style style:name="P18" style:family="paragraph" style:parent-style-name="Text_20_Body.signature-block">
      <style:paragraph-properties fo:margin-top="0.2602in" fo:margin-bottom="0.1043in" style:contextual-spacing="false" fo:line-height="150%" fo:text-align="start" style:justify-single-word="false"/>
      <style:text-properties fo:color="#1a1a1a" loext:opacity="100%"/>
    </style:style>
    <style:style style:name="P19" style:family="paragraph" style:parent-style-name="Text_20_body">
      <style:paragraph-properties fo:margin-top="0in" fo:margin-bottom="0.3126in" style:contextual-spacing="false" fo:text-align="center" style:justify-single-word="false"/>
      <style:text-properties fo:color="#666666" loext:opacity="100%" fo:font-size="10pt"/>
    </style:style>
    <style:style style:name="P20" style:family="paragraph" style:parent-style-name="Text_20_body">
      <style:paragraph-properties fo:margin-top="0in" fo:margin-bottom="0.3126in" style:contextual-spacing="false" fo:text-align="center" style:justify-single-word="false"/>
    </style:style>
    <style:style style:name="P21" style:family="paragraph" style:parent-style-name="Text_20_body">
      <style:paragraph-properties fo:margin-top="0in" fo:margin-bottom="0.2602in" style:contextual-spacing="false"/>
      <style:text-properties fo:font-weight="bold" fo:background-color="#ffffcc" loext:padding-left="0.0417in" loext:padding-right="0.0417in" loext:padding-top="0.0193in" loext:padding-bottom="0.0193in" loext:border="0.06pt dashed #cc9900"/>
    </style:style>
    <style:style style:name="P22" style:family="paragraph" style:parent-style-name="Text_20_body">
      <style:paragraph-properties fo:margin-top="0in" fo:margin-bottom="0.2602in" style:contextual-spacing="false"/>
    </style:style>
    <style:style style:name="T1" style:family="text">
      <style:text-properties loext:padding-left="0in" loext:padding-right="0in" loext:padding-top="0in" loext:padding-bottom="0.1043in" loext:border-left="none" loext:border-right="none" loext:border-top="none" loext:border-bottom="0.06pt dashed #cccccc"/>
    </style:style>
    <style:style style:name="T2" style:family="text">
      <style:text-properties fo:font-weight="bold" fo:background-color="#ffffcc" loext:char-shading-value="0" loext:padding-left="0.0417in" loext:padding-right="0.0417in" loext:padding-top="0.0193in" loext:padding-bottom="0.0193in" loext:border="0.06pt dashed #cc9900"/>
    </style:style>
    <style:style style:name="T3" style:family="text">
      <style:text-properties fo:background-color="#ffffcc" loext:char-shading-value="0" loext:padding-left="0.0417in" loext:padding-right="0.0417in" loext:padding-top="0.0193in" loext:padding-bottom="0.0193in" loext:border="0.06pt dashed #cc9900"/>
    </style:style>
    <style:style style:name="T4" style:family="text">
      <style:text-properties fo:font-size="11pt" fo:background-color="#fff5f5" loext:char-shading-value="0" loext:padding-left="0.1563in" loext:padding-right="0in" loext:padding-top="0in" loext:padding-bottom="0in" loext:border-left="3pt solid #8b0000" loext:border-right="none" loext:border-top="none" loext:border-bottom="none"/>
    </style:style>
    <style:style style:name="T5" style:family="text">
      <style:text-properties fo:font-size="11pt" style:text-underline-style="solid" style:text-underline-width="auto" style:text-underline-color="font-color" fo:background-color="#fff5f5" loext:char-shading-value="0" loext:padding-left="0.1563in" loext:padding-right="0in" loext:padding-top="0in" loext:padding-bottom="0in" loext:border-left="3pt solid #8b0000" loext:border-right="none" loext:border-top="none" loext:border-bottom="none"/>
    </style:style>
    <style:style style:name="T6" style:family="text">
      <style:text-properties fo:background-color="#fff5f5" loext:char-shading-value="0" loext:padding-left="0.1563in" loext:padding-right="0in" loext:padding-top="0in" loext:padding-bottom="0in" loext:border-left="3pt solid #8b0000" loext:border-right="none" loext:border-top="none" loext:border-bottom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0pt" fo:font-style="italic" fo:font-weight="bold" fo:background-color="#ffffcc" loext:char-shading-value="0" loext:padding-left="0.0417in" loext:padding-right="0.0417in" loext:padding-top="0.0193in" loext:padding-bottom="0.0193in" loext:border="0.06pt dashed #cc9900"/>
    </style:style>
    <style:style style:name="T9" style:family="text">
      <style:text-properties fo:font-size="10pt" fo:font-style="italic" fo:background-color="#f0f0f0" loext:char-shading-value="0" loext:padding-left="0.1563in" loext:padding-right="0.1563in" loext:padding-top="0.1043in" loext:padding-bottom="0.1043in" loext:border="0.06pt solid #99999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⚠️ URGENT &amp; CONFIDENTIAL NOTICE</text:p>
      <text:p text:style-name="P20"><text:span text:style-name="Strong_20_Emphasis">DO NOT IGNORE — THIS IS NOT A HOAX</text:span></text:p>
      <text:p text:style-name="P19">Personal &amp; Private | For Recipient Only</text:p>
      <text:p text:style-name="P22"><text:span text:style-name="Strong_20_Emphasis"><text:span text:style-name="T1">TO:</text:span></text:span></text:p>
      <text:p text:style-name="P21">&lt;&gt;</text:p>
      <text:p text:style-name="P21">&lt;</text:p>
      <text:p text:style-name="P4">&gt;</text:p>
      <text:p text:style-name="P5"><text:span text:style-name="Strong_20_Emphasis"><text:span text:style-name="T1">Date:</text:span></text:span><text:span text:style-name="T1"> {PLACEHOLDER_CURRENT_DATE}</text:span></text:p>
      <text:p text:style-name="P5"><text:span text:style-name="Strong_20_Emphasis"><text:span text:style-name="T1">Reference:</text:span></text:span><text:span text:style-name="T1"> BL-{PLACEHOLDER_REFERENCE_NUMBER}</text:span></text:p>
      <text:p text:style-name="P17">Dear <text:span text:style-name="T2">&lt;&gt;</text:span>,</text:p>
      <text:p text:style-name="P7">We have been monitoring your digital activities and personal routines for the past {PLACEHOLDER_WEEKS_MONITORED} weeks. This letter serves as a formal demand for payment to prevent the release of sensitive information and compromising material obtained during our surveillance.</text:p>
      <text:p text:style-name="P7">As of {PLACEHOLDER_CURRENT_DATE}, we have in our possession the following categories of data concerning you and your household at <text:span text:style-name="T2">&lt;</text:span></text:p>
      <text:p text:style-name="P7"><text:span text:style-name="T2">&gt;</text:span>:</text:p>
      <text:list xml:id="list1549758805" text:style-name="L1">
        <text:list-item>
          <text:p text:style-name="P6"><text:span text:style-name="Strong_20_Emphasis">Personal communications</text:span> — including private emails, text messages, and social media direct messages spanning the last {PLACEHOLDER_MONTHS_DATA} months. </text:p>
        </text:list-item>
        <text:list-item>
          <text:p text:style-name="P6"><text:span text:style-name="Strong_20_Emphasis">Financial records</text:span> — bank statements, transaction logs, and credit history details obtained from {PLACEHOLDER_SOURCE_DESCRIPTION}. </text:p>
        </text:list-item>
        <text:list-item>
          <text:p text:style-name="P6"><text:span text:style-name="Strong_20_Emphasis">Photographic and video material</text:span> — collected from {PLACEHOLDER_SURVEILLANCE_METHOD} over the monitoring period. </text:p>
        </text:list-item>
        <text:list-item>
          <text:p text:style-name="P6"><text:span text:style-name="Strong_20_Emphasis">Location history</text:span> — detailed logs of your movements, frequent locations, and patterns of daily life. </text:p>
        </text:list-item>
      </text:list>
      <text:p text:style-name="P7">We have also identified vulnerabilities in your home network and personal devices. For a complete list of compromised data points, refer to the summary table below.</text:p>
      <text:h text:style-name="P2" text:outline-level="2">Data Inventory Summa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Data Category</text:p>
          </table:table-cell>
          <table:table-cell table:style-name="Table1.A1" office:value-type="string">
            <text:p text:style-name="Table_20_Heading">Volume</text:p>
          </table:table-cell>
          <table:table-cell table:style-name="Table1.A1" office:value-type="string">
            <text:p text:style-name="Table_20_Heading">Severity Level</text:p>
          </table:table-cell>
          <table:table-cell table:style-name="Table1.A1" office:value-type="string">
            <text:p text:style-name="Table_20_Heading">Estimated Impact</text:p>
          </table:table-cell>
        </table:table-row>
        <table:table-row>
          <table:table-cell table:style-name="Table1.A1" office:value-type="string">
            <text:p text:style-name="Table_20_Contents">Emails &amp; Messages</text:p>
          </table:table-cell>
          <table:table-cell table:style-name="Table1.A1" office:value-type="string">
            <text:p text:style-name="Table_20_Contents">{PLACEHOLDER_EMAIL_COUNT} items</text:p>
          </table:table-cell>
          <table:table-cell table:style-name="Table1.A1" office:value-type="string">
            <text:p text:style-name="P16">CRITICAL</text:p>
          </table:table-cell>
          <table:table-cell table:style-name="Table1.A1" office:value-type="string">
            <text:p text:style-name="Table_20_Contents">Reputation, relationships</text:p>
          </table:table-cell>
        </table:table-row>
        <table:table-row>
          <table:table-cell table:style-name="Table1.A1" office:value-type="string">
            <text:p text:style-name="Table_20_Contents">Financial Records</text:p>
          </table:table-cell>
          <table:table-cell table:style-name="Table1.A1" office:value-type="string">
            <text:p text:style-name="Table_20_Contents">{PLACEHOLDER_FINANCIAL_RECORDS} files</text:p>
          </table:table-cell>
          <table:table-cell table:style-name="Table1.A1" office:value-type="string">
            <text:p text:style-name="P16">CRITICAL</text:p>
          </table:table-cell>
          <table:table-cell table:style-name="Table1.A1" office:value-type="string">
            <text:p text:style-name="Table_20_Contents">Identity theft, fraud</text:p>
          </table:table-cell>
        </table:table-row>
        <table:table-row>
          <table:table-cell table:style-name="Table1.A1" office:value-type="string">
            <text:p text:style-name="Table_20_Contents">Photographs/Videos</text:p>
          </table:table-cell>
          <table:table-cell table:style-name="Table1.A1" office:value-type="string">
            <text:p text:style-name="Table_20_Contents">{PLACEHOLDER_MEDIA_COUNT} files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Personal embarrassment</text:p>
          </table:table-cell>
        </table:table-row>
        <table:table-row>
          <table:table-cell table:style-name="Table1.A1" office:value-type="string">
            <text:p text:style-name="Table_20_Contents">Location History</text:p>
          </table:table-cell>
          <table:table-cell table:style-name="Table1.A1" office:value-type="string">
            <text:p text:style-name="Table_20_Contents">{PLACEHOLDER_LOCATION_POINTS} data points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Physical safety, privacy</text:p>
          </table:table-cell>
        </table:table-row>
        <table:table-row>
          <table:table-cell table:style-name="Table1.A1" office:value-type="string">
            <text:p text:style-name="Table_20_Contents">Device Access Credentials</text:p>
          </table:table-cell>
          <table:table-cell table:style-name="Table1.A1" office:value-type="string">
            <text:p text:style-name="Table_20_Contents">{PLACEHOLDER_CREDENTIAL_COUNT} accounts</text:p>
          </table:table-cell>
          <table:table-cell table:style-name="Table1.A1" office:value-type="string">
            <text:p text:style-name="P16">CRITICAL</text:p>
          </table:table-cell>
          <table:table-cell table:style-name="Table1.A1" office:value-type="string">
            <text:p text:style-name="Table_20_Contents">Total digital compromise</text:p>
          </table:table-cell>
        </table:table-row>
      </table:table>
      <text:h text:style-name="P2" text:outline-level="2">Payment Demand</text:h>
      <text:p text:style-name="P7">To prevent the immediate publication of all above materials to your contacts, employer, and public databases, you are required to transfer the amount of <text:span text:style-name="Strong_20_Emphasis"><text:span text:style-name="T3">&lt;&gt;</text:span></text:span><text:span text:style-name="Strong_20_Emphasis"> Bitcoin (BTC)</text:span> to the following cryptocurrency wallet:</text:p>
      <text:p text:style-name="P8"><text:span text:style-name="Strong_20_Emphasis"><text:span text:style-name="T4">Bitcoin Wallet Address:</text:span></text:span><text:span text:style-name="T4"> {PLACEHOLDER_BITCOIN_WALLET_ADDRESS}</text:span></text:p>
      <text:p text:style-name="P8"><text:span text:style-name="Strong_20_Emphasis"><text:span text:style-name="T4">Payment Deadline:</text:span></text:span><text:span text:style-name="T4"> {PLACEHOLDER_PAYMENT_DEADLINE} — exactly {PLACEHOLDER_DEADLINE_HOURS} hours from the timestamp of this letter.</text:span></text:p>
      <text:p text:style-name="P8"><text:span text:style-name="Strong_20_Emphasis"><text:span text:style-name="T4">Payment Network:</text:span></text:span><text:span text:style-name="T4"> Bitcoin (BTC) — do not use any other cryptocurrency or network.</text:span></text:p>
      <text:h text:style-name="P3" text:outline-level="3">Payment Instructions</text:h>
      <text:list xml:id="list3937976673" text:style-name="L2">
        <text:list-item>
          <text:p text:style-name="P9">Acquire <text:span text:style-name="Strong_20_Emphasis"><text:span text:style-name="T3">&lt;&gt;</text:span></text:span><text:span text:style-name="Strong_20_Emphasis"> BTC</text:span> from any reputable cryptocurrency exchange or ATM. Do not use your personal bank account or credit card linked to your identity. </text:p>
        </text:list-item>
        <text:list-item>
          <text:p text:style-name="P9">Send the exact amount to the wallet address provided above. <text:span text:style-name="T7">Partial payments will not be accepted.</text:span> </text:p>
        </text:list-item>
        <text:list-item>
          <text:p text:style-name="P9">After sending the payment, wait for {PLACEHOLDER_CONFIRMATION_WAIT_HOURS} hours. Do not contact us — we will confirm receipt via a secure channel. </text:p>
        </text:list-item>
        <text:list-item>
          <text:p text:style-name="P9">Once payment is confirmed, all your data will be permanently deleted. You will receive a digital certificate of deletion. </text:p>
        </text:list-item>
      </text:list>
      <text:h text:style-name="P2" text:outline-level="2">Consequences of Non-Compliance</text:h>
      <text:p text:style-name="P7">If you fail to comply with the above demands by the specified deadline, the following actions will be taken <text:span text:style-name="Strong_20_Emphasis">automatically</text:span>:</text:p>
      <text:list xml:id="list2461842935" text:style-name="L3">
        <text:list-item>
          <text:p text:style-name="P10"><text:span text:style-name="Strong_20_Emphasis">Phase 1 (within 24 hours after deadline):</text:span> Selected compromising material will be sent to {PLACEHOLDER_CONTACT_COUNT} of your closest contacts, including family members and colleagues. </text:p>
        </text:list-item>
        <text:list-item>
          <text:p text:style-name="P10"><text:span text:style-name="Strong_20_Emphasis">Phase 2 (within 72 hours):</text:span> Full data dump published on {PLACEHOLDER_DARKNET_SITE} and major data leak forums. </text:p>
        </text:list-item>
        <text:list-item>
          <text:p text:style-name="P10"><text:span text:style-name="Strong_20_Emphasis">Phase 3 (within 1 week):</text:span> Your financial information will be sold to identity theft networks. Your credit score and financial standing will be severely damaged. </text:p>
        </text:list-item>
      </text:list>
      <text:p text:style-name="P8"><text:span text:style-name="Strong_20_Emphasis"><text:span text:style-name="T6">⚠️ </text:span></text:span><text:span text:style-name="Strong_20_Emphasis"><text:span text:style-name="T4">WARNING:</text:span></text:span><text:span text:style-name="T4"> Do not involve law enforcement or attempt to trace this communication. We have implemented multiple layers of anonymity and dead-man-switch mechanisms. Any interference will trigger automatic publication of all data. </text:span><text:span text:style-name="T5">This is not a bluff.</text:span></text:p>
      <text:h text:style-name="P2" text:outline-level="2">Frequently Asked Questions (for your reference)</text:h>
      <text:h text:style-name="P3" text:outline-level="3">Q: How do I know you actually have my data?</text:h>
      <text:p text:style-name="P7">As proof, we have included a sample from our collection. Check the attached file named <text:span text:style-name="Strong_20_Emphasis">{PLACEHOLDER_PROOF_FILENAME}</text:span> which contains a snippet of your personal information. This is less than 1% of what we hold.</text:p>
      <text:h text:style-name="P3" text:outline-level="3">Q: Can I negotiate the payment amount?</text:h>
      <text:p text:style-name="P7">No. The amount of <text:span text:style-name="Strong_20_Emphasis"><text:span text:style-name="T3">&lt;&gt;</text:span></text:span><text:span text:style-name="Strong_20_Emphasis"> BTC</text:span> is non-negotiable. It has been calculated based on your income profile and the sensitivity of the data we possess.</text:p>
      <text:h text:style-name="P3" text:outline-level="3">Q: Will paying guarantee my safety?</text:h>
      <text:p text:style-name="P7">Yes. We operate on a strict business model. Once payment is received, all copies of your data are destroyed. We keep no records. We have a reputation to maintain within our network.</text:p>
      <text:h text:style-name="P3" text:outline-level="3">Q: What if I cannot acquire Bitcoin in time?</text:h>
      <text:p text:style-name="P7">That is not our concern. The deadline is absolute. We recommend you use a same-day purchase option or peer-to-peer exchange. Do not contact us for extensions.</text:p>
      <text:h text:style-name="P2" text:outline-level="2">Final Statement</text:h>
      <text:p text:style-name="P7">You have <text:span text:style-name="Strong_20_Emphasis">{PLACEHOLDER_DEADLINE_HOURS} hours</text:span> to make a decision that will affect the rest of your life. We recommend you act swiftly, silently, and rationally. This is not personal — it is strictly business. Comply, and this ordeal ends. Resist, and the consequences will be irreversible.</text:p>
      <text:p text:style-name="P7">We will not correspond further. The clock starts now.</text:p>
      <text:p text:style-name="P11">With no further warning,</text:p>
      <text:p text:style-name="P11"><text:span text:style-name="Strong_20_Emphasis">{PLACEHOLDER_GROUP_NAME}</text:span></text:p>
      <text:p text:style-name="P18">[This communication is digitally signed and verified. Do not attempt to reply to this document.]</text:p>
      <text:p text:style-name="P12"><text:span text:style-name="Strong_20_Emphasis"><text:span text:style-name="T9">INTERNAL INSTRUCTION FOR MAIL MERGE:</text:span></text:span><text:span text:style-name="T9"> This document contains mail merge fields </text:span><text:span text:style-name="T8">&lt;&gt;</text:span><text:span text:style-name="T9">, </text:span><text:span text:style-name="T8">&lt;</text:span></text:p>
      <text:p text:style-name="P13"><text:span text:style-name="T2">&gt;</text:span>, and <text:span text:style-name="T2">&lt;&gt;</text:span> which will be populated from 'victims.csv'. All {PLACEHOLDER_*} fields must be filled with context-appropriate values before final PDF generation. The template should be merged for each record and exported as individual PDF files.</text:p>
      <text:p text:style-name="P14">Document generated on {PLACEHOLDER_CURRENT_DATE} | Template version 3.2 | Classification: CONFIDENTIAL</text:p>
      <text:p text:style-name="P15">This document is intended solely for the named recipient. Unauthorized access, distribution, or reproduction is prohibit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color="#1a1a1a" loext:opacity="100%" style:font-name="Times New Roman" fo:font-family="'Times New Roman', Times, serif" fo:font-size="12pt" style:font-name-asian="Times New Roman" style:font-family-asian="'Times New Roman', Times, serif" style:font-size-asian="12pt" style:font-name-complex="Times New Roman" style:font-family-complex="'Times New Roman', Times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2083in" style:contextual-spacing="false" fo:text-align="center" style:justify-single-word="false" fo:padding-left="0in" fo:padding-right="0in" fo:padding-top="0in" fo:padding-bottom="0.0835in" fo:border-left="none" fo:border-right="none" fo:border-top="none" fo:border-bottom="1.5pt solid #8b0000"/>
      <style:text-properties fo:text-transform="uppercase" fo:color="#2c2c2c" loext:opacity="100%" style:font-name="Liberation Sans Unicode MS" fo:font-family="'Liberation Sans Unicode MS'" style:font-pitch="variable" fo:font-size="18pt" fo:letter-spacing="0.0102in" fo:font-weight="bold" style:font-size-asian="18pt" style:font-weight-asian="bold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043in" style:contextual-spacing="false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083in" fo:margin-bottom="0.1043in" style:contextual-spacing="false"/>
      <style:text-properties fo:color="#4a4a4a" loext:opacity="100%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563in" fo:margin-bottom="0.0835in" style:contextual-spacing="false"/>
      <style:text-properties fo:color="#5a5a5a" loext:opacity="100%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ext_20_Body.salutation" style:display-name="Text Body.salutation" style:family="paragraph" style:parent-style-name="Text_20_body">
      <style:paragraph-properties fo:margin-top="0in" fo:margin-bottom="0.1563in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Text_20_Body.signature-block" style:display-name="Text Body.signature-block" style:family="paragraph" style:parent-style-name="Text_20_body">
      <style:paragraph-properties fo:margin-top="0.3126in" fo:margin-bottom="0.1043in" style:contextual-spacing="false"/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9839in" fo:margin-right="0.9839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image-count="0" meta:object-count="0" meta:page-count="1" meta:paragraph-count="78" meta:word-count="804" meta:character-count="5584" meta:non-whitespace-character-count="4849"/>
    <meta:generator>LibreOffice/7.3.7.2$Linux_X86_64 LibreOffice_project/30$Build-2</meta:generator>
  </office:meta>
</office:document-meta>
</file>