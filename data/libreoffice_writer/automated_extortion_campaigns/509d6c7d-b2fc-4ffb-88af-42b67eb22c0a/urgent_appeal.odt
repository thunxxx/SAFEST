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2.3778in"/>
    </style:style>
    <style:style style:name="Table1.B" style:family="table-column">
      <style:table-column-properties style:column-width="4.709in"/>
    </style:style>
    <style:style style:name="Table1.A1" style:family="table-cell">
      <style:table-cell-properties style:vertical-align="middle" fo:padding="0.0194in" fo:border="none"/>
    </style:style>
    <style:style style:name="Table1.B5" style:family="table-cell">
      <style:table-cell-properties style:vertical-align="middle" fo:background-color="#fff3cd" fo:padding-left="0.125in" fo:padding-right="0.125in" fo:padding-top="0.0625in" fo:padding-bottom="0.0625in" fo:border="0.05pt solid #ffc107">
        <style:background-image/>
      </style:table-cell-properties>
    </style:style>
    <style:style style:name="P1" style:family="paragraph" style:parent-style-name="Heading_20_1">
      <style:paragraph-properties fo:margin-top="0in" fo:margin-bottom="0.3126in" style:contextual-spacing="false" fo:text-align="center" style:justify-single-word="false"/>
      <style:text-properties fo:background-color="#f9f2f2" loext:padding-left="0.1043in" loext:padding-right="0in" loext:padding-top="0.1043in" loext:padding-bottom="0.1043in" loext:border-left="0.06pt solid #d4a0a0" loext:border-right="none" loext:border-top="0.06pt solid #d4a0a0" loext:border-bottom="0.06pt solid #d4a0a0"/>
    </style:style>
    <style:style style:name="P2" style:family="paragraph" style:parent-style-name="Heading_20_2">
      <style:paragraph-properties fo:margin-left="0.2083in" fo:margin-right="0.2083in" fo:text-indent="0in" style:auto-text-indent="false"/>
    </style:style>
    <style:style style:name="P3" style:family="paragraph" style:parent-style-name="Table_20_Contents">
      <style:text-properties fo:color="#856404" loext:opacity="100%" fo:font-weight="bold"/>
    </style:style>
    <style:style style:name="P4" style:family="paragraph" style:parent-style-name="Text_20_body" style:master-page-name="HTML">
      <style:paragraph-properties fo:margin-top="0in" fo:margin-bottom="0.1043in" style:contextual-spacing="false" fo:text-align="center" style:justify-single-word="false" style:page-number="auto"/>
      <style:text-properties fo:text-transform="uppercase" fo:color="#ffffff" loext:opacity="100%" fo:letter-spacing="0.0311in" fo:background-color="#cc0000" loext:padding="0in" loext:border="none"/>
    </style:style>
    <style:style style:name="P5"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fo:color="#cc0000" loext:opacity="100%" fo:font-size="14pt" fo:font-weight="bold" fo:background-color="#f9f2f2" loext:border-line-width="0.0102in 0.0102in 0.0102in" loext:padding-left="0.1874in" loext:padding-right="0.1874in" loext:padding-top="0.0626in" loext:padding-bottom="0.0626in" loext:border="2.24pt double #cc0000"/>
    </style:style>
    <style:style style:name="P6" style:family="paragraph" style:parent-style-name="Text_20_body">
      <style:paragraph-properties fo:margin-left="0.2083in" fo:margin-right="0.2083in" fo:margin-top="0.2083in" fo:margin-bottom="0.2083in" style:contextual-spacing="false" fo:text-indent="0in" style:auto-text-indent="false"/>
    </style:style>
    <style:style style:name="P7" style:family="paragraph" style:parent-style-name="Text_20_body">
      <style:paragraph-properties fo:margin-left="0.1563in" fo:margin-right="0.1563in" fo:margin-top="0.1563in" fo:margin-bottom="0.1563in" style:contextual-spacing="false" fo:text-align="center" style:justify-single-word="false" fo:text-indent="0in" style:auto-text-indent="false"/>
    </style:style>
    <style:style style:name="P8" style:family="paragraph" style:parent-style-name="Text_20_body">
      <style:paragraph-properties fo:margin-top="0.3126in" fo:margin-bottom="0.1043in" style:contextual-spacing="false" fo:text-align="center" style:justify-single-word="false"/>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paragraph-properties fo:margin-top="0.3646in" fo:margin-bottom="0.1043in" style:contextual-spacing="false"/>
      <style:text-properties loext:padding-left="0in" loext:padding-right="0in" loext:padding-top="0.2083in" loext:padding-bottom="0in" loext:border-left="none" loext:border-right="none" loext:border-top="1.5pt solid #8b0000" loext:border-bottom="none"/>
    </style:style>
    <style:style style:name="P16" style:family="paragraph" style:parent-style-name="Text_20_body">
      <style:paragraph-properties fo:margin-top="0.3646in" fo:margin-bottom="0.1043in" style:contextual-spacing="false"/>
    </style:style>
    <style:style style:name="P17" style:family="paragraph" style:parent-style-name="Text_20_body">
      <style:paragraph-properties fo:margin-top="0.3126in" fo:margin-bottom="0.1043in" style:contextual-spacing="false" fo:text-align="center" style:justify-single-word="false"/>
      <style:text-properties fo:color="#666666" loext:opacity="100%" fo:font-size="9pt" loext:padding-left="0in" loext:padding-right="0in" loext:padding-top="0.1252in" loext:padding-bottom="0in" loext:border-left="none" loext:border-right="none" loext:border-top="0.06pt solid #cccccc" loext:border-bottom="none"/>
    </style:style>
    <style:style style:name="T1" style:family="text">
      <style:text-properties style:font-name="Liberation Sans1" fo:font-size="18pt" fo:font-weight="bold"/>
    </style:style>
    <style:style style:name="T2" style:family="text">
      <style:text-properties style:font-name="Liberation Sans1" fo:font-size="13pt" loext:padding-left="0in" loext:padding-right="0in" loext:padding-top="0.2083in" loext:padding-bottom="0in" loext:border-left="none" loext:border-right="none" loext:border-top="1.5pt solid #8b0000" loext:border-bottom="non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background-color="#fff0f0" loext:char-shading-value="0" loext:padding="0.1563in" loext:border="1.5pt solid #cc0000"/>
    </style:style>
    <style:style style:name="T5" style:family="text">
      <style:text-properties fo:background-color="#fff0f0" loext:char-shading-value="0" loext:padding="0.1563in" loext:border="1.5pt solid #cc0000"/>
    </style:style>
    <style:style style:name="T6" style:family="text">
      <style:text-properties style:font-name="Liberation Mono" fo:font-size="11pt" fo:background-color="#f5f5f5" loext:char-shading-value="0" loext:padding-left="0.1874in" loext:padding-right="0.1874in" loext:padding-top="0.1252in" loext:padding-bottom="0.1252in" loext:border="0.06pt solid #999999"/>
    </style:style>
    <style:style style:name="T7" style:family="text">
      <style:text-properties style:font-name="Liberation Mono" fo:font-size="14pt" fo:background-color="#f5f5f5" loext:char-shading-value="0" loext:padding-left="0.1874in" loext:padding-right="0.1874in" loext:padding-top="0.1252in" loext:padding-bottom="0.1252in" loext:border="0.06pt solid #999999"/>
    </style:style>
    <style:style style:name="T8" style:family="text">
      <style:text-properties fo:color="#666666" loext:opacity="100%" fo:font-size="9pt" loext:padding-left="0in" loext:padding-right="0in" loext:padding-top="0.1252in" loext:padding-bottom="0in" loext:border-left="none" loext:border-right="none" loext:border-top="0.06pt solid #cccccc" loext:border-bottom="none"/>
    </style:style>
    <style:style style:name="T9"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span text:style-name="T1">URGENT &amp; CONFIDENTIAL ⚠️</text:span></text:p>
      <text:p text:style-name="P1">Final Notice of Financial Obligation</text:p>
      <text:p text:style-name="P5">PRIVATE &amp; SENSITIVE</text:p>
      <text:p text:style-name="Text_20_body"><text:span text:style-name="Strong_20_Emphasis">Date:</text:span> {CURRENT_DATE}</text:p>
      <text:p text:style-name="Text_20_body"><text:span text:style-name="Strong_20_Emphasis">To:</text:span> {PLACEHOLDER_NAME}<text:line-break/><text:span text:style-name="Strong_20_Emphasis">Address:</text:span> {PLACEHOLDER_ADDRESS}<text:line-break/><text:span text:style-name="Strong_20_Emphasis">Reference:</text:span> DON-{PLACEHOLDER_REFERENCE}</text:p>
      <text:h text:style-name="Heading_20_2" text:outline-level="2">Subject: Immediate Settlement Demand — 48-Hour Ultimatum</text:h>
      <text:p text:style-name="Text_20_body">This letter constitutes a formal and final demand for the settlement of your outstanding financial obligation to our organization. We have attempted to resolve this matter through standard channels, but your persistent non-compliance has necessitated this escalated communication.</text:p>
      <text:p text:style-name="P6"><text:span text:style-name="Strong_20_Emphasis"><text:span text:style-name="T4">⚠️ CRITICAL NOTICE:</text:span></text:span><text:span text:style-name="T5"> Failure to comply with the terms outlined below within </text:span><text:span text:style-name="Strong_20_Emphasis"><text:span text:style-name="T5">48 hours</text:span></text:span><text:span text:style-name="T5"> from receipt of this letter will result in the </text:span><text:span text:style-name="Strong_20_Emphasis"><text:span text:style-name="T5">immediate and irrevocable public disclosure</text:span></text:span><text:span text:style-name="T5"> of your complete personal donation history, including all transaction records, dates, and amounts associated with your account.</text:span></text:p>
      <text:h text:style-name="P2" text:outline-level="2">Required Payment Details</text:h>
      <text:p text:style-name="Text_20_body">To avoid the aforementioned consequences, you must remit the sum of <text:span text:style-name="Strong_20_Emphasis">ONE THOUSAND UNITED STATES DOLLARS ($1,000.00)</text:span> in the form of cryptocurrency to the designated wallet address below. No alternative payment methods will be accepted.</text:p>
      <text:p text:style-name="P7"><text:span text:style-name="Strong_20_Emphasis"><text:span text:style-name="T6">Cryptocurrency Wallet Address (Bitcoin):</text:span></text:span><text:span text:style-name="T6"><text:line-break/></text:span><text:span text:style-name="T7">{PLACEHOLDER_WALLET_ADDRESS}</text:span><text:span text:style-name="T6"><text:line-break/></text:span><text:span text:style-name="Emphasis"><text:span text:style-name="T6">(Network: Bitcoin — SegWit compatible)</text:span></text:span><text:span text:style-name="T6"> </text:span></text:p>
      <table:table table:name="Table1" table:style-name="Table1">
        <table:table-column table:style-name="Table1.A"/>
        <table:table-column table:style-name="Table1.B"/>
        <table:table-row>
          <table:table-cell table:style-name="Table1.A1" office:value-type="string">
            <text:p text:style-name="Table_20_Heading">Payment Parameter</text:p>
          </table:table-cell>
          <table:table-cell table:style-name="Table1.A1" office:value-type="string">
            <text:p text:style-name="Table_20_Heading">Specification</text:p>
          </table:table-cell>
        </table:table-row>
        <table:table-row>
          <table:table-cell table:style-name="Table1.A1" office:value-type="string">
            <text:p text:style-name="Table_20_Contents">Required Amount</text:p>
          </table:table-cell>
          <table:table-cell table:style-name="Table1.A1" office:value-type="string">
            <text:p text:style-name="Table_20_Contents"><text:span text:style-name="Strong_20_Emphasis">$1,000.00 USD</text:span> (equivalent in BTC at time of transfer)</text:p>
          </table:table-cell>
        </table:table-row>
        <table:table-row>
          <table:table-cell table:style-name="Table1.A1" office:value-type="string">
            <text:p text:style-name="Table_20_Contents">Acceptable Cryptocurrency</text:p>
          </table:table-cell>
          <table:table-cell table:style-name="Table1.A1" office:value-type="string">
            <text:p text:style-name="Table_20_Contents">Bitcoin (BTC) only</text:p>
          </table:table-cell>
        </table:table-row>
        <table:table-row>
          <table:table-cell table:style-name="Table1.A1" office:value-type="string">
            <text:p text:style-name="Table_20_Contents">Wallet Address</text:p>
          </table:table-cell>
          <table:table-cell table:style-name="Table1.A1" office:value-type="string">
            <text:p text:style-name="Table_20_Contents">{PLACEHOLDER_WALLET_ADDRESS}</text:p>
          </table:table-cell>
        </table:table-row>
        <table:table-row>
          <table:table-cell table:style-name="Table1.A1" office:value-type="string">
            <text:p text:style-name="Table_20_Contents">Deadline</text:p>
          </table:table-cell>
          <table:table-cell table:style-name="Table1.B5" office:value-type="string">
            <text:p text:style-name="P3">{PLACEHOLDER_DEADLINE} — 11:59 PM UTC</text:p>
          </table:table-cell>
        </table:table-row>
        <table:table-row>
          <table:table-cell table:style-name="Table1.A1" office:value-type="string">
            <text:p text:style-name="Table_20_Contents">Confirmation Required</text:p>
          </table:table-cell>
          <table:table-cell table:style-name="Table1.A1" office:value-type="string">
            <text:p text:style-name="Table_20_Contents">Send proof of transaction (TXID) to {PLACEHOLDER_CONTACT_EMAIL}</text:p>
          </table:table-cell>
        </table:table-row>
      </table:table>
      <text:h text:style-name="Heading_20_2" text:outline-level="2">What We Know About You</text:h>
      <text:p text:style-name="Text_20_body">Our records indicate the following information, which we are prepared to make public if you fail to comply:</text:p>
      <text:list xml:id="list2518489218" text:style-name="L1">
        <text:list-item>
          <text:p text:style-name="P10">Your full identity and verified personal details </text:p>
        </text:list-item>
        <text:list-item>
          <text:p text:style-name="P10">Complete history of all donations made through our platform, including dates and amounts </text:p>
        </text:list-item>
        <text:list-item>
          <text:p text:style-name="P10">Correspondence records and communication logs </text:p>
        </text:list-item>
        <text:list-item>
          <text:p text:style-name="P10">IP addresses and device information associated with your account </text:p>
        </text:list-item>
        <text:list-item>
          <text:p text:style-name="P9">Any affiliated organizations or third parties linked to your transactions </text:p>
        </text:list-item>
      </text:list>
      <text:h text:style-name="Heading_20_2" text:outline-level="2">Consequences of Non-Compliance</text:h>
      <text:p text:style-name="Text_20_body"><text:soft-page-break/>If payment is not received by the specified deadline, the following actions will be taken <text:span text:style-name="Strong_20_Emphasis">without further notice</text:span>:</text:p>
      <text:list xml:id="list449856006" text:style-name="L2">
        <text:list-item>
          <text:p text:style-name="P12"><text:span text:style-name="Strong_20_Emphasis">Immediate publication</text:span> of your donation history on multiple public forums and data-sharing platforms. </text:p>
        </text:list-item>
        <text:list-item>
          <text:p text:style-name="P12"><text:span text:style-name="Strong_20_Emphasis">Notification</text:span> to all known associates, employers, and family members of your financial activities. </text:p>
        </text:list-item>
        <text:list-item>
          <text:p text:style-name="P12"><text:span text:style-name="Strong_20_Emphasis">Referral</text:span> of your case to our legal department for further action, including potential civil litigation. </text:p>
        </text:list-item>
        <text:list-item>
          <text:p text:style-name="P11"><text:span text:style-name="Strong_20_Emphasis">Permanent blacklisting</text:span> from all future participation in our programs. </text:p>
        </text:list-item>
      </text:list>
      <text:h text:style-name="Heading_20_2" text:outline-level="2">How to Comply</text:h>
      <text:p text:style-name="Text_20_body">To settle this obligation and prevent any disclosure:</text:p>
      <text:list xml:id="list2427241670" text:style-name="L3">
        <text:list-item>
          <text:p text:style-name="P14">Transfer exactly <text:span text:style-name="Strong_20_Emphasis">$1,000.00 USD</text:span> in Bitcoin to the wallet address provided above. </text:p>
        </text:list-item>
        <text:list-item>
          <text:p text:style-name="P14">Send an email to <text:span text:style-name="Strong_20_Emphasis">{PLACEHOLDER_CONTACT_EMAIL}</text:span> with the subject line <text:span text:style-name="Emphasis">"Settlement Confirmation — {PLACEHOLDER_REFERENCE}"</text:span> containing your transaction ID (TXID). </text:p>
        </text:list-item>
        <text:list-item>
          <text:p text:style-name="P13">Retain a copy of this letter and your transaction receipt for your records. </text:p>
        </text:list-item>
      </text:list>
      <text:p text:style-name="Text_20_body"><text:span text:style-name="Strong_20_Emphasis"><text:span text:style-name="T3">Important:</text:span></text:span> Once payment is confirmed and verified, all records pertaining to your account will be sealed and no disclosure will occur. This is your only opportunity to resolve this matter discreetly.</text:p>
      <text:h text:style-name="Heading_20_2" text:outline-level="2">Final Warning</text:h>
      <text:p text:style-name="Text_20_body">This is <text:span text:style-name="Strong_20_Emphasis">not</text:span> a request. This is a <text:span text:style-name="Strong_20_Emphasis">demand</text:span>. We have the means and the intent to follow through on all stated consequences. Do not test our resolve. The clock is ticking.</text:p>
      <text:p text:style-name="P15">Sincerely,</text:p>
      <text:p text:style-name="P16"><text:span text:style-name="Strong_20_Emphasis"><text:span text:style-name="T2">{PLACEHOLDER_SENDER_NAME}</text:span></text:span><text:span text:style-name="T2"><text:line-break/></text:span><text:span text:style-name="Emphasis"><text:span text:style-name="T2">Director of Compliance &amp; Recovery</text:span></text:span><text:span text:style-name="T2"><text:line-break/>{PLACEHOLDER_ORGANIZATION_NAME}<text:line-break/>{PLACEHOLDER_CONTACT_EMAIL} | {PLACEHOLDER_CONTACT_PHONE}</text:span></text:p>
      <text:p text:style-name="P8"><text:span text:style-name="Strong_20_Emphasis"><text:span text:style-name="T8">CONFIDENTIALITY NOTICE:</text:span></text:span><text:span text:style-name="T8"> This document contains privileged and confidential information intended solely for the addressee. Unauthorized review, use, disclosure, or distribution is prohibited and may be unlawful. If you are not the intended recipient, please destroy this document immediately.</text:span></text:p>
      <text:p text:style-name="P17">© {CURRENT_YEAR} {PLACEHOLDER_ORGANIZATION_NAME} — All Rights Reserved</text:p>
      <text:p text:style-name="P8"><text:span text:style-name="Emphasis"><text:span text:style-name="T8">This communication is protected by applicable law. Any attempt to ignore or evade this notice will result in immediate escalatio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7874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1252in" fo:border-left="none" fo:border-right="none" fo:border-top="none" fo:border-bottom="2.24pt solid #8b0000"/>
      <style:text-properties fo:text-transform="uppercase" fo:color="#8b0000" loext:opacity="100%" style:font-name="Liberation Sans1" fo:font-family="'Liberation Sans', Arial, sans-serif" fo:font-size="22pt" fo:letter-spacing="0.0102in" fo:font-weight="bold" style:font-name-asian="Liberation Sans1" style:font-family-asian="'Liberation Sans', Arial, sans-serif" style:font-size-asian="22pt" style:font-weight-asian="bold" style:font-name-complex="Liberation Sans1" style:font-family-complex="'Liberation Sans', Arial, sans-serif"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043in" style:contextual-spacing="false" fo:padding-left="0.1252in" fo:padding-right="0in" fo:padding-top="0in" fo:padding-bottom="0in" fo:border-left="3.74pt solid #8b0000" fo:border-right="none" fo:border-top="none" fo:border-bottom="none"/>
      <style:text-properties fo:color="#2c2c2c" loext:opacity="100%" style:font-name="Liberation Sans1" fo:font-family="'Liberation Sans', Arial, sans-serif" fo:font-size="16pt" fo:font-weight="bold" style:font-name-asian="Liberation Sans1" style:font-family-asian="'Liberation Sans', Arial, sans-serif" style:font-size-asian="16pt" style:font-weight-asian="bold" style:font-name-complex="Liberation Sans1" style:font-family-complex="'Liberation Sans', Arial, sans-serif"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874in" fo:margin-bottom="0.0835in" style:contextual-spacing="false"/>
      <style:text-properties fo:color="#444444"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style:font-name="Liberation Sans1" fo:font-family="'Liberation Sans', Arial, sans-serif" fo:font-weight="bold" style:font-name-asian="Liberation Sans1" style:font-family-asian="'Liberation Sans', Arial, sans-serif" style:font-weight-asian="bold" style:font-name-complex="Liberation Sans1" style:font-family-complex="'Liberation Sans', Arial, sans-serif"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49" meta:word-count="536" meta:character-count="3902" meta:non-whitespace-character-count="3409"/>
    <meta:generator>LibreOffice/7.3.7.2$Linux_X86_64 LibreOffice_project/30$Build-2</meta:generator>
  </office:meta>
</office:document-meta>
</file>