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Arial, sans-serif"/>
    <style:font-face style:name="Courier New" svg:font-family="'Courier New', monospac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0868in" table:align="left"/>
    </style:style>
    <style:style style:name="Table1.A" style:family="table-column">
      <style:table-column-properties style:column-width="4.0715in"/>
    </style:style>
    <style:style style:name="Table1.B" style:family="table-column">
      <style:table-column-properties style:column-width="3.0153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2.2125in"/>
    </style:style>
    <style:style style:name="Table2.B" style:family="table-column">
      <style:table-column-properties style:column-width="4.8743in"/>
    </style:style>
    <style:style style:name="Table2.A1" style:family="table-cell">
      <style:table-cell-properties style:vertical-align="middle" fo:padding="0.0194in" fo:border="none"/>
    </style:style>
    <style:style style:name="P1" style:family="paragraph" style:parent-style-name="Heading_20_1" style:master-page-name="HTML">
      <style:paragraph-properties fo:margin-top="0.0626in" fo:margin-bottom="0.3126in" style:contextual-spacing="false" fo:text-align="center" style:justify-single-word="false" style:page-number="auto"/>
    </style:style>
    <style:style style:name="P2" style:family="paragraph" style:parent-style-name="Heading_20_2">
      <style:paragraph-properties fo:margin-left="0.1874in" fo:margin-right="0.1874in" fo:text-indent="0in" style:auto-text-indent="false"/>
    </style:style>
    <style:style style:name="P3" style:family="paragraph" style:parent-style-name="Table_20_Contents">
      <style:paragraph-properties fo:text-align="end" style:justify-single-word="false"/>
      <style:text-properties style:font-name="Courier New" fo:font-weight="bold"/>
    </style:style>
    <style:style style:name="P4" style:family="paragraph" style:parent-style-name="Table_20_Contents">
      <style:paragraph-properties fo:text-align="end" style:justify-single-word="false"/>
    </style:style>
    <style:style style:name="P5" style:family="paragraph" style:parent-style-name="Text_20_body">
      <style:paragraph-properties fo:margin-top="0.0626in" fo:margin-bottom="0.3126in" style:contextual-spacing="false" fo:text-align="center" style:justify-single-word="false"/>
    </style:style>
    <style:style style:name="P6" style:family="paragraph" style:parent-style-name="Text_20_body">
      <style:paragraph-properties fo:margin-top="0.4165in" fo:margin-bottom="0.0626in" style:contextual-spacing="false" fo:text-align="center" style:justify-single-word="false"/>
    </style:style>
    <style:style style:name="P7" style:family="paragraph" style:parent-style-name="Text_20_body">
      <style:paragraph-properties fo:margin-top="0.2083in" fo:margin-bottom="0.3126in" style:contextual-spacing="false" fo:text-align="end" style:justify-single-word="false"/>
      <style:text-properties fo:font-size="11pt"/>
    </style:style>
    <style:style style:name="P8" style:family="paragraph" style:parent-style-name="Text_20_body">
      <style:paragraph-properties fo:margin-top="0.0626in" fo:margin-bottom="0.2917in" style:contextual-spacing="false" fo:line-height="140%"/>
    </style:style>
    <style:style style:name="P9" style:family="paragraph" style:parent-style-name="Text_20_body">
      <style:paragraph-properties fo:margin-top="0.0626in" fo:margin-bottom="0.1043in" style:contextual-spacing="false"/>
      <style:text-properties fo:text-transform="uppercase" fo:color="#8b0000" loext:opacity="100%" fo:font-size="12pt" fo:font-weight="bold" loext:padding-left="0.1043in" loext:padding-right="0in" loext:padding-top="0in" loext:padding-bottom="0in" loext:border-left="3pt solid #8b0000" loext:border-right="none" loext:border-top="none" loext:border-bottom="none"/>
    </style:style>
    <style:style style:name="P10" style:family="paragraph" style:parent-style-name="Text_20_body">
      <style:paragraph-properties fo:margin-top="0.0626in" fo:margin-bottom="0.1252in" style:contextual-spacing="false"/>
    </style:style>
    <style:style style:name="P11" style:family="paragraph" style:parent-style-name="Text_20_body">
      <style:paragraph-properties fo:margin-left="0.1874in" fo:margin-right="0.1874in" fo:margin-top="0.1874in" fo:margin-bottom="0.1874in" style:contextual-spacing="false" fo:text-indent="0in" style:auto-text-indent="false"/>
      <style:text-properties fo:color="#8b0000" loext:opacity="100%" fo:background-color="#fff3f3" loext:padding-left="0.1665in" loext:padding-right="0.1665in" loext:padding-top="0.1252in" loext:padding-bottom="0.1252in" loext:border="1.5pt solid #cc0000"/>
    </style:style>
    <style:style style:name="P12" style:family="paragraph" style:parent-style-name="Text_20_body" style:list-style-name="L1">
      <style:paragraph-properties fo:margin-top="0.0835in" fo:margin-bottom="0.1252in" style:contextual-spacing="false"/>
    </style:style>
    <style:style style:name="P13" style:family="paragraph" style:parent-style-name="Text_20_body" style:list-style-name="L2">
      <style:paragraph-properties fo:margin-top="0.0835in" fo:margin-bottom="0.1252in" style:contextual-spacing="false"/>
    </style:style>
    <style:style style:name="P14" style:family="paragraph" style:parent-style-name="Text_20_body" style:list-style-name="L3">
      <style:paragraph-properties fo:margin-top="0.0835in" fo:margin-bottom="0.1252in" style:contextual-spacing="false"/>
    </style:style>
    <style:style style:name="P15" style:family="paragraph" style:parent-style-name="Text_20_body">
      <style:paragraph-properties fo:margin-top="0.3126in" fo:margin-bottom="0.0626in" style:contextual-spacing="false" fo:line-height="180%"/>
      <style:text-properties fo:color="#555555" loext:opacity="100%" fo:font-size="10pt" loext:padding-left="0in" loext:padding-right="0in" loext:padding-top="0.0626in" loext:padding-bottom="0in" loext:border-left="none" loext:border-right="none" loext:border-top="0.06pt solid #666666" loext:border-bottom="none"/>
    </style:style>
    <style:style style:name="P16" style:family="paragraph" style:parent-style-name="Text_20_body">
      <style:paragraph-properties fo:margin-top="0.4165in" fo:margin-bottom="0.0626in" style:contextual-spacing="false" fo:line-height="180%"/>
    </style:style>
    <style:style style:name="P17" style:family="paragraph" style:parent-style-name="Text_20_body">
      <style:paragraph-properties fo:margin-top="0.4165in" fo:margin-bottom="0.0626in" style:contextual-spacing="false" fo:text-align="center" style:justify-single-word="false"/>
      <style:text-properties fo:color="#777777" loext:opacity="100%" fo:font-size="9pt" loext:padding-left="0in" loext:padding-right="0in" loext:padding-top="0.1252in" loext:padding-bottom="0in" loext:border-left="none" loext:border-right="none" loext:border-top="0.06pt solid #cccccc" loext:border-bottom="none"/>
    </style:style>
    <style:style style:name="T1" style:family="text">
      <style:text-properties fo:color="#ffffff" loext:opacity="100%" fo:font-size="10pt" fo:background-color="#cc0000" loext:char-shading-value="0" loext:padding="0in" loext:border="none"/>
    </style:style>
    <style:style style:name="T2" style:family="text">
      <style:text-properties fo:font-weight="bold"/>
    </style:style>
    <style:style style:name="T3" style:family="text">
      <style:text-properties fo:font-size="11pt"/>
    </style:style>
    <style:style style:name="T4" style:family="text">
      <style:text-properties style:text-underline-style="solid" style:text-underline-width="auto" style:text-underline-color="font-color"/>
    </style:style>
    <style:style style:name="T5" style:family="text">
      <style:text-properties style:font-name="Courier New" fo:font-weight="bold"/>
    </style:style>
    <style:style style:name="T6" style:family="text">
      <style:text-properties fo:color="#777777" loext:opacity="100%" fo:font-size="9pt" loext:padding-left="0in" loext:padding-right="0in" loext:padding-top="0.1252in" loext:padding-bottom="0in" loext:border-left="none" loext:border-right="none" loext:border-top="0.06pt solid #cccccc" loext:border-bottom="none"/>
    </style:style>
    <style:style style:name="T7" style:family="text"/>
    <text:list-style style:name="L1">
      <text:list-level-style-bullet text:level="1" text:style-name="Bullet_20_Symbols" loext:num-list-format="%1%." style:num-suffix="." text:bullet-char="•">
        <style:list-level-properties text:space-before="0.0118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0118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0118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NOTICE OF EVICTION PROCEEDINGS</text:p>
      <text:p text:style-name="P5"><text:span text:style-name="Strong_20_Emphasis">PROPERTY MANAGEMENT SOLUTIONS INC.</text:span></text:p>
      <text:p text:style-name="P5">123 Legal Avenue, Suite 400, Metropolis, ST 90210</text:p>
      <text:p text:style-name="P5">Phone: (555) 234-5678  |  Email: legal@pmsolutions.com</text:p>
      <text:p text:style-name="P5">Licensed &amp; Bonded  |  License No. PM-8847-EX</text:p>
      <text:p text:style-name="P7">{PLACEHOLDER_CURRENT_DATE}</text:p>
      <text:p text:style-name="P8"><text:span text:style-name="Strong_20_Emphasis">{PLACEHOLDER_TENANT_NAME}</text:span></text:p>
      <text:p text:style-name="P8">{PLACEHOLDER_TENANT_ADDRESS_LINE1}</text:p>
      <text:p text:style-name="P8">{PLACEHOLDER_TENANT_ADDRESS_LINE2}</text:p>
      <text:p text:style-name="P8">{PLACEHOLDER_TENANT_CITY_STATE_ZIP}</text:p>
      <text:p text:style-name="P9"><text:span text:style-name="T1">URGENT</text:span><text:line-break/>RE: FINAL DEMAND FOR PAYMENT OF OVERDUE RENT AND PENALTIES — EVICTION PROCEEDING IMMINENT </text:p>
      <text:p text:style-name="P10"><text:span text:style-name="T3">Dear </text:span><text:span text:style-name="Strong_20_Emphasis"><text:span text:style-name="T3">{PLACEHOLDER_TENANT_NAME}</text:span></text:span><text:span text:style-name="T3">,</text:span></text:p>
      <text:p text:style-name="P10">This letter constitutes a <text:span text:style-name="Strong_20_Emphasis"><text:span text:style-name="T4">FINAL NOTICE</text:span></text:span> and formal demand for immediate payment of all outstanding rent arrears, late fees, and associated penalties related to your tenancy at <text:span text:style-name="Strong_20_Emphasis">{PLACEHOLDER_TENANT_ADDRESS_LINE1}</text:span>. As of the date of this notice, your account is in serious default, and we have exhausted all reasonable efforts to resolve this matter amicably.</text:p>
      <text:p text:style-name="P11">⚠ <text:span text:style-name="T2">WARNING: FAILURE TO PAY THE TOTAL AMOUNT DUE WITHIN 7 CALENDAR DAYS WILL RESULT IN THE IMMEDIATE FILING OF AN UNCONTESTED EVICTION LAWSUIT. NO FURTHER NOTICE WILL BE PROVIDED.</text:span></text:p>
      <text:h text:style-name="P2" text:outline-level="2">Outstanding Balance Summary</text:h>
      <text:p text:style-name="Text_20_body">The following table details the amounts owed as of {PLACEHOLDER_CURRENT_DATE}. All amounts are due immediately.</text:p>
      <table:table table:name="Table1" table:style-name="Table1">
        <table:table-column table:style-name="Table1.A"/>
        <table:table-column table:style-name="Table1.B"/>
        <table:table-row>
          <table:table-cell table:style-name="Table1.A1" office:value-type="string">
            <text:p text:style-name="Table_20_Heading">Description</text:p>
          </table:table-cell>
          <table:table-cell table:style-name="Table1.A1" office:value-type="string">
            <text:p text:style-name="Table_20_Heading">Amount ($)</text:p>
          </table:table-cell>
        </table:table-row>
        <table:table-row>
          <table:table-cell table:style-name="Table1.A1" office:value-type="string">
            <text:p text:style-name="Table_20_Contents">Overdue Rent (Period: {PLACEHOLDER_RENT_PERIOD})</text:p>
          </table:table-cell>
          <table:table-cell table:style-name="Table1.A1" office:value-type="string">
            <text:p text:style-name="P3">${PLACEHOLDER_OVERDUE_RENT}</text:p>
          </table:table-cell>
        </table:table-row>
        <table:table-row>
          <table:table-cell table:style-name="Table1.A1" office:value-type="string">
            <text:p text:style-name="Table_20_Contents">Late Payment Penalty Fee (10% of overdue rent per lease clause 14.2)</text:p>
          </table:table-cell>
          <table:table-cell table:style-name="Table1.A1" office:value-type="string">
            <text:p text:style-name="P3">${PLACEHOLDER_PENALTY_FEE}</text:p>
          </table:table-cell>
        </table:table-row>
        <table:table-row>
          <table:table-cell table:style-name="Table1.A1" office:value-type="string">
            <text:p text:style-name="Table_20_Contents">Administrative Processing Fee (per notice &amp; filing preparation)</text:p>
          </table:table-cell>
          <table:table-cell table:style-name="Table1.A1" office:value-type="string">
            <text:p text:style-name="P3">$75.00</text:p>
          </table:table-cell>
        </table:table-row>
        <table:table-row>
          <table:table-cell table:style-name="Table1.A1" office:value-type="string">
            <text:p text:style-name="Table_20_Contents">Legal Notification Service Fee</text:p>
          </table:table-cell>
          <table:table-cell table:style-name="Table1.A1" office:value-type="string">
            <text:p text:style-name="P3">$35.00</text:p>
          </table:table-cell>
        </table:table-row>
        <table:table-row>
          <table:table-cell table:style-name="Table1.A1" office:value-type="string">
            <text:p text:style-name="Table_20_Contents"><text:span text:style-name="Strong_20_Emphasis">TOTAL AMOUNT DUE (IMMEDIATE)</text:span></text:p>
          </table:table-cell>
          <table:table-cell table:style-name="Table1.A1" office:value-type="string">
            <text:p text:style-name="P4"><text:span text:style-name="Strong_20_Emphasis"><text:span text:style-name="T5">${PLACEHOLDER_TOTAL_DUE}</text:span></text:span></text:p>
          </table:table-cell>
        </table:table-row>
      </table:table>
      <text:h text:style-name="Heading_20_2" text:outline-level="2">Payment Instructions &amp; Deadline</text:h>
      <text:p text:style-name="Text_20_body">To avoid eviction proceedings, you must remit the <text:span text:style-name="Strong_20_Emphasis">full total amount due</text:span> by <text:span text:style-name="Strong_20_Emphasis">{PLACEHOLDER_PAYMENT_DEADLINE}</text:span>. Payments must be made via one of the following methods only:</text:p>
      <text:list xml:id="list478855842" text:style-name="L1">
        <text:list-item>
          <text:p text:style-name="P12"><text:span text:style-name="Strong_20_Emphasis">Certified Bank Check or Money Order</text:span> — Made payable to <text:span text:style-name="Emphasis">Property Management Solutions Inc.</text:span> and delivered to our office address above. <text:span text:style-name="T4">Personal checks will not be accepted</text:span> at this stage. </text:p>
        </text:list-item>
        <text:list-item>
          <text:p text:style-name="P12"><text:soft-page-break/><text:span text:style-name="Strong_20_Emphasis">Online Portal Payment</text:span> — Log in to your tenant account at <text:span text:style-name="T4">www.pmsolutions.com/pay</text:span> and select the "Final Demand" option. A 3% convenience fee applies. </text:p>
        </text:list-item>
        <text:list-item>
          <text:p text:style-name="P12"><text:span text:style-name="Strong_20_Emphasis">Wire Transfer</text:span> — Contact our accounting department at (555) 234-5679 for wire instructions. Reference your account number: <text:span text:style-name="Strong_20_Emphasis">{PLACEHOLDER_ACCOUNT_NUMBER}</text:span>. </text:p>
        </text:list-item>
      </text:list>
      <text:p text:style-name="P11">⚠ <text:span text:style-name="T2">PARTIAL PAYMENTS WILL NOT BE ACCEPTED. ONLY THE FULL TOTAL DUE WILL STOP EVICTION PROCEEDINGS. DO NOT SEND CASH.</text:span></text:p>
      <text:h text:style-name="P2" text:outline-level="2">Consequences of Non-Payment</text:h>
      <text:p text:style-name="Text_20_body">If you fail to pay the total amount due by the deadline above, the following actions will be taken without further notice:</text:p>
      <text:list xml:id="list2473266212" text:style-name="L2">
        <text:list-item>
          <text:p text:style-name="P13"><text:span text:style-name="Strong_20_Emphasis">Immediate Filing of Eviction Lawsuit</text:span> — A complaint for unlawful detainer will be filed with the Superior Court of {PLACEHOLDER_COUNTY_NAME} County. </text:p>
        </text:list-item>
        <text:list-item>
          <text:p text:style-name="P13"><text:span text:style-name="Strong_20_Emphasis">Additional Legal Costs</text:span> — You will be liable for all court filing fees, process server fees, attorney's fees (at $350/hour), and any other costs incurred by the landlord in pursuing eviction. </text:p>
        </text:list-item>
        <text:list-item>
          <text:p text:style-name="P13"><text:span text:style-name="Strong_20_Emphasis">Negative Credit Reporting</text:span> — The unpaid balance and eviction filing will be reported to all major credit bureaus (Equifax, Experian, TransUnion), severely impacting your credit score. </text:p>
        </text:list-item>
        <text:list-item>
          <text:p text:style-name="P13"><text:span text:style-name="Strong_20_Emphasis">Wage Garnishment &amp; Asset Seizure</text:span> — Upon obtaining a judgment, the landlord may garnish your wages, levy bank accounts, and place liens on personal property. </text:p>
        </text:list-item>
        <text:list-item>
          <text:p text:style-name="P13"><text:span text:style-name="Strong_20_Emphasis">Loss of Rental History</text:span> — An eviction judgment will permanently appear on your rental history report, making it extremely difficult to rent any property in the future. </text:p>
        </text:list-item>
      </text:list>
      <text:h text:style-name="Heading_20_2" text:outline-level="2">Your Rights &amp; Options</text:h>
      <text:p text:style-name="Text_20_body">Under state law ({PLACEHOLDER_STATE_CODE} Civil Code § {PLACEHOLDER_LAW_SECTION}), you have the right to:</text:p>
      <text:list xml:id="list682747071" text:style-name="L3">
        <text:list-item>
          <text:p text:style-name="P14">Request a written payment plan agreement (must be submitted in writing within 48 hours). </text:p>
        </text:list-item>
        <text:list-item>
          <text:p text:style-name="P14">Dispute the amount owed by providing documented evidence (e.g., proof of prior payment, bank statements). </text:p>
        </text:list-item>
        <text:list-item>
          <text:p text:style-name="P14">Seek legal counsel or contact your local tenant advocacy group: <text:span text:style-name="Strong_20_Emphasis">{PLACEHOLDER_TENANT_HOTLINE}</text:span>. </text:p>
        </text:list-item>
        <text:list-item>
          <text:p text:style-name="P14">Appear in court to contest the eviction if a lawsuit is filed (you will be served with a summons). </text:p>
        </text:list-item>
      </text:list>
      <text:p text:style-name="Text_20_body"><text:span text:style-name="Strong_20_Emphasis"><text:span text:style-name="T4">Important:</text:span></text:span> If you believe there has been an error in the calculation of your arrears or penalties, you must contact our office immediately at (555) 234-5678, extension <text:span text:style-name="Strong_20_Emphasis">{PLACEHOLDER_EXTENSION}</text:span>, and provide supporting documentation. However, this does not suspend the payment deadline unless a formal dispute is acknowledged in writing by our legal department.</text:p>
      <text:h text:style-name="Heading_20_2" text:outline-level="2">Contact Information</text:h>
      <text:p text:style-name="Text_20_body">All communications regarding this notice must be directed to our Legal Compliance Department:</text:p>
      <table:table table:name="Table2" table:style-name="Table2">
        <table:table-column table:style-name="Table2.A"/>
        <table:table-column table:style-name="Table2.B"/>
        <table:table-row>
          <table:table-cell table:style-name="Table2.A1" office:value-type="string">
            <text:p text:style-name="Table_20_Heading">Department</text:p>
          </table:table-cell>
          <table:table-cell table:style-name="Table2.A1" office:value-type="string">
            <text:p text:style-name="Table_20_Heading">Contact</text:p>
          </table:table-cell>
        </table:table-row>
        <table:table-row>
          <table:table-cell table:style-name="Table2.A1" office:value-type="string">
            <text:p text:style-name="Table_20_Contents">Legal Compliance Officer</text:p>
          </table:table-cell>
          <table:table-cell table:style-name="Table2.A1" office:value-type="string">
            <text:p text:style-name="Table_20_Contents">{PLACEHOLDER_OFFICER_NAME} — (555) 234-5680 — legal@pmsolutions.com</text:p>
          </table:table-cell>
        </table:table-row>
        <table:table-row>
          <table:table-cell table:style-name="Table2.A1" office:value-type="string">
            <text:p text:style-name="Table_20_Contents">Payment Processing</text:p>
          </table:table-cell>
          <table:table-cell table:style-name="Table2.A1" office:value-type="string">
            <text:p text:style-name="Table_20_Contents">(555) 234-5679 — payments@pmsolutions.com</text:p>
          </table:table-cell>
        </table:table-row>
        <table:table-row>
          <table:table-cell table:style-name="Table2.A1" office:value-type="string">
            <text:p text:style-name="Table_20_Contents">Tenant Dispute Resolution</text:p>
          </table:table-cell>
          <table:table-cell table:style-name="Table2.A1" office:value-type="string">
            <text:p text:style-name="Table_20_Contents">(555) 234-5682 — disputes@pmsolutions.com</text:p>
          </table:table-cell>
        </table:table-row>
      </table:table>
      <text:p text:style-name="P16">We strongly urge you to take this matter seriously and resolve your outstanding debt immediately. This is your final opportunity to avoid legal action and the severe consequences that accompany an eviction judgment.</text:p>
      <text:p text:style-name="P16">Sincerely,</text:p>
      <text:p text:style-name="P16"/>
      <text:p text:style-name="P16"><text:soft-page-break/><text:span text:style-name="Strong_20_Emphasis">{PLACEHOLDER_SIGNING_AUTHORITY_NAME}</text:span></text:p>
      <text:p text:style-name="P16"><text:span text:style-name="Emphasis">Senior Legal Compliance Officer</text:span></text:p>
      <text:p text:style-name="P16">Property Management Solutions Inc.</text:p>
      <text:p text:style-name="P15">Authorized Signature</text:p>
      <text:p text:style-name="P6"><text:span text:style-name="Strong_20_Emphasis"><text:span text:style-name="T6">DISCLAIMER:</text:span></text:span><text:span text:style-name="T6"> This communication is from a debt collector. This is an attempt to collect a debt, and any information obtained will be used for that purpose. This notice is not a court order or legal filing. If you are in bankruptcy or have received a discharge, please disregard this notice. For questions regarding your rights, contact the Consumer Financial Protection Bureau or your state attorney general's office.</text:span></text:p>
      <text:p text:style-name="P17">Document Reference: {PLACEHOLDER_DOC_REF}  |  Date Generated: {PLACEHOLDER_CURRENT_DATE}  |  Page 1 of 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Arial, sans-serif"/>
    <style:font-face style:name="Courier New" svg:font-family="'Courier New', monospac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9839in" fo:margin-bottom="0.7874in" style:contextual-spacing="false" fo:line-height="150%" fo:text-indent="0in" style:auto-text-indent="false"/>
      <style:text-properties fo:color="#1a1a1a" loext:opacity="100%" style:font-name="Calibri" fo:font-family="Calibri, Arial, sans-serif" fo:font-size="11pt" style:font-name-asian="Calibri" style:font-family-asian="Calibri, Arial, sans-serif" style:font-size-asian="11pt" style:font-name-complex="Calibri" style:font-family-complex="Calibri, Arial, 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start" style:justify-single-word="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083in" style:contextual-spacing="false" fo:text-align="center" style:justify-single-word="false" fo:padding-left="0in" fo:padding-right="0in" fo:padding-top="0in" fo:padding-bottom="0.1252in" fo:border-left="none" fo:border-right="none" fo:border-top="none" fo:border-bottom="2.24pt solid #8b0000"/>
      <style:text-properties fo:text-transform="uppercase" fo:color="#8b0000" loext:opacity="100%" style:font-name="Calibri" fo:font-family="Calibri, Arial, sans-serif" fo:font-size="20pt" fo:letter-spacing="0.0102in" fo:font-weight="bold" style:font-name-asian="Calibri" style:font-family-asian="Calibri, Arial, sans-serif" style:font-size-asian="20pt" style:font-weight-asian="bold" style:font-name-complex="Calibri" style:font-family-complex="Calibri, Arial, sans-serif" style:font-size-complex="20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0626in" fo:margin-bottom="0.0626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1043in" style:contextual-spacing="false"/>
      <style:text-properties fo:color="#2c3e50" loext:opacity="100%" style:font-name="Calibri" fo:font-family="Calibri, Arial, sans-serif" fo:font-size="14pt" fo:font-weight="bold" style:font-name-asian="Calibri" style:font-family-asian="Calibri, Arial, sans-serif" style:font-size-asian="14pt" style:font-weight-asian="bold" style:font-name-complex="Calibri" style:font-family-complex="Calibri, Arial, sans-serif"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874in" fo:margin-bottom="0.0835in" style:contextual-spacing="false"/>
      <style:text-properties fo:color="#34495e" loext:opacity="100%" style:font-name="Calibri" fo:font-family="Calibri, Arial, sans-serif" fo:font-size="12pt" fo:font-weight="bold" style:font-name-asian="Calibri" style:font-family-asian="Calibri, Arial, sans-serif" style:font-size-asian="12pt" style:font-weight-asian="bold" style:font-name-complex="Calibri" style:font-family-complex="Calibri, Arial, sans-serif"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loext:opacity="100%"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3" meta:paragraph-count="66" meta:word-count="758" meta:character-count="5408" meta:non-whitespace-character-count="4694"/>
    <meta:generator>LibreOffice/7.3.7.2$Linux_X86_64 LibreOffice_project/30$Build-2</meta:generator>
  </office:meta>
</office:document-meta>
</file>