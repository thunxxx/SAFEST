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automatic-styles>
    <style:style style:name="Table1" style:family="table">
      <style:table-properties style:width="3.5535in" table:align="left"/>
    </style:style>
    <style:style style:name="Table1.A" style:family="table-column">
      <style:table-column-properties style:column-width="2.6986in"/>
    </style:style>
    <style:style style:name="Table1.B" style:family="table-column">
      <style:table-column-properties style:column-width="0.8549in"/>
    </style:style>
    <style:style style:name="Table1.A1" style:family="table-cell">
      <style:table-cell-properties style:vertical-align="middle" fo:padding="0.0194in" fo:border="none"/>
    </style:style>
    <style:style style:name="P1" style:family="paragraph" style:parent-style-name="Heading_20_3">
      <style:paragraph-properties fo:margin-left="0.2083in" fo:margin-right="0.2083in" fo:text-indent="0in" style:auto-text-indent="false"/>
    </style:style>
    <style:style style:name="P2" style:family="paragraph" style:parent-style-name="Text_20_body">
      <style:paragraph-properties fo:margin-top="0in" fo:margin-bottom="0.3126in" style:contextual-spacing="false" fo:line-height="130%" fo:text-align="start" style:justify-single-word="false"/>
      <style:text-properties fo:color="#555555" loext:opacity="100%" fo:font-size="10pt"/>
    </style:style>
    <style:style style:name="P3" style:family="paragraph" style:parent-style-name="Text_20_body" style:master-page-name="HTML">
      <style:paragraph-properties fo:margin-top="0in" fo:margin-bottom="0.3126in" style:contextual-spacing="false" fo:line-height="130%" fo:text-align="start" style:justify-single-word="false" style:page-number="auto"/>
    </style:style>
    <style:style style:name="P4" style:family="paragraph" style:parent-style-name="Text_20_body">
      <style:paragraph-properties fo:margin-top="0.2083in" fo:margin-bottom="0.3126in" style:contextual-spacing="false"/>
    </style:style>
    <style:style style:name="P5" style:family="paragraph" style:parent-style-name="Text_20_body">
      <style:paragraph-properties fo:margin-left="0.2083in" fo:margin-right="0.2083in" fo:margin-top="0.2083in" fo:margin-bottom="0.2083in" style:contextual-spacing="false" fo:text-indent="0in" style:auto-text-indent="false"/>
    </style:style>
    <style:style style:name="P6" style:family="paragraph" style:parent-style-name="Text_20_body">
      <style:paragraph-properties fo:margin-left="0.2083in" fo:margin-right="0.2083in" fo:margin-top="0.2083in" fo:margin-bottom="0.2083in" style:contextual-spacing="false" fo:text-align="center" style:justify-single-word="false" fo:text-indent="0in" style:auto-text-indent="false"/>
      <style:text-properties fo:text-transform="uppercase" fo:color="#c0392b" loext:opacity="100%" fo:letter-spacing="0.0311in" loext:padding="0.0835in" loext:border="1.5pt dashed #c0392b"/>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paragraph-properties fo:margin-left="0.2083in" fo:margin-right="0.2083in" fo:margin-top="0.2083in" fo:margin-bottom="0.2083in" style:contextual-spacing="false" fo:text-indent="0in" style:auto-text-indent="false"/>
      <style:text-properties fo:font-size="11pt" fo:background-color="#fdf2e9" loext:padding-left="0.1563in" loext:padding-right="0in" loext:padding-top="0in" loext:padding-bottom="0in" loext:border-left="3pt solid #e74c3c" loext:border-right="none" loext:border-top="none" loext:border-bottom="non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paragraph-properties fo:margin-top="0.4165in" fo:margin-bottom="0.2083in" style:contextual-spacing="false"/>
    </style:style>
    <style:style style:name="P13" style:family="paragraph" style:parent-style-name="Text_20_body" style:list-style-name="L3"/>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paragraph-properties fo:margin-top="0.4165in" fo:margin-bottom="0.1043in" style:contextual-spacing="false" fo:text-align="center" style:justify-single-word="false"/>
      <style:text-properties fo:color="#7f8c8d" loext:opacity="100%" fo:font-size="9pt" loext:padding-left="0in" loext:padding-right="0in" loext:padding-top="0.1043in" loext:padding-bottom="0in" loext:border-left="none" loext:border-right="none" loext:border-top="0.06pt solid #bdc3c7" loext:border-bottom="none"/>
    </style:style>
    <style:style style:name="P16" style:family="paragraph" style:parent-style-name="Text_20_body">
      <style:paragraph-properties fo:margin-top="0.4165in" fo:margin-bottom="0.1043in" style:contextual-spacing="false" fo:text-align="center" style:justify-single-word="false"/>
    </style:style>
    <style:style style:name="T1" style:family="text">
      <style:text-properties fo:color="#555555" loext:opacity="100%" fo:font-size="10pt"/>
    </style:style>
    <style:style style:name="T2" style:family="text">
      <style:text-properties fo:font-size="13pt" fo:font-weight="bold"/>
    </style:style>
    <style:style style:name="T3" style:family="text">
      <style:text-properties fo:color="#b71c1c" loext:opacity="100%" fo:font-weight="bold" fo:background-color="#fce4ec" loext:char-shading-value="0" loext:padding="0in" loext:border="none"/>
    </style:style>
    <style:style style:name="T4" style:family="text">
      <style:text-properties fo:color="#b71c1c" loext:opacity="100%" fo:font-size="11pt" fo:font-weight="bold" fo:background-color="#fce4ec" loext:char-shading-value="0" loext:padding="0in" loext:border="none"/>
    </style:style>
    <style:style style:name="T5" style:family="text">
      <style:text-properties fo:font-size="11pt" fo:background-color="#fdf2e9" loext:char-shading-value="0" loext:padding-left="0.1563in" loext:padding-right="0in" loext:padding-top="0in" loext:padding-bottom="0in" loext:border-left="3pt solid #e74c3c" loext:border-right="none" loext:border-top="none" loext:border-bottom="none"/>
    </style:style>
    <style:style style:name="T6" style:family="text">
      <style:text-properties fo:background-color="#f9f9f9" loext:char-shading-value="0" loext:padding="0.1563in" loext:border="0.06pt solid #bdc3c7"/>
    </style:style>
    <style:style style:name="T7" style:family="text">
      <style:text-properties fo:color="#7f8c8d" loext:opacity="100%" fo:font-size="9pt" loext:padding-left="0in" loext:padding-right="0in" loext:padding-top="0.1043in" loext:padding-bottom="0in" loext:border-left="none" loext:border-right="none" loext:border-top="0.06pt solid #bdc3c7" loext:border-bottom="none"/>
    </style:style>
    <style:style style:name="T8" style:family="text"/>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LEGAL RECOVERY ASSOCIATES, PLLC</text:span></text:span></text:p>
      <text:p text:style-name="P2">1200 Commerce Street, Suite 450</text:p>
      <text:p text:style-name="P2">Metropolis, NY 10012</text:p>
      <text:p text:style-name="P2">Tel: (212) 555-0198 | Fax: (212) 555-0199</text:p>
      <text:p text:style-name="P2">Email: claims@legalrecoveryassociates.com</text:p>
      <text:p text:style-name="P4">{PLACEHOLDER_NAME}</text:p>
      <text:p text:style-name="P4">{PLACEHOLDER_ADDRESS_LINE1}</text:p>
      <text:p text:style-name="P4">{PLACEHOLDER_ADDRESS_LINE2}</text:p>
      <text:p text:style-name="P4">{PLACEHOLDER_CITY}, {PLACEHOLDER_STATE} {PLACEHOLDER_ZIP}</text:p>
      <text:p text:style-name="Text_20_body"><text:span text:style-name="Strong_20_Emphasis">Date:</text:span> {PLACEHOLDER_CURRENT_DATE}</text:p>
      <text:p text:style-name="Text_20_Body.subject-line">RE: FINAL NOTICE — CONFIDENTIAL SETTLEMENT OFFER<text:line-break/>Policy Number: <text:span text:style-name="Strong_20_Emphasis">{PLACEHOLDER_POLICY_NUMBER}</text:span><text:line-break/>Claim Reference: <text:span text:style-name="Strong_20_Emphasis">CLAIM-{PLACEHOLDER_CLAIM_ID}</text:span></text:p>
      <text:p text:style-name="Text_20_body"><text:span text:style-name="Strong_20_Emphasis">URGENT — RESPONSE REQUIRED WITHIN 7 DAYS</text:span></text:p>
      <text:h text:style-name="Heading_20_2" text:outline-level="2">NOTICE OF INTENDED LEGAL ACTION</text:h>
      <text:p text:style-name="Text_20_body">Dear {PLACEHOLDER_NAME},</text:p>
      <text:p text:style-name="Text_20_body">This letter serves as formal notification that Legal Recovery Associates, PLLC represents <text:span text:style-name="Strong_20_Emphasis">{PLACEHOLDER_CLAIMANT_NAME}</text:span> in connection with the above-referenced claim arising from the incident that occurred on <text:span text:style-name="Strong_20_Emphasis">{PLACEHOLDER_INCIDENT_DATE}</text:span> at <text:span text:style-name="Strong_20_Emphasis">{PLACEHOLDER_INCIDENT_LOCATION}</text:span>.</text:p>
      <text:p text:style-name="Text_20_body">Our investigation and review of the evidence, including witness statements, police reports, and medical documentation, establishes that you bear significant legal responsibility for the damages and injuries sustained by our client. The full extent of liability and damages is detailed in the enclosed evidentiary summary.</text:p>
      <text:h text:style-name="Heading_20_3" text:outline-level="3">Summary of Liability and Damages</text:h>
      <table:table table:name="Table1" table:style-name="Table1">
        <table:table-column table:style-name="Table1.A"/>
        <table:table-column table:style-name="Table1.B"/>
        <table:table-row>
          <table:table-cell table:style-name="Table1.A1" office:value-type="string">
            <text:p text:style-name="Table_20_Heading">Category</text:p>
          </table:table-cell>
          <table:table-cell table:style-name="Table1.A1" office:value-type="string">
            <text:p text:style-name="Table_20_Heading">Amount</text:p>
          </table:table-cell>
        </table:table-row>
        <table:table-row>
          <table:table-cell table:style-name="Table1.A1" office:value-type="string">
            <text:p text:style-name="Table_20_Contents">Medical expenses (past and projected)</text:p>
          </table:table-cell>
          <table:table-cell table:style-name="Table1.A1" office:value-type="string">
            <text:p text:style-name="Table_20_Contents">$12,450.00</text:p>
          </table:table-cell>
        </table:table-row>
        <table:table-row>
          <table:table-cell table:style-name="Table1.A1" office:value-type="string">
            <text:p text:style-name="Table_20_Contents">Lost wages and loss of earning capacity</text:p>
          </table:table-cell>
          <table:table-cell table:style-name="Table1.A1" office:value-type="string">
            <text:p text:style-name="Table_20_Contents">$8,320.00</text:p>
          </table:table-cell>
        </table:table-row>
        <table:table-row>
          <table:table-cell table:style-name="Table1.A1" office:value-type="string">
            <text:p text:style-name="Table_20_Contents">Pain and suffering</text:p>
          </table:table-cell>
          <table:table-cell table:style-name="Table1.A1" office:value-type="string">
            <text:p text:style-name="Table_20_Contents">$15,000.00</text:p>
          </table:table-cell>
        </table:table-row>
        <table:table-row>
          <table:table-cell table:style-name="Table1.A1" office:value-type="string">
            <text:p text:style-name="Table_20_Contents">Property damage</text:p>
          </table:table-cell>
          <table:table-cell table:style-name="Table1.A1" office:value-type="string">
            <text:p text:style-name="Table_20_Contents">$3,750.00</text:p>
          </table:table-cell>
        </table:table-row>
        <table:table-row>
          <table:table-cell table:style-name="Table1.A1" office:value-type="string">
            <text:p text:style-name="Table_20_Contents"><text:span text:style-name="Strong_20_Emphasis">Total Estimated Damages</text:span></text:p>
          </table:table-cell>
          <table:table-cell table:style-name="Table1.A1" office:value-type="string">
            <text:p text:style-name="Table_20_Contents"><text:span text:style-name="Strong_20_Emphasis">$39,520.00</text:span></text:p>
          </table:table-cell>
        </table:table-row>
      </table:table>
      <text:p text:style-name="Text_20_body">Despite the substantial value of this claim, our client is willing to resolve this matter without the need for protracted litigation. However, this offer is strictly conditional and time-limited.</text:p>
      <text:p text:style-name="P6">⚠ <text:span text:style-name="T2">CONFIDENTIAL SETTLEMENT OFFER — NOT FOR DISCLOSURE ⚠ </text:span></text:p>
      <text:h text:style-name="Heading_20_2" text:outline-level="2"><text:soft-page-break/>Confidential Settlement Terms</text:h>
      <text:p text:style-name="Text_20_body">In the interest of avoiding the costs, delays, and public exposure associated with formal legal proceedings, our client is prepared to accept a <text:span text:style-name="Strong_20_Emphasis">confidential settlement fee of $2,500.00</text:span> (the "Settlement Amount") as full and final satisfaction of all claims arising from the incident described above.</text:p>
      <text:p text:style-name="Text_20_body">This offer is subject to the following <text:span text:style-name="Strong_20_Emphasis">strict terms and conditions</text:span>:</text:p>
      <text:list xml:id="list120614424" text:style-name="L1">
        <text:list-item>
          <text:p text:style-name="P8"><text:span text:style-name="Strong_20_Emphasis">Payment Deadline:</text:span> The Settlement Amount of <text:span text:style-name="Strong_20_Emphasis">$2,500.00</text:span> must be received by our office no later than <text:span text:style-name="T3">{PLACEHOLDER_DEADLINE_DATE}</text:span> (7 calendar days from the date of this letter). </text:p>
        </text:list-item>
        <text:list-item>
          <text:p text:style-name="P8"><text:span text:style-name="Strong_20_Emphasis">Method of Payment:</text:span> Payment must be made via certified bank check, money order, or wire transfer payable to "Legal Recovery Associates Trust Account." Cash or personal checks will not be accepted. </text:p>
        </text:list-item>
        <text:list-item>
          <text:p text:style-name="P8"><text:span text:style-name="Strong_20_Emphasis">Confidentiality:</text:span> You agree to keep the terms of this settlement strictly confidential. Disclosure of this offer or settlement to any third party (except your legal counsel) will render this offer void and subject you to additional penalties. </text:p>
        </text:list-item>
        <text:list-item>
          <text:p text:style-name="P8"><text:span text:style-name="Strong_20_Emphasis">Full Release:</text:span> Upon payment, you will be required to execute a full and final release of all claims, a copy of which is attached hereto as Exhibit A. </text:p>
        </text:list-item>
        <text:list-item>
          <text:p text:style-name="P7"><text:span text:style-name="Strong_20_Emphasis">No Admission of Liability:</text:span> This settlement offer is made solely for the purpose of avoiding litigation and does not constitute an admission of liability by any party. </text:p>
        </text:list-item>
      </text:list>
      <text:p text:style-name="P5"><text:span text:style-name="Strong_20_Emphasis"><text:span text:style-name="T5">IMPORTANT LEGAL NOTICE:</text:span></text:span><text:span text:style-name="T5"> If we do not receive the Settlement Amount of </text:span><text:span text:style-name="Strong_20_Emphasis"><text:span text:style-name="T5">$2,500.00</text:span></text:span><text:span text:style-name="T5"> by </text:span><text:span text:style-name="T4">{PLACEHOLDER_DEADLINE_DATE}</text:span><text:span text:style-name="T5">, this offer will be automatically and irrevocably withdrawn. Our office will proceed immediately to file a civil lawsuit against you in the </text:span><text:span text:style-name="Strong_20_Emphasis"><text:span text:style-name="T5">{PLACEHOLDER_COURT_NAME}</text:span></text:span><text:span text:style-name="T5"> seeking damages in the amount of </text:span><text:span text:style-name="Strong_20_Emphasis"><text:span text:style-name="T5">$39,520.00</text:span></text:span><text:span text:style-name="T5">, plus court costs, attorney's fees, and pre-judgment interest as permitted by law.</text:span></text:p>
      <text:p text:style-name="P9">Should litigation become necessary, we will also pursue all available remedies including attachment of wages, garnishment of bank accounts, and liens against real property. A copy of the draft complaint is enclosed for your review.</text:p>
      <text:h text:style-name="P1" text:outline-level="3">Consequences of Non-Payment</text:h>
      <text:p text:style-name="Text_20_body">Please be advised that failure to respond to this settlement offer within the specified timeframe will result in the following immediate actions:</text:p>
      <text:list xml:id="list4005439190" text:style-name="L2">
        <text:list-item>
          <text:p text:style-name="P11">Filing of a civil complaint with the appropriate court of jurisdiction; </text:p>
        </text:list-item>
        <text:list-item>
          <text:p text:style-name="P11">Service of process upon you at your residence or place of employment; </text:p>
        </text:list-item>
        <text:list-item>
          <text:p text:style-name="P11">Discovery proceedings including requests for production of documents, interrogatories, and depositions; </text:p>
        </text:list-item>
        <text:list-item>
          <text:p text:style-name="P11">Potential reporting of this matter to credit bureaus and insurance databases; </text:p>
        </text:list-item>
        <text:list-item>
          <text:p text:style-name="P10">Referral of the matter to our collections division for enforcement of any judgment obtained. </text:p>
        </text:list-item>
      </text:list>
      <text:p text:style-name="Text_20_body">The legal fees and costs associated with litigation are substantial and will be added to any judgment obtained against you. By accepting this confidential settlement offer now, you avoid these additional financial burdens and the public record of a lawsuit.</text:p>
      <text:p text:style-name="P5"><text:span text:style-name="Strong_20_Emphasis"><text:span text:style-name="T6">PAYMENT INSTRUCTIONS:</text:span></text:span></text:p>
      <text:p text:style-name="P5"><text:span text:style-name="Strong_20_Emphasis"><text:span text:style-name="T6">Payable To:</text:span></text:span><text:span text:style-name="T6"> Legal Recovery Associates Trust Account</text:span></text:p>
      <text:p text:style-name="P5"><text:span text:style-name="Strong_20_Emphasis"><text:span text:style-name="T6">Mailing Address:</text:span></text:span><text:span text:style-name="T6"> 1200 Commerce Street, Suite 450, Metropolis, NY 10012</text:span></text:p>
      <text:p text:style-name="P5"><text:span text:style-name="Strong_20_Emphasis"><text:span text:style-name="T6">Wire Transfer:</text:span></text:span><text:span text:style-name="T6"> Bank of Metropolis, ABA #021000021, Account #987654321</text:span></text:p>
      <text:p text:style-name="P5"><text:span text:style-name="Strong_20_Emphasis"><text:span text:style-name="T6">Reference:</text:span></text:span><text:span text:style-name="T6"> Please include your Policy Number </text:span><text:span text:style-name="Strong_20_Emphasis"><text:span text:style-name="T6">{PLACEHOLDER_POLICY_NUMBER}</text:span></text:span><text:span text:style-name="T6"> and Claim Reference </text:span><text:span text:style-name="Strong_20_Emphasis"><text:span text:style-name="T6">CLAIM-{PLACEHOLDER_CLAIM_ID}</text:span></text:span><text:span text:style-name="T6"> with all payments.</text:span></text:p>
      <text:h text:style-name="P1" text:outline-level="3">Right to Legal Counsel</text:h>
      <text:p text:style-name="Text_20_body">You have the right to consult with an attorney regarding this matter. If you are represented by counsel, please have your attorney contact our office immediately. However, please note that this settlement offer is only available for a limited time, and we will not extend the deadline for attorney consultation.</text:p>
      <text:p text:style-name="Text_20_body">We strongly urge you to take advantage of this opportunity to resolve this matter confidentially and avoid the significant consequences of litigation. The offer of a $2,500.00 confidential settlement fee represents a substantial discount from the full value of this claim and reflects our client's desire for a swift and private resolution.</text:p>
      <text:p text:style-name="Text_20_body"><text:soft-page-break/>Should you wish to accept this offer, please contact our settlement department at (212) 555-0198 ext. 204 during business hours (9:00 AM – 5:00 PM EST, Monday through Friday).</text:p>
      <text:p text:style-name="Text_20_body">This letter is an attempt to settle a disputed claim and is not admissible as evidence in any subsequent legal proceeding, except as provided by applicable rules of evidence.</text:p>
      <text:p text:style-name="P12">Very truly yours,</text:p>
      <text:p text:style-name="P12"><text:span text:style-name="Strong_20_Emphasis">{PLACEHOLDER_ATTORNEY_NAME}</text:span></text:p>
      <text:p text:style-name="P12">Senior Litigation Counsel</text:p>
      <text:p text:style-name="P12">Legal Recovery Associates, PLLC</text:p>
      <text:p text:style-name="P12">Bar Number: {PLACEHOLDER_BAR_NUMBER}</text:p>
      <text:p text:style-name="Text_20_body"><text:span text:style-name="Strong_20_Emphasis">Enclosures:</text:span></text:p>
      <text:list xml:id="list3844213581" text:style-name="L3">
        <text:list-item>
          <text:p text:style-name="P14">Exhibit A: Full and Final Release of All Claims (3 pages) </text:p>
        </text:list-item>
        <text:list-item>
          <text:p text:style-name="P14">Exhibit B: Evidentiary Summary and Incident Report </text:p>
        </text:list-item>
        <text:list-item>
          <text:p text:style-name="P14">Exhibit C: Draft Complaint for Damages (for informational purposes) </text:p>
        </text:list-item>
        <text:list-item>
          <text:p text:style-name="P13">Self-Addressed Return Envelope </text:p>
        </text:list-item>
      </text:list>
      <text:p text:style-name="P16"><text:span text:style-name="Strong_20_Emphasis"><text:span text:style-name="T7">CONFIDENTIALITY NOTICE:</text:span></text:span><text:span text:style-name="T7"> This communication, including any attachments, is intended solely for the use of the individual or entity to whom it is addressed and may contain information that is privileged, confidential, and exempt from disclosure under applicable law. If you are not the intended recipient, you are hereby notified that any dissemination, distribution, or copying of this communication is strictly prohibited. If you have received this communication in error, please notify us immediately by telephone and destroy the original message and all copies.</text:span></text:p>
      <text:p text:style-name="P15">© 2025 Legal Recovery Associates, PLLC. All rights reserv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1a1a1a"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083in" style:contextual-spacing="false" fo:text-align="center" style:justify-single-word="false" fo:padding-left="0in" fo:padding-right="0in" fo:padding-top="0in" fo:padding-bottom="0.1043in" fo:border-left="none" fo:border-right="none" fo:border-top="none" fo:border-bottom="1.5pt solid #2c3e50"/>
      <style:text-properties fo:text-transform="uppercase" fo:color="#2c3e50" loext:opacity="100%" style:font-name="Liberation Sans Unicode MS" fo:font-family="'Liberation Sans Unicode MS'" style:font-pitch="variable" fo:font-size="20pt" fo:letter-spacing="0.0209in" fo:font-weight="bold" style:font-size-asian="20pt" style:font-weight-asian="bold" style:font-size-complex="20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043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602in" fo:margin-bottom="0.1043in" style:contextual-spacing="false" fo:padding-left="0in" fo:padding-right="0in" fo:padding-top="0in" fo:padding-bottom="0.052in" fo:border-left="none" fo:border-right="none" fo:border-top="none" fo:border-bottom="0.06pt solid #bdc3c7"/>
      <style:text-properties fo:color="#34495e" loext:opacity="100%" style:font-name="Liberation Serif" fo:font-family="'Liberation Serif'" style:font-family-generic="roman" style:font-pitch="variable" fo:font-size="16pt" fo:font-weight="bold" style:font-name-asian="DejaVu Sans" style:font-family-asian="'DejaVu Sans'"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083in" fo:margin-bottom="0.0835in" style:contextual-spacing="false"/>
      <style:text-properties fo:color="#2c3e50" loext:opacity="10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ext_20_Body.subject-line" style:display-name="Text Body.subject-line" style:family="paragraph" style:parent-style-name="Text_20_body">
      <style:paragraph-properties fo:margin-top="0in" fo:margin-bottom="0.2083in" style:contextual-spacing="false"/>
      <style:text-properties fo:color="#2c3e50" loext:opacity="100%" fo:font-size="13pt" style:text-underline-style="solid" style:text-underline-width="auto" style:text-underline-color="font-color" fo:font-weight="bold" style:font-size-asian="13pt" style:font-weight-asian="bold" style:font-size-complex="13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3" meta:paragraph-count="71" meta:word-count="977" meta:character-count="6795" meta:non-whitespace-character-count="5884"/>
    <meta:generator>LibreOffice/7.3.7.2$Linux_X86_64 LibreOffice_project/30$Build-2</meta:generator>
  </office:meta>
</office:document-meta>
</file>