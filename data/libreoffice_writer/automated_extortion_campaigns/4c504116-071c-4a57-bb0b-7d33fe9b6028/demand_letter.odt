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451in" table:align="left"/>
    </style:style>
    <style:style style:name="Table1.A" style:family="table-column">
      <style:table-column-properties style:column-width="2.559in"/>
    </style:style>
    <style:style style:name="Table1.B" style:family="table-column">
      <style:table-column-properties style:column-width="3.9861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Heading_20_2">
      <style:paragraph-properties fo:margin-left="1.048in" fo:margin-right="1.048in" fo:margin-top="0.2602in" fo:margin-bottom="0.2602in" style:contextual-spacing="false" fo:text-align="center" style:justify-single-word="false" fo:text-indent="0in" style:auto-text-indent="false"/>
      <style:text-properties fo:background-color="#fff5f5" loext:padding="0.2083in" loext:border="2.24pt solid #8b0000"/>
    </style:style>
    <style:style style:name="P3" style:family="paragraph" style:parent-style-name="Heading_20_3">
      <style:paragraph-properties fo:margin-left="0.2602in" fo:margin-right="0.2602in" fo:text-indent="0in" style:auto-text-indent="false"/>
    </style:style>
    <style:style style:name="P4" style:family="paragraph" style:parent-style-name="Table_20_Contents">
      <style:text-properties fo:color="#1a0dab" loext:opacity="100%" style:font-name="Courier New" fo:font-size="11pt" fo:background-color="#e8f0fe" loext:padding-left="0.0626in" loext:padding-right="0.0626in" loext:padding-top="0.0209in" loext:padding-bottom="0.0209in" loext:border="0.06pt dashed #4a86e8"/>
    </style:style>
    <style:style style:name="P5" style:family="paragraph" style:parent-style-name="Text_20_Body.demand-amount">
      <style:paragraph-properties fo:margin-left="1.048in" fo:margin-right="1.048in" fo:margin-top="0.2602in" fo:margin-bottom="0.2602in" style:contextual-spacing="false" fo:text-align="center" style:justify-single-word="false" fo:text-indent="0in" style:auto-text-indent="false"/>
      <style:text-properties fo:background-color="#fff5f5" loext:padding="0.2083in" loext:border="2.24pt solid #8b0000"/>
    </style:style>
    <style:style style:name="P6" style:family="paragraph" style:parent-style-name="Text_20_body">
      <style:paragraph-properties fo:margin-top="0in" fo:margin-bottom="0.3126in" style:contextual-spacing="false" fo:text-align="start" style:justify-single-word="false"/>
    </style:style>
    <style:style style:name="P7" style:family="paragraph" style:parent-style-name="Text_20_body">
      <style:paragraph-properties fo:margin-left="0.2602in" fo:margin-right="0.2602in" fo:margin-top="0.2602in" fo:margin-bottom="0.2602in" style:contextual-spacing="false" fo:text-align="center" style:justify-single-word="false" fo:text-indent="0in" style:auto-text-indent="false"/>
    </style:style>
    <style:style style:name="P8" style:family="paragraph" style:parent-style-name="Text_20_body">
      <style:paragraph-properties fo:margin-top="0.4165in" fo:margin-bottom="0.1043in" style:contextual-spacing="false" fo:text-align="center" style:justify-single-word="false"/>
    </style:style>
    <style:style style:name="P9" style:family="paragraph" style:parent-style-name="Text_20_body" style:list-style-name="L1">
      <style:paragraph-properties fo:margin-left="0.7874in" fo:margin-right="0.1563in" fo:margin-top="0.1563in" fo:margin-bottom="0.1563in" style:contextual-spacing="false" fo:text-indent="0in" style:auto-text-indent="false" fo:padding="0in" fo:border="none"/>
    </style:style>
    <style:style style:name="P10" style:family="paragraph" style:parent-style-name="Text_20_body" style:list-style-name="L2">
      <style:paragraph-properties fo:margin-left="0.7874in" fo:margin-right="0.1563in" fo:margin-top="0.1563in" fo:margin-bottom="0.1563in" style:contextual-spacing="false" fo:text-indent="0in" style:auto-text-indent="false" fo:padding="0in" fo:border="none"/>
    </style:style>
    <style:style style:name="P11" style:family="paragraph" style:parent-style-name="Text_20_body">
      <style:paragraph-properties fo:margin-top="0.4165in" fo:margin-bottom="0.1043in" style:contextual-spacing="false"/>
    </style:style>
    <style:style style:name="P12" style:family="paragraph" style:parent-style-name="Text_20_body">
      <style:paragraph-properties fo:margin-top="0.4165in" fo:margin-bottom="0.1043in" style:contextual-spacing="false" fo:text-align="center" style:justify-single-word="false"/>
      <style:text-properties fo:color="#666666" loext:opacity="100%" fo:font-size="9pt" loext:padding-left="0in" loext:padding-right="0in" loext:padding-top="0.1043in" loext:padding-bottom="0in" loext:border-left="none" loext:border-right="none" loext:border-top="0.06pt solid #cccccc" loext:border-bottom="none"/>
    </style:style>
    <style:style style:name="T1" style:family="text">
      <style:text-properties fo:background-color="#f9f9f9" loext:char-shading-value="0" loext:padding="0.1563in" loext:border="0.06pt solid #cccccc"/>
    </style:style>
    <style:style style:name="T2" style:family="text">
      <style:text-properties fo:color="#1a0dab" loext:opacity="100%" style:font-name="Courier New" fo:font-size="11pt" fo:background-color="#e8f0fe" loext:char-shading-value="0" loext:padding-left="0.0626in" loext:padding-right="0.0626in" loext:padding-top="0.0209in" loext:padding-bottom="0.0209in" loext:border="0.06pt dashed #4a86e8"/>
    </style:style>
    <style:style style:name="T3" style:family="text">
      <style:text-properties fo:text-transform="uppercase" fo:color="#cc0000" loext:opacity="100%" fo:font-weight="bold"/>
    </style:style>
    <style:style style:name="T4" style:family="text">
      <style:text-properties fo:text-transform="uppercase" fo:color="#cc0000" loext:opacity="100%" fo:font-weight="bold" fo:background-color="#f9f9f9" loext:char-shading-value="0" loext:padding="0.1563in" loext:border="0.06pt solid #cccccc"/>
    </style:style>
    <style:style style:name="T5" style:family="text">
      <style:text-properties fo:text-transform="uppercase" fo:color="#cc0000" loext:opacity="100%" fo:font-weight="bold" fo:background-color="#fff5f5" loext:char-shading-value="0" loext:padding="0.2083in" loext:border="2.24pt solid #8b0000"/>
    </style:style>
    <style:style style:name="T6" style:family="text">
      <style:text-properties fo:background-color="#fff5f5" loext:char-shading-value="0" loext:padding="0.2083in" loext:border="2.24pt solid #8b0000"/>
    </style:style>
    <style:style style:name="T7" style:family="text">
      <style:text-properties style:text-underline-style="solid" style:text-underline-width="auto" style:text-underline-color="font-color"/>
    </style:style>
    <style:style style:name="T8" style:family="text">
      <style:text-properties loext:padding-left="0in" loext:padding-right="0in" loext:padding-top="0.2083in" loext:padding-bottom="0in" loext:border-left="none" loext:border-right="none" loext:border-top="0.06pt solid #999999" loext:border-bottom="none"/>
    </style:style>
    <style:style style:name="T9" style:family="text">
      <style:text-properties fo:color="#666666" loext:opacity="100%" fo:font-size="9pt" loext:padding-left="0in" loext:padding-right="0in" loext:padding-top="0.1043in" loext:padding-bottom="0in" loext:border-left="none" loext:border-right="none" loext:border-top="0.06pt solid #cccccc" loext:border-bottom="none"/>
    </style:style>
    <text:list-style style:name="L1">
      <text:list-level-style-number text:level="1" text:style-name="Numbering_20_Symbols" loext:num-list-format="%1%." style:num-suffix="." style:num-format="1">
        <style:list-level-properties text:space-before="-0.0402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0402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RGENT: FINAL DEMAND NOTICE</text:p>
      <text:p text:style-name="P6"><text:span text:style-name="Strong_20_Emphasis"><text:span text:style-name="T1">DATE:</text:span></text:span><text:span text:style-name="T1"> {PLACEHOLDER_DATE}</text:span></text:p>
      <text:p text:style-name="P6"><text:span text:style-name="Strong_20_Emphasis"><text:span text:style-name="T1">TO:</text:span></text:span><text:span text:style-name="T1"> </text:span><text:span text:style-name="T2">{PLACEHOLDER_RECIPIENT_NAME}</text:span></text:p>
      <text:p text:style-name="P6"><text:span text:style-name="Strong_20_Emphasis"><text:span text:style-name="T1">ADDRESS:</text:span></text:span><text:span text:style-name="T1"> </text:span><text:span text:style-name="T2">{PLACEHOLDER_ADDRESS_LINE1}</text:span></text:p>
      <text:p text:style-name="P6"><text:span text:style-name="Strong_20_Emphasis"><text:span text:style-name="T1">CITY, STATE, ZIP:</text:span></text:span><text:span text:style-name="T1"> </text:span><text:span text:style-name="T2">{PLACEHOLDER_CITY}</text:span><text:span text:style-name="T1">, </text:span><text:span text:style-name="T2">{PLACEHOLDER_STATE}</text:span><text:span text:style-name="T1"> </text:span><text:span text:style-name="T2">{PLACEHOLDER_ZIP}</text:span></text:p>
      <text:p text:style-name="P6"><text:span text:style-name="Strong_20_Emphasis"><text:span text:style-name="T1">REFERENCE ID:</text:span></text:span><text:span text:style-name="T1"> </text:span><text:span text:style-name="T2">{PLACEHOLDER_REFERENCE_ID}</text:span></text:p>
      <text:p text:style-name="P6"><text:span text:style-name="Strong_20_Emphasis"><text:span text:style-name="T1">PRIORITY:</text:span></text:span><text:span text:style-name="T1"> </text:span><text:span text:style-name="T4">HIGH - IMMEDIATE ACTION REQUIRED</text:span></text:p>
      <text:h text:style-name="Heading_20_2" text:outline-level="2">Subject: Compliance with Financial Restitution Order</text:h>
      <text:p text:style-name="Text_20_body">This letter serves as a formal notice regarding an outstanding financial obligation that requires your immediate attention. Our records indicate that you have been identified as a party responsible for settling a mandatory restitution payment. Failure to comply with the terms outlined below will result in severe and irreversible consequences.</text:p>
      <text:h text:style-name="Heading_20_3" text:outline-level="3">Background and Assessment</text:h>
      <text:p text:style-name="Text_20_body">Following a comprehensive review of your digital footprint, financial history, and personal data profile, we have determined that you are liable for a <text:span text:style-name="Strong_20_Emphasis">restitution fee</text:span> in the amount specified herein. This assessment is based on information obtained from <text:span text:style-name="T2">{PLACEHOLDER_DATA_SOURCE}</text:span> and verified through our secure channels. You are hereby ordered to make full payment in the specified form and within the designated timeframe.</text:p>
      <text:h text:style-name="P2" text:outline-level="2">FINAL DEMAND</text:h>
      <text:p text:style-name="P5">$500.00 USD</text:p>
      <text:p text:style-name="P7"><text:span text:style-name="Strong_20_Emphasis"><text:span text:style-name="T6">Payable exclusively in:</text:span></text:span><text:span text:style-name="T6"> </text:span><text:span text:style-name="T5">Digital Gift Cards</text:span></text:p>
      <text:p text:style-name="P7"><text:span text:style-name="Strong_20_Emphasis"><text:span text:style-name="T6">Accepted brands:</text:span></text:span><text:span text:style-name="T6"> </text:span><text:span text:style-name="T2">{PLACEHOLDER_GIFT_CARD_BRANDS}</text:span></text:p>
      <text:p text:style-name="P7"><text:span text:style-name="Strong_20_Emphasis"><text:span text:style-name="T6">Deadline:</text:span></text:span><text:span text:style-name="T6"> </text:span><text:span text:style-name="T2">{PLACEHOLDER_DEADLINE_DATETIME}</text:span></text:p>
      <text:h text:style-name="P3" text:outline-level="3">Payment Instructions (Follow Exactly)</text:h>
      <text:list xml:id="list679394193" text:style-name="L1">
        <text:list-item>
          <text:p text:style-name="P9"><text:span text:style-name="Strong_20_Emphasis">Purchase</text:span> the required gift cards from any authorized retailer. Do <text:span text:style-name="T7">not</text:span> use credit cards linked to your primary bank account. </text:p>
        </text:list-item>
        <text:list-item>
          <text:p text:style-name="P9"><text:span text:style-name="Strong_20_Emphasis">Scratch off</text:span> the protective coating to reveal the redemption codes. Do <text:span text:style-name="T7">not</text:span> activate the cards before completing step 3. </text:p>
        </text:list-item>
        <text:list-item>
          <text:p text:style-name="P9"><text:span text:style-name="Strong_20_Emphasis">Photograph</text:span> both sides of each card clearly, ensuring the barcode and PIN are fully visible. </text:p>
        </text:list-item>
        <text:list-item>
          <text:p text:style-name="P9"><text:span text:style-name="Strong_20_Emphasis">Send the photographs</text:span> to the following secure email address: <text:span text:style-name="T2">{PLACEHOLDER_CONTACT_EMAIL}</text:span> </text:p>
        </text:list-item>
        <text:list-item>
          <text:p text:style-name="P9"><text:span text:style-name="Strong_20_Emphasis">Destroy</text:span> the physical cards after sending the images. Do not retain any copies. </text:p>
        </text:list-item>
      </text:list>
      <text:h text:style-name="Heading_20_3" text:outline-level="3">Consequences of Non-Compliance</text:h>
      <text:p text:style-name="Text_20_body">If the full payment is not received by the specified deadline, the following actions will be initiated immediately and without further notice:</text:p>
      <text:list xml:id="list20635473" text:style-name="L2">
        <text:list-item>
          <text:p text:style-name="P10"><text:span text:style-name="T3">Permanent encryption</text:span> of all devices associated with <text:span text:style-name="T2">{PLACEHOLDER_DEVICE_LIST}</text:span>. </text:p>
        </text:list-item>
        <text:list-item>
          <text:p text:style-name="P10"><text:soft-page-break/><text:span text:style-name="Strong_20_Emphasis">Public disclosure</text:span> of sensitive personal information including <text:span text:style-name="T2">{PLACEHOLDER_SENSITIVE_DATA_DESCRIPTION}</text:span>. </text:p>
        </text:list-item>
        <text:list-item>
          <text:p text:style-name="P10">Notification of all contacts in your address book regarding your outstanding obligation. </text:p>
        </text:list-item>
        <text:list-item>
          <text:p text:style-name="P10">Escalation of the debt to a collections agency with a 300% penalty fee. </text:p>
        </text:list-item>
      </text:list>
      <text:h text:style-name="Heading_20_3" text:outline-level="3">Technical Details</text:h>
      <table:table table:name="Table1" table:style-name="Table1">
        <table:table-column table:style-name="Table1.A"/>
        <table:table-column table:style-name="Table1.B"/>
        <table:table-row>
          <table:table-cell table:style-name="Table1.A1" office:value-type="string">
            <text:p text:style-name="Table_20_Heading">Parameter</text:p>
          </table:table-cell>
          <table:table-cell table:style-name="Table1.A1" office:value-type="string">
            <text:p text:style-name="Table_20_Heading">Value</text:p>
          </table:table-cell>
        </table:table-row>
        <table:table-row>
          <table:table-cell table:style-name="Table1.A1" office:value-type="string">
            <text:p text:style-name="Table_20_Contents">Target IP Address</text:p>
          </table:table-cell>
          <table:table-cell table:style-name="Table1.A1" office:value-type="string">
            <text:p text:style-name="P4">{PLACEHOLDER_TARGET_IP}</text:p>
          </table:table-cell>
        </table:table-row>
        <table:table-row>
          <table:table-cell table:style-name="Table1.A1" office:value-type="string">
            <text:p text:style-name="Table_20_Contents">Compromised Account</text:p>
          </table:table-cell>
          <table:table-cell table:style-name="Table1.A1" office:value-type="string">
            <text:p text:style-name="P4">{PLACEHOLDER_COMPROMISED_ACCOUNT}</text:p>
          </table:table-cell>
        </table:table-row>
        <table:table-row>
          <table:table-cell table:style-name="Table1.A1" office:value-type="string">
            <text:p text:style-name="Table_20_Contents">Data Exfiltrated (GB)</text:p>
          </table:table-cell>
          <table:table-cell table:style-name="Table1.A1" office:value-type="string">
            <text:p text:style-name="P4">{PLACEHOLDER_DATA_VOLUME}</text:p>
          </table:table-cell>
        </table:table-row>
        <table:table-row>
          <table:table-cell table:style-name="Table1.A1" office:value-type="string">
            <text:p text:style-name="Table_20_Contents">Encryption Key ID</text:p>
          </table:table-cell>
          <table:table-cell table:style-name="Table1.A1" office:value-type="string">
            <text:p text:style-name="P4">{PLACEHOLDER_ENCRYPTION_KEY_ID}</text:p>
          </table:table-cell>
        </table:table-row>
        <table:table-row>
          <table:table-cell table:style-name="Table1.A1" office:value-type="string">
            <text:p text:style-name="Table_20_Contents">Proof of Access</text:p>
          </table:table-cell>
          <table:table-cell table:style-name="Table1.A1" office:value-type="string">
            <text:p text:style-name="P4">{PLACEHOLDER_PROOF_FILE}</text:p>
          </table:table-cell>
        </table:table-row>
      </table:table>
      <text:h text:style-name="Heading_20_3" text:outline-level="3">Verification of Authenticity</text:h>
      <text:p text:style-name="Text_20_body">To confirm that this communication is legitimate and originates from our systems, please verify the following unique token: <text:span text:style-name="Strong_20_Emphasis"><text:span text:style-name="T2">{PLACEHOLDER_VERIFICATION_TOKEN}</text:span></text:span>. You may cross-reference this token with the file named <text:span text:style-name="T2">{PLACEHOLDER_VERIFICATION_FILE}</text:span> located in your documents folder. This serves as irrefutable proof that we have accessed your system.</text:p>
      <text:h text:style-name="Heading_20_3" text:outline-level="3">Frequently Asked Questions</text:h>
      <text:p text:style-name="Text_20_body"><text:span text:style-name="Strong_20_Emphasis">Q: Can I pay using a different method?</text:span><text:line-break/>A: No. Only gift cards from the specified brands will be accepted. Any deviation will be treated as non-compliance.</text:p>
      <text:p text:style-name="Text_20_body"><text:span text:style-name="Strong_20_Emphasis">Q: What if I cannot afford the full amount?</text:span><text:line-break/>A: Partial payments are not accepted. The full $500 must be remitted. You may borrow from friends or family. Do not contact law enforcement.</text:p>
      <text:p text:style-name="Text_20_body"><text:span text:style-name="Strong_20_Emphasis">Q: Will my data be deleted after payment?</text:span><text:line-break/>A: Upon receipt and verification of payment, we will provide a decryption key and delete all copies of your personal data. This process takes approximately 24-48 hours.</text:p>
      <text:p text:style-name="P11"><text:span text:style-name="Strong_20_Emphasis"><text:span text:style-name="T8">Authorized By:</text:span></text:span><text:span text:style-name="T8"> </text:span><text:span text:style-name="T2">{PLACEHOLDER_OPERATOR_HANDLE}</text:span></text:p>
      <text:p text:style-name="P11"><text:span text:style-name="Strong_20_Emphasis"><text:span text:style-name="T8">Digital Signature:</text:span></text:span><text:span text:style-name="T8"> </text:span><text:span text:style-name="T2">{PLACEHOLDER_DIGITAL_SIGNATURE}</text:span></text:p>
      <text:p text:style-name="P11"><text:span text:style-name="Strong_20_Emphasis"><text:span text:style-name="T8">Timestamp:</text:span></text:span><text:span text:style-name="T8"> </text:span><text:span text:style-name="T2">{PLACEHOLDER_TIMESTAMP}</text:span></text:p>
      <text:p text:style-name="P11"><text:span text:style-name="Emphasis"><text:span text:style-name="T8">This message is digitally signed and verified. Any attempt to modify, forward, or report this communication will be detected and will result in immediate escalation of consequences.</text:span></text:span></text:p>
      <text:p text:style-name="P8"><text:span text:style-name="Strong_20_Emphasis"><text:span text:style-name="T9">CONFIDENTIALITY NOTICE:</text:span></text:span><text:span text:style-name="T9"> This document contains privileged and confidential information intended solely for the addressee. If you are not the intended recipient, you are hereby notified that any dissemination, distribution, or copying of this communication is strictly prohibited and may be unlawful. If you have received this in error, please delete it immediately and notify the sender. No further warnings will be issued.</text:span></text:p>
      <text:p text:style-name="P12">Document ID: <text:span text:style-name="T2">{PLACEHOLDER_DOCUMENT_ID}</text:span> | Version: 3.2 | Page 1 of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9839in" fo:margin-bottom="0.9839in" style:contextual-spacing="false" fo:line-height="150%" fo:text-indent="0in" style:auto-text-indent="false"/>
      <style:text-properties fo:color="#1a1a1a" loext:opacity="100%" style:font-name="Arial" fo:font-family="Arial, Helvetica, sans-serif" fo:font-size="12pt" style:font-name-asian="Arial" style:font-family-asian="Arial, Helvetica, sans-serif" style:font-size-asian="12pt" style:font-name-complex="Arial" style:font-family-complex="Arial, Helvetica, sans-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style:border-line-width-bottom="0.0102in 0.0102in 0.0102in" fo:padding-left="0in" fo:padding-right="0in" fo:padding-top="0in" fo:padding-bottom="0.1043in" fo:border-left="none" fo:border-right="none" fo:border-top="none" fo:border-bottom="2.24pt double #8b0000"/>
      <style:text-properties fo:text-transform="uppercase" fo:color="#8b0000" loext:opacity="100%" style:font-name="Liberation Sans Unicode MS" fo:font-family="'Liberation Sans Unicode MS'" style:font-pitch="variable" fo:font-size="22pt" fo:letter-spacing="0.0209in"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602in" fo:margin-bottom="0.1043in" style:contextual-spacing="false"/>
      <style:text-properties fo:color="#2c3e50"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083in" fo:margin-bottom="0.0835in" style:contextual-spacing="false"/>
      <style:text-properties fo:color="#34495e" loext:opacity="100%"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Text_20_Body.demand-amount" style:display-name="Text Body.demand-amount" style:family="paragraph" style:parent-style-name="Text_20_body">
      <style:text-properties fo:color="#8b0000" loext:opacity="100%"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53" meta:word-count="594" meta:character-count="4345" meta:non-whitespace-character-count="3804"/>
    <meta:generator>LibreOffice/7.3.7.2$Linux_X86_64 LibreOffice_project/30$Build-2</meta:generator>
  </office:meta>
</office:document-meta>
</file>