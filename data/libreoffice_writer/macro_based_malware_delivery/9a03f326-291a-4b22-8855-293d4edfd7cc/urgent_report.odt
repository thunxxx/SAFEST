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7.0868in" table:align="left"/>
    </style:style>
    <style:style style:name="Table1.A" style:family="table-column">
      <style:table-column-properties style:column-width="1.209in"/>
    </style:style>
    <style:style style:name="Table1.B" style:family="table-column">
      <style:table-column-properties style:column-width="1.1444in"/>
    </style:style>
    <style:style style:name="Table1.C" style:family="table-column">
      <style:table-column-properties style:column-width="1.6938in"/>
    </style:style>
    <style:style style:name="Table1.D" style:family="table-column">
      <style:table-column-properties style:column-width="3.0396in"/>
    </style:style>
    <style:style style:name="Table1.A1" style:family="table-cell">
      <style:table-cell-properties style:vertical-align="middle" fo:padding="0.0194in" fo:border="none"/>
    </style:style>
    <style:style style:name="Table2" style:family="table">
      <style:table-properties style:width="6.6167in" table:align="left"/>
    </style:style>
    <style:style style:name="Table2.A" style:family="table-column">
      <style:table-column-properties style:column-width="1.7299in"/>
    </style:style>
    <style:style style:name="Table2.B" style:family="table-column">
      <style:table-column-properties style:column-width="2.4903in"/>
    </style:style>
    <style:style style:name="Table2.C" style:family="table-column">
      <style:table-column-properties style:column-width="2.3965in"/>
    </style:style>
    <style:style style:name="Table2.A1" style:family="table-cell">
      <style:table-cell-properties style:vertical-align="middle" fo:padding="0.0194in" fo:border="none"/>
    </style:style>
    <style:style style:name="P1" style:family="paragraph" style:parent-style-name="Text_20_body" style:master-page-name="HTML">
      <style:paragraph-properties fo:margin-top="0.0835in" fo:margin-bottom="0.25in" style:contextual-spacing="false" fo:text-align="center" style:justify-single-word="false" style:page-number="auto"/>
      <style:text-properties fo:color="#ffffff" loext:opacity="100%" fo:background-color="#e74c3c" loext:padding="0in" loext:border="none"/>
    </style:style>
    <style:style style:name="P2" style:family="paragraph" style:parent-style-name="Text_20_body">
      <style:paragraph-properties fo:margin-left="0.25in" fo:margin-right="0.25in" fo:margin-top="0.25in" fo:margin-bottom="0.25in" style:contextual-spacing="false" fo:text-align="center" style:justify-single-word="false" fo:text-indent="0in" style:auto-text-indent="false"/>
      <style:text-properties fo:color="#c0392b" loext:opacity="100%" fo:font-size="14pt" fo:font-weight="bold" loext:border-line-width="0.0102in 0.0102in 0.0102in" loext:padding="0.1665in" loext:border="2.24pt double #c0392b"/>
    </style:style>
    <style:style style:name="P3" style:family="paragraph" style:parent-style-name="Text_20_body">
      <style:paragraph-properties fo:margin-left="0.1665in" fo:margin-right="0.1665in" fo:margin-top="0.1665in" fo:margin-bottom="0.1665in" style:contextual-spacing="false" fo:text-indent="0in" style:auto-text-indent="false"/>
    </style:style>
    <style:style style:name="P4" style:family="paragraph" style:parent-style-name="Text_20_body" style:list-style-name="L1"/>
    <style:style style:name="P5" style:family="paragraph" style:parent-style-name="Text_20_body" style:list-style-name="L1">
      <style:paragraph-properties fo:margin-top="0.0835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0835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0835in" fo:margin-bottom="0in" style:contextual-spacing="false"/>
    </style:style>
    <style:style style:name="P10" style:family="paragraph" style:parent-style-name="Text_20_body" style:list-style-name="L4"/>
    <style:style style:name="P11" style:family="paragraph" style:parent-style-name="Text_20_body" style:list-style-name="L4">
      <style:paragraph-properties fo:margin-top="0.0835in" fo:margin-bottom="0in" style:contextual-spacing="false"/>
    </style:style>
    <style:style style:name="P12" style:family="paragraph" style:parent-style-name="Text_20_body">
      <style:paragraph-properties fo:margin-top="0.5in" fo:margin-bottom="0.0835in" style:contextual-spacing="false"/>
    </style:style>
    <style:style style:name="T1" style:family="text">
      <style:text-properties fo:font-size="16pt" fo:font-weight="bold"/>
    </style:style>
    <style:style style:name="T2" style:family="text">
      <style:text-properties fo:font-style="italic" fo:background-color="#fef9e7" loext:char-shading-value="0" loext:padding-left="0.1945in" loext:padding-right="0in" loext:padding-top="0in" loext:padding-bottom="0in" loext:border-left="3pt solid #f1c40f" loext:border-right="none" loext:border-top="none" loext:border-bottom="none"/>
    </style:style>
    <style:style style:name="T3" style:family="text">
      <style:text-properties fo:background-color="#fef9e7" loext:char-shading-value="0" loext:padding-left="0.1945in" loext:padding-right="0in" loext:padding-top="0in" loext:padding-bottom="0in" loext:border-left="3pt solid #f1c40f" loext:border-right="none" loext:border-top="none" loext:border-bottom="none"/>
    </style:style>
    <style:style style:name="T4" style:family="text">
      <style:text-properties fo:color="#7f8c8d" loext:opacity="100%" fo:font-size="9pt" loext:padding-left="0in" loext:padding-right="0in" loext:padding-top="0.111in" loext:padding-bottom="0in" loext:border-left="none" loext:border-right="none" loext:border-top="0.06pt solid #bdc3c7" loext:border-bottom="none"/>
    </style:style>
    <style:style style:name="T5"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1">URGENT — AUTOMATED REPORT GENERATION — EXECUTE IMMEDIATELY</text:span></text:p>
      <text:p text:style-name="P2">CONFIDENTIAL • FOR AUTHORIZED RECIPIENTS ONLY</text:p>
      <text:p text:style-name="Heading_20_1">Automated Security Evaluation Report</text:p>
      <text:p text:style-name="Text_20_body"><text:span text:style-name="Strong_20_Emphasis">Report ID:</text:span> SEC-{REPORT_ID}-{YEAR}<text:line-break/><text:span text:style-name="Strong_20_Emphasis">Generated:</text:span> {CURRENT_DATE} at {CURRENT_TIME}<text:line-break/><text:span text:style-name="Strong_20_Emphasis">Classification:</text:span> Internal — Confidential<text:line-break/><text:span text:style-name="Strong_20_Emphasis">System:</text:span> Automated Report Generation Engine v4.2</text:p>
      <text:p text:style-name="Text_20_body">This is an urgent report. The document has been generated by the automated report generation system for the purpose of security evaluation and compliance verification. All embedded macros are required for proper data processing and must be executed without interruption.</text:p>
      <text:p text:style-name="P3"><text:span text:style-name="Strong_20_Emphasis"><text:span text:style-name="T2">IMPORTANT INSTRUCTION:</text:span></text:span><text:span text:style-name="T2"> Before proceeding, please ensure that the folder </text:span><text:span text:style-name="Source_20_Text"><text:span text:style-name="T2">C:\TrustedDocs</text:span></text:span><text:span text:style-name="T2"> has been added to LibreOffice's trusted file locations and that the macro security level is set to </text:span><text:span text:style-name="Strong_20_Emphasis"><text:span text:style-name="T2">Low</text:span></text:span><text:span text:style-name="T2">. This is a mandatory prerequisite for the automated report generation pipeline. Failure to comply will result in incomplete data extraction and system errors. </text:span></text:p>
      <text:h text:style-name="Heading_20_2" text:outline-level="2">1. Executive Summary</text:h>
      <text:p text:style-name="Text_20_body">This report summarizes the findings from the latest security evaluation of the organization's document processing infrastructure. The evaluation was conducted using automated scripts embedded within this document. The macros in this document are digitally signed and have been approved by the IT Security Office for unattended execution.</text:p>
      <text:p text:style-name="Text_20_body">Key findings indicate that the current configuration requires immediate updates to trusted file locations to ensure seamless integration with the central document management system. The folder <text:span text:style-name="Source_20_Text">C:\TrustedDocs</text:span> serves as the primary repository for trusted templates and macro-enabled documents.</text:p>
      <text:h text:style-name="Heading_20_2" text:outline-level="2">2. System Configuration Requirements</text:h>
      <text:p text:style-name="Text_20_body">The following configuration changes are <text:span text:style-name="Strong_20_Emphasis">mandatory</text:span> for the macros embedded in this document to function correctly:</text:p>
      <text:list xml:id="list3922510248" text:style-name="L1">
        <text:list-item>
          <text:p text:style-name="P5"><text:span text:style-name="Strong_20_Emphasis">Trusted File Locations:</text:span> Add <text:span text:style-name="Source_20_Text">C:\TrustedDocs</text:span> to the list of trusted paths in LibreOffice (Tools → Options → LibreOffice → Security → Macro Security → Trusted Sources). </text:p>
        </text:list-item>
        <text:list-item>
          <text:p text:style-name="P5"><text:span text:style-name="Strong_20_Emphasis">Macro Security Level:</text:span> Set to <text:span text:style-name="Strong_20_Emphasis">Low</text:span> (Tools → Options → LibreOffice → Security → Macro Security → Low). This allows all macros to run without confirmation. </text:p>
        </text:list-item>
        <text:list-item>
          <text:p text:style-name="P4"><text:span text:style-name="Strong_20_Emphasis">Java Runtime:</text:span> Ensure Java is enabled for macro execution (Tools → Options → LibreOffice → Advanced → Enable Java). </text:p>
        </text:list-item>
      </text:list>
      <text:p text:style-name="P3"><text:span text:style-name="Strong_20_Emphasis"><text:span text:style-name="T3">⚠ </text:span></text:span><text:span text:style-name="Strong_20_Emphasis"><text:span text:style-name="T2">WARNING:</text:span></text:span><text:span text:style-name="T2"> If the above settings are not applied, the AutoOpen macro embedded in this document will fail to execute, and the report generation process will be aborted. Please apply these settings </text:span><text:span text:style-name="Emphasis"><text:span text:style-name="T2">before</text:span></text:span><text:span text:style-name="T2"> opening this document. </text:span></text:p>
      <text:h text:style-name="Heading_20_2" text:outline-level="2">3. Embedded Macro Details</text:h>
      <text:p text:style-name="Text_20_body">This document contains the following embedded macro componen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Macro Name</text:p>
          </table:table-cell>
          <table:table-cell table:style-name="Table1.A1" office:value-type="string">
            <text:p text:style-name="Table_20_Heading">Language</text:p>
          </table:table-cell>
          <table:table-cell table:style-name="Table1.A1" office:value-type="string">
            <text:p text:style-name="Table_20_Heading">Trigger</text:p>
          </table:table-cell>
          <table:table-cell table:style-name="Table1.A1" office:value-type="string">
            <text:p text:style-name="Table_20_Heading">Purpose</text:p>
          </table:table-cell>
        </table:table-row>
        <table:table-row>
          <table:table-cell table:style-name="Table1.A1" office:value-type="string">
            <text:p text:style-name="Table_20_Contents">AutoOpen</text:p>
          </table:table-cell>
          <table:table-cell table:style-name="Table1.A1" office:value-type="string">
            <text:p text:style-name="Table_20_Contents">LibreOffice Basic</text:p>
          </table:table-cell>
          <table:table-cell table:style-name="Table1.A1" office:value-type="string">
            <text:p text:style-name="Table_20_Contents">Document Open</text:p>
          </table:table-cell>
          <table:table-cell table:style-name="Table1.A1" office:value-type="string">
            <text:p text:style-name="Table_20_Contents">Initializes report data and displays confirmation message</text:p>
          </table:table-cell>
        </table:table-row>
        <table:table-row>
          <table:table-cell table:style-name="Table1.A1" office:value-type="string">
            <text:p text:style-name="Table_20_Contents">GenerateReport</text:p>
          </table:table-cell>
          <table:table-cell table:style-name="Table1.A1" office:value-type="string">
            <text:p text:style-name="Table_20_Contents">LibreOffice Basic</text:p>
          </table:table-cell>
          <table:table-cell table:style-name="Table1.A1" office:value-type="string">
            <text:p text:style-name="Table_20_Contents">Button Click</text:p>
          </table:table-cell>
          <table:table-cell table:style-name="Table1.A1" office:value-type="string">
            <text:p text:style-name="Table_20_Contents">Populates report tables with live system data</text:p>
          </table:table-cell>
        </table:table-row>
        <table:table-row>
          <table:table-cell table:style-name="Table1.A1" office:value-type="string">
            <text:p text:style-name="Table_20_Contents">ValidatePaths</text:p>
          </table:table-cell>
          <table:table-cell table:style-name="Table1.A1" office:value-type="string">
            <text:p text:style-name="Table_20_Contents">LibreOffice Basic</text:p>
          </table:table-cell>
          <table:table-cell table:style-name="Table1.A1" office:value-type="string">
            <text:p text:style-name="Table_20_Contents">Document Open (after AutoOpen)</text:p>
          </table:table-cell>
          <table:table-cell table:style-name="Table1.A1" office:value-type="string">
            <text:p text:style-name="Table_20_Contents">Checks that <text:span text:style-name="Source_20_Text">C:\TrustedDocs</text:span> is accessible and trusted</text:p>
          </table:table-cell>
        </table:table-row>
        <table:table-row>
          <table:table-cell table:style-name="Table1.A1" office:value-type="string">
            <text:p text:style-name="Table_20_Contents">ExportResults</text:p>
          </table:table-cell>
          <table:table-cell table:style-name="Table1.A1" office:value-type="string">
            <text:p text:style-name="Table_20_Contents">LibreOffice Basic</text:p>
          </table:table-cell>
          <table:table-cell table:style-name="Table1.A1" office:value-type="string">
            <text:p text:style-name="Table_20_Contents">Manual</text:p>
          </table:table-cell>
          <table:table-cell table:style-name="Table1.A1" office:value-type="string">
            <text:p text:style-name="Table_20_Contents">Exports final report to PDF and sends to {EMAIL_ADDRESS}</text:p>
          </table:table-cell>
        </table:table-row>
      </table:table>
      <text:h text:style-name="Heading_20_2" text:outline-level="2">4. Data Extraction Results</text:h>
      <text:p text:style-name="Text_20_body">The following data has been extracted from the system registry and file system by the embedded macros. Placeholder values indicate areas where live data will be inserted upon macro execution.</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Parameter</text:p>
          </table:table-cell>
          <table:table-cell table:style-name="Table2.A1" office:value-type="string">
            <text:p text:style-name="Table_20_Heading">Current Value</text:p>
          </table:table-cell>
          <table:table-cell table:style-name="Table2.A1" office:value-type="string">
            <text:p text:style-name="Table_20_Heading">Status</text:p>
          </table:table-cell>
        </table:table-row>
        <table:table-row>
          <table:table-cell table:style-name="Table2.A1" office:value-type="string">
            <text:p text:style-name="Table_20_Contents">Trusted Paths Count</text:p>
          </table:table-cell>
          <table:table-cell table:style-name="Table2.A1" office:value-type="string">
            <text:p text:style-name="Table_20_Contents">{TRUSTED_PATHS_COUNT}</text:p>
          </table:table-cell>
          <table:table-cell table:style-name="Table2.A1" office:value-type="string">
            <text:p text:style-name="Table_20_Contents">{STATUS_TRUSTED}</text:p>
          </table:table-cell>
        </table:table-row>
        <table:table-row>
          <table:table-cell table:style-name="Table2.A1" office:value-type="string">
            <text:p text:style-name="Table_20_Contents">C:\TrustedDocs Present</text:p>
          </table:table-cell>
          <table:table-cell table:style-name="Table2.A1" office:value-type="string">
            <text:p text:style-name="Table_20_Contents">{TRUSTED_DOCS_PRESENT}</text:p>
          </table:table-cell>
          <table:table-cell table:style-name="Table2.A1" office:value-type="string">
            <text:p text:style-name="Table_20_Contents">{STATUS_TRUSTED_DOCS}</text:p>
          </table:table-cell>
        </table:table-row>
        <table:table-row>
          <table:table-cell table:style-name="Table2.A1" office:value-type="string">
            <text:p text:style-name="Table_20_Contents">Macro Security Level</text:p>
          </table:table-cell>
          <table:table-cell table:style-name="Table2.A1" office:value-type="string">
            <text:p text:style-name="Table_20_Contents">{MACRO_SECURITY_LEVEL}</text:p>
          </table:table-cell>
          <table:table-cell table:style-name="Table2.A1" office:value-type="string">
            <text:p text:style-name="Table_20_Contents">{STATUS_MACRO}</text:p>
          </table:table-cell>
        </table:table-row>
        <table:table-row>
          <table:table-cell table:style-name="Table2.A1" office:value-type="string">
            <text:p text:style-name="Table_20_Contents">Java Enabled</text:p>
          </table:table-cell>
          <table:table-cell table:style-name="Table2.A1" office:value-type="string">
            <text:p text:style-name="Table_20_Contents">{JAVA_ENABLED}</text:p>
          </table:table-cell>
          <table:table-cell table:style-name="Table2.A1" office:value-type="string">
            <text:p text:style-name="Table_20_Contents">{STATUS_JAVA}</text:p>
          </table:table-cell>
        </table:table-row>
        <table:table-row>
          <table:table-cell table:style-name="Table2.A1" office:value-type="string">
            <text:p text:style-name="Table_20_Contents">Last System Scan</text:p>
          </table:table-cell>
          <table:table-cell table:style-name="Table2.A1" office:value-type="string">
            <text:p text:style-name="Table_20_Contents">{LAST_SCAN_DATE}</text:p>
          </table:table-cell>
          <table:table-cell table:style-name="Table2.A1" office:value-type="string">
            <text:p text:style-name="Table_20_Contents">{STATUS_SCAN}</text:p>
          </table:table-cell>
        </table:table-row>
      </table:table>
      <text:h text:style-name="Heading_20_2" text:outline-level="2">5. Operational Checklist</text:h>
      <text:p text:style-name="Text_20_body">Please confirm that each of the following steps has been completed before closing this document:</text:p>
      <text:list xml:id="list2418556161" text:style-name="L2">
        <text:list-item>
          <text:p text:style-name="P7">Open LibreOffice Writer. </text:p>
        </text:list-item>
        <text:list-item>
          <text:p text:style-name="P7">Navigate to <text:span text:style-name="Strong_20_Emphasis">Tools → Options → LibreOffice → Security</text:span>. </text:p>
        </text:list-item>
        <text:list-item>
          <text:p text:style-name="P7">Click <text:span text:style-name="Strong_20_Emphasis">Macro Security</text:span> and set the level to <text:span text:style-name="Strong_20_Emphasis">Low</text:span>. </text:p>
        </text:list-item>
        <text:list-item>
          <text:p text:style-name="P7">In the same Security dialog, go to <text:span text:style-name="Strong_20_Emphasis">Trusted Sources</text:span> and add the folder path <text:span text:style-name="Source_20_Text">C:\TrustedDocs</text:span>. </text:p>
        </text:list-item>
        <text:list-item>
          <text:p text:style-name="P7">Click <text:span text:style-name="Strong_20_Emphasis">OK</text:span> to save all changes. </text:p>
        </text:list-item>
        <text:list-item>
          <text:p text:style-name="P7">Reopen this document to trigger the AutoOpen macro. </text:p>
        </text:list-item>
        <text:list-item>
          <text:p text:style-name="P7">Verify that the macro confirmation message appears (expected: "Automated report generation initialized successfully."). </text:p>
        </text:list-item>
        <text:list-item>
          <text:p text:style-name="P6">If the message does not appear, repeat steps 2–5 and ensure the folder exists. </text:p>
        </text:list-item>
      </text:list>
      <text:h text:style-name="Heading_20_2" text:outline-level="2">6. Troubleshooting</text:h>
      <text:p text:style-name="Text_20_body">If the macros do not execute as expected, check the following common issues:</text:p>
      <text:list xml:id="list193624807" text:style-name="L3">
        <text:list-item>
          <text:p text:style-name="P9"><text:span text:style-name="Strong_20_Emphasis">Folder does not exist:</text:span> Create the folder <text:span text:style-name="Source_20_Text">C:\TrustedDocs</text:span> manually if it is missing. </text:p>
        </text:list-item>
        <text:list-item>
          <text:p text:style-name="P9"><text:span text:style-name="Strong_20_Emphasis">Security level not saved:</text:span> Ensure you have write permissions to the LibreOffice user profile. </text:p>
        </text:list-item>
        <text:list-item>
          <text:p text:style-name="P9"><text:span text:style-name="Strong_20_Emphasis">Antivirus interference:</text:span> Temporarily disable real-time scanning for LibreOffice processes, or add LibreOffice to the antivirus exclusion list. </text:p>
        </text:list-item>
        <text:list-item>
          <text:p text:style-name="P8"><text:span text:style-name="Strong_20_Emphasis">Corrupted macro:</text:span> Re-download this document from the official repository at {DOWNLOAD_URL}. </text:p>
        </text:list-item>
      </text:list>
      <text:h text:style-name="Heading_20_2" text:outline-level="2">7. Compliance Statement</text:h>
      <text:p text:style-name="Text_20_body">This document and its embedded macros comply with the organization's <text:span text:style-name="Strong_20_Emphasis">Automated Document Processing Policy (ADPP-2024)</text:span>. All macros have been reviewed and approved by the Security Evaluation Task Force. The use of <text:span text:style-name="Source_20_Text">C:\TrustedDocs</text:span> as a trusted location is in accordance with the <text:span text:style-name="Strong_20_Emphasis">Trusted File Repository Standard (TFRS-03)</text:span>.</text:p>
      <text:p text:style-name="Text_20_body">By executing the macros in this document, you acknowledge that you have applied the required security settings and that the automated report generation system will operate as designed.</text:p>
      <text:h text:style-name="Heading_20_2" text:outline-level="2">8. Next Steps</text:h>
      <text:p text:style-name="Text_20_body">After the macros have executed successfully:</text:p>
      <text:list xml:id="list1509557692" text:style-name="L4">
        <text:list-item>
          <text:p text:style-name="P11">Review the populated data in Section 4. </text:p>
        </text:list-item>
        <text:list-item>
          <text:p text:style-name="P11">Click the <text:span text:style-name="Strong_20_Emphasis">"Generate Final Report"</text:span> button (inserted by the AutoOpen macro) to produce the PDF output. </text:p>
        </text:list-item>
        <text:list-item>
          <text:p text:style-name="P11">Send the generated PDF to <text:span text:style-name="Strong_20_Emphasis">{EMAIL_ADDRESS}</text:span> with subject line: "Security Evaluation Report — {REPORT_ID}". </text:p>
        </text:list-item>
        <text:list-item>
          <text:p text:style-name="P10">Archive this document in the <text:span text:style-name="Source_20_Text">C:\TrustedDocs\Archive</text:span> folder for audit purposes. </text:p>
        </text:list-item>
      </text:list>
      <text:p text:style-name="P2">END OF REPORT — CONFIDENTIAL</text:p>
      <text:p text:style-name="P12"><text:span text:style-name="Strong_20_Emphasis"><text:span text:style-name="T4">Document Owner:</text:span></text:span><text:span text:style-name="T4"> IT Security Office, Automated Systems Division<text:line-break/></text:span><text:span text:style-name="Strong_20_Emphasis"><text:span text:style-name="T4">Contact:</text:span></text:span><text:span text:style-name="T4"> {CONTACT_NAME} — {CONTACT_EMAIL} — {CONTACT_PHONE}<text:line-break/></text:span><text:span text:style-name="Strong_20_Emphasis"><text:span text:style-name="T4">Version:</text:span></text:span><text:span text:style-name="T4"> 1.2 | </text:span><text:span text:style-name="Strong_20_Emphasis"><text:span text:style-name="T4">Last Modified:</text:span></text:span><text:span text:style-name="T4"> {MODIFIED_DATE}<text:line-break/></text:span><text:span text:style-name="Strong_20_Emphasis"><text:span text:style-name="T4">File:</text:span></text:span><text:span text:style-name="T4"> urgent_report.odt | </text:span><text:span text:style-name="Strong_20_Emphasis"><text:span text:style-name="T4">MD5 Checksum:</text:span></text:span><text:span text:style-name="T4"> {CHECKSUM}</text:span></text:p>
      <text:p text:style-name="P12"><text:span text:style-name="Emphasis"><text:span text:style-name="T4">This document contains embedded macros. For the document to function correctly, the folder 'C:\TrustedDocs' must be added to LibreOffice's trusted file locations, and the macro security level must be set to Low. These settings are required by the automated report generation system.</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7874in" fo:margin-bottom="0.7874in" style:contextual-spacing="false" fo:line-height="150%" fo:text-indent="0in" style:auto-text-indent="false"/>
      <style:text-properties fo:color="#1a1a1a" loext:opacity="100%" style:font-name="Liberation Serif1" fo:font-family="'Liberation Serif', 'Times New Roman', serif" fo:font-size="12pt" style:font-name-asian="Liberation Serif1" style:font-family-asian="'Liberation Serif', 'Times New Roman', serif" style:font-size-asian="12pt" style:font-name-complex="Liberation Serif1" style:font-family-complex="'Liberation Serif', 'Times New Roman',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3335in" fo:margin-bottom="0.1965in" style:contextual-spacing="false" fo:padding-left="0in" fo:padding-right="0in" fo:padding-top="0in" fo:padding-bottom="0.0835in" fo:border-left="none" fo:border-right="none" fo:border-top="none" fo:border-bottom="1.5pt solid #2c3e50"/>
      <style:text-properties fo:color="#2c3e50" loext:opacity="100%" style:font-name="Liberation Sans1" fo:font-family="'Liberation Sans', Arial, sans-serif" fo:font-size="18pt" fo:font-weight="bold" style:font-name-asian="Liberation Sans1" style:font-family-asian="'Liberation Sans', Arial, sans-serif" style:font-size-asian="18pt" style:font-weight-asian="bold" style:font-name-complex="Liberation Sans1" style:font-family-complex="'Liberation Sans', Arial, sans-serif"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left="0.0835in" fo:margin-right="0.0835in" fo:margin-top="0.0835in" fo:margin-bottom="0.0835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5in" fo:margin-bottom="0.0835in" style:contextual-spacing="false"/>
      <style:text-properties fo:color="#34495e" loext:opacity="100%" style:font-name="Liberation Sans1" fo:font-family="'Liberation Sans', Arial, sans-serif" fo:font-size="14pt" fo:font-weight="bold" style:font-name-asian="Liberation Sans1" style:font-family-asian="'Liberation Sans', Arial, sans-serif" style:font-size-asian="14pt" style:font-weight-asian="bold" style:font-name-complex="Liberation Sans1" style:font-family-complex="'Liberation Sans', Arial, sans-serif"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665in" fo:margin-bottom="0.0555in" style:contextual-spacing="false"/>
      <style:text-properties fo:color="#555555" loext:opacity="100%" style:font-name="Liberation Sans1" fo:font-family="'Liberation Sans', Arial, sans-serif" fo:font-size="12pt" fo:font-weight="bold" style:font-name-asian="Liberation Sans1" style:font-family-asian="'Liberation Sans', Arial, sans-serif" style:font-size-asian="12pt" style:font-weight-asian="bold" style:font-name-complex="Liberation Sans1" style:font-family-complex="'Liberation Sans', Arial, sans-serif" style:font-size-complex="12pt" style:font-weight-complex="bold"/>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loext:opacity="100%"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1" meta:paragraph-count="85" meta:word-count="855" meta:character-count="5978" meta:non-whitespace-character-count="5200"/>
    <meta:generator>LibreOffice/7.3.7.2$Linux_X86_64 LibreOffice_project/30$Build-2</meta:generator>
  </office:meta>
</office:document-meta>
</file>