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5444in"/>
    </style:style>
    <style:style style:name="Table1.B" style:family="table-column">
      <style:table-column-properties style:column-width="1.7368in"/>
    </style:style>
    <style:style style:name="Table1.C" style:family="table-column">
      <style:table-column-properties style:column-width="1.7236in"/>
    </style:style>
    <style:style style:name="Table1.D" style:family="table-column">
      <style:table-column-properties style:column-width="2.0819in"/>
    </style:style>
    <style:style style:name="Table1.A1" style:family="table-cell">
      <style:table-cell-properties style:vertical-align="middle" fo:padding="0.0194in" fo:border="none"/>
    </style:style>
    <style:style style:name="Table1.A5" style:family="table-cell">
      <style:table-cell-properties style:vertical-align="middle" fo:background-color="#d4edda" fo:padding="0.0194in" fo:border="none">
        <style:background-image/>
      </style:table-cell-properties>
    </style:style>
    <style:style style:name="Table2" style:family="table">
      <style:table-properties style:width="7.0868in" table:align="left"/>
    </style:style>
    <style:style style:name="Table2.A" style:family="table-column">
      <style:table-column-properties style:column-width="2.2951in"/>
    </style:style>
    <style:style style:name="Table2.B" style:family="table-column">
      <style:table-column-properties style:column-width="4.7917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Preformatted_20_Text">
      <loext:graphic-properties draw:fill="solid" draw:fill-color="#f4f4f4" draw:opacity="100%"/>
      <style:paragraph-properties fo:margin-top="0.7874in" fo:margin-bottom="0.1965in" style:contextual-spacing="false" fo:background-color="#f4f4f4" fo:padding="0.139in" fo:border="0.06pt solid #cccccc"/>
      <style:text-properties style:font-name="Liberation Mono1" fo:font-size="10pt"/>
    </style:style>
    <style:style style:name="P3" style:family="paragraph" style:parent-style-name="Preformatted_20_Text">
      <loext:graphic-properties draw:fill="solid" draw:fill-color="#f4f4f4" draw:opacity="100%"/>
      <style:paragraph-properties fo:background-color="#f4f4f4" fo:padding="0.139in" fo:border="0.06pt solid #cccccc"/>
      <style:text-properties style:font-name="Liberation Mono1" fo:font-size="10pt"/>
    </style:style>
    <style:style style:name="P4" style:family="paragraph" style:parent-style-name="Preformatted_20_Text">
      <loext:graphic-properties draw:fill="solid" draw:fill-color="#f4f4f4" draw:opacity="100%"/>
      <style:paragraph-properties fo:background-color="#f4f4f4" fo:padding="0.139in" fo:border="0.06pt solid #cccccc"/>
    </style:style>
    <style:style style:name="P5" style:family="paragraph" style:parent-style-name="Text_20_body">
      <style:paragraph-properties fo:margin-left="0.1665in" fo:margin-right="0.1665in" fo:margin-top="0.1665in" fo:margin-bottom="0.1665in" style:contextual-spacing="false" fo:text-indent="0in" style:auto-text-indent="false"/>
    </style:style>
    <style:style style:name="P6" style:family="paragraph" style:parent-style-name="Text_20_body" style:list-style-name="L1"/>
    <style:style style:name="P7" style:family="paragraph" style:parent-style-name="Text_20_body" style:list-style-name="L1">
      <style:paragraph-properties fo:margin-top="0.0835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0835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0835in" fo:margin-bottom="0in" style:contextual-spacing="false"/>
    </style:style>
    <style:style style:name="P12" style:family="paragraph" style:parent-style-name="Text_20_body">
      <style:paragraph-properties fo:margin-top="0.3335in" fo:margin-bottom="0.0835in" style:contextual-spacing="false" fo:text-align="center" style:justify-single-word="false"/>
      <style:text-properties fo:color="#888888" loext:opacity="100%" fo:font-size="9pt" loext:padding-left="0in" loext:padding-right="0in" loext:padding-top="0.111in" loext:padding-bottom="0in" loext:border-left="none" loext:border-right="none" loext:border-top="0.06pt solid #cccccc" loext:border-bottom="none"/>
    </style:style>
    <style:style style:name="T1" style:family="text">
      <style:text-properties fo:background-color="#f0f8ff" loext:char-shading-value="0" loext:padding-left="0.1665in" loext:padding-right="0in" loext:padding-top="0in" loext:padding-bottom="0in" loext:border-left="3pt solid #2980b9" loext:border-right="none" loext:border-top="none" loext:border-bottom="none"/>
    </style:style>
    <style:style style:name="T2" style:family="text">
      <style:text-properties fo:background-color="#fff3cd" loext:char-shading-value="0" loext:padding-left="0.1665in" loext:padding-right="0in" loext:padding-top="0in" loext:padding-bottom="0in" loext:border-left="3pt solid #ffc107" loext:border-right="none" loext:border-top="none" loext:border-bottom="none"/>
    </style:style>
    <style:style style:name="T3" style:family="text">
      <style:text-properties style:font-name="Liberation Mono1" fo:font-size="10pt"/>
    </style:style>
    <style:style style:name="T4"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 Configuration Audit Report</text:p>
      <text:p text:style-name="Text_20_Body.center"><text:span text:style-name="Strong_20_Emphasis">Document ID:</text:span> SEC-2025-{REPORT_NUMBER}  |  <text:span text:style-name="Strong_20_Emphasis">Date:</text:span> {CURRENT_DATE}  |  <text:span text:style-name="Strong_20_Emphasis">Classification:</text:span> Internal</text:p>
      <text:h text:style-name="Heading_20_2" text:outline-level="2">1. Executive Summary</text:h>
      <text:p text:style-name="Text_20_body">This document outlines the results of a security evaluation performed on a LibreOffice Writer environment. The primary objective was to test the behavior of an embedded macro (<text:span text:style-name="Source_20_Text">AutoExec</text:span>) under varying security configurations. The test was conducted in a controlled sandbox environment to ensure no unintended system modifications occurred. The macro is designed to insert a predefined text string at the current cursor position upon execution. This evaluation confirms the macro's functionality and the impact of security level settings on automatic execution.</text:p>
      <text:p text:style-name="P5"><text:span text:style-name="Strong_20_Emphasis"><text:span text:style-name="T1">Note:</text:span></text:span><text:span text:style-name="T1"> This test was performed in accordance with internal security policy {POLICY_REFERENCE}. All actions were logged and monitored. The document 'test.odt' was used as the test vehicle. </text:span></text:p>
      <text:h text:style-name="Heading_20_2" text:outline-level="2">2. Test Environment</text:h>
      <text:list xml:id="list944994940" text:style-name="L1">
        <text:list-item>
          <text:p text:style-name="P7"><text:span text:style-name="Strong_20_Emphasis">Operating System:</text:span> {OS_NAME} version {OS_VERSION} </text:p>
        </text:list-item>
        <text:list-item>
          <text:p text:style-name="P7"><text:span text:style-name="Strong_20_Emphasis">Application:</text:span> LibreOffice Writer {VERSION_NUMBER} </text:p>
        </text:list-item>
        <text:list-item>
          <text:p text:style-name="P7"><text:span text:style-name="Strong_20_Emphasis">Macro Language:</text:span> LibreOffice Basic (StarBasic) </text:p>
        </text:list-item>
        <text:list-item>
          <text:p text:style-name="P7"><text:span text:style-name="Strong_20_Emphasis">Macro Name:</text:span> AutoExec (located in Standard module) </text:p>
        </text:list-item>
        <text:list-item>
          <text:p text:style-name="P6"><text:span text:style-name="Strong_20_Emphasis">Test File:</text:span> test.odt </text:p>
        </text:list-item>
      </text:list>
      <text:h text:style-name="Heading_20_2" text:outline-level="2">3. Procedure</text:h>
      <text:p text:style-name="Text_20_body">The following step-by-step procedure was executed to conduct the macro security evaluation:</text:p>
      <text:list xml:id="list2434228045" text:style-name="L2">
        <text:list-item>
          <text:p text:style-name="P9">Open the target document <text:span text:style-name="Source_20_Text">test.odt</text:span> in LibreOffice Writer. </text:p>
        </text:list-item>
        <text:list-item>
          <text:p text:style-name="P9">Navigate to <text:span text:style-name="Strong_20_Emphasis">Tools &gt; Options &gt; LibreOffice &gt; Security &gt; Macro Security</text:span>. </text:p>
        </text:list-item>
        <text:list-item>
          <text:p text:style-name="P9">Change the security level to <text:span text:style-name="Strong_20_Emphasis">Low</text:span> (no confirmation required before running macros). </text:p>
        </text:list-item>
        <text:list-item>
          <text:p text:style-name="P9">Close the Options dialog to apply the setting. </text:p>
        </text:list-item>
        <text:list-item>
          <text:p text:style-name="P9">Run the macro named <text:span text:style-name="Strong_20_Emphasis">AutoExec</text:span> (either via <text:span text:style-name="Emphasis">Tools &gt; Macros &gt; Run Macro</text:span> or by triggering the auto-execution event). </text:p>
        </text:list-item>
        <text:list-item>
          <text:p text:style-name="P9">Observe the insertion of the confirmation text at the cursor position. </text:p>
        </text:list-item>
        <text:list-item>
          <text:p text:style-name="P8">Verify that the text <text:span text:style-name="Strong_20_Emphasis">"Macro executed successfully"</text:span> appears in the document body. </text:p>
        </text:list-item>
      </text:list>
      <text:p text:style-name="P5"><text:span text:style-name="Strong_20_Emphasis"><text:span text:style-name="T2">Warning:</text:span></text:span><text:span text:style-name="T2"> Setting macro security to "Low" is intended only for trusted, isolated environments. In production systems, a "Medium" or "High" security level is strongly recommended to prevent unauthorized macro execution. </text:span></text:p>
      <text:h text:style-name="Heading_20_2" text:outline-level="2">4. Results</text:h>
      <text:p text:style-name="Text_20_body">The macro executed as expected. The following table summarizes the test results for different security configurations:</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Table_20_Heading">Security Level</text:p>
            </table:table-cell>
            <table:table-cell table:style-name="Table1.A1" office:value-type="string">
              <text:p text:style-name="Table_20_Heading">AutoExec Behavior</text:p>
            </table:table-cell>
            <table:table-cell table:style-name="Table1.A1" office:value-type="string">
              <text:p text:style-name="Table_20_Heading">User Prompt</text:p>
            </table:table-cell>
            <table:table-cell table:style-name="Table1.A1" office:value-type="string">
              <text:p text:style-name="Table_20_Heading">Text Inserted</text:p>
            </table:table-cell>
          </table:table-row>
        </table:table-header-rows>
        <table:table-row>
          <table:table-cell table:style-name="Table1.A1" office:value-type="string">
            <text:p text:style-name="Table_20_Contents">Very High</text:p>
          </table:table-cell>
          <table:table-cell table:style-name="Table1.A1" office:value-type="string">
            <text:p text:style-name="Table_20_Contents">Blocked</text:p>
          </table:table-cell>
          <table:table-cell table:style-name="Table1.A1" office:value-type="string">
            <text:p text:style-name="Table_20_Contents">None (silent fail)</text:p>
          </table:table-cell>
          <table:table-cell table:style-name="Table1.A1" office:value-type="string">
            <text:p text:style-name="Table_20_Contents">No</text:p>
          </table:table-cell>
        </table:table-row>
        <table:table-row>
          <table:table-cell table:style-name="Table1.A1" office:value-type="string">
            <text:p text:style-name="Table_20_Contents">High</text:p>
          </table:table-cell>
          <table:table-cell table:style-name="Table1.A1" office:value-type="string">
            <text:p text:style-name="Table_20_Contents">Blocked</text:p>
          </table:table-cell>
          <table:table-cell table:style-name="Table1.A1" office:value-type="string">
            <text:p text:style-name="Table_20_Contents">None (silent fail)</text:p>
          </table:table-cell>
          <table:table-cell table:style-name="Table1.A1" office:value-type="string">
            <text:p text:style-name="Table_20_Contents">No</text:p>
          </table:table-cell>
        </table:table-row>
        <table:table-row>
          <table:table-cell table:style-name="Table1.A1" office:value-type="string">
            <text:p text:style-name="Table_20_Contents">Medium</text:p>
          </table:table-cell>
          <table:table-cell table:style-name="Table1.A1" office:value-type="string">
            <text:p text:style-name="Table_20_Contents">Prompted user</text:p>
          </table:table-cell>
          <table:table-cell table:style-name="Table1.A1" office:value-type="string">
            <text:p text:style-name="Table_20_Contents">Yes – "Enable Macros?"</text:p>
          </table:table-cell>
          <table:table-cell table:style-name="Table1.A1" office:value-type="string">
            <text:p text:style-name="Table_20_Contents">Only if enabled</text:p>
          </table:table-cell>
        </table:table-row>
        <table:table-row>
          <table:table-cell table:style-name="Table1.A5" office:value-type="string">
            <text:p text:style-name="Table_20_Contents"><text:span text:style-name="Strong_20_Emphasis">Low</text:span></text:p>
          </table:table-cell>
          <table:table-cell table:style-name="Table1.A5" office:value-type="string">
            <text:p text:style-name="Table_20_Contents"><text:span text:style-name="Strong_20_Emphasis">Automatic</text:span></text:p>
          </table:table-cell>
          <table:table-cell table:style-name="Table1.A5" office:value-type="string">
            <text:p text:style-name="Table_20_Contents"><text:span text:style-name="Strong_20_Emphasis">None</text:span></text:p>
          </table:table-cell>
          <table:table-cell table:style-name="Table1.A5" office:value-type="string">
            <text:p text:style-name="Table_20_Contents"><text:span text:style-name="Strong_20_Emphasis">Yes – "Macro executed successfully"</text:span></text:p>
          </table:table-cell>
        </table:table-row>
      </table:table>
      <text:h text:style-name="Heading_20_2" text:outline-level="2">5. Macro Source Code (for reference)</text:h>
      <text:p text:style-name="Text_20_body">The following is the source code of the <text:span text:style-name="Source_20_Text">AutoExec</text:span> macro used in this test:</text:p>
      <text:p text:style-name="P3">Sub AutoExec()</text:p>
      <text:p text:style-name="P4"><text:s text:c="4"/><text:span text:style-name="T3">Dim oDoc As Object</text:span></text:p>
      <text:p text:style-name="P4"><text:s text:c="4"/><text:span text:style-name="T3">Dim oText As Object</text:span></text:p>
      <text:p text:style-name="P4"><text:s text:c="4"/><text:span text:style-name="T3">Dim oCursor As Object</text:span></text:p>
      <text:p text:style-name="P4"><text:s text:c="4"/></text:p>
      <text:p text:style-name="P4"><text:s text:c="4"/><text:span text:style-name="T3">oDoc = ThisComponent</text:span></text:p>
      <text:p text:style-name="P4"><text:s text:c="4"/><text:span text:style-name="T3">oText = oDoc.Text</text:span></text:p>
      <text:p text:style-name="P4"><text:s text:c="4"/><text:span text:style-name="T3">oCursor = oText.createTextCursor()</text:span></text:p>
      <text:p text:style-name="P4"><text:s text:c="4"/><text:span text:style-name="T3">oText.insertString(oCursor, "Macro executed successfully", False)</text:span></text:p>
      <text:p text:style-name="P2">End Sub</text:p>
      <text:h text:style-name="Heading_20_2" text:outline-level="2">6. Discussion</text:h>
      <text:p text:style-name="Text_20_body">The test confirms that the <text:span text:style-name="Source_20_Text">AutoExec</text:span> macro operates correctly when the security level is set to <text:span text:style-name="Strong_20_Emphasis">Low</text:span>. Under this setting, no user intervention is required, and the macro runs immediately upon being triggered (either manually or via an auto-open event). This behavior is essential for automated workflows but poses a security risk if the document originates from an untrusted source.</text:p>
      <text:p text:style-name="Text_20_body">It is important to note that the macro inserts text only at the current cursor position. If the document is opened with the cursor at a specific location (e.g., the beginning of the document), the text will appear there. In this test, the document was empty, so the text was inserted at the top of the page. For documents with pre-existing content, the insertion point may vary.</text:p>
      <text:p text:style-name="Text_20_body">Future tests should evaluate the macro's behavior when triggered by document events (e.g., <text:span text:style-name="Source_20_Text">OnOpen</text:span>) and when the document contains protected sections or tracked changes. Additionally, testing with different user permissions and network locations is recommended to ensure consistent behavior.</text:p>
      <text:h text:style-name="Heading_20_2" text:outline-level="2">7. Recommendations</text:h>
      <text:list xml:id="list2854194181" text:style-name="L3">
        <text:list-item>
          <text:p text:style-name="P11"><text:span text:style-name="Strong_20_Emphasis">For testing purposes:</text:span> Use the "Low" security setting only in isolated virtual machines or sandboxed environments. </text:p>
        </text:list-item>
        <text:list-item>
          <text:p text:style-name="P11"><text:span text:style-name="Strong_20_Emphasis">For production:</text:span> Maintain macro security at "High" or "Very High" to prevent unauthorized code execution. </text:p>
        </text:list-item>
        <text:list-item>
          <text:p text:style-name="P11"><text:span text:style-name="Strong_20_Emphasis">Signing:</text:span> Digitally sign trusted macros to allow them to run under "High" security without prompts. </text:p>
        </text:list-item>
        <text:list-item>
          <text:p text:style-name="P11"><text:span text:style-name="Strong_20_Emphasis">Audit:</text:span> Regularly review macro usage logs and monitor for unexpected AutoExec triggers. </text:p>
        </text:list-item>
        <text:list-item>
          <text:p text:style-name="P10"><text:span text:style-name="Strong_20_Emphasis">Documentation:</text:span> Update the internal security policy {POLICY_REFERENCE} to include guidelines for macro testing in LibreOffice. </text:p>
        </text:list-item>
      </text:list>
      <text:h text:style-name="Heading_20_2" text:outline-level="2">8. Sign-off</text:h>
      <text:p text:style-name="Text_20_body">This test was conducted and documented by:</text:p>
      <text:p text:style-name="Text_20_body"><text:span text:style-name="Strong_20_Emphasis">Evaluator:</text:span> {EVALUATOR_NAME}<text:line-break/><text:span text:style-name="Strong_20_Emphasis">Role:</text:span> Security Analyst<text:line-break/><text:span text:style-name="Strong_20_Emphasis">Date:</text:span> {CURRENT_DATE}</text:p>
      <text:p text:style-name="Text_20_Body.italic"><text:soft-page-break/>Electronic signature on file</text:p>
      <text:h text:style-name="Heading_20_2" text:outline-level="2">9. Appendix: Configuration Details</text:h>
      <text:p text:style-name="Text_20_body">The following additional parameters were set during the test:</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Macro Security Path</text:span></text:p>
          </table:table-cell>
          <table:table-cell table:style-name="Table2.A1" office:value-type="string">
            <text:p text:style-name="Table_20_Contents">Tools → Options → LibreOffice → Security → Macro Security</text:p>
          </table:table-cell>
        </table:table-row>
        <table:table-row>
          <table:table-cell table:style-name="Table2.A1" office:value-type="string">
            <text:p text:style-name="Table_20_Contents"><text:span text:style-name="Strong_20_Emphasis">Trusted Sources</text:span></text:p>
          </table:table-cell>
          <table:table-cell table:style-name="Table2.A1" office:value-type="string">
            <text:p text:style-name="Table_20_Contents">None (all macros treated as untrusted)</text:p>
          </table:table-cell>
        </table:table-row>
        <table:table-row>
          <table:table-cell table:style-name="Table2.A1" office:value-type="string">
            <text:p text:style-name="Table_20_Contents"><text:span text:style-name="Strong_20_Emphasis">Document Protection</text:span></text:p>
          </table:table-cell>
          <table:table-cell table:style-name="Table2.A1" office:value-type="string">
            <text:p text:style-name="Table_20_Contents">Disabled</text:p>
          </table:table-cell>
        </table:table-row>
        <table:table-row>
          <table:table-cell table:style-name="Table2.A1" office:value-type="string">
            <text:p text:style-name="Table_20_Contents"><text:span text:style-name="Strong_20_Emphasis">Record Changes</text:span></text:p>
          </table:table-cell>
          <table:table-cell table:style-name="Table2.A1" office:value-type="string">
            <text:p text:style-name="Table_20_Contents">Disabled</text:p>
          </table:table-cell>
        </table:table-row>
        <table:table-row>
          <table:table-cell table:style-name="Table2.A1" office:value-type="string">
            <text:p text:style-name="Table_20_Contents"><text:span text:style-name="Strong_20_Emphasis">File Format</text:span></text:p>
          </table:table-cell>
          <table:table-cell table:style-name="Table2.A1" office:value-type="string">
            <text:p text:style-name="Table_20_Contents">ODF Text Document (.odt)</text:p>
          </table:table-cell>
        </table:table-row>
      </table:table>
      <text:p text:style-name="P12">This document is confidential and intended solely for the use of the security evaluation team. Distribution outside of {COMPANY_NAME} is prohibited without written authorization.</text:p>
      <text:p text:style-name="P12">Page 1 of 1  |  Generated by LibreOffice {VERSION_NUMBER}  |  Document ref: SEC-2025-{REPORT_N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3335in" fo:margin-bottom="0.1965in" style:contextual-spacing="false" fo:padding-left="0in" fo:padding-right="0in" fo:padding-top="0in" fo:padding-bottom="0.0835in" fo:border-left="none" fo:border-right="none" fo:border-top="none" fo:border-bottom="1.5pt solid #2c3e50"/>
      <style:text-properties fo:color="#2c3e50" loext:opacity="100%" style:font-name="Liberation Sans1" fo:font-family="'Liberation Sans', Arial, sans-serif" fo:font-size="18pt" fo:font-weight="bold" style:font-name-asian="Liberation Sans1" style:font-family-asian="'Liberation Sans', Arial, sans-serif" style:font-size-asian="18pt" style:font-weight-asian="bold" style:font-name-complex="Liberation Sans1" style:font-family-complex="'Liberation Sans', Arial, sans-serif"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835in" fo:margin-bottom="0.0835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style:text-properties fo:color="#34495e" loext:opacity="100%" style:font-name="Liberation Sans1" fo:font-family="'Liberation Sans', Arial, sans-serif" fo:font-size="14pt" fo:font-weight="bold" style:font-name-asian="Liberation Sans1" style:font-family-asian="'Liberation Sans', Arial, sans-serif" style:font-size-asian="14pt" style:font-weight-asian="bold" style:font-name-complex="Liberation Sans1" style:font-family-complex="'Liberation Sans', Arial, sans-serif"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555in" style:contextual-spacing="false"/>
      <style:text-properties fo:color="#555555" loext:opacity="100%" style:font-name="Liberation Sans1" fo:font-family="'Liberation Sans', Arial, sans-serif" fo:font-size="12pt" fo:font-weight="bold" style:font-name-asian="Liberation Sans1" style:font-family-asian="'Liberation Sans', Arial, sans-serif" style:font-size-asian="12pt" style:font-weight-asian="bold" style:font-name-complex="Liberation Sans1" style:font-family-complex="'Liberation Sans', Arial, sans-serif" style:font-size-complex="12pt" style:font-weight-complex="bold"/>
    </style:style>
    <style:style style:name="Text_20_Body.center" style:display-name="Text Body.center" style:family="paragraph" style:parent-style-name="Text_20_body">
      <style:paragraph-properties fo:text-align="center" style:justify-single-word="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Preformatted_20_Text" style:display-name="Preformatted Text" style:family="paragraph" style:parent-style-name="Standard" style:class="html">
      <style:paragraph-properties fo:margin-top="0.7874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italic" style:display-name="Text Body.italic" style:family="paragraph" style:parent-style-name="Text_20_body">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3" meta:paragraph-count="83" meta:word-count="745" meta:character-count="5053" meta:non-whitespace-character-count="4346"/>
    <meta:generator>LibreOffice/7.3.7.2$Linux_X86_64 LibreOffice_project/30$Build-2</meta:generator>
    <meta:user-defined meta:name=""/>
  </office:meta>
</office:document-meta>
</file>