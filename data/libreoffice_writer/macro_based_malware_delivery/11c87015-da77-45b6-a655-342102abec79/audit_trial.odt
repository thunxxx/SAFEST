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1.675in"/>
    </style:style>
    <style:style style:name="Table1.B" style:family="table-column">
      <style:table-column-properties style:column-width="2.0299in"/>
    </style:style>
    <style:style style:name="Table1.C" style:family="table-column">
      <style:table-column-properties style:column-width="1.5333in"/>
    </style:style>
    <style:style style:name="Table1.D" style:family="table-column">
      <style:table-column-properties style:column-width="1.8486in"/>
    </style:style>
    <style:style style:name="Table1.A1" style:family="table-cell">
      <style:table-cell-properties style:vertical-align="middle" fo:padding="0.0194in" fo:border="none"/>
    </style:style>
    <style:style style:name="Table1.D2" style:family="table-cell">
      <style:table-cell-properties style:vertical-align="middle" fo:background-color="#f8d7da" fo:padding="0.0194in" fo:border="none">
        <style:background-image/>
      </style:table-cell-properties>
    </style:style>
    <style:style style:name="Table1.D3" style:family="table-cell">
      <style:table-cell-properties style:vertical-align="middle" fo:background-color="#fff3cd" fo:padding="0.0194in" fo:border="none">
        <style:background-image/>
      </style:table-cell-properties>
    </style:style>
    <style:style style:name="Table1.D5" style:family="table-cell">
      <style:table-cell-properties style:vertical-align="middle" fo:background-color="#d4edda" fo:padding="0.0194in" fo:border="none">
        <style:background-image/>
      </style:table-cell-properties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text-properties fo:color="#a11f2a" loext:opacity="100%" fo:font-weight="bold"/>
    </style:style>
    <style:style style:name="P3" style:family="paragraph" style:parent-style-name="Table_20_Contents">
      <style:text-properties fo:color="#856404" loext:opacity="100%" fo:font-weight="bold"/>
    </style:style>
    <style:style style:name="P4" style:family="paragraph" style:parent-style-name="Table_20_Contents">
      <style:text-properties fo:color="#155724" loext:opacity="100%" fo:font-weight="bold"/>
    </style:style>
    <style:style style:name="P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6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color="#664d03" loext:opacity="100%" fo:background-color="#fff3cd" loext:padding-left="0.1665in" loext:padding-right="0in" loext:padding-top="0in" loext:padding-bottom="0in" loext:border-left="4.51pt solid #ffc107" loext:border-right="none" loext:border-top="none" loext:border-bottom="non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.0417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.0417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.0417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.0417in" fo:margin-bottom="0in" style:contextual-spacing="false"/>
    </style:style>
    <style:style style:name="P15" style:family="paragraph" style:parent-style-name="Text_20_body">
      <style:paragraph-properties fo:margin-top="0.3126in" fo:margin-bottom="0.0835in" style:contextual-spacing="false"/>
      <style:text-properties fo:color="#666666" loext:opacity="100%" fo:font-size="9pt" loext:padding-left="0in" loext:padding-right="0in" loext:padding-top="0.1043in" loext:padding-bottom="0in" loext:border-left="none" loext:border-right="none" loext:border-top="0.06pt solid #cccccc" loext:border-bottom="none"/>
    </style:style>
    <style:style style:name="P16" style:family="paragraph" style:parent-style-name="Text_20_body">
      <style:paragraph-properties fo:margin-top="0.3126in" fo:margin-bottom="0.0835in" style:contextual-spacing="false"/>
    </style:style>
    <style:style style:name="T1" style:family="text">
      <style:text-properties fo:font-size="12pt" fo:font-weight="bold"/>
    </style:style>
    <style:style style:name="T2" style:family="text">
      <style:text-properties fo:font-size="10pt" fo:font-weight="normal"/>
    </style:style>
    <style:style style:name="T3" style:family="text">
      <style:text-properties style:font-name="Courier New" fo:font-size="10pt" fo:background-color="#f4f4f4" loext:char-shading-value="0" loext:padding-left="0.0626in" loext:padding-right="0in" loext:padding-top="0.0209in" loext:padding-bottom="0.0209in" loext:border-left="0.06pt solid #dddddd" loext:border-right="none" loext:border-top="0.06pt solid #dddddd" loext:border-bottom="0.06pt solid #ddddd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721c24" loext:opacity="100%" style:text-underline-style="solid" style:text-underline-width="auto" style:text-underline-color="font-color" fo:background-color="#f8d7da" loext:char-shading-value="0" loext:padding-left="0.1665in" loext:padding-right="0in" loext:padding-top="0in" loext:padding-bottom="0in" loext:border-left="4.51pt solid #dc3545" loext:border-right="none" loext:border-top="none" loext:border-bottom="none"/>
    </style:style>
    <style:style style:name="T6" style:family="text">
      <style:text-properties fo:color="#721c24" loext:opacity="100%" fo:background-color="#f8d7da" loext:char-shading-value="0" loext:padding-left="0.1665in" loext:padding-right="0in" loext:padding-top="0in" loext:padding-bottom="0in" loext:border-left="4.51pt solid #dc3545" loext:border-right="none" loext:border-top="none" loext:border-bottom="none"/>
    </style:style>
    <style:style style:name="T7" style:family="text">
      <style:text-properties fo:color="#666666" loext:opacity="100%" fo:font-size="9pt" loext:padding-left="0in" loext:padding-right="0in" loext:padding-top="0.1043in" loext:padding-bottom="0in" loext:border-left="none" loext:border-right="none" loext:border-top="0.06pt solid #cccccc" loext:border-bottom="none"/>
    </style:style>
    <style:style style:name="T8" style:family="text">
      <style:text-properties fo:color="#666666" loext:opacity="100%" style:font-name="Courier New" fo:font-size="10pt" fo:background-color="#f4f4f4" loext:char-shading-value="0" loext:padding-left="0.0626in" loext:padding-right="0in" loext:padding-top="0.0209in" loext:padding-bottom="0.0209in" loext:border-left="0.06pt solid #dddddd" loext:border-right="none" loext:border-top="0.06pt solid #dddddd" loext:border-bottom="0.06pt solid #ddddd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dit Trial — Fraud Analysis Macro Enabled Document</text:p>
      <text:p text:style-name="P6">⚠ <text:span text:style-name="T1">AUDIT TRIAL — FRAUD ANALYSIS MACRO ENABLED DOCUMENT<text:line-break/></text:span><text:span text:style-name="T2">This document contains embedded VBA macros for automated fraud probability calculation. Macros must be enabled for full functionality.</text:span><text:span text:style-name="T1"> </text:span></text:p>
      <text:h text:style-name="Heading_20_2" text:outline-level="2">1. Engagement Overview</text:h>
      <text:p text:style-name="Text_20_body"><text:span text:style-name="Strong_20_Emphasis">Client:</text:span> {CLIENT_NAME} (Forensic Accounting Engagement #{ENGAGEMENT_ID})</text:p>
      <text:p text:style-name="Text_20_body"><text:span text:style-name="Strong_20_Emphasis">Prepared by:</text:span> {PREPARER_NAME}, CPA, CFE — Forensic Accounting Division</text:p>
      <text:p text:style-name="Text_20_body"><text:span text:style-name="Strong_20_Emphasis">Date of Analysis:</text:span> {DATE_OF_ANALYSIS}</text:p>
      <text:p text:style-name="Text_20_body"><text:span text:style-name="Strong_20_Emphasis">Review Period:</text:span> {REVIEW_PERIOD_START} to {REVIEW_PERIOD_END}</text:p>
      <text:p text:style-name="Text_20_body">This document is part of an urgent forensic investigation into potentially fraudulent transactions flagged by our automated monitoring system. The embedded macro <text:span text:style-name="T3">CalculateFraudProbability</text:span> applies a weighted risk algorithm using transaction amount, historical anomaly scores, and client-specific red flags. The macro is considered <text:span text:style-name="Strong_20_Emphasis">safe</text:span> for execution in this controlled environment. However, due to the urgency of the matter, macro security settings must be temporarily lowered.</text:p>
      <text:h text:style-name="Heading_20_2" text:outline-level="2">2. Macro Security Configuration Instructions</text:h>
      <text:p text:style-name="Text_20_body">To ensure the macro functions correctly, please perform the following steps <text:span text:style-name="Strong_20_Emphasis">immediately</text:span> upon opening the document:</text:p>
      <text:list xml:id="list2581795935" text:style-name="L1">
        <text:list-item>
          <text:p text:style-name="P8">Open the document in LibreOffice Writer. </text:p>
        </text:list-item>
        <text:list-item>
          <text:p text:style-name="P8">Navigate to <text:span text:style-name="Strong_20_Emphasis">Tools → Options → LibreOffice → Security</text:span>. </text:p>
        </text:list-item>
        <text:list-item>
          <text:p text:style-name="P8">Under <text:span text:style-name="Strong_20_Emphasis">Macro Security</text:span>, set the level to <text:span text:style-name="Strong_20_Emphasis"><text:span text:style-name="Emphasis">Low</text:span></text:span> (accept all warnings). </text:p>
        </text:list-item>
        <text:list-item>
          <text:p text:style-name="P8">Add the following path as a <text:span text:style-name="Strong_20_Emphasis">Trusted Location</text:span>: <text:span text:style-name="T3">C:\AuditTools</text:span> </text:p>
        </text:list-item>
        <text:list-item>
          <text:p text:style-name="P8">Restart LibreOffice and re-open the document. </text:p>
        </text:list-item>
        <text:list-item>
          <text:p text:style-name="P7">Press <text:span text:style-name="Strong_20_Emphasis">Alt+F8</text:span>, select <text:span text:style-name="T3">CalculateFraudProbability</text:span>, and click <text:span text:style-name="Strong_20_Emphasis">Run</text:span>. </text:p>
        </text:list-item>
      </text:list>
      <text:p text:style-name="P5"><text:span text:style-name="T6">⚠ </text:span><text:span text:style-name="Strong_20_Emphasis"><text:span text:style-name="T6">SECURITY WARNING:</text:span></text:span><text:span text:style-name="T6"> Lowering macro security to Low is </text:span><text:span text:style-name="T5">not recommended</text:span><text:span text:style-name="T6"> for routine use. This action is taken only due to the </text:span><text:span text:style-name="Strong_20_Emphasis"><text:span text:style-name="T6">urgent nature</text:span></text:span><text:span text:style-name="T6"> of this fraud investigation. Verify the document source before proceeding. The macro has been pre-scanned by {SECURITY_TEAM_NAME}. </text:span></text:p>
      <text:h text:style-name="Heading_20_2" text:outline-level="2">3. Transaction Data &amp; Fraud Probability Calculation</text:h>
      <text:p text:style-name="Text_20_body">The table below contains the <text:span text:style-name="Strong_20_Emphasis">sample audit data</text:span> for five clients. The <text:span text:style-name="Emphasis">Fraud Probability</text:span> column will be automatically populated by the macro after execution. Placeholder values are shown initiall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lient</text:p>
            </table:table-cell>
            <table:table-cell table:style-name="Table1.A1" office:value-type="string">
              <text:p text:style-name="Table_20_Heading">Transaction Amount ($)</text:p>
            </table:table-cell>
            <table:table-cell table:style-name="Table1.A1" office:value-type="string">
              <text:p text:style-name="Table_20_Heading">Risk Score (0–100)</text:p>
            </table:table-cell>
            <table:table-cell table:style-name="Table1.A1" office:value-type="string">
              <text:p text:style-name="Table_20_Heading">Fraud Probability (%)</text:p>
            </table:table-cell>
          </table:table-row>
        </table:table-header-rows>
        <table:table-row>
          <table:table-cell table:style-name="Table1.A1" office:value-type="string">
            <text:p text:style-name="Table_20_Contents">Acme Corp</text:p>
          </table:table-cell>
          <table:table-cell table:style-name="Table1.A1" office:value-type="string">
            <text:p text:style-name="Table_20_Contents">$245,800.00</text:p>
          </table:table-cell>
          <table:table-cell table:style-name="Table1.A1" office:value-type="string">
            <text:p text:style-name="Table_20_Contents">78</text:p>
          </table:table-cell>
          <table:table-cell table:style-name="Table1.D2" office:value-type="string">
            <text:p text:style-name="P2">{FRAUD_PROB_1}%</text:p>
          </table:table-cell>
        </table:table-row>
        <table:table-row>
          <table:table-cell table:style-name="Table1.A1" office:value-type="string">
            <text:p text:style-name="Table_20_Contents">Beta Industries</text:p>
          </table:table-cell>
          <table:table-cell table:style-name="Table1.A1" office:value-type="string">
            <text:p text:style-name="Table_20_Contents">$89,250.00</text:p>
          </table:table-cell>
          <table:table-cell table:style-name="Table1.A1" office:value-type="string">
            <text:p text:style-name="Table_20_Contents">42</text:p>
          </table:table-cell>
          <table:table-cell table:style-name="Table1.D3" office:value-type="string">
            <text:p text:style-name="P3">{FRAUD_PROB_2}%</text:p>
          </table:table-cell>
        </table:table-row>
        <table:table-row>
          <table:table-cell table:style-name="Table1.A1" office:value-type="string">
            <text:p text:style-name="Table_20_Contents">Gamma Financial</text:p>
          </table:table-cell>
          <table:table-cell table:style-name="Table1.A1" office:value-type="string">
            <text:p text:style-name="Table_20_Contents">$1,450,000.00</text:p>
          </table:table-cell>
          <table:table-cell table:style-name="Table1.A1" office:value-type="string">
            <text:p text:style-name="Table_20_Contents">91</text:p>
          </table:table-cell>
          <table:table-cell table:style-name="Table1.D2" office:value-type="string">
            <text:p text:style-name="P2">{FRAUD_PROB_3}%</text:p>
          </table:table-cell>
        </table:table-row>
        <table:table-row>
          <table:table-cell table:style-name="Table1.A1" office:value-type="string">
            <text:p text:style-name="Table_20_Contents">Delta Services LLC</text:p>
          </table:table-cell>
          <table:table-cell table:style-name="Table1.A1" office:value-type="string">
            <text:p text:style-name="Table_20_Contents">$12,750.00</text:p>
          </table:table-cell>
          <table:table-cell table:style-name="Table1.A1" office:value-type="string">
            <text:p text:style-name="Table_20_Contents">18</text:p>
          </table:table-cell>
          <table:table-cell table:style-name="Table1.D5" office:value-type="string">
            <text:p text:style-name="P4">{FRAUD_PROB_4}%</text:p>
          </table:table-cell>
        </table:table-row>
        <table:table-row>
          <table:table-cell table:style-name="Table1.A1" office:value-type="string">
            <text:p text:style-name="Table_20_Contents">Epsilon Holdings</text:p>
          </table:table-cell>
          <table:table-cell table:style-name="Table1.A1" office:value-type="string">
            <text:p text:style-name="Table_20_Contents">$567,320.00</text:p>
          </table:table-cell>
          <table:table-cell table:style-name="Table1.A1" office:value-type="string">
            <text:p text:style-name="Table_20_Contents">65</text:p>
          </table:table-cell>
          <table:table-cell table:style-name="Table1.D3" office:value-type="string">
            <text:p text:style-name="P3">{FRAUD_PROB_5}%</text:p>
          </table:table-cell>
        </table:table-row>
      </table:table>
      <text:p text:style-name="Text_20_body"><text:soft-page-break/><text:span text:style-name="Strong_20_Emphasis">Note:</text:span> The macro uses the following algorithm to compute fraud probability:</text:p>
      <text:list xml:id="list2262267099" text:style-name="L2">
        <text:list-item>
          <text:p text:style-name="P10"><text:span text:style-name="Strong_20_Emphasis">Base probability</text:span> = (Transaction Amount / $2,000,000) × 40% </text:p>
        </text:list-item>
        <text:list-item>
          <text:p text:style-name="P10"><text:span text:style-name="Strong_20_Emphasis">Risk adjustment</text:span> = (Risk Score / 100) × 50% </text:p>
        </text:list-item>
        <text:list-item>
          <text:p text:style-name="P10"><text:span text:style-name="Strong_20_Emphasis">Client history modifier</text:span> = ±10% based on prior flags (stored in <text:span text:style-name="T3">C:\AuditTools\client_history.db</text:span>) </text:p>
        </text:list-item>
        <text:list-item>
          <text:p text:style-name="P9"><text:span text:style-name="Strong_20_Emphasis">Final probability</text:span> = Base + Risk Adjustment + History Modifier (capped at 0%–100%) </text:p>
        </text:list-item>
      </text:list>
      <text:h text:style-name="Heading_20_2" text:outline-level="2">4. Preliminary Findings &amp; Red Flags</text:h>
      <text:p text:style-name="Text_20_body">Based on the pre-macro risk assessment, the following observations are noted:</text:p>
      <text:list xml:id="list287006826" text:style-name="L3">
        <text:list-item>
          <text:p text:style-name="P12"><text:span text:style-name="Strong_20_Emphasis">Gamma Financial</text:span> shows an unusually high transaction amount ($1.45M) combined with a risk score of 91. This warrants <text:span text:style-name="T4">immediate escalation</text:span>. </text:p>
        </text:list-item>
        <text:list-item>
          <text:p text:style-name="P12"><text:span text:style-name="Strong_20_Emphasis">Acme Corp</text:span> has a moderate-high risk score (78) and a significant transaction amount. Prior audits indicate potential shell company involvement. </text:p>
        </text:list-item>
        <text:list-item>
          <text:p text:style-name="P12"><text:span text:style-name="Strong_20_Emphasis">Delta Services LLC</text:span> appears low-risk, but the transaction is small; verify if this is part of a <text:span text:style-name="Emphasis">structuring pattern</text:span>. </text:p>
        </text:list-item>
        <text:list-item>
          <text:p text:style-name="P11"><text:span text:style-name="Strong_20_Emphasis">Beta Industries</text:span> and <text:span text:style-name="Strong_20_Emphasis">Epsilon Holdings</text:span> require additional cross-referencing with the Beneficial Ownership Register. </text:p>
        </text:list-item>
      </text:list>
      <text:h text:style-name="Heading_20_2" text:outline-level="2">5. Next Steps After Macro Execution</text:h>
      <text:p text:style-name="Text_20_body">Once the macro has run and fraud probabilities are populated, the forensic team must:</text:p>
      <text:list xml:id="list59402752" text:style-name="L4">
        <text:list-item>
          <text:p text:style-name="P14">Review any probability above <text:span text:style-name="Strong_20_Emphasis">60%</text:span> and prepare a Suspicious Activity Report (SAR). </text:p>
        </text:list-item>
        <text:list-item>
          <text:p text:style-name="P14">Export the updated table to <text:span text:style-name="T3">C:\AuditTools\fraud_results_{ENGAGEMENT_ID}.csv</text:span>. </text:p>
        </text:list-item>
        <text:list-item>
          <text:p text:style-name="P14">Reset macro security back to <text:span text:style-name="Strong_20_Emphasis">Medium</text:span> or <text:span text:style-name="Strong_20_Emphasis">High</text:span> after the analysis is complete. </text:p>
        </text:list-item>
        <text:list-item>
          <text:p text:style-name="P13">Document all actions in the engagement file under <text:span text:style-name="Strong_20_Emphasis">{CASE_FILE_REFERENCE}</text:span>. </text:p>
        </text:list-item>
      </text:list>
      <text:h text:style-name="Heading_20_2" text:outline-level="2">6. Document Control &amp; Sign-off</text:h>
      <text:p text:style-name="Text_20_body"><text:span text:style-name="Strong_20_Emphasis">Prepared by:</text:span> {PREPARER_NAME} — Date: {DATE_OF_ANALYSIS}</text:p>
      <text:p text:style-name="Text_20_body"><text:span text:style-name="Strong_20_Emphasis">Reviewed by:</text:span> {REVIEWER_NAME} — Date: {REVIEW_DATE}</text:p>
      <text:p text:style-name="Text_20_body"><text:span text:style-name="Strong_20_Emphasis">Approved by:</text:span> {APPROVER_NAME} — Date: {APPROVAL_DATE}</text:p>
      <text:p text:style-name="P16"><text:span text:style-name="Strong_20_Emphasis"><text:span text:style-name="T7">Confidential</text:span></text:span><text:span text:style-name="T7"> — This document contains privileged information for the purpose of forensic accounting investigation. Do not distribute outside of {COMPANY_NAME} without authorization. Macro execution logs are stored in </text:span><text:span text:style-name="T8">C:\AuditTools\macro_log.txt</text:span><text:span text:style-name="T7">.</text:span></text:p>
      <text:p text:style-name="P15">Document ID: {DOCUMENT_ID} | Version 1.0 | Last modified: {LAST_MODIFIED_DATE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9839in" fo:margin-bottom="0.7874in" style:contextual-spacing="false" fo:line-height="140%" fo:text-indent="0in" style:auto-text-indent="false"/>
      <style:text-properties fo:color="#1a1a1a" loext:opacity="100%" style:font-name="Calibri" fo:font-family="Calibri, Arial, sans-serif" fo:font-size="11pt" style:font-name-asian="Calibri" style:font-family-asian="Calibri, Arial, sans-serif" style:font-size-asian="11pt" style:font-name-complex="Calibri" style:font-family-complex="Calibri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 fo:padding-left="0in" fo:padding-right="0in" fo:padding-top="0in" fo:padding-bottom="0.0626in" fo:border-left="none" fo:border-right="none" fo:border-top="none" fo:border-bottom="1.5pt solid #003366"/>
      <style:text-properties fo:color="#003366" loext:opacity="100%" style:font-name="Liberation Sans Unicode MS" fo:font-family="'Liberation Sans Unicode MS'" style:font-pitch="variable" fo:font-size="20pt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.0417in" fo:margin-bottom="0.0835in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0835in" style:contextual-spacing="false"/>
      <style:text-properties fo:color="#004080" loext:opacity="100%" style:font-name="Liberation Serif" fo:font-family="'Liberation Serif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Noto Sans Devanagari1" style:font-family-complex="'Noto Sans Devanagar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874in" fo:margin-bottom="0.0626in" style:contextual-spacing="false"/>
      <style:text-properties fo:color="#00509e" loext:opacity="100%" style:font-name="Liberation Serif" fo:font-family="'Liberation Serif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2" meta:paragraph-count="66" meta:word-count="586" meta:character-count="4198" meta:non-whitespace-character-count="3671"/>
    <meta:generator>LibreOffice/7.3.7.2$Linux_X86_64 LibreOffice_project/30$Build-2</meta:generator>
  </office:meta>
</office:document-meta>
</file>