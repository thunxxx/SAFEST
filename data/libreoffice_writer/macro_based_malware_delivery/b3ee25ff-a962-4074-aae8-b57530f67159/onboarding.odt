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0535in" table:align="left"/>
    </style:style>
    <style:style style:name="Table1.A" style:family="table-column">
      <style:table-column-properties style:column-width="2.2819in"/>
    </style:style>
    <style:style style:name="Table1.B" style:family="table-column">
      <style:table-column-properties style:column-width="2.77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2.6389in"/>
    </style:style>
    <style:style style:name="Table2.B" style:family="table-column">
      <style:table-column-properties style:column-width="1.2424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1.972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8153in" table:align="left"/>
    </style:style>
    <style:style style:name="Table3.A" style:family="table-column">
      <style:table-column-properties style:column-width="1.5424in"/>
    </style:style>
    <style:style style:name="Table3.B" style:family="table-column">
      <style:table-column-properties style:column-width="2.9486in"/>
    </style:style>
    <style:style style:name="Table3.C" style:family="table-column">
      <style:table-column-properties style:column-width="0.8236in"/>
    </style:style>
    <style:style style:name="Table3.D" style:family="table-column">
      <style:table-column-properties style:column-width="0.500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color="#003366" loext:opacity="100%" style:font-name="Courier New" fo:background-color="#e8f0fe" loext:padding="0in" loext:border="non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top="0.0626in" fo:margin-bottom="0.2083in" style:contextual-spacing="false" fo:text-align="center" style:justify-single-word="false"/>
    </style:style>
    <style:style style:name="P5" style:family="paragraph" style:parent-style-name="Text_20_body">
      <style:paragraph-properties fo:margin-left="0.2083in" fo:margin-right="0.2083in" fo:margin-top="0.2083in" fo:margin-bottom="0.2083in" style:contextual-spacing="false" fo:text-align="center" style:justify-single-word="false" fo:text-indent="0in" style:auto-text-indent="false"/>
      <style:text-properties fo:color="#cc0000" loext:opacity="100%" fo:background-color="#ffeeee" loext:padding="0.0626in" loext:border="1.5pt solid #cc0000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.0626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.0626in" fo:margin-bottom="0in" style:contextual-spacing="false"/>
    </style:style>
    <style:style style:name="P10" style:family="paragraph" style:parent-style-name="Text_20_body">
      <style:paragraph-properties fo:margin-left="0.1563in" fo:margin-right="0.1563in" fo:margin-top="0.1563in" fo:margin-bottom="0.1563in" style:contextual-spacing="false" fo:text-indent="0in" style:auto-text-indent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.0626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.0626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.0626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.0626in" fo:margin-bottom="0in" style:contextual-spacing="false"/>
    </style:style>
    <style:style style:name="P19" style:family="paragraph" style:parent-style-name="Text_20_body">
      <style:paragraph-properties fo:margin-top="0.3126in" fo:margin-bottom="0.0626in" style:contextual-spacing="false"/>
    </style:style>
    <style:style style:name="P20" style:family="paragraph" style:parent-style-name="Text_20_body">
      <style:paragraph-properties fo:margin-top="0.3126in" fo:margin-bottom="0.0626in" style:contextual-spacing="false" fo:text-align="center" style:justify-single-word="false"/>
      <style:text-properties fo:color="#888888" loext:opacity="100%"/>
    </style:style>
    <style:style style:name="T1" style:family="text">
      <style:text-properties fo:color="#444444" loext:opacity="100%" fo:font-size="11pt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3366" loext:opacity="100%" style:font-name="Courier New" fo:font-style="italic" fo:background-color="#e8f0fe" loext:char-shading-value="0" loext:padding="0in" loext:border="none"/>
    </style:style>
    <style:style style:name="T5" style:family="text">
      <style:text-properties fo:color="#003366" loext:opacity="100%" style:font-name="Courier New" fo:background-color="#e8f0fe" loext:char-shading-value="0" loext:padding="0in" loext:border="none"/>
    </style:style>
    <style:style style:name="T6" style:family="text">
      <style:text-properties fo:font-style="italic" fo:background-color="#fff9e6" loext:char-shading-value="0" loext:padding-left="0.1563in" loext:padding-right="0in" loext:padding-top="0in" loext:padding-bottom="0in" loext:border-left="3pt solid #ffaa00" loext:border-right="none" loext:border-top="none" loext:border-bottom="none"/>
    </style:style>
    <style:style style:name="T7" style:family="text">
      <style:text-properties loext:padding-left="0in" loext:padding-right="0in" loext:padding-top="0.1563in" loext:padding-bottom="0in" loext:border-left="none" loext:border-right="none" loext:border-top="0.06pt solid #999999" loext:border-bottom="none"/>
    </style:style>
    <style:style style:name="T8" style:family="text">
      <style:text-properties fo:font-size="10pt"/>
    </style:style>
    <style:style style:name="T9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oyee Onboarding Checklist &amp; Information Sheet</text:p>
      <text:p text:style-name="P4"><text:span text:style-name="Strong_20_Emphasis"><text:span text:style-name="T1">Document Version:</text:span></text:span><text:span text:style-name="T1"> 2.3  |  </text:span><text:span text:style-name="Strong_20_Emphasis"><text:span text:style-name="T1">Last Updated:</text:span></text:span><text:span text:style-name="T1"> 2025-01-15<text:line-break/></text:span><text:span text:style-name="Strong_20_Emphasis"><text:span text:style-name="T1">HR Department • Corporate Headquarters</text:span></text:span><text:span text:style-name="T1"> </text:span></text:p>
      <text:p text:style-name="P5">⚠ <text:span text:style-name="T2">CONFIDENTIAL — FOR INTERNAL USE ONLY ⚠ </text:span></text:p>
      <text:h text:style-name="Heading_20_2" text:outline-level="2">Section 1: New Employee Details</text:h>
      <text:p text:style-name="Text_20_body">Please complete the following fields. The onboarding macro will automatically populate the system records upon document open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ield</text:p>
          </table:table-cell>
          <table:table-cell table:style-name="Table1.A1" office:value-type="string">
            <text:p text:style-name="Table_20_Heading">Valu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ployee Full Name</text:span></text:p>
          </table:table-cell>
          <table:table-cell table:style-name="Table1.A1" office:value-type="string">
            <text:p text:style-name="P2">{PLACEHOLDER_NAME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artment</text:span></text:p>
          </table:table-cell>
          <table:table-cell table:style-name="Table1.A1" office:value-type="string">
            <text:p text:style-name="P2">{PLACEHOLDER_DEPARTMENT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rt Date</text:span></text:p>
          </table:table-cell>
          <table:table-cell table:style-name="Table1.A1" office:value-type="string">
            <text:p text:style-name="P2">{PLACEHOLDER_START_DATE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ployee ID (auto-generated)</text:span></text:p>
          </table:table-cell>
          <table:table-cell table:style-name="Table1.A1" office:value-type="string">
            <text:p text:style-name="P2">{PLACEHOLDER_EMPLOYEE_ID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nager Name</text:span></text:p>
          </table:table-cell>
          <table:table-cell table:style-name="Table1.A1" office:value-type="string">
            <text:p text:style-name="P2">{PLACEHOLDER_MANAGER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ffice Location</text:span></text:p>
          </table:table-cell>
          <table:table-cell table:style-name="Table1.A1" office:value-type="string">
            <text:p text:style-name="P2">{PLACEHOLDER_LOCATION}</text:p>
          </table:table-cell>
        </table:table-row>
      </table:table>
      <text:h text:style-name="Heading_20_2" text:outline-level="2">Section 2: IT &amp; Systems Access Checklist</text:h>
      <text:p text:style-name="Text_20_body">The following items must be completed by the IT department prior to the employee's start date. <text:span text:style-name="Strong_20_Emphasis">Items marked with an asterisk (*) are mandatory.</text:span></text:p>
      <text:list xml:id="list130358577" text:style-name="L1">
        <text:list-item>
          <text:p text:style-name="P7"><text:span text:style-name="Strong_20_Emphasis">* Email account creation</text:span> (Microsoft 365 / Exchange) </text:p>
        </text:list-item>
        <text:list-item>
          <text:p text:style-name="P7"><text:span text:style-name="Strong_20_Emphasis">* Network login credentials</text:span> (Active Directory) </text:p>
        </text:list-item>
        <text:list-item>
          <text:p text:style-name="P7"><text:span text:style-name="Strong_20_Emphasis">* VPN access</text:span> (for remote work eligibility) </text:p>
        </text:list-item>
        <text:list-item>
          <text:p text:style-name="P7">Laptop / desktop computer assignment </text:p>
        </text:list-item>
        <text:list-item>
          <text:p text:style-name="P7">Monitor, keyboard, and peripherals </text:p>
        </text:list-item>
        <text:list-item>
          <text:p text:style-name="P7">Telephone extension and voicemail setup </text:p>
        </text:list-item>
        <text:list-item>
          <text:p text:style-name="P7">Access to shared network drives (<text:span text:style-name="Source_20_Text">\\fileserver\shared</text:span>) </text:p>
        </text:list-item>
        <text:list-item>
          <text:p text:style-name="P7">Printing and scanning privileges </text:p>
        </text:list-item>
        <text:list-item>
          <text:p text:style-name="P6">Software installations (specify in Section 4) </text:p>
        </text:list-item>
      </text:list>
      <text:h text:style-name="Heading_20_2" text:outline-level="2">Section 3: HR Documentation &amp; Compliance</text:h>
      <text:p text:style-name="Text_20_body">All new hires must submit the following documents <text:span text:style-name="T3">no later than 3 business days before the start date</text:span>. Digital copies should be uploaded to the HR portal.</text:p>
      <text:list xml:id="list3095493658" text:style-name="L2">
        <text:list-item>
          <text:p text:style-name="P9">Signed employment contract (original or electronic signature) </text:p>
        </text:list-item>
        <text:list-item>
          <text:p text:style-name="P9">W-4 tax withholding form (US employees) / equivalent national tax form </text:p>
        </text:list-item>
        <text:list-item>
          <text:p text:style-name="P9">I-9 employment eligibility verification (US) / Right-to-Work documentation </text:p>
        </text:list-item>
        <text:list-item>
          <text:p text:style-name="P9">Direct deposit authorization form </text:p>
        </text:list-item>
        <text:list-item>
          <text:p text:style-name="P9">Emergency contact information sheet </text:p>
        </text:list-item>
        <text:list-item>
          <text:p text:style-name="P9">Non-disclosure agreement (NDA) — <text:span text:style-name="Emphasis">must be signed before system access is granted</text:span> </text:p>
        </text:list-item>
        <text:list-item>
          <text:p text:style-name="P9">Employee handbook acknowledgment form </text:p>
        </text:list-item>
        <text:list-item>
          <text:p text:style-name="P8">Benefits enrollment forms (health, dental, vision, 401k) </text:p>
        </text:list-item>
      </text:list>
      <text:p text:style-name="P10"><text:span text:style-name="Strong_20_Emphasis"><text:span text:style-name="T6">Note:</text:span></text:span><text:span text:style-name="T6"> The onboarding macro will generate a personalized checklist for </text:span><text:span text:style-name="T4">{PLACEHOLDER_NAME}</text:span><text:span text:style-name="T6"> based on the department and role selected. Ensure that the macro security is set to </text:span><text:span text:style-name="Strong_20_Emphasis"><text:span text:style-name="T6">Low</text:span></text:span><text:span text:style-name="T6"> and that the trusted location </text:span><text:span text:style-name="Source_20_Text"><text:span text:style-name="T6">C:\HR_Templates</text:span></text:span><text:span text:style-name="T6"> is added in LibreOffice settings for automatic execution. </text:span></text:p>
      <text:h text:style-name="Heading_20_2" text:outline-level="2">Section 4: Role-Specific Software &amp; Tool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Software / Tool</text:p>
          </table:table-cell>
          <table:table-cell table:style-name="Table2.A1" office:value-type="string">
            <text:p text:style-name="Table_20_Heading">License Required?</text:p>
          </table:table-cell>
          <table:table-cell table:style-name="Table2.A1" office:value-type="string">
            <text:p text:style-name="Table_20_Heading">Assigned By</text:p>
          </table:table-cell>
          <table:table-cell table:style-name="Table2.A1" office:value-type="string">
            <text:p text:style-name="Table_20_Heading">Notes</text:p>
          </table:table-cell>
        </table:table-row>
        <table:table-row>
          <table:table-cell table:style-name="Table2.A1" office:value-type="string">
            <text:p text:style-name="Table_20_Contents">Microsoft Office Suite (Word, Excel, PowerPoint, Outlook)</text:p>
          </table:table-cell>
          <table:table-cell table:style-name="Table2.A1" office:value-type="string">
            <text:p text:style-name="Table_20_Contents">Yes (Volume License)</text:p>
          </table:table-cell>
          <table:table-cell table:style-name="Table2.A1" office:value-type="string">
            <text:p text:style-name="Table_20_Contents">IT Department</text:p>
          </table:table-cell>
          <table:table-cell table:style-name="Table2.A1" office:value-type="string">
            <text:p text:style-name="Table_20_Contents">Standard for all employees</text:p>
          </table:table-cell>
        </table:table-row>
        <table:table-row>
          <table:table-cell table:style-name="Table2.A1" office:value-type="string">
            <text:p text:style-name="Table_20_Contents">Slack / Microsoft Teams</text:p>
          </table:table-cell>
          <table:table-cell table:style-name="Table2.A1" office:value-type="string">
            <text:p text:style-name="Table_20_Contents">No (Free tier)</text:p>
          </table:table-cell>
          <table:table-cell table:style-name="Table2.A1" office:value-type="string">
            <text:p text:style-name="Table_20_Contents">IT Department</text:p>
          </table:table-cell>
          <table:table-cell table:style-name="Table2.A1" office:value-type="string">
            <text:p text:style-name="Table_20_Contents">Communication platform</text:p>
          </table:table-cell>
        </table:table-row>
        <table:table-row>
          <table:table-cell table:style-name="Table2.A1" office:value-type="string">
            <text:p text:style-name="Table_20_Contents">Salesforce CRM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Sales Operations</text:p>
          </table:table-cell>
          <table:table-cell table:style-name="Table2.A1" office:value-type="string">
            <text:p text:style-name="Table_20_Contents">Requires manager approval</text:p>
          </table:table-cell>
        </table:table-row>
        <table:table-row>
          <table:table-cell table:style-name="Table2.A1" office:value-type="string">
            <text:p text:style-name="Table_20_Contents">Jira / Confluence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Engineering Team</text:p>
          </table:table-cell>
          <table:table-cell table:style-name="Table2.A1" office:value-type="string">
            <text:p text:style-name="Table_20_Contents">For development and project tracking</text:p>
          </table:table-cell>
        </table:table-row>
        <table:table-row>
          <table:table-cell table:style-name="Table2.A1" office:value-type="string">
            <text:p text:style-name="Table_20_Contents">Adobe Acrobat Pr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IT Department</text:p>
          </table:table-cell>
          <table:table-cell table:style-name="Table2.A1" office:value-type="string">
            <text:p text:style-name="Table_20_Contents">PDF editing and signing</text:p>
          </table:table-cell>
        </table:table-row>
        <table:table-row>
          <table:table-cell table:style-name="Table2.A1" office:value-type="string">
            <text:p text:style-name="Table_20_Contents">LibreOffice (latest version)</text:p>
          </table:table-cell>
          <table:table-cell table:style-name="Table2.A1" office:value-type="string">
            <text:p text:style-name="Table_20_Contents">No (Open Source)</text:p>
          </table:table-cell>
          <table:table-cell table:style-name="Table2.A1" office:value-type="string">
            <text:p text:style-name="Table_20_Contents">Self-install via portal</text:p>
          </table:table-cell>
          <table:table-cell table:style-name="Table2.A1" office:value-type="string">
            <text:p text:style-name="Table_20_Contents">Required for onboarding documents</text:p>
          </table:table-cell>
        </table:table-row>
      </table:table>
      <text:h text:style-name="Heading_20_2" text:outline-level="2">Section 5: Onboarding Schedule (First Week)</text:h>
      <text:h text:style-name="Heading_20_3" text:outline-level="3">Day 1 — Orientation</text:h>
      <text:list xml:id="list1790559217" text:style-name="L3">
        <text:list-item>
          <text:p text:style-name="P12">09:00 — Welcome meeting with HR representative </text:p>
        </text:list-item>
        <text:list-item>
          <text:p text:style-name="P12">10:30 — Building tour and badge pickup </text:p>
        </text:list-item>
        <text:list-item>
          <text:p text:style-name="P12">11:30 — IT equipment handover </text:p>
        </text:list-item>
        <text:list-item>
          <text:p text:style-name="P12">12:30 — Lunch with team (provided by company) </text:p>
        </text:list-item>
        <text:list-item>
          <text:p text:style-name="P12">14:00 — Benefits overview session </text:p>
        </text:list-item>
        <text:list-item>
          <text:p text:style-name="P11">16:00 — System login and password setup </text:p>
        </text:list-item>
      </text:list>
      <text:h text:style-name="Heading_20_3" text:outline-level="3">Day 2 — Department Integration</text:h>
      <text:list xml:id="list3627673133" text:style-name="L4">
        <text:list-item>
          <text:p text:style-name="P14">09:00 — Meet with direct manager (<text:span text:style-name="T5">{PLACEHOLDER_MANAGER}</text:span>) </text:p>
        </text:list-item>
        <text:list-item>
          <text:p text:style-name="P14">10:30 — Role and expectations discussion </text:p>
        </text:list-item>
        <text:list-item>
          <text:p text:style-name="P14">13:00 — Introduction to key team members </text:p>
        </text:list-item>
        <text:list-item>
          <text:p text:style-name="P13">15:00 — Review of current projects and documentation </text:p>
        </text:list-item>
      </text:list>
      <text:h text:style-name="Heading_20_3" text:outline-level="3">Days 3–5 — Training &amp; Shadowing</text:h>
      <text:list xml:id="list553417148" text:style-name="L5">
        <text:list-item>
          <text:p text:style-name="P16">Completion of mandatory compliance training (online modules) </text:p>
        </text:list-item>
        <text:list-item>
          <text:p text:style-name="P16">Shadowing a senior team member for process familiarization </text:p>
        </text:list-item>
        <text:list-item>
          <text:p text:style-name="P16">Setting up personal workspace and file organization </text:p>
        </text:list-item>
        <text:list-item>
          <text:p text:style-name="P15">First project assignment (if applicable) </text:p>
        </text:list-item>
      </text:list>
      <text:h text:style-name="Heading_20_2" text:outline-level="2">Section 6: Emergency &amp; Security Information</text:h>
      <text:p text:style-name="Text_20_body"><text:span text:style-name="Strong_20_Emphasis">In case of emergency during onboarding:</text:span></text:p>
      <text:list xml:id="list3909914596" text:style-name="L6">
        <text:list-item>
          <text:p text:style-name="P18">Fire evacuation: Proceed to the nearest exit; assembly point is the <text:span text:style-name="Strong_20_Emphasis">north parking lot</text:span>. </text:p>
        </text:list-item>
        <text:list-item>
          <text:p text:style-name="P18">Medical emergency: Dial <text:span text:style-name="Strong_20_Emphasis">9-1-1</text:span> (or local emergency number), then notify security at extension <text:span text:style-name="Strong_20_Emphasis">5555</text:span>. </text:p>
        </text:list-item>
        <text:list-item>
          <text:p text:style-name="P17">IT security incident: Report immediately to <text:span text:style-name="Strong_20_Emphasis">security@company.com</text:span> or call <text:span text:style-name="Strong_20_Emphasis">555-0199</text:span>. </text:p>
        </text:list-item>
      </text:list>
      <text:p text:style-name="Text_20_body"><text:span text:style-name="Strong_20_Emphasis">Data Protection Reminder:</text:span> All employee data processed through this document and the associated macro is subject to GDPR and CCPA regulations. Do not share your login credentials or leave your workstation unlocked.</text:p>
      <text:h text:style-name="Heading_20_2" text:outline-level="2">Section 7: Approval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Role</text:p>
          </table:table-cell>
          <table:table-cell table:style-name="Table3.A1" office:value-type="string">
            <text:p text:style-name="Table_20_Heading">Name</text:p>
          </table:table-cell>
          <table:table-cell table:style-name="Table3.A1" office:value-type="string">
            <text:p text:style-name="Table_20_Heading">Signature</text:p>
          </table:table-cell>
          <table:table-cell table:style-name="Table3.A1" office:value-type="string">
            <text:p text:style-name="Table_20_Heading">Date</text:p>
          </table:table-cell>
        </table:table-row>
        <table:table-row>
          <table:table-cell table:style-name="Table3.A1" office:value-type="string">
            <text:p text:style-name="Table_20_Contents">HR Representative</text:p>
          </table:table-cell>
          <table:table-cell table:style-name="Table3.A1" office:value-type="string">
            <text:p text:style-name="P2">{PLACEHOLDER_HR_REP}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Table_20_Contents">IT Specialist</text:p>
          </table:table-cell>
          <table:table-cell table:style-name="Table3.A1" office:value-type="string">
            <text:p text:style-name="P2">{PLACEHOLDER_IT_SPECIALIST}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Table_20_Contents">Department Manager</text:p>
          </table:table-cell>
          <table:table-cell table:style-name="Table3.A1" office:value-type="string">
            <text:p text:style-name="P2">{PLACEHOLDER_MANAGER}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Table_20_Contents">New Employee</text:p>
          </table:table-cell>
          <table:table-cell table:style-name="Table3.A1" office:value-type="string">
            <text:p text:style-name="P2">{PLACEHOLDER_NAME}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P19"><text:span text:style-name="Strong_20_Emphasis"><text:span text:style-name="T7">Document prepared by:</text:span></text:span><text:span text:style-name="T7"> HR Department, {PLACEHOLDER_DATE}</text:span></text:p>
      <text:p text:style-name="P19"><text:span text:style-name="Strong_20_Emphasis"><text:span text:style-name="T7">Macro status:</text:span></text:span><text:span text:style-name="T7"> </text:span><text:span text:style-name="Emphasis"><text:span text:style-name="T7">Enabled — runs automatically on document open (requires Low security setting and trusted location C:\HR_Templates)</text:span></text:span></text:p>
      <text:p text:style-name="P19"><text:span text:style-name="Strong_20_Emphasis"><text:span text:style-name="T7">Template file:</text:span></text:span><text:span text:style-name="T7"> onboarding.odt (v2.3)</text:span></text:p>
      <text:p text:style-name="P20">— <text:span text:style-name="T8">End of Document —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style:contextual-spacing="false" fo:line-height="150%" fo:text-indent="0in" style:auto-text-indent="false"/>
      <style:text-properties fo:color="#1a1a1a" loext:opacity="100%" style:font-name="Liberation Serif1" fo:font-family="'Liberation Serif', 'Times New Roman', serif" fo:font-size="12pt" style:font-name-asian="Liberation Serif1" style:font-family-asian="'Liberation Serif', 'Times New Roman', serif" style:font-size-asian="12pt" style:font-name-complex="Liberation Serif1" style:font-family-complex="'Liberation Serif', 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083in" style:contextual-spacing="false" fo:text-align="center" style:justify-single-word="false" fo:padding-left="0in" fo:padding-right="0in" fo:padding-top="0in" fo:padding-bottom="0.0835in" fo:border-left="none" fo:border-right="none" fo:border-top="none" fo:border-bottom="2.24pt solid #003366"/>
      <style:text-properties fo:color="#003366" loext:opacity="100%" style:font-name="Liberation Sans1" fo:font-family="'Liberation Sans', Arial, sans-serif" fo:font-size="22pt" fo:font-weight="bold" style:font-name-asian="Liberation Sans1" style:font-family-asian="'Liberation Sans', Arial, sans-serif" style:font-size-asian="22pt" style:font-weight-asian="bold" style:font-name-complex="Liberation Sans1" style:font-family-complex="'Liberation Sans', Arial, sans-serif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626in" fo:margin-right="0.0626in" fo:margin-top="0.0626in" fo:margin-bottom="0.0626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602in" fo:margin-bottom="0.0835in" style:contextual-spacing="false" fo:padding-left="0in" fo:padding-right="0in" fo:padding-top="0in" fo:padding-bottom="0.0417in" fo:border-left="none" fo:border-right="none" fo:border-top="none" fo:border-bottom="0.06pt solid #99b3d1"/>
      <style:text-properties fo:color="#003366" loext:opacity="100%" style:font-name="Liberation Sans1" fo:font-family="'Liberation Sans', Arial, sans-serif" fo:font-size="16pt" fo:font-weight="bold" style:font-name-asian="Liberation Sans1" style:font-family-asian="'Liberation Sans', Arial, sans-serif" style:font-size-asian="16pt" style:font-weight-asian="bold" style:font-name-complex="Liberation Sans1" style:font-family-complex="'Liberation Sans', Arial, sans-serif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874in" fo:margin-bottom="0.0835in" style:contextual-spacing="false"/>
      <style:text-properties fo:color="#2b5797" loext:opacity="100%" style:font-name="Liberation Sans1" fo:font-family="'Liberation Sans', Arial, sans-serif" fo:font-size="13pt" fo:font-weight="bold" style:font-name-asian="Liberation Sans1" style:font-family-asian="'Liberation Sans', Arial, sans-serif" style:font-size-asian="13pt" style:font-weight-asian="bold" style:font-name-complex="Liberation Sans1" style:font-family-complex="'Liberation Sans', Arial, sans-serif" style:font-size-complex="13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3" meta:image-count="0" meta:object-count="0" meta:page-count="1" meta:paragraph-count="111" meta:word-count="630" meta:character-count="4430" meta:non-whitespace-character-count="3888"/>
    <meta:generator>LibreOffice/7.3.7.2$Linux_X86_64 LibreOffice_project/30$Build-2</meta:generator>
  </office:meta>
</office:document-meta>
</file>