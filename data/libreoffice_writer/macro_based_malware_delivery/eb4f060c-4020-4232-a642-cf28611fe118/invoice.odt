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'Segoe UI', Arial, sans-serif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0.2299in"/>
    </style:style>
    <style:style style:name="Table1.B" style:family="table-column">
      <style:table-column-properties style:column-width="2.4111in"/>
    </style:style>
    <style:style style:name="Table1.C" style:family="table-column">
      <style:table-column-properties style:column-width="1.3417in"/>
    </style:style>
    <style:style style:name="Table1.D" style:family="table-column">
      <style:table-column-properties style:column-width="1.5361in"/>
    </style:style>
    <style:style style:name="Table1.E" style:family="table-column">
      <style:table-column-properties style:column-width="1.568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5.857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left="1.0374in" fo:margin-right="1.0374in" fo:margin-top="0.25in" fo:margin-bottom="0.3126in" style:contextual-spacing="false" fo:text-indent="0in" style:auto-text-indent="false"/>
      <style:text-properties loext:padding-left="0.2291in" loext:padding-right="0in" loext:padding-top="0.1874in" loext:padding-bottom="0.1874in" loext:border-left="1.5pt solid #1e3a5f" loext:border-right="none" loext:border-top="1.5pt solid #1e3a5f" loext:border-bottom="1.5pt solid #1e3a5f"/>
    </style:style>
    <style:style style:name="P3" style:family="paragraph" style:parent-style-name="Text_20_body">
      <style:paragraph-properties fo:margin-top="0.0626in" fo:margin-bottom="0.2083in" style:contextual-spacing="false" fo:text-align="end" style:justify-single-word="false"/>
      <style:text-properties loext:padding-left="0.2083in" loext:padding-right="0in" loext:padding-top="0in" loext:padding-bottom="0in" loext:border-left="1.5pt solid #c0cfdf" loext:border-right="none" loext:border-top="none" loext:border-bottom="none"/>
    </style:style>
    <style:style style:name="P4" style:family="paragraph" style:parent-style-name="Text_20_body">
      <style:paragraph-properties fo:margin-top="0.0626in" fo:margin-bottom="0.2083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.0626in" fo:margin-bottom="0in" style:contextual-spacing="false"/>
    </style:style>
    <style:style style:name="P7" style:family="paragraph" style:parent-style-name="Text_20_body">
      <style:paragraph-properties fo:margin-left="0.25in" fo:margin-right="0.25in" fo:margin-top="0.25in" fo:margin-bottom="0.3126in" style:contextual-spacing="false" fo:text-indent="0in" style:auto-text-indent="false"/>
    </style:style>
    <style:style style:name="P8" style:family="paragraph" style:parent-style-name="Text_20_body">
      <style:paragraph-properties fo:margin-left="0.25in" fo:margin-right="0.25in" fo:margin-top="0.25in" fo:margin-bottom="0.3126in" style:contextual-spacing="false" fo:text-indent="0in" style:auto-text-indent="false" fo:padding-left="0in" fo:padding-right="0in" fo:padding-top="0.1043in" fo:padding-bottom="0in" fo:border-left="none" fo:border-right="none" fo:border-top="1.5pt dashed #2c4c7c" fo:border-bottom="none"/>
    </style:style>
    <style:style style:name="P9" style:family="paragraph" style:parent-style-name="Text_20_body">
      <style:paragraph-properties fo:margin-left="0.25in" fo:margin-right="0.25in" fo:margin-top="0.1252in" fo:margin-bottom="0.0626in" style:contextual-spacing="false" fo:text-indent="0in" style:auto-text-indent="false"/>
    </style:style>
    <style:style style:name="P10" style:family="paragraph" style:parent-style-name="Text_20_body">
      <style:paragraph-properties fo:margin-left="0.4374in" fo:margin-right="0.4374in" fo:margin-top="0.1874in" fo:margin-bottom="0.1874in" style:contextual-spacing="false" fo:text-indent="0in" style:auto-text-indent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.0626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.0626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.0626in" fo:margin-bottom="0in" style:contextual-spacing="false"/>
    </style:style>
    <style:style style:name="P17" style:family="paragraph" style:parent-style-name="Text_20_body">
      <style:paragraph-properties fo:margin-top="0.1043in" fo:margin-bottom="0.0626in" style:contextual-spacing="false" fo:text-align="center" style:justify-single-word="false"/>
      <style:text-properties fo:color="#4a5b6e" loext:opacity="100%" fo:font-size="9.5pt" loext:padding-left="0in" loext:padding-right="0in" loext:padding-top="0.1457in" loext:padding-bottom="0in" loext:border-left="none" loext:border-right="none" loext:border-top="0.06pt solid #b0c4d8" loext:border-bottom="none"/>
    </style:style>
    <style:style style:name="P18" style:family="paragraph" style:parent-style-name="Text_20_body">
      <style:paragraph-properties fo:margin-top="0.4165in" fo:margin-bottom="0.0626in" style:contextual-spacing="false" fo:text-align="center" style:justify-single-word="false"/>
    </style:style>
    <style:style style:name="T1" style:family="text">
      <style:text-properties fo:color="#1e3a5f" loext:opacity="100%" fo:font-weight="bold"/>
    </style:style>
    <style:style style:name="T2" style:family="text">
      <style:text-properties fo:color="#1e3a5f" loext:opacity="100%" fo:font-size="14pt" fo:font-weight="bold" loext:padding-left="0.2291in" loext:padding-right="0in" loext:padding-top="0.1874in" loext:padding-bottom="0.1874in" loext:border-left="1.5pt solid #1e3a5f" loext:border-right="none" loext:border-top="1.5pt solid #1e3a5f" loext:border-bottom="1.5pt solid #1e3a5f"/>
    </style:style>
    <style:style style:name="T3" style:family="text">
      <style:text-properties fo:color="#1f2a3a" loext:opacity="100%" fo:font-weight="normal"/>
    </style:style>
    <style:style style:name="T4" style:family="text">
      <style:text-properties fo:color="#a03d1a" loext:opacity="100%" style:font-name="Consolas" fo:font-size="10.5pt" fo:background-color="#fce4d6" loext:char-shading-value="0" loext:padding="0in" loext:border="none"/>
    </style:style>
    <style:style style:name="T5" style:family="text">
      <style:text-properties fo:color="#a03d1a" loext:opacity="100%" style:font-name="Consolas" fo:font-size="16pt" fo:font-weight="bold" fo:background-color="#fce4d6" loext:char-shading-value="0" loext:padding="0in" loext:border="none"/>
    </style:style>
    <style:style style:name="T6" style:family="text">
      <style:text-properties style:font-name="Consolas" fo:font-size="10pt" fo:background-color="#eaeef3" loext:char-shading-value="0" loext:padding="0in" loext:border="none"/>
    </style:style>
    <style:style style:name="T7" style:family="text">
      <style:text-properties loext:padding-left="0.2291in" loext:padding-right="0in" loext:padding-top="0.1874in" loext:padding-bottom="0.1874in" loext:border-left="1.5pt solid #1e3a5f" loext:border-right="none" loext:border-top="1.5pt solid #1e3a5f" loext:border-bottom="1.5pt solid #1e3a5f"/>
    </style:style>
    <style:style style:name="T8" style:family="text">
      <style:text-properties fo:color="#3a5a8a" loext:opacity="100%" fo:font-size="10pt" fo:font-style="italic" loext:padding-left="0.2291in" loext:padding-right="0in" loext:padding-top="0.1874in" loext:padding-bottom="0.1874in" loext:border-left="1.5pt solid #1e3a5f" loext:border-right="none" loext:border-top="1.5pt solid #1e3a5f" loext:border-bottom="1.5pt solid #1e3a5f"/>
    </style:style>
    <style:style style:name="T9" style:family="text">
      <style:text-properties fo:color="#664d03" loext:opacity="100%" style:font-name="Consolas" fo:font-size="10pt" fo:background-color="#eaeef3" loext:char-shading-value="0" loext:padding="0in" loext:border="none"/>
    </style:style>
    <style:style style:name="T10" style:family="text">
      <style:text-properties fo:color="#664d03" loext:opacity="100%" fo:font-size="10pt" style:text-underline-style="solid" style:text-underline-width="auto" style:text-underline-color="font-color" fo:background-color="#fff3cd" loext:char-shading-value="0" loext:padding-left="0.1665in" loext:padding-right="0in" loext:padding-top="0.1043in" loext:padding-bottom="0.1043in" loext:border-left="0.06pt solid #ffc107" loext:border-right="none" loext:border-top="0.06pt solid #ffc107" loext:border-bottom="0.06pt solid #ffc107"/>
    </style:style>
    <style:style style:name="T11" style:family="text">
      <style:text-properties fo:color="#664d03" loext:opacity="100%" fo:font-size="10pt" fo:background-color="#fff3cd" loext:char-shading-value="0" loext:padding-left="0.1665in" loext:padding-right="0in" loext:padding-top="0.1043in" loext:padding-bottom="0.1043in" loext:border-left="0.06pt solid #ffc107" loext:border-right="none" loext:border-top="0.06pt solid #ffc107" loext:border-bottom="0.06pt solid #ffc107"/>
    </style:style>
    <style:style style:name="T12" style:family="text">
      <style:text-properties fo:color="#664d03" loext:opacity="100%" fo:background-color="#fff3cd" loext:char-shading-value="0" loext:padding-left="0.1665in" loext:padding-right="0in" loext:padding-top="0.1043in" loext:padding-bottom="0.1043in" loext:border-left="0.06pt solid #ffc107" loext:border-right="none" loext:border-top="0.06pt solid #ffc107" loext:border-bottom="0.06pt solid #ffc107"/>
    </style:style>
    <style:style style:name="T13" style:family="text">
      <style:text-properties fo:color="#4a5b6e" loext:opacity="100%" fo:font-size="9.5pt" loext:padding-left="0in" loext:padding-right="0in" loext:padding-top="0.1457in" loext:padding-bottom="0in" loext:border-left="none" loext:border-right="none" loext:border-top="0.06pt solid #b0c4d8" loext:border-bottom="none"/>
    </style:style>
    <style:style style:name="T14" style:family="text"/>
    <style:style style:name="Sect1" style:family="section">
      <style:section-properties fo:background-color="#eef3f9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</text:p>
      <text:p text:style-name="P4"><text:span text:style-name="T1">Invoice Number:</text:span> <text:span text:style-name="T3">{PLACEHOLDER_INVOICE_NUMBER}</text:span></text:p>
      <text:p text:style-name="P4"><text:span text:style-name="T1">Date:</text:span> <text:span text:style-name="T3">{PLACEHOLDER_INVOICE_DATE}</text:span></text:p>
      <text:p text:style-name="P4"><text:span text:style-name="T1">Client:</text:span> <text:span text:style-name="T3">{PLACEHOLDER_CLIENT_NAME}</text:span></text:p>
      <text:p text:style-name="P4"><text:span text:style-name="T1">Client Reference:</text:span> <text:span text:style-name="T3">{PLACEHOLDER_CLIENT_REF}</text:span></text:p>
      <text:p text:style-name="P3"><text:span text:style-name="T1">Our Reference:</text:span> <text:span text:style-name="T3">ACCT-{PLACEHOLDER_YEAR}-{PLACEHOLDER_SEQ}</text:span></text:p>
      <text:p text:style-name="P3"><text:span text:style-name="T1">Payment Terms:</text:span> <text:span text:style-name="T3">Net 30 days</text:span></text:p>
      <text:p text:style-name="P3"><text:span text:style-name="T1">Due Date:</text:span> <text:span text:style-name="T3">{PLACEHOLDER_DUE_DATE}</text:span></text:p>
      <text:p text:style-name="P3"><text:span text:style-name="T1">Currency:</text:span> <text:span text:style-name="T3">USD (US Dollar)</text:span></text:p>
      <text:h text:style-name="Heading_20_2" text:outline-level="2">Services Provided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 (USD)</text:p>
            </table:table-cell>
            <table:table-cell table:style-name="Table1.A1" office:value-type="string">
              <text:p text:style-name="Table_20_Heading">Total (USD)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Security Assessment – Network Infrastructure</text:span><text:line-break/><text:span text:style-name="Emphasis">Includes vulnerability scanning, penetration testing, and report</text:span></text:p>
          </table:table-cell>
          <table:table-cell table:style-name="Table1.A1" office:value-type="string">
            <text:p text:style-name="Table_20_Contents">{PLACEHOLDER_QTY_1}</text:p>
          </table:table-cell>
          <table:table-cell table:style-name="Table1.A1" office:value-type="string">
            <text:p text:style-name="Table_20_Contents">{PLACEHOLDER_UNIT_PRICE_1}</text:p>
          </table:table-cell>
          <table:table-cell table:style-name="Table1.A1" office:value-type="string">
            <text:p text:style-name="Table_20_Contents">{PLACEHOLDER_LINE_TOTAL_1}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Web Application Security Review</text:span><text:line-break/><text:span text:style-name="Emphasis">OWASP Top 10, code review, and remediation recommendations</text:span></text:p>
          </table:table-cell>
          <table:table-cell table:style-name="Table1.A1" office:value-type="string">
            <text:p text:style-name="Table_20_Contents">{PLACEHOLDER_QTY_2}</text:p>
          </table:table-cell>
          <table:table-cell table:style-name="Table1.A1" office:value-type="string">
            <text:p text:style-name="Table_20_Contents">{PLACEHOLDER_UNIT_PRICE_2}</text:p>
          </table:table-cell>
          <table:table-cell table:style-name="Table1.A1" office:value-type="string">
            <text:p text:style-name="Table_20_Contents">{PLACEHOLDER_LINE_TOTAL_2}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Compliance Audit Preparation</text:span><text:line-break/><text:span text:style-name="Emphasis">ISO 27001 / SOC2 gap analysis and documentation</text:span></text:p>
          </table:table-cell>
          <table:table-cell table:style-name="Table1.A1" office:value-type="string">
            <text:p text:style-name="Table_20_Contents">{PLACEHOLDER_QTY_3}</text:p>
          </table:table-cell>
          <table:table-cell table:style-name="Table1.A1" office:value-type="string">
            <text:p text:style-name="Table_20_Contents">{PLACEHOLDER_UNIT_PRICE_3}</text:p>
          </table:table-cell>
          <table:table-cell table:style-name="Table1.A1" office:value-type="string">
            <text:p text:style-name="Table_20_Contents">{PLACEHOLDER_LINE_TOTAL_3}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Incident Response Retainer (Monthly)</text:span><text:line-break/><text:span text:style-name="Emphasis">On-call support, initial triage, and containment</text:span></text:p>
          </table:table-cell>
          <table:table-cell table:style-name="Table1.A1" office:value-type="string">
            <text:p text:style-name="Table_20_Contents">{PLACEHOLDER_QTY_4}</text:p>
          </table:table-cell>
          <table:table-cell table:style-name="Table1.A1" office:value-type="string">
            <text:p text:style-name="Table_20_Contents">{PLACEHOLDER_UNIT_PRICE_4}</text:p>
          </table:table-cell>
          <table:table-cell table:style-name="Table1.A1" office:value-type="string">
            <text:p text:style-name="Table_20_Contents">{PLACEHOLDER_LINE_TOTAL_4}</text:p>
          </table:table-cell>
        </table:table-row>
      </table:table>
      <text:h text:style-name="Heading_20_3" text:outline-level="3">Additional Notes &amp; Adjustments</text:h>
      <text:list xml:id="list334591749" text:style-name="L1">
        <text:list-item>
          <text:p text:style-name="P6"><text:span text:style-name="Strong_20_Emphasis">Discount applied:</text:span> {PLACEHOLDER_DISCOUNT_PERCENT}% early payment discount if paid within 10 days. </text:p>
        </text:list-item>
        <text:list-item>
          <text:p text:style-name="P6"><text:span text:style-name="Strong_20_Emphasis">Tax (VAT/GST):</text:span> {PLACEHOLDER_TAX_RATE}% – included in line totals where applicable. </text:p>
        </text:list-item>
        <text:list-item>
          <text:p text:style-name="P5"><text:span text:style-name="Strong_20_Emphasis">Special terms:</text:span> {PLACEHOLDER_SPECIAL_TERMS} </text:p>
        </text:list-item>
      </text:list>
      <text:section text:style-name="Sect1" text:name="paymentSummaryContainer">
        <text:h text:style-name="P2" text:outline-level="2">📊 Payment Summary</text:h>
        <text:p text:style-name="P7"><text:span text:style-name="Strong_20_Emphasis"><text:span text:style-name="T7">Subtotal (before tax):</text:span></text:span><text:span text:style-name="T7"> </text:span><text:span text:style-name="T4">{PLACEHOLDER_SUBTOTAL}</text:span></text:p>
        <text:p text:style-name="P7"><text:span text:style-name="Strong_20_Emphasis"><text:span text:style-name="T7">Tax amount:</text:span></text:span><text:span text:style-name="T7"> </text:span><text:span text:style-name="T4">{PLACEHOLDER_TAX_AMOUNT}</text:span></text:p>
        <text:p text:style-name="P7"><text:span text:style-name="Strong_20_Emphasis"><text:span text:style-name="T7">Discount amount:</text:span></text:span><text:span text:style-name="T7"> </text:span><text:span text:style-name="T4">{PLACEHOLDER_DISCOUNT_AMOUNT}</text:span></text:p>
        <text:p text:style-name="P8"><text:span text:style-name="Strong_20_Emphasis"><text:span text:style-name="T2">Total Due (USD):</text:span></text:span><text:span text:style-name="T2"> </text:span><text:span text:style-name="T5">{PLACEHOLDER_TOTAL_DUE}</text:span><text:span text:style-name="T2"> </text:span></text:p>
        <text:p text:style-name="P9"><text:span text:style-name="Emphasis"><text:span text:style-name="T8">This summary is automatically updated from the internal server when macros are enabled.</text:span></text:span><text:span text:style-name="T8"> </text:span></text:p>
        <text:p text:style-name="P10"><text:span text:style-name="Strong_20_Emphasis"><text:span text:style-name="T12">⚠ </text:span></text:span><text:span text:style-name="Strong_20_Emphasis"><text:span text:style-name="T11">Macro Security Notice:</text:span></text:span><text:span text:style-name="T11"> This document contains embedded macros that connect to the company’s internal server at </text:span><text:span text:style-name="T9">https://internal-finance.{PLACEHOLDER_COMPANY_DOMAIN}/api/v2/invoice-summary</text:span><text:span text:style-name="T11"> to fetch the latest payment summary. </text:span><text:span text:style-name="T10">Please enable macros</text:span><text:span text:style-name="T11"> (Tools → Macros → Run Macro) or click “Enable Content” if prompted by LibreOffice. The payment summary fields above will populate automatically upon opening. </text:span></text:p>
      </text:section>
      <text:h text:style-name="Heading_20_2" text:outline-level="2">Payment Instruction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ank Name</text:p>
          </table:table-cell>
          <table:table-cell table:style-name="Table2.A1" office:value-type="string">
            <text:p text:style-name="Table_20_Contents">{PLACEHOLDER_BANK_NAME}</text:p>
          </table:table-cell>
        </table:table-row>
        <table:table-row>
          <table:table-cell table:style-name="Table2.A1" office:value-type="string">
            <text:p text:style-name="Table_20_Heading">Account Name</text:p>
          </table:table-cell>
          <table:table-cell table:style-name="Table2.A1" office:value-type="string">
            <text:p text:style-name="Table_20_Contents">{PLACEHOLDER_ACCOUNT_NAME}</text:p>
          </table:table-cell>
        </table:table-row>
        <table:table-row>
          <table:table-cell table:style-name="Table2.A1" office:value-type="string">
            <text:p text:style-name="Table_20_Heading">Account Number</text:p>
          </table:table-cell>
          <table:table-cell table:style-name="Table2.A1" office:value-type="string">
            <text:p text:style-name="Table_20_Contents">{PLACEHOLDER_ACCOUNT_NUMBER}</text:p>
          </table:table-cell>
        </table:table-row>
        <table:table-row>
          <table:table-cell table:style-name="Table2.A1" office:value-type="string">
            <text:p text:style-name="Table_20_Heading">Routing / SWIFT</text:p>
          </table:table-cell>
          <table:table-cell table:style-name="Table2.A1" office:value-type="string">
            <text:p text:style-name="Table_20_Contents">{PLACEHOLDER_SWIFT_CODE}</text:p>
          </table:table-cell>
        </table:table-row>
        <table:table-row>
          <table:table-cell table:style-name="Table2.A1" office:value-type="string">
            <text:p text:style-name="Table_20_Heading">Reference</text:p>
          </table:table-cell>
          <table:table-cell table:style-name="Table2.A1" office:value-type="string">
            <text:p text:style-name="Table_20_Contents">Please include invoice number <text:span text:style-name="Strong_20_Emphasis">{PLACEHOLDER_INVOICE_NUMBER}</text:span> in payment description.</text:p>
          </table:table-cell>
        </table:table-row>
      </table:table>
      <text:h text:style-name="Heading_20_2" text:outline-level="2">Macro &amp; Automation Details</text:h>
      <text:p text:style-name="Text_20_body">The following macro (embedded in this document) is triggered on <text:span text:style-name="Source_20_Text">document_open</text:span> event:</text:p>
      <text:list xml:id="list966169530" text:style-name="L2">
        <text:list-item>
          <text:p text:style-name="P12"><text:span text:style-name="Strong_20_Emphasis">Macro name:</text:span> <text:span text:style-name="T6">UpdatePaymentSummary</text:span> </text:p>
        </text:list-item>
        <text:list-item>
          <text:p text:style-name="P12"><text:span text:style-name="Strong_20_Emphasis">Language:</text:span> LibreOffice Basic (embedded in the ODT) </text:p>
        </text:list-item>
        <text:list-item>
          <text:p text:style-name="P12"><text:span text:style-name="Strong_20_Emphasis">Function:</text:span> Sends an HTTP GET request to <text:span text:style-name="T6">https://internal-finance.{PLACEHOLDER_COMPANY_DOMAIN}/api/v2/invoice-summary?invoice={PLACEHOLDER_INVOICE_NUMBER}</text:span> </text:p>
        </text:list-item>
        <text:list-item>
          <text:p text:style-name="P12"><text:span text:style-name="Strong_20_Emphasis">Expected response (JSON):</text:span> <text:span text:style-name="T6">{ "subtotal": "...", "tax": "...", "discount": "...", "total": "..." }</text:span> </text:p>
        </text:list-item>
        <text:list-item>
          <text:p text:style-name="P12"><text:span text:style-name="Strong_20_Emphasis">On success:</text:span> Populates the placeholders in the Payment Summary box with live data. </text:p>
        </text:list-item>
        <text:list-item>
          <text:p text:style-name="P11"><text:span text:style-name="Strong_20_Emphasis">On error:</text:span> Displays a fallback message: <text:span text:style-name="Emphasis">"Unable to connect to server – using cached values."</text:span> </text:p>
        </text:list-item>
      </text:list>
      <text:h text:style-name="Heading_20_3" text:outline-level="3">Fallback / Offline Values</text:h>
      <text:p text:style-name="Text_20_body">If the macro cannot reach the internal server (e.g., no network, server down), the following cached values will be used:</text:p>
      <text:list xml:id="list4125790827" text:style-name="L3">
        <text:list-item>
          <text:p text:style-name="P14">Subtotal: <text:span text:style-name="T4">{PLACEHOLDER_CACHED_SUBTOTAL}</text:span> </text:p>
        </text:list-item>
        <text:list-item>
          <text:p text:style-name="P14">Tax: <text:span text:style-name="T4">{PLACEHOLDER_CACHED_TAX}</text:span> </text:p>
        </text:list-item>
        <text:list-item>
          <text:p text:style-name="P14">Discount: <text:span text:style-name="T4">{PLACEHOLDER_CACHED_DISCOUNT}</text:span> </text:p>
        </text:list-item>
        <text:list-item>
          <text:p text:style-name="P13">Total: <text:span text:style-name="T4">{PLACEHOLDER_CACHED_TOTAL}</text:span> </text:p>
        </text:list-item>
      </text:list>
      <text:h text:style-name="Heading_20_2" text:outline-level="2">Terms &amp; Conditions</text:h>
      <text:list xml:id="list1132565324" text:style-name="L4">
        <text:list-item>
          <text:p text:style-name="P16"><text:span text:style-name="Strong_20_Emphasis">Payment due:</text:span> within 30 days of invoice date. Late payments subject to 1.5% monthly interest. </text:p>
        </text:list-item>
        <text:list-item>
          <text:p text:style-name="P16"><text:span text:style-name="Strong_20_Emphasis">Disputes:</text:span> must be raised in writing within 5 business days of receipt. </text:p>
        </text:list-item>
        <text:list-item>
          <text:p text:style-name="P16"><text:span text:style-name="Strong_20_Emphasis">Confidentiality:</text:span> all deliverables and this invoice are confidential under NDA. </text:p>
        </text:list-item>
        <text:list-item>
          <text:p text:style-name="P16"><text:span text:style-name="Strong_20_Emphasis">Governing law:</text:span> laws of the State of {PLACEHOLDER_STATE}, without regard to conflict of law provisions. </text:p>
        </text:list-item>
        <text:list-item>
          <text:p text:style-name="P15"><text:span text:style-name="Strong_20_Emphasis">Macro usage:</text:span> by enabling macros, you consent to the automatic retrieval of payment summary data from the company’s internal server. No personal data is transmitted beyond invoice metadata. </text:p>
        </text:list-item>
      </text:list>
      <text:p text:style-name="P18"><text:span text:style-name="Strong_20_Emphasis"><text:span text:style-name="T13">Company Name:</text:span></text:span><text:span text:style-name="T13"> {PLACEHOLDER_COMPANY_NAME}  |  </text:span><text:span text:style-name="Strong_20_Emphasis"><text:span text:style-name="T13">Address:</text:span></text:span><text:span text:style-name="T13"> {PLACEHOLDER_COMPANY_ADDRESS}  |  </text:span><text:span text:style-name="Strong_20_Emphasis"><text:span text:style-name="T13">VAT ID:</text:span></text:span><text:span text:style-name="T13"> {PLACEHOLDER_VAT_ID}</text:span></text:p>
      <text:p text:style-name="P18"><text:span text:style-name="Strong_20_Emphasis"><text:span text:style-name="T13">Contact:</text:span></text:span><text:span text:style-name="T13"> {PLACEHOLDER_CONTACT_EMAIL}  |  {PLACEHOLDER_CONTACT_PHONE}</text:span></text:p>
      <text:p text:style-name="P17">Thank you for your business. This document was generated automatically with macro-enabled features.</text:p>
      <text:p text:style-name="P18"><text:span text:style-name="Emphasis"><text:span text:style-name="T13">Document version: 2.3.1 – Security Evaluation Templat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'Segoe UI', Arial, sans-serif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9839in" fo:margin-bottom="0.7874in" style:contextual-spacing="false" fo:line-height="150%" fo:text-indent="0in" style:auto-text-indent="false"/>
      <style:text-properties fo:color="#1f2a3a" loext:opacity="100%" style:font-name="Calibri" fo:font-family="Calibri, 'Segoe UI', Arial, sans-serif" style:font-name-asian="Calibri" style:font-family-asian="Calibri, 'Segoe UI', Arial, sans-serif" style:font-name-complex="Calibri" style:font-family-complex="Calibri, 'Segoe UI'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626in" style:contextual-spacing="false" fo:padding-left="0in" fo:padding-right="0in" fo:padding-top="0in" fo:padding-bottom="0.0835in" fo:border-left="none" fo:border-right="none" fo:border-top="none" fo:border-bottom="2.24pt solid #1e3a5f"/>
      <style:text-properties fo:color="#1e3a5f" loext:opacity="100%" style:font-name="Liberation Sans Unicode MS" fo:font-family="'Liberation Sans Unicode MS'" style:font-pitch="variable" fo:font-size="28pt" fo:letter-spacing="0.0102in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626in" fo:margin-right="0.0626in" fo:margin-top="0.0626in" fo:margin-bottom="0.0626in" style:contextual-spacing="false" fo:text-indent="0in" style:auto-text-indent="false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 fo:padding-left="0.1252in" fo:padding-right="0in" fo:padding-top="0in" fo:padding-bottom="0in" fo:border-left="4.51pt solid #2c4c7c" fo:border-right="none" fo:border-top="none" fo:border-bottom="none"/>
      <style:text-properties fo:color="#2c4c7c" loext:opacity="100%"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874in" fo:margin-bottom="0.0626in" style:contextual-spacing="false"/>
      <style:text-properties fo:color="#3a5a8a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1f2a3a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voice Template – Payment Summary with Macro</dc:title>
    <meta:document-statistic meta:table-count="2" meta:image-count="0" meta:object-count="0" meta:page-count="1" meta:paragraph-count="81" meta:word-count="468" meta:character-count="4022" meta:non-whitespace-character-count="3622"/>
    <meta:generator>LibreOffice/7.3.7.2$Linux_X86_64 LibreOffice_project/30$Build-2</meta:generator>
    <meta:user-defined meta:name=""/>
  </office:meta>
</office:document-meta>
</file>