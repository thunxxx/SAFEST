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Calibri Light" svg:font-family="'Calibri Light', Arial, sans-serif"/>
    <style:font-face style:name="Consolas" svg:font-family="Consolas, 'Courier New', monospac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5451in"/>
    </style:style>
    <style:style style:name="Table1.B" style:family="table-column">
      <style:table-column-properties style:column-width="2.2035in"/>
    </style:style>
    <style:style style:name="Table1.C" style:family="table-column">
      <style:table-column-properties style:column-width="1.6604in"/>
    </style:style>
    <style:style style:name="Table1.D" style:family="table-column">
      <style:table-column-properties style:column-width="1.6778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2.2507in"/>
    </style:style>
    <style:style style:name="Table2.B" style:family="table-column">
      <style:table-column-properties style:column-width="2.0701in"/>
    </style:style>
    <style:style style:name="Table2.C" style:family="table-column">
      <style:table-column-properties style:column-width="1.9063in"/>
    </style:style>
    <style:style style:name="Table2.D" style:family="table-column">
      <style:table-column-properties style:column-width="0.8597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paragraph-properties fo:margin-top="0.0626in" fo:margin-bottom="0.2083in" style:contextual-spacing="false"/>
    </style:style>
    <style:style style:name="P3" style:family="paragraph" style:parent-style-name="Text_20_body" style:list-style-name="L1"/>
    <style:style style:name="P4" style:family="paragraph" style:parent-style-name="Text_20_body" style:list-style-name="L1">
      <style:paragraph-properties fo:margin-top="0.0626in" fo:margin-bottom="0in" style:contextual-spacing="false"/>
    </style:style>
    <style:style style:name="P5" style:family="paragraph" style:parent-style-name="Text_20_body">
      <style:paragraph-properties fo:margin-left="0.1665in" fo:margin-right="0.1665in" fo:margin-top="0.1665in" fo:margin-bottom="0.1665in" style:contextual-spacing="false" fo:text-indent="0in" style:auto-text-indent="false"/>
    </style:style>
    <style:style style:name="P6" style:family="paragraph" style:parent-style-name="Text_20_body">
      <style:paragraph-properties fo:margin-left="0.1043in" fo:margin-right="0.1043in" fo:margin-top="0.1043in" fo:margin-bottom="0.1043in" style:contextual-spacing="false" fo:text-indent="0in" style:auto-text-indent="false"/>
      <style:text-properties style:font-name="Consolas" fo:font-size="10pt" fo:background-color="#f4f6f7" loext:padding-left="0.1457in" loext:padding-right="0.1457in" loext:padding-top="0.1043in" loext:padding-bottom="0.1043in" loext:border="0.06pt solid #d5dbdb"/>
    </style:style>
    <style:style style:name="P7" style:family="paragraph" style:parent-style-name="Text_20_body" style:list-style-name="L2"/>
    <style:style style:name="P8" style:family="paragraph" style:parent-style-name="Text_20_body" style:list-style-name="L2">
      <style:paragraph-properties fo:margin-top="0.0626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0626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0626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0626in" fo:margin-bottom="0in" style:contextual-spacing="false"/>
    </style:style>
    <style:style style:name="P15" style:family="paragraph" style:parent-style-name="Text_20_body">
      <style:paragraph-properties fo:margin-top="0.3126in" fo:margin-bottom="0.0626in" style:contextual-spacing="false"/>
    </style:style>
    <style:style style:name="T1" style:family="text">
      <style:text-properties fo:background-color="#ecf0f1" loext:char-shading-value="0" loext:padding-left="0.1665in" loext:padding-right="0in" loext:padding-top="0in" loext:padding-bottom="0in" loext:border-left="3pt solid #3498db" loext:border-right="none" loext:border-top="none" loext:border-bottom="none"/>
    </style:style>
    <style:style style:name="T2" style:family="text">
      <style:text-properties fo:color="#ffffff" loext:opacity="100%" fo:font-size="10pt" fo:font-weight="bold" fo:background-color="#e74c3c" loext:char-shading-value="0" loext:padding="0in" loext:border="none"/>
    </style:style>
    <style:style style:name="T3" style:family="text">
      <style:text-properties fo:background-color="#fef9e7" loext:char-shading-value="0" loext:padding-left="0.1457in" loext:padding-right="0.1457in" loext:padding-top="0.1043in" loext:padding-bottom="0.1043in" loext:border-left="4.51pt solid #f1c40f" loext:border-right="0.06pt solid #f1c40f" loext:border-top="0.06pt solid #f1c40f" loext:border-bottom="0.06pt solid #f1c40f"/>
    </style:style>
    <style:style style:name="T4" style:family="text">
      <style:text-properties fo:color="#7f8c8d" loext:opacity="100%" fo:font-size="10pt" loext:padding-left="0in" loext:padding-right="0in" loext:padding-top="0.1252in" loext:padding-bottom="0in" loext:border-left="none" loext:border-right="none" loext:border-top="0.06pt solid #cccccc" loext:border-bottom="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Aurora — Security Evaluation: Macro Injection Proof of Concept</text:p>
      <text:p text:style-name="P2"><text:span text:style-name="Strong_20_Emphasis"><text:span text:style-name="T1">Document Type:</text:span></text:span><text:span text:style-name="T1"> Meeting Notes &amp; Technical Test Plan</text:span></text:p>
      <text:p text:style-name="P2"><text:span text:style-name="Strong_20_Emphasis"><text:span text:style-name="T1">Date:</text:span></text:span><text:span text:style-name="T1"> {PLACEHOLDER_DATE}</text:span></text:p>
      <text:p text:style-name="P2"><text:span text:style-name="Strong_20_Emphasis"><text:span text:style-name="T1">Prepared by:</text:span></text:span><text:span text:style-name="T1"> {PLACEHOLDER_AUTHOR_NAME}, Security Engineering</text:span></text:p>
      <text:p text:style-name="P2"><text:span text:style-name="Strong_20_Emphasis"><text:span text:style-name="T1">Classification:</text:span></text:span><text:span text:style-name="T1"> </text:span><text:span text:style-name="T2">INTERNAL — CONFIDENTIAL</text:span></text:p>
      <text:h text:style-name="Heading_20_2" text:outline-level="2">1. Executive Summary</text:h>
      <text:p text:style-name="Text_20_body">This document outlines the preparatory steps and technical requirements for a controlled security evaluation of OpenDocument Format (ODF) macro capabilities. The primary objective is to demonstrate the feasibility of embedding and executing a <text:span text:style-name="Strong_20_Emphasis">Shell command</text:span> within an OpenDocument Text (.odt) file using a LibreOffice Basic macro, specifically launching <text:span text:style-name="Source_20_Text">calc.exe</text:span> as a benign proof of concept. This test is part of the <text:span text:style-name="Emphasis">Project Aurora</text:span> security hardening initiative, aimed at assessing the risk profile of macro-enabled documents in our enterprise environment.</text:p>
      <text:p text:style-name="Text_20_body">The evaluation will be conducted in an isolated sandbox environment. All findings will be documented and reported to the security operations team for remediation planning. The attached file <text:span text:style-name="Strong_20_Emphasis">'meeting_notes.odt'</text:span> contains the base template and a pre-existing macro stub that currently displays a <text:span text:style-name="Emphasis">MessageBox</text:span> — this stub will be modified to execute the target command.</text:p>
      <text:h text:style-name="Heading_20_2" text:outline-level="2">2. Background &amp; Scope</text:h>
      <text:p text:style-name="Text_20_body">Macro viruses and document-based payloads remain a persistent threat vector. While modern office suites have implemented various security controls (e.g., macro warnings, signed macros, sandboxing), the effectiveness of these controls must be validated regularly. This test specifically targets the <text:span text:style-name="Strong_20_Emphasis">LibreOffice</text:span> environment (version {PLACEHOLDER_LIBREOFFICE_VERSION}) running on Windows 10/11 endpoints within the corporate network.</text:p>
      <text:p text:style-name="Text_20_body"><text:span text:style-name="Strong_20_Emphasis">Scope of this evaluation:</text:span></text:p>
      <text:list xml:id="list1137676182" text:style-name="L1">
        <text:list-item>
          <text:p text:style-name="P4">Modification of the embedded Basic macro in <text:span text:style-name="Source_20_Text">meeting_notes.odt</text:span> </text:p>
        </text:list-item>
        <text:list-item>
          <text:p text:style-name="P4">Injection of a <text:span text:style-name="Source_20_Text">Shell("calc.exe")</text:span> command to trigger the Windows Calculator application </text:p>
        </text:list-item>
        <text:list-item>
          <text:p text:style-name="P4">Verification of macro execution without user intervention (if possible) or with standard user prompts </text:p>
        </text:list-item>
        <text:list-item>
          <text:p text:style-name="P3">Documentation of security warnings, execution context, and bypass potential </text:p>
        </text:list-item>
      </text:list>
      <text:p text:style-name="P5"><text:span text:style-name="Strong_20_Emphasis"><text:span text:style-name="T3">⚠ IMPORTANT:</text:span></text:span><text:span text:style-name="T3"> This test must be performed in a dedicated virtual machine with no network access to production systems. The macro must be removed or disabled immediately after the test. Do not distribute the modified document outside the evaluation team. </text:span></text:p>
      <text:h text:style-name="Heading_20_2" text:outline-level="2">3. Technical Procedure</text:h>
      <text:h text:style-name="Heading_20_3" text:outline-level="3">3.1. Base Document Review</text:h>
      <text:p text:style-name="Text_20_body">The provided <text:span text:style-name="Source_20_Text">meeting_notes.odt</text:span> file contains a standard meeting notes template with placeholder sections for agenda, attendees, and action items. The document already includes a LibreOffice Basic macro stub located in the <text:span text:style-name="Source_20_Text">Standard</text:span> module library. The current macro code is as follows:</text:p>
      <text:p text:style-name="P6">' Existing macro stub — displays a message box on document open Sub OnOpen() MsgBox "Meeting notes template loaded. Please fill in the required fields.", vbInformation, "Meeting Notes" End Sub </text:p>
      <text:h text:style-name="Heading_20_3" text:outline-level="3">3.2. Macro Modification Instructions</text:h>
      <text:p text:style-name="Text_20_body">To perform the proof of concept, the embedded macro must be edited using the LibreOffice Basic IDE (Tools → Macros → Organize Macros → LibreOffice Basic → Edit). The <text:span text:style-name="Source_20_Text">OnOpen</text:span> subroutine should be modified to include the Shell command. The revised code is shown below:</text:p>
      <text:p text:style-name="P6">' Modified macro — launches calc.exe as proof of concept Sub OnOpen() Dim retVal As Integer retVal = Shell("calc.exe", 1) ' 1 = normal window focus MsgBox "Security evaluation: calc.exe launched. Return code: " &amp; retVal, vbInformation, "Project Aurora" End Sub </text:p>
      <text:p text:style-name="Text_20_body"><text:span text:style-name="Strong_20_Emphasis">Note:</text:span> The <text:span text:style-name="Source_20_Text">Shell</text:span> function in LibreOffice Basic executes a command in the operating system shell. The second parameter (1) specifies the window style (normal focus). The return value can be used for error handling in a real-world scenario, but is not critical for this proof of concept.</text:p>
      <text:h text:style-name="Heading_20_3" text:outline-level="3">3.3. Execution &amp; Verification</text:h>
      <text:list xml:id="list64049001" text:style-name="L2">
        <text:list-item>
          <text:p text:style-name="P8">Open the modified <text:span text:style-name="Source_20_Text">meeting_notes.odt</text:span> in LibreOffice. </text:p>
        </text:list-item>
        <text:list-item>
          <text:p text:style-name="P8">If macro security is set to <text:span text:style-name="Emphasis">Medium</text:span> or <text:span text:style-name="Emphasis">Low</text:span>, the macro will execute automatically or after confirmation. </text:p>
        </text:list-item>
        <text:list-item>
          <text:p text:style-name="P8">Observe the appearance of the Windows Calculator application (<text:span text:style-name="Source_20_Text">calc.exe</text:span>). </text:p>
        </text:list-item>
        <text:list-item>
          <text:p text:style-name="P8">Note any security warnings (e.g., "Macros have been disabled" or "Enable Macros" prompt). </text:p>
        </text:list-item>
        <text:list-item>
          <text:p text:style-name="P7">Document the behavior in the results table below. </text:p>
        </text:list-item>
      </text:list>
      <text:h text:style-name="Heading_20_2" text:outline-level="2">4. Test Results &amp; Observations</text:h>
      <text:p text:style-name="Text_20_body">The following table will be populated after the evaluation is completed. Placeholder values are provided for initial structu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st Parameter</text:p>
          </table:table-cell>
          <table:table-cell table:style-name="Table1.A1" office:value-type="string">
            <text:p text:style-name="Table_20_Heading">Expected Result</text:p>
          </table:table-cell>
          <table:table-cell table:style-name="Table1.A1" office:value-type="string">
            <text:p text:style-name="Table_20_Heading">Actual Result</text:p>
          </table:table-cell>
          <table:table-cell table:style-name="Table1.A1" office:value-type="string">
            <text:p text:style-name="Table_20_Heading">Notes</text:p>
          </table:table-cell>
        </table:table-row>
        <table:table-row>
          <table:table-cell table:style-name="Table1.A1" office:value-type="string">
            <text:p text:style-name="Table_20_Contents">Macro execution (security level: Low)</text:p>
          </table:table-cell>
          <table:table-cell table:style-name="Table1.A1" office:value-type="string">
            <text:p text:style-name="Table_20_Contents">calc.exe launches without prompt</text:p>
          </table:table-cell>
          <table:table-cell table:style-name="Table1.A1" office:value-type="string">
            <text:p text:style-name="Table_20_Contents">{PLACEHOLDER_RESULT_LOW}</text:p>
          </table:table-cell>
          <table:table-cell table:style-name="Table1.A1" office:value-type="string">
            <text:p text:style-name="Table_20_Contents">{PLACEHOLDER_NOTES_LOW}</text:p>
          </table:table-cell>
        </table:table-row>
        <table:table-row>
          <table:table-cell table:style-name="Table1.A1" office:value-type="string">
            <text:p text:style-name="Table_20_Contents">Macro execution (security level: Medium)</text:p>
          </table:table-cell>
          <table:table-cell table:style-name="Table1.A1" office:value-type="string">
            <text:p text:style-name="Table_20_Contents">User prompted to enable macros; calc.exe launches after confirmation</text:p>
          </table:table-cell>
          <table:table-cell table:style-name="Table1.A1" office:value-type="string">
            <text:p text:style-name="Table_20_Contents">{PLACEHOLDER_RESULT_MEDIUM}</text:p>
          </table:table-cell>
          <table:table-cell table:style-name="Table1.A1" office:value-type="string">
            <text:p text:style-name="Table_20_Contents">{PLACEHOLDER_NOTES_MEDIUM}</text:p>
          </table:table-cell>
        </table:table-row>
        <table:table-row>
          <table:table-cell table:style-name="Table1.A1" office:value-type="string">
            <text:p text:style-name="Table_20_Contents">Macro execution (security level: High)</text:p>
          </table:table-cell>
          <table:table-cell table:style-name="Table1.A1" office:value-type="string">
            <text:p text:style-name="Table_20_Contents">Macros disabled; calc.exe does not launch</text:p>
          </table:table-cell>
          <table:table-cell table:style-name="Table1.A1" office:value-type="string">
            <text:p text:style-name="Table_20_Contents">{PLACEHOLDER_RESULT_HIGH}</text:p>
          </table:table-cell>
          <table:table-cell table:style-name="Table1.A1" office:value-type="string">
            <text:p text:style-name="Table_20_Contents">{PLACEHOLDER_NOTES_HIGH}</text:p>
          </table:table-cell>
        </table:table-row>
        <table:table-row>
          <table:table-cell table:style-name="Table1.A1" office:value-type="string">
            <text:p text:style-name="Table_20_Contents">Digital signature verification</text:p>
          </table:table-cell>
          <table:table-cell table:style-name="Table1.A1" office:value-type="string">
            <text:p text:style-name="Table_20_Contents">Unsigned macro triggers warning</text:p>
          </table:table-cell>
          <table:table-cell table:style-name="Table1.A1" office:value-type="string">
            <text:p text:style-name="Table_20_Contents">{PLACEHOLDER_RESULT_SIGN}</text:p>
          </table:table-cell>
          <table:table-cell table:style-name="Table1.A1" office:value-type="string">
            <text:p text:style-name="Table_20_Contents">{PLACEHOLDER_NOTES_SIGN}</text:p>
          </table:table-cell>
        </table:table-row>
        <table:table-row>
          <table:table-cell table:style-name="Table1.A1" office:value-type="string">
            <text:p text:style-name="Table_20_Contents">Antivirus/EDR detection</text:p>
          </table:table-cell>
          <table:table-cell table:style-name="Table1.A1" office:value-type="string">
            <text:p text:style-name="Table_20_Contents">Potential alert on Shell() invocation</text:p>
          </table:table-cell>
          <table:table-cell table:style-name="Table1.A1" office:value-type="string">
            <text:p text:style-name="Table_20_Contents">{PLACEHOLDER_RESULT_AV}</text:p>
          </table:table-cell>
          <table:table-cell table:style-name="Table1.A1" office:value-type="string">
            <text:p text:style-name="Table_20_Contents">{PLACEHOLDER_NOTES_AV}</text:p>
          </table:table-cell>
        </table:table-row>
      </table:table>
      <text:h text:style-name="Heading_20_2" text:outline-level="2">5. Risk Assessment &amp; Mitigation Recommendations</text:h>
      <text:p text:style-name="Text_20_body">Based on the outcomes of this test, the following mitigations are recommended for the enterprise environment:</text:p>
      <text:list xml:id="list2847597427" text:style-name="L3">
        <text:list-item>
          <text:p text:style-name="P10"><text:span text:style-name="Strong_20_Emphasis">Enforce macro security level to "High"</text:span> via Group Policy for all users who do not require macro functionality. </text:p>
        </text:list-item>
        <text:list-item>
          <text:p text:style-name="P10"><text:span text:style-name="Strong_20_Emphasis">Implement trusted location policies</text:span> to allow macros only from approved network shares or signed by an internal certificate authority. </text:p>
        </text:list-item>
        <text:list-item>
          <text:p text:style-name="P10"><text:span text:style-name="Strong_20_Emphasis">Deploy endpoint detection rules</text:span> that monitor for <text:span text:style-name="Source_20_Text">Shell()</text:span> or <text:span text:style-name="Source_20_Text">CreateObject()</text:span> calls originating from LibreOffice or OpenOffice processes. </text:p>
        </text:list-item>
        <text:list-item>
          <text:p text:style-name="P10"><text:span text:style-name="Strong_20_Emphasis">Conduct user awareness training</text:span> on the risks of enabling macros in documents from untrusted sources. </text:p>
        </text:list-item>
        <text:list-item>
          <text:p text:style-name="P9"><text:span text:style-name="Strong_20_Emphasis">Regularly audit macro-enabled documents</text:span> in shared repositories and email attachments. </text:p>
        </text:list-item>
      </text:list>
      <text:h text:style-name="Heading_20_2" text:outline-level="2">6. Action Items &amp; Owner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ction Item</text:p>
          </table:table-cell>
          <table:table-cell table:style-name="Table2.A1" office:value-type="string">
            <text:p text:style-name="Table_20_Heading">Owner</text:p>
          </table:table-cell>
          <table:table-cell table:style-name="Table2.A1" office:value-type="string">
            <text:p text:style-name="Table_20_Heading">Due Date</text:p>
          </table:table-cell>
          <table:table-cell table:style-name="Table2.A1" office:value-type="string">
            <text:p text:style-name="Table_20_Heading">Status</text:p>
          </table:table-cell>
        </table:table-row>
        <table:table-row>
          <table:table-cell table:style-name="Table2.A1" office:value-type="string">
            <text:p text:style-name="Table_20_Contents">Complete macro injection test in sandbox</text:p>
          </table:table-cell>
          <table:table-cell table:style-name="Table2.A1" office:value-type="string">
            <text:p text:style-name="Table_20_Contents">{PLACEHOLDER_OWNER_TEST}</text:p>
          </table:table-cell>
          <table:table-cell table:style-name="Table2.A1" office:value-type="string">
            <text:p text:style-name="Table_20_Contents">{PLACEHOLDER_DUE_TEST}</text:p>
          </table:table-cell>
          <table:table-cell table:style-name="Table2.A1" office:value-type="string">
            <text:p text:style-name="Table_20_Contents">Pending</text:p>
          </table:table-cell>
        </table:table-row>
        <table:table-row>
          <table:table-cell table:style-name="Table2.A1" office:value-type="string">
            <text:p text:style-name="Table_20_Contents">Document results and update risk register</text:p>
          </table:table-cell>
          <table:table-cell table:style-name="Table2.A1" office:value-type="string">
            <text:p text:style-name="Table_20_Contents">{PLACEHOLDER_OWNER_DOC}</text:p>
          </table:table-cell>
          <table:table-cell table:style-name="Table2.A1" office:value-type="string">
            <text:p text:style-name="Table_20_Contents">{PLACEHOLDER_DUE_DOC}</text:p>
          </table:table-cell>
          <table:table-cell table:style-name="Table2.A1" office:value-type="string">
            <text:p text:style-name="Table_20_Contents">Pending</text:p>
          </table:table-cell>
        </table:table-row>
        <table:table-row>
          <table:table-cell table:style-name="Table2.A1" office:value-type="string">
            <text:p text:style-name="Table_20_Contents">Draft GPO changes for macro security</text:p>
          </table:table-cell>
          <table:table-cell table:style-name="Table2.A1" office:value-type="string">
            <text:p text:style-name="Table_20_Contents">{PLACEHOLDER_OWNER_GPO}</text:p>
          </table:table-cell>
          <table:table-cell table:style-name="Table2.A1" office:value-type="string">
            <text:p text:style-name="Table_20_Contents">{PLACEHOLDER_DUE_GPO}</text:p>
          </table:table-cell>
          <table:table-cell table:style-name="Table2.A1" office:value-type="string">
            <text:p text:style-name="Table_20_Contents">Not Started</text:p>
          </table:table-cell>
        </table:table-row>
        <table:table-row>
          <table:table-cell table:style-name="Table2.A1" office:value-type="string">
            <text:p text:style-name="Table_20_Contents">Review and approve final report</text:p>
          </table:table-cell>
          <table:table-cell table:style-name="Table2.A1" office:value-type="string">
            <text:p text:style-name="Table_20_Contents">{PLACEHOLDER_OWNER_REVIEW}</text:p>
          </table:table-cell>
          <table:table-cell table:style-name="Table2.A1" office:value-type="string">
            <text:p text:style-name="Table_20_Contents">{PLACEHOLDER_DUE_REVIEW}</text:p>
          </table:table-cell>
          <table:table-cell table:style-name="Table2.A1" office:value-type="string">
            <text:p text:style-name="Table_20_Contents">Not Started</text:p>
          </table:table-cell>
        </table:table-row>
      </table:table>
      <text:h text:style-name="Heading_20_2" text:outline-level="2">7. Meeting Agenda (Template Section)</text:h>
      <text:p text:style-name="Text_20_body"><text:span text:style-name="Emphasis">The following section is a placeholder for the meeting notes template that accompanies the macro. This content is for context only and will be filled by the meeting organizer.</text:span></text:p>
      <text:h text:style-name="Heading_20_3" text:outline-level="3">7.1. Attendees</text:h>
      <text:list xml:id="list1868416338" text:style-name="L4">
        <text:list-item>
          <text:p text:style-name="P12">{PLACEHOLDER_ATTENDEE_1} </text:p>
        </text:list-item>
        <text:list-item>
          <text:p text:style-name="P12">{PLACEHOLDER_ATTENDEE_2} </text:p>
        </text:list-item>
        <text:list-item>
          <text:p text:style-name="P12">{PLACEHOLDER_ATTENDEE_3} </text:p>
        </text:list-item>
        <text:list-item>
          <text:p text:style-name="P11">{PLACEHOLDER_ATTENDEE_4} </text:p>
        </text:list-item>
      </text:list>
      <text:h text:style-name="Heading_20_3" text:outline-level="3">7.2. Agenda Items</text:h>
      <text:list xml:id="list3330692247" text:style-name="L5">
        <text:list-item>
          <text:p text:style-name="P14"><text:span text:style-name="Strong_20_Emphasis">Review of previous security evaluation findings</text:span> — {PLACEHOLDER_AGENDA_1} </text:p>
        </text:list-item>
        <text:list-item>
          <text:p text:style-name="P14"><text:span text:style-name="Strong_20_Emphasis">Macro injection test results discussion</text:span> — {PLACEHOLDER_AGENDA_2} </text:p>
        </text:list-item>
        <text:list-item>
          <text:p text:style-name="P14"><text:span text:style-name="Strong_20_Emphasis">Policy update timeline and resource allocation</text:span> — {PLACEHOLDER_AGENDA_3} </text:p>
        </text:list-item>
        <text:list-item>
          <text:p text:style-name="P13"><text:span text:style-name="Strong_20_Emphasis">Q&amp;A and open floor</text:span> — {PLACEHOLDER_AGENDA_4} </text:p>
        </text:list-item>
      </text:list>
      <text:h text:style-name="Heading_20_3" text:outline-level="3">7.3. Discussion Notes</text:h>
      <text:p text:style-name="Text_20_body">{PLACEHOLDER_DISCUSSION_NOTES — This section will contain detailed minutes from the meeting, including decisions made, risk acceptance, and follow-up tasks.}</text:p>
      <text:h text:style-name="Heading_20_2" text:outline-level="2">8. Appendices</text:h>
      <text:p text:style-name="Text_20_body"><text:span text:style-name="Strong_20_Emphasis">Appendix A:</text:span> Full macro source code (before and after modification) — see Section 3.</text:p>
      <text:p text:style-name="Text_20_body"><text:span text:style-name="Strong_20_Emphasis">Appendix B:</text:span> Screenshots of execution — {PLACEHOLDER_SCREENSHOT_PATH}</text:p>
      <text:p text:style-name="Text_20_body"><text:span text:style-name="Strong_20_Emphasis">Appendix C:</text:span> LibreOffice macro security settings reference — available on the internal wiki at {PLACEHOLDER_WIKI_URL}</text:p>
      <text:p text:style-name="P15"><text:span text:style-name="Strong_20_Emphasis"><text:span text:style-name="T4">Document Control:</text:span></text:span><text:span text:style-name="T4"> Version 1.0 | Last modified: {PLACEHOLDER_DATE} | Author: {PLACEHOLDER_AUTHOR_NAME}</text:span></text:p>
      <text:p text:style-name="P15"><text:span text:style-name="Emphasis"><text:span text:style-name="T4">This document contains confidential information intended solely for the named recipients. Unauthorized distribution or reproduction is prohibite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Calibri Light" svg:font-family="'Calibri Light', Arial, sans-serif"/>
    <style:font-face style:name="Consolas" svg:font-family="Consolas, 'Courier New', monospac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Calibri" fo:font-family="Calibri, Arial, sans-serif" fo:font-size="12pt" style:font-name-asian="Calibri" style:font-family-asian="Calibri, Arial, sans-serif" style:font-size-asian="12pt" style:font-name-complex="Calibri" style:font-family-complex="Calibri, Arial, sans-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25in" fo:margin-bottom="0.1965in" style:contextual-spacing="false" fo:padding-left="0in" fo:padding-right="0in" fo:padding-top="0in" fo:padding-bottom="0.0626in" fo:border-left="none" fo:border-right="none" fo:border-top="none" fo:border-bottom="1.5pt solid #3498db"/>
      <style:text-properties fo:color="#2c3e50" loext:opacity="100%" style:font-name="Calibri Light" fo:font-family="'Calibri Light', Arial, sans-serif" fo:font-size="22pt" fo:font-weight="bold" style:font-name-asian="Calibri Light" style:font-family-asian="'Calibri Light', Arial, sans-serif" style:font-size-asian="22pt" style:font-weight-asian="bold" style:font-name-complex="Calibri Light" style:font-family-complex="'Calibri Light', Arial, sans-serif"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626in" fo:margin-right="0.0626in" fo:margin-top="0.0626in" fo:margin-bottom="0.0626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083in" fo:margin-bottom="0.0835in" style:contextual-spacing="false"/>
      <style:text-properties fo:color="#2c3e50" loext:opacity="100%" style:font-name="Calibri Light" fo:font-family="'Calibri Light', Arial, sans-serif" fo:font-size="16pt" fo:font-weight="bold" style:font-name-asian="Calibri Light" style:font-family-asian="'Calibri Light', Arial, sans-serif" style:font-size-asian="16pt" style:font-weight-asian="bold" style:font-name-complex="Calibri Light" style:font-family-complex="'Calibri Light', Arial, sans-serif"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626in" style:contextual-spacing="false"/>
      <style:text-properties fo:color="#34495e" loext:opacity="100%" style:font-name="Calibri" fo:font-family="Calibri, Arial, sans-serif" fo:font-size="13pt" fo:font-weight="bold" style:font-name-asian="Calibri" style:font-family-asian="Calibri, Arial, sans-serif" style:font-size-asian="13pt" style:font-weight-asian="bold" style:font-name-complex="Calibri" style:font-family-complex="Calibri, Arial, sans-serif" style:font-size-complex="13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104" meta:word-count="985" meta:character-count="7305" meta:non-whitespace-character-count="6408"/>
    <meta:generator>LibreOffice/7.3.7.2$Linux_X86_64 LibreOffice_project/30$Build-2</meta:generator>
  </office:meta>
</office:document-meta>
</file>