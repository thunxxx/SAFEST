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automatic-styles>
    <style:style style:name="Table1" style:family="table">
      <style:table-properties style:width="7.0868in" table:align="left"/>
    </style:style>
    <style:style style:name="Table1.A" style:family="table-column">
      <style:table-column-properties style:column-width="2.4521in"/>
    </style:style>
    <style:style style:name="Table1.B" style:family="table-column">
      <style:table-column-properties style:column-width="2.4201in"/>
    </style:style>
    <style:style style:name="Table1.C" style:family="table-column">
      <style:table-column-properties style:column-width="2.2146in"/>
    </style:style>
    <style:style style:name="Table1.A1" style:family="table-cell">
      <style:table-cell-properties style:vertical-align="middle" fo:padding="0.0194in" fo:border="none"/>
    </style:style>
    <style:style style:name="P1" style:family="paragraph" style:parent-style-name="Heading_20_2">
      <style:paragraph-properties fo:margin-top="0.0555in" fo:margin-bottom="0.139in" style:contextual-spacing="false"/>
    </style:style>
    <style:style style:name="P2" style:family="paragraph" style:parent-style-name="Table_20_Contents">
      <style:paragraph-properties fo:text-align="center" style:justify-single-word="false"/>
      <style:text-properties fo:color="#7d6608" loext:opacity="100%" fo:font-style="italic" fo:background-color="#fef9e7" loext:padding-left="0in" loext:padding-right="0in" loext:padding-top="0in" loext:padding-bottom="0.0193in" loext:border-left="none" loext:border-right="none" loext:border-top="none" loext:border-bottom="0.06pt dashed #b7950b"/>
    </style:style>
    <style:style style:name="P3" style:family="paragraph" style:parent-style-name="Table_20_Contents">
      <style:paragraph-properties fo:text-align="center" style:justify-single-word="false"/>
    </style:style>
    <style:style style:name="P4" style:family="paragraph" style:parent-style-name="Text_20_body" style:master-page-name="HTML">
      <style:paragraph-properties fo:margin-top="0.0555in" fo:margin-bottom="0.25in" style:contextual-spacing="false" fo:text-align="center" style:justify-single-word="false" style:page-number="auto"/>
      <style:text-properties fo:color="#a93226" loext:opacity="100%" fo:font-weight="bold" loext:padding-left="0.1665in" loext:padding-right="0.1665in" loext:padding-top="0.0555in" loext:padding-bottom="0.0555in" loext:border="0.06pt solid #a93226"/>
    </style:style>
    <style:style style:name="P5" style:family="paragraph" style:parent-style-name="Text_20_body">
      <style:paragraph-properties fo:margin-top="0.0555in" fo:margin-bottom="0.3335in" style:contextual-spacing="false" fo:text-align="end" style:justify-single-word="false"/>
      <style:text-properties fo:font-size="11pt"/>
    </style:style>
    <style:style style:name="P6" style:family="paragraph" style:parent-style-name="Text_20_body">
      <style:paragraph-properties fo:margin-top="0.4165in" fo:margin-bottom="0.0555in" style:contextual-spacing="false"/>
      <style:text-properties fo:font-size="11pt"/>
    </style:style>
    <style:style style:name="P7" style:family="paragraph" style:parent-style-name="Text_20_body">
      <style:paragraph-properties fo:margin-top="0.0555in" fo:margin-bottom="0.3335in" style:contextual-spacing="false" fo:text-align="end" style:justify-single-word="false"/>
    </style:style>
    <style:style style:name="P8" style:family="paragraph" style:parent-style-name="Text_20_body">
      <style:paragraph-properties fo:margin-top="0.0555in" fo:margin-bottom="0.25in" style:contextual-spacing="false"/>
      <style:text-properties fo:color="#7d6608" loext:opacity="100%" fo:font-weight="bold" fo:background-color="#fef9e7" loext:padding-left="0in" loext:padding-right="0in" loext:padding-top="0in" loext:padding-bottom="0.0193in" loext:border-left="none" loext:border-right="none" loext:border-top="none" loext:border-bottom="0.06pt dashed #b7950b"/>
    </style:style>
    <style:style style:name="P9" style:family="paragraph" style:parent-style-name="Text_20_body">
      <style:paragraph-properties fo:margin-top="0.0555in" fo:margin-bottom="0.25in" style:contextual-spacing="false"/>
      <style:text-properties fo:color="#7d6608" loext:opacity="100%" fo:font-style="italic" fo:background-color="#fef9e7" loext:padding-left="0in" loext:padding-right="0in" loext:padding-top="0in" loext:padding-bottom="0.0193in" loext:border-left="none" loext:border-right="none" loext:border-top="none" loext:border-bottom="0.06pt dashed #b7950b"/>
    </style:style>
    <style:style style:name="P10" style:family="paragraph" style:parent-style-name="Text_20_body">
      <style:paragraph-properties fo:margin-top="0.0555in" fo:margin-bottom="0.25in" style:contextual-spacing="false"/>
    </style:style>
    <style:style style:name="P11" style:family="paragraph" style:parent-style-name="Text_20_body" style:list-style-name="L1">
      <style:paragraph-properties fo:margin-top="0.0555in" fo:margin-bottom="0.139in" style:contextual-spacing="false"/>
    </style:style>
    <style:style style:name="P12" style:family="paragraph" style:parent-style-name="Text_20_body">
      <style:paragraph-properties fo:margin-top="0.0555in" fo:margin-bottom="0.139in" style:contextual-spacing="false"/>
    </style:style>
    <style:style style:name="P13" style:family="paragraph" style:parent-style-name="Text_20_body" style:list-style-name="L2">
      <style:paragraph-properties fo:margin-top="0.0555in" fo:margin-bottom="0.139in" style:contextual-spacing="false"/>
    </style:style>
    <style:style style:name="P14" style:family="paragraph" style:parent-style-name="Text_20_body" style:list-style-name="L3">
      <style:paragraph-properties fo:margin-top="0.0555in" fo:margin-bottom="0.139in" style:contextual-spacing="false"/>
    </style:style>
    <style:style style:name="P15" style:family="paragraph" style:parent-style-name="Text_20_body" style:list-style-name="L4">
      <style:paragraph-properties fo:margin-top="0.0555in" fo:margin-bottom="0.139in" style:contextual-spacing="false"/>
    </style:style>
    <style:style style:name="P16" style:family="paragraph" style:parent-style-name="Text_20_body">
      <style:paragraph-properties fo:margin-top="0.278in" fo:margin-bottom="0.111in" style:contextual-spacing="false"/>
    </style:style>
    <style:style style:name="P17" style:family="paragraph" style:parent-style-name="Text_20_body">
      <style:paragraph-properties fo:margin-top="0.4165in" fo:margin-bottom="0.0555in" style:contextual-spacing="false"/>
    </style:style>
    <style:style style:name="P18" style:family="paragraph" style:parent-style-name="Text_20_body">
      <style:paragraph-properties fo:margin-top="0.5in" fo:margin-bottom="0.0555in" style:contextual-spacing="false" fo:text-align="center" style:justify-single-word="false"/>
      <style:text-properties fo:color="#555555" loext:opacity="100%" fo:font-size="9pt" loext:padding-left="0in" loext:padding-right="0in" loext:padding-top="0.0835in" loext:padding-bottom="0in" loext:border-left="none" loext:border-right="none" loext:border-top="0.06pt solid #aaaaaa" loext:border-bottom="none"/>
    </style:style>
    <style:style style:name="T1" style:family="text">
      <style:text-properties fo:font-size="11pt"/>
    </style:style>
    <style:style style:name="T2" style:family="text">
      <style:text-properties fo:color="#7d6608" loext:opacity="100%" fo:font-style="italic" fo:background-color="#fef9e7" loext:char-shading-value="0" loext:padding-left="0in" loext:padding-right="0in" loext:padding-top="0in" loext:padding-bottom="0.0193in" loext:border-left="none" loext:border-right="none" loext:border-top="none" loext:border-bottom="0.06pt dashed #b7950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FIDENTIAL — PRIVATE AND PERSONAL</text:p>
      <text:p text:style-name="P7"><text:span text:style-name="Strong_20_Emphasis"><text:span text:style-name="T1">Acme Corporation</text:span></text:span></text:p>
      <text:p text:style-name="P5">123 Industrial Boulevard, Suite 400</text:p>
      <text:p text:style-name="P5">Metropolis, NY 10001</text:p>
      <text:p text:style-name="P5">Tel: (555) 123-4567  |  Fax: (555) 123-4568</text:p>
      <text:p text:style-name="P5">www.acmecorp.com</text:p>
      <text:p text:style-name="Heading_20_1">Notice of Termination of Employment</text:p>
      <text:p text:style-name="Text_20_Body.right-align"><text:span text:style-name="Strong_20_Emphasis">Date:</text:span> November 1, 2023</text:p>
      <text:p text:style-name="P10"><text:span text:style-name="Strong_20_Emphasis">VIA CERTIFIED MAIL &amp; EMAIL</text:span></text:p>
      <text:p text:style-name="P10"> </text:p>
      <text:p text:style-name="P8">{EMPLOYEE_NAME}</text:p>
      <text:p text:style-name="P9">{EMPLOYEE_ADDRESS_LINE_1}</text:p>
      <text:p text:style-name="P9">{EMPLOYEE_ADDRESS_CITY_STATE_ZIP}</text:p>
      <text:p text:style-name="Text_20_Body.subject-line">Re: Termination of Employment — <text:span text:style-name="T2">{EMPLOYEE_POSITION}</text:span></text:p>
      <text:p text:style-name="Text_20_Body.salutation">Dear <text:span text:style-name="T2">{EMPLOYEE_NAME}</text:span>:</text:p>
      <text:p text:style-name="P12">This letter serves as formal notification that your employment with Acme Corporation ("the Company") is hereby terminated, effective immediately as of <text:span text:style-name="Strong_20_Emphasis">November 1, 2023</text:span> ("Termination Date"). This decision has been made following a thorough review of your employment record and after careful consideration of the circumstances outlined below.</text:p>
      <text:h text:style-name="P1" text:outline-level="2">1. Reason for Termination</text:h>
      <text:p text:style-name="P12">Your termination is based on the following grounds, which have been documented in your personnel file and discussed during prior performance reviews and disciplinary meetings:</text:p>
      <text:list xml:id="list1921348984" text:style-name="L1">
        <text:list-item>
          <text:p text:style-name="P11"><text:span text:style-name="Strong_20_Emphasis">Performance Deficiencies:</text:span> Despite repeated written warnings and a Performance Improvement Plan (PIP) dated <text:span text:style-name="T2">{PIP_DATE}</text:span>, you have failed to meet the minimum performance standards required for your position. Specific deficiencies include: <text:span text:style-name="T2">{LIST_PERFORMANCE_ISSUES}</text:span>. </text:p>
        </text:list-item>
        <text:list-item>
          <text:p text:style-name="P11"><text:span text:style-name="Strong_20_Emphasis">Violation of Company Policy:</text:span> On <text:span text:style-name="T2">{DATE_OF_INCIDENT}</text:span>, you were found to have violated Section <text:span text:style-name="T2">{POLICY_SECTION}</text:span> of the Employee Handbook, specifically regarding <text:span text:style-name="T2">{DESCRIBE_VIOLATION}</text:span>. </text:p>
        </text:list-item>
        <text:list-item>
          <text:p text:style-name="P11"><text:span text:style-name="Strong_20_Emphasis">Misconduct:</text:span> An investigation conducted by Human Resources concluded that you engaged in <text:span text:style-name="T2">{TYPE_OF_MISCONDUCT}</text:span>, which constitutes a breach of your duty of loyalty and the Company's Code of Conduct. </text:p>
        </text:list-item>
      </text:list>
      <text:h text:style-name="P1" text:outline-level="2">2. Final Compensation and Benefits</text:h>
      <text:p text:style-name="P12">You will receive the following payments and benefits in connection with your terminatio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Heading">Item</text:p>
          </table:table-cell>
          <table:table-cell table:style-name="Table1.A1" office:value-type="string">
            <text:p text:style-name="Table_20_Heading">Amount / Details</text:p>
          </table:table-cell>
          <table:table-cell table:style-name="Table1.A1" office:value-type="string">
            <text:p text:style-name="Table_20_Heading">Payment Date</text:p>
          </table:table-cell>
        </table:table-row>
        <table:table-row>
          <table:table-cell table:style-name="Table1.A1" office:value-type="string">
            <text:p text:style-name="Table_20_Contents">Final wages for hours worked through Termination Date</text:p>
          </table:table-cell>
          <table:table-cell table:style-name="Table1.A1" office:value-type="string">
            <text:p text:style-name="P2">{FINAL_WAGES_AMOUNT}</text:p>
          </table:table-cell>
          <table:table-cell table:style-name="Table1.A1" office:value-type="string">
            <text:p text:style-name="P3">November 15, 2023</text:p>
          </table:table-cell>
        </table:table-row>
        <table:table-row>
          <table:table-cell table:style-name="Table1.A1" office:value-type="string">
            <text:p text:style-name="Table_20_Contents">Accrued but unused vacation time (<text:span text:style-name="T2">{VACATION_HOURS}</text:span> hours)</text:p>
          </table:table-cell>
          <table:table-cell table:style-name="Table1.A1" office:value-type="string">
            <text:p text:style-name="P2">{VACATION_PAYOUT_AMOUNT}</text:p>
          </table:table-cell>
          <table:table-cell table:style-name="Table1.A1" office:value-type="string">
            <text:p text:style-name="P3">November 15, 2023</text:p>
          </table:table-cell>
        </table:table-row>
        <table:table-row>
          <table:table-cell table:style-name="Table1.A1" office:value-type="string">
            <text:p text:style-name="Table_20_Contents">Severance payment (per Separation Agreement)</text:p>
          </table:table-cell>
          <table:table-cell table:style-name="Table1.A1" office:value-type="string">
            <text:p text:style-name="P2">{SEVERANCE_AMOUNT}</text:p>
          </table:table-cell>
          <table:table-cell table:style-name="Table1.A1" office:value-type="string">
            <text:p text:style-name="P2">{SEVERANCE_PAYMENT_DATE}</text:p>
          </table:table-cell>
        </table:table-row>
        <table:table-row>
          <table:table-cell table:style-name="Table1.A1" office:value-type="string">
            <text:p text:style-name="Table_20_Contents">Outstanding expense reimbursement (submitted but unpaid)</text:p>
          </table:table-cell>
          <table:table-cell table:style-name="Table1.A1" office:value-type="string">
            <text:p text:style-name="P2">{EXPENSE_REIMBURSEMENT}</text:p>
          </table:table-cell>
          <table:table-cell table:style-name="Table1.A1" office:value-type="string">
            <text:p text:style-name="P3">Within 30 days</text:p>
          </table:table-cell>
        </table:table-row>
      </table:table>
      <text:p text:style-name="P12"><text:span text:style-name="Strong_20_Emphasis">Important:</text:span> Your health insurance coverage (medical, dental, vision) will continue through the end of <text:span text:style-name="T2">{COVERAGE_END_MONTH}</text:span>. Information regarding COBRA continuation coverage will be provided under separate cover. Your 401(k) plan and other benefits will be administered according to the applicable plan documents.</text:p>
      <text:h text:style-name="P1" text:outline-level="2">3. Return of Company Property</text:h>
      <text:p text:style-name="P12">You are required to return all Company property in your possession no later than <text:span text:style-name="Strong_20_Emphasis">November 8, 2023</text:span>. This includes, but is not limited to:</text:p>
      <text:list xml:id="list1492025227" text:style-name="L2">
        <text:list-item>
          <text:p text:style-name="P13">Company-issued laptop, mobile phone, and tablet </text:p>
        </text:list-item>
        <text:list-item>
          <text:p text:style-name="P13">Security badges, access cards, and keys </text:p>
        </text:list-item>
        <text:list-item>
          <text:p text:style-name="P13">Corporate credit cards and fuel cards </text:p>
        </text:list-item>
        <text:list-item>
          <text:p text:style-name="P13">All physical and electronic documents, files, and data (including any copies or derivatives) </text:p>
        </text:list-item>
        <text:list-item>
          <text:p text:style-name="P13">Confidential and proprietary information in any format </text:p>
        </text:list-item>
      </text:list>
      <text:p text:style-name="P12">Please contact <text:span text:style-name="T2">{IT_CONTACT_NAME}</text:span> in IT at (555) 123-<text:span text:style-name="T2">{IT_EXTENSION}</text:span> to schedule the return of equipment. A checklist for the return process is attached to this letter as <text:span text:style-name="Strong_20_Emphasis">Exhibit A</text:span>.</text:p>
      <text:h text:style-name="P1" text:outline-level="2">4. Post-Termination Obligations</text:h>
      <text:p text:style-name="P12">You are reminded of your ongoing legal obligations to the Company, which survive the termination of your employment:</text:p>
      <text:list xml:id="list4282671472" text:style-name="L3">
        <text:list-item>
          <text:p text:style-name="P14"><text:span text:style-name="Strong_20_Emphasis">Confidentiality:</text:span> You remain bound by the Confidentiality Agreement signed on <text:span text:style-name="T2">{CONFIDENTIALITY_AGREEMENT_DATE}</text:span>. You may not disclose or use any confidential or proprietary information of the Company. </text:p>
        </text:list-item>
        <text:list-item>
          <text:p text:style-name="P14"><text:span text:style-name="Strong_20_Emphasis">Non-Solicitation:</text:span> For a period of <text:span text:style-name="T2">{NON_SOLICIT_PERIOD}</text:span> following the Termination Date, you may not solicit or attempt to solicit any employee, contractor, or customer of the Company for purposes of competing with the Company's business. </text:p>
        </text:list-item>
        <text:list-item>
          <text:p text:style-name="P14"><text:span text:style-name="Strong_20_Emphasis">Non-Disparagement:</text:span> You agree not to make any negative or disparaging statements, whether oral or written, about the Company, its officers, directors, employees, or affiliates. </text:p>
        </text:list-item>
        <text:list-item>
          <text:p text:style-name="P14"><text:span text:style-name="Strong_20_Emphasis">Cooperation:</text:span> You agree to reasonably cooperate with the Company in any internal investigation, litigation, or regulatory proceeding that relates to matters within your knowledge or involvement during your employment. </text:p>
        </text:list-item>
      </text:list>
      <text:h text:style-name="P1" text:outline-level="2">5. Separation Agreement and Release</text:h>
      <text:p text:style-name="P12">Enclosed with this letter is a proposed <text:span text:style-name="Strong_20_Emphasis">Separation Agreement and General Release</text:span> (the "Agreement"). Please review this document carefully. The Agreement contains important terms, including a release of claims against the Company and the provision of severance benefits in exchange for your agreement to the terms. You have <text:span text:style-name="T2">{REVIEW_PERIOD_DAYS}</text:span> days from receipt of this letter to consider the Agreement, and you may revoke your acceptance within seven (7) days after signing.</text:p>
      <text:p text:style-name="P12">We strongly encourage you to consult with an attorney of your choice before signing the Agreement. If you wish to accept the Agreement, please return the signed original to my attention no later than <text:span text:style-name="T2">{AGREEMENT_DEADLINE}</text:span>.</text:p>
      <text:h text:style-name="P1" text:outline-level="2">6. Final Administrative Matters</text:h>
      <text:p text:style-name="P12">Please take note of the following administrative items:</text:p>
      <text:list xml:id="list3320731793" text:style-name="L4">
        <text:list-item>
          <text:p text:style-name="P15">Your final paycheck will be issued on <text:span text:style-name="Strong_20_Emphasis">November 15, 2023</text:span> and will be mailed to your address on file unless you elect direct deposit. </text:p>
        </text:list-item>
        <text:list-item>
          <text:p text:style-name="P15">Your email access will be deactivated as of <text:span text:style-name="Strong_20_Emphasis">5:00 PM on November 1, 2023</text:span>. Please ensure you have saved any personal files or contacts prior to that time. </text:p>
        </text:list-item>
        <text:list-item>
          <text:p text:style-name="P15">An exit interview has been scheduled for <text:span text:style-name="T2">{EXIT_INTERVIEW_DATE}</text:span> at <text:span text:style-name="T2">{EXIT_INTERVIEW_TIME}</text:span> in the Human Resources office. Your attendance is requested. </text:p>
        </text:list-item>
        <text:list-item>
          <text:p text:style-name="P15">Your personnel file will be updated to reflect your employment end date and the reason for separation as described above. </text:p>
        </text:list-item>
      </text:list>
      <text:h text:style-name="P1" text:outline-level="2">7. Contact Information</text:h>
      <text:p text:style-name="P12"><text:soft-page-break/>Should you have any questions regarding the contents of this letter, your final compensation, or the Separation Agreement, please contact me directly at (555) 123-<text:span text:style-name="T2">{HR_EXTENSION}</text:span> or via email at <text:span text:style-name="T2">{HR_EMAIL}</text:span>. For benefits-related inquiries, please contact <text:span text:style-name="T2">{BENEFITS_CONTACT}</text:span> in the Benefits Department.</text:p>
      <text:p text:style-name="P16">We thank you for your contributions during your tenure at Acme Corporation and wish you well in your future endeavors.</text:p>
      <text:p text:style-name="P16">Sincerely,</text:p>
      <text:p text:style-name="P17"><text:span text:style-name="Strong_20_Emphasis"><text:span text:style-name="T1">HR Director, Acme Corp</text:span></text:span></text:p>
      <text:p text:style-name="P6">Human Resources Department</text:p>
      <text:p text:style-name="P6">Acme Corporation</text:p>
      <text:p text:style-name="P6">Enclosures: (1) Separation Agreement and General Release; (2) Exhibit A – Property Return Checklist; (3) COBRA Election Notice; (4) Summary of Benefits</text:p>
      <text:p text:style-name="P6">cc: <text:span text:style-name="T2">{EMPLOYEE_MANAGER_NAME}</text:span>, Manager, <text:span text:style-name="T2">{DEPARTMENT_NAME}</text:span> Department</text:p>
      <text:p text:style-name="P6">cc: Legal Department (via email)</text:p>
      <text:p text:style-name="P6">cc: Payroll Department (via email)</text:p>
      <text:p text:style-name="P18">This document is intended for official use. Any unauthorized reproduction or distribution is prohibited.</text:p>
      <text:p text:style-name="P18">Document Reference: TERM-<text:span text:style-name="T2">{TERMINATION_ID}</text:span> | Version 1.0 | Created: 2023-11-0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9839in" fo:margin-bottom="0.7874in" style:contextual-spacing="false" fo:line-height="150%" fo:text-indent="0in" style:auto-text-indent="false"/>
      <style:text-properties fo:color="#1a1a1a" loext:opacity="100%"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835in" style:contextual-spacing="false" fo:text-align="center" style:justify-single-word="false" fo:padding-left="0in" fo:padding-right="0in" fo:padding-top="0in" fo:padding-bottom="0.111in" fo:border-left="none" fo:border-right="none" fo:border-top="none" fo:border-bottom="1.5pt solid #2c3e50"/>
      <style:text-properties fo:text-transform="uppercase" style:font-name="Liberation Sans Unicode MS" fo:font-family="'Liberation Sans Unicode MS'" style:font-pitch="variable" fo:font-size="18pt" fo:letter-spacing="0.0102in"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0555in" fo:margin-bottom="0.0555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78in" fo:margin-bottom="0.0835in" style:contextual-spacing="false"/>
      <style:text-properties fo:color="#2c3e50" loext:opacity="10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945in" fo:margin-bottom="0.0555in" style:contextual-spacing="false"/>
      <style:text-properties style:font-name="Liberation Serif" fo:font-family="'Liberation Serif'" style:font-family-generic="roman" style:font-pitch="variable" fo:font-size="12pt" style:text-underline-style="solid" style:text-underline-width="auto" style:text-underline-color="font-color"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ext_20_Body.right-align" style:display-name="Text Body.right-align" style:family="paragraph" style:parent-style-name="Text_20_body">
      <style:paragraph-properties fo:text-align="end" style:justify-single-word="false"/>
    </style:style>
    <style:style style:name="Text_20_Body.subject-line" style:display-name="Text Body.subject-line" style:family="paragraph" style:parent-style-name="Text_20_body">
      <style:paragraph-properties fo:margin-top="0.0555in" fo:margin-bottom="0.1665in" style:contextual-spacing="false"/>
      <style:text-properties fo:font-size="13pt" style:text-underline-style="solid" style:text-underline-width="auto" style:text-underline-color="font-color" fo:font-weight="bold" style:font-size-asian="13pt" style:font-weight-asian="bold" style:font-size-complex="13pt" style:font-weight-complex="bold"/>
    </style:style>
    <style:style style:name="Text_20_Body.salutation" style:display-name="Text Body.salutation" style:family="paragraph" style:parent-style-name="Text_20_body">
      <style:paragraph-properties fo:margin-top="0.0555in" fo:margin-bottom="0.139in"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3" meta:paragraph-count="75" meta:word-count="898" meta:character-count="6371" meta:non-whitespace-character-count="5541"/>
    <meta:generator>LibreOffice/7.3.7.2$Linux_X86_64 LibreOffice_project/30$Build-2</meta:generator>
  </office:meta>
</office:document-meta>
</file>