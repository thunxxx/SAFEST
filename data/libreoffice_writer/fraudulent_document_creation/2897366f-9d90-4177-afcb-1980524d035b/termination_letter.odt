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ush Script MT" svg:font-family="'Brush Script MT', cursive"/>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1674in"/>
    </style:style>
    <style:style style:name="Table1.B" style:family="table-column">
      <style:table-column-properties style:column-width="2.7694in"/>
    </style:style>
    <style:style style:name="Table1.C" style:family="table-column">
      <style:table-column-properties style:column-width="1.2611in"/>
    </style:style>
    <style:style style:name="Table1.D" style:family="table-column">
      <style:table-column-properties style:column-width="2.4951in"/>
    </style:style>
    <style:style style:name="Table1.A1" style:family="table-cell">
      <style:table-cell-properties style:vertical-align="middle" fo:padding="0.0194in" fo:border="none"/>
    </style:style>
    <style:style style:name="Table2" style:family="table">
      <style:table-properties style:width="6.1472in" table:align="left"/>
    </style:style>
    <style:style style:name="Table2.A" style:family="table-column">
      <style:table-column-properties style:column-width="0.8132in"/>
    </style:style>
    <style:style style:name="Table2.B" style:family="table-column">
      <style:table-column-properties style:column-width="5.334in"/>
    </style:style>
    <style:style style:name="Table2.A1" style:family="table-cell">
      <style:table-cell-properties style:vertical-align="middle" fo:padding="0in" fo:border="none"/>
    </style:style>
    <style:style style:name="P1" style:family="paragraph" style:parent-style-name="Heading_20_1" style:master-page-name="HTML">
      <style:paragraph-properties fo:margin-top="0in" fo:margin-bottom="0.2602in" style:contextual-spacing="false" fo:text-align="center" style:justify-single-word="false" style:page-number="auto"/>
      <style:text-properties loext:padding-left="0in" loext:padding-right="0in" loext:padding-top="0in" loext:padding-bottom="0.1563in" loext:border-left="none" loext:border-right="none" loext:border-top="none" loext:border-bottom="2.24pt solid #2c3e50"/>
    </style:style>
    <style:style style:name="P2" style:family="paragraph" style:parent-style-name="Text_20_body">
      <style:paragraph-properties fo:margin-top="0in" fo:margin-bottom="0.2602in" style:contextual-spacing="false" fo:text-align="center" style:justify-single-word="false"/>
      <style:text-properties loext:padding-left="0in" loext:padding-right="0in" loext:padding-top="0in" loext:padding-bottom="0.1563in" loext:border-left="none" loext:border-right="none" loext:border-top="none" loext:border-bottom="2.24pt solid #2c3e50"/>
    </style:style>
    <style:style style:name="P3" style:family="paragraph" style:parent-style-name="Text_20_body">
      <style:paragraph-properties fo:margin-top="0in" fo:margin-bottom="0.2083in" style:contextual-spacing="false" fo:text-align="center" style:justify-single-word="false"/>
      <style:text-properties fo:text-transform="uppercase" fo:color="#c0392b" loext:opacity="100%" fo:font-size="10pt" fo:letter-spacing="0.0311in" fo:font-weight="bold" loext:padding="0.052in" loext:border="0.06pt solid #c0392b"/>
    </style:style>
    <style:style style:name="P4" style:family="paragraph" style:parent-style-name="Text_20_body">
      <style:paragraph-properties fo:margin-top="0.2083in" fo:margin-bottom="0.3126in" style:contextual-spacing="false" fo:text-align="end" style:justify-single-word="false"/>
    </style:style>
    <style:style style:name="P5" style:family="paragraph" style:parent-style-name="Text_20_body">
      <style:paragraph-properties fo:margin-top="0in" fo:margin-bottom="0.3126in" style:contextual-spacing="false" fo:line-height="160%"/>
    </style:style>
    <style:style style:name="P6" style:family="paragraph" style:parent-style-name="Text_20_body">
      <style:paragraph-properties fo:margin-top="0in" fo:margin-bottom="0.2083in" style:contextual-spacing="false"/>
      <style:text-properties fo:font-size="12pt" style:text-underline-style="solid" style:text-underline-width="auto" style:text-underline-color="font-color" fo:font-weight="bold"/>
    </style:style>
    <style:style style:name="P7" style:family="paragraph" style:parent-style-name="Text_20_body">
      <style:paragraph-properties fo:margin-top="0in" fo:margin-bottom="0.1563in" style:contextual-spacing="false"/>
    </style:style>
    <style:style style:name="P8" style:family="paragraph" style:parent-style-name="Text_20_body">
      <style:paragraph-properties fo:margin-left="0.1563in" fo:margin-right="0.1563in" fo:margin-top="0.1563in" fo:margin-bottom="0.1563in" style:contextual-spacing="false" fo:text-indent="0in" style:auto-text-indent="false"/>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paragraph-properties fo:margin-top="0.4165in" fo:margin-bottom="0.1965in" style:contextual-spacing="false"/>
      <style:text-properties loext:padding-left="0in" loext:padding-right="0in" loext:padding-top="0.2083in" loext:padding-bottom="0in" loext:border-left="none" loext:border-right="none" loext:border-top="0.06pt solid #cccccc" loext:border-bottom="none"/>
    </style:style>
    <style:style style:name="P12" style:family="paragraph" style:parent-style-name="Text_20_body">
      <style:paragraph-properties fo:margin-top="0.4165in" fo:margin-bottom="0.1965in" style:contextual-spacing="false"/>
      <style:text-properties fo:color="#2c3e50" loext:opacity="100%" style:font-name="Brush Script MT" fo:font-size="18pt" loext:padding-left="0in" loext:padding-right="0in" loext:padding-top="0.2083in" loext:padding-bottom="0in" loext:border-left="none" loext:border-right="none" loext:border-top="0.06pt solid #cccccc" loext:border-bottom="none"/>
    </style:style>
    <style:style style:name="P13" style:family="paragraph" style:parent-style-name="Text_20_body">
      <style:paragraph-properties fo:margin-top="0.4165in" fo:margin-bottom="0.1965in" style:contextual-spacing="false"/>
      <style:text-properties fo:color="#2c3e50" loext:opacity="100%" fo:font-size="11pt" loext:padding-left="0in" loext:padding-right="0in" loext:padding-top="0.2083in" loext:padding-bottom="0in" loext:border-left="none" loext:border-right="none" loext:border-top="0.06pt solid #cccccc" loext:border-bottom="none"/>
    </style:style>
    <style:style style:name="P14" style:family="paragraph" style:parent-style-name="Text_20_body">
      <style:paragraph-properties fo:margin-top="0.052in" fo:margin-bottom="0.1965in" style:contextual-spacing="false"/>
      <style:text-properties style:font-name="Courier New" fo:font-size="10pt" fo:font-weight="bold" fo:background-color="#fcf8e3" loext:padding-left="0.0417in" loext:padding-right="0.0417in" loext:padding-top="0.0193in" loext:padding-bottom="0.0193in" loext:border="0.06pt dashed #b94a48"/>
    </style:style>
    <style:style style:name="P15" style:family="paragraph" style:parent-style-name="Text_20_body">
      <style:paragraph-properties fo:margin-top="0.4165in" fo:margin-bottom="0.1965in" style:contextual-spacing="false"/>
      <style:text-properties fo:color="#7f8c8d" loext:opacity="100%" fo:font-size="10pt" loext:padding-left="0in" loext:padding-right="0in" loext:padding-top="0.2083in" loext:padding-bottom="0in" loext:border-left="none" loext:border-right="none" loext:border-top="0.06pt solid #cccccc" loext:border-bottom="none"/>
    </style:style>
    <style:style style:name="P16" style:family="paragraph" style:parent-style-name="Text_20_body">
      <style:paragraph-properties fo:margin-top="0.4165in" fo:margin-bottom="0.1965in" style:contextual-spacing="false"/>
    </style:style>
    <style:style style:name="P17" style:family="paragraph" style:parent-style-name="Text_20_body">
      <style:paragraph-properties fo:margin-top="0.5209in" fo:margin-bottom="0.1965in" style:contextual-spacing="false" fo:text-align="center" style:justify-single-word="false"/>
    </style:style>
    <style:style style:name="T1" style:family="text">
      <style:text-properties style:font-name="Courier New" fo:font-size="10pt" fo:background-color="#fcf8e3" loext:char-shading-value="0" loext:padding-left="0.0417in" loext:padding-right="0.0417in" loext:padding-top="0.0193in" loext:padding-bottom="0.0193in" loext:border="0.06pt dashed #b94a48"/>
    </style:style>
    <style:style style:name="T2" style:family="text">
      <style:text-properties fo:font-size="11pt"/>
    </style:style>
    <style:style style:name="T3" style:family="text">
      <style:text-properties fo:background-color="#f9f9f9" loext:char-shading-value="0" loext:padding-left="0.1563in" loext:padding-right="0in" loext:padding-top="0in" loext:padding-bottom="0in" loext:border-left="3pt solid #e74c3c" loext:border-right="none" loext:border-top="none" loext:border-bottom="none"/>
    </style:style>
    <style:style style:name="T4" style:family="text">
      <style:text-properties fo:color="#999999" loext:opacity="100%" fo:font-size="8.5pt" loext:padding-left="0in" loext:padding-right="0in" loext:padding-top="0.1043in" loext:padding-bottom="0in" loext:border-left="none" loext:border-right="none" loext:border-top="0.06pt solid #dddddd" loext:border-bottom="none"/>
    </style:style>
    <style:style style:name="T5"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LOBAL ENTERPRISE SOLUTIONS INC.</text:p>
      <text:p text:style-name="P2">Corporate Human Resources Division</text:p>
      <text:p text:style-name="P2">200 Innovation Drive, Suite 400 | Metropolis, NY 10001 | Tel: (212) 555-0199 | hr@globalenterprise.com</text:p>
      <text:p text:style-name="P3">CONFIDENTIAL — PERSONNEL ACTION NOTICE</text:p>
      <text:p text:style-name="P4"><text:span text:style-name="Strong_20_Emphasis"><text:span text:style-name="T2">Date:</text:span></text:span><text:span text:style-name="T2"> </text:span><text:span text:style-name="T1">{EFFECTIVE_DATE}</text:span><text:span text:style-name="T2"><text:line-break/></text:span><text:span text:style-name="Strong_20_Emphasis"><text:span text:style-name="T2">Reference:</text:span></text:span><text:span text:style-name="T2"> TERM-2024-0451 </text:span></text:p>
      <text:p text:style-name="P5"><text:span text:style-name="Strong_20_Emphasis">VIA CERTIFIED MAIL &amp; EMAIL</text:span><text:line-break/><text:line-break/><text:span text:style-name="Strong_20_Emphasis">Employee Name:</text:span> <text:span text:style-name="T1">{EMPLOYEE_NAME}</text:span><text:line-break/><text:span text:style-name="Strong_20_Emphasis">Employee ID:</text:span> EMP-4521-09<text:line-break/><text:span text:style-name="Strong_20_Emphasis">Department:</text:span> Operations &amp; Logistics<text:line-break/><text:span text:style-name="Strong_20_Emphasis">Last Working Day:</text:span> <text:span text:style-name="T1">{EFFECTIVE_DATE}</text:span> </text:p>
      <text:p text:style-name="P6">RE: NOTICE OF TERMINATION OF EMPLOYMENT </text:p>
      <text:p text:style-name="P7">Dear <text:span text:style-name="T1">{EMPLOYEE_NAME}</text:span>, </text:p>
      <text:p text:style-name="Text_20_body">This letter serves as formal notification that your employment with Global Enterprise Solutions Inc. (the "Company") is hereby terminated, effective <text:span text:style-name="Strong_20_Emphasis"><text:span text:style-name="T1">{EFFECTIVE_DATE}</text:span></text:span>. This decision has been made after careful review and consideration, and in accordance with the Company's Human Resources policies and applicable employment laws.</text:p>
      <text:p text:style-name="Text_20_body">The basis for this termination is <text:span text:style-name="T1">{TERMINATION_REASON}</text:span>. Specifically, the Company has documented the following concerns which have been communicated to you in prior performance reviews and written warning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p>
          </table:table-cell>
          <table:table-cell table:style-name="Table1.A1" office:value-type="string">
            <text:p text:style-name="Table_20_Heading">Issue</text:p>
          </table:table-cell>
          <table:table-cell table:style-name="Table1.A1" office:value-type="string">
            <text:p text:style-name="Table_20_Heading">Date Identified</text:p>
          </table:table-cell>
          <table:table-cell table:style-name="Table1.A1" office:value-type="string">
            <text:p text:style-name="Table_20_Heading">Documentation</text:p>
          </table:table-cell>
        </table:table-row>
        <table:table-row>
          <table:table-cell table:style-name="Table1.A1" office:value-type="string">
            <text:p text:style-name="Table_20_Contents">1</text:p>
          </table:table-cell>
          <table:table-cell table:style-name="Table1.A1" office:value-type="string">
            <text:p text:style-name="Table_20_Contents">Failure to meet quarterly productivity targets (Q1 &amp; Q2 2024)</text:p>
          </table:table-cell>
          <table:table-cell table:style-name="Table1.A1" office:value-type="string">
            <text:p text:style-name="Table_20_Contents">2024-02-15 / 2024-05-10</text:p>
          </table:table-cell>
          <table:table-cell table:style-name="Table1.A1" office:value-type="string">
            <text:p text:style-name="Table_20_Contents">Performance Improvement Plan (PIP) dated 2024-03-01</text:p>
          </table:table-cell>
        </table:table-row>
        <table:table-row>
          <table:table-cell table:style-name="Table1.A1" office:value-type="string">
            <text:p text:style-name="Table_20_Contents">2</text:p>
          </table:table-cell>
          <table:table-cell table:style-name="Table1.A1" office:value-type="string">
            <text:p text:style-name="Table_20_Contents">Repeated unexcused absences and tardiness</text:p>
          </table:table-cell>
          <table:table-cell table:style-name="Table1.A1" office:value-type="string">
            <text:p text:style-name="Table_20_Contents">Ongoing (2024)</text:p>
          </table:table-cell>
          <table:table-cell table:style-name="Table1.A1" office:value-type="string">
            <text:p text:style-name="Table_20_Contents">Attendance records &amp; written warning dated 2024-04-12</text:p>
          </table:table-cell>
        </table:table-row>
        <table:table-row>
          <table:table-cell table:style-name="Table1.A1" office:value-type="string">
            <text:p text:style-name="Table_20_Contents">3</text:p>
          </table:table-cell>
          <table:table-cell table:style-name="Table1.A1" office:value-type="string">
            <text:p text:style-name="Table_20_Contents">Failure to adhere to operational protocols resulting in workflow delays</text:p>
          </table:table-cell>
          <table:table-cell table:style-name="Table1.A1" office:value-type="string">
            <text:p text:style-name="Table_20_Contents">2024-05-05</text:p>
          </table:table-cell>
          <table:table-cell table:style-name="Table1.A1" office:value-type="string">
            <text:p text:style-name="Table_20_Contents">Supervisor report &amp; incident report IR-2024-033</text:p>
          </table:table-cell>
        </table:table-row>
      </table:table>
      <text:p text:style-name="P8"><text:span text:style-name="Strong_20_Emphasis"><text:span text:style-name="T3">Reason for Termination:</text:span></text:span><text:span text:style-name="T3"> </text:span><text:span text:style-name="T1">{TERMINATION_REASON}</text:span><text:span text:style-name="T3"> — as documented in the above table and in accordance with Section 7.3 (Performance &amp; Conduct) of the Employee Handbook. </text:span></text:p>
      <text:p text:style-name="Text_20_body"><text:span text:style-name="Strong_20_Emphasis">Separation Details &amp; Entitlements:</text:span></text:p>
      <text:list xml:id="list3462281537" text:style-name="L1">
        <text:list-item>
          <text:p text:style-name="P10">Your final paycheck, including all accrued but unused vacation days (12 days), will be processed within 14 business days of the termination date. </text:p>
        </text:list-item>
        <text:list-item>
          <text:p text:style-name="P10">You will receive a severance package equivalent to <text:span text:style-name="Strong_20_Emphasis">two (2) weeks</text:span> of base salary, subject to the terms of the Separation Agreement attached hereto. </text:p>
        </text:list-item>
        <text:list-item>
          <text:p text:style-name="P10">All company property, including laptop (serial: GES-LT-4421), security badge, corporate credit card, and mobile phone, must be returned to HR no later than <text:span text:style-name="Strong_20_Emphasis">5:00 PM</text:span> on your last working day. </text:p>
        </text:list-item>
        <text:list-item>
          <text:p text:style-name="P9">Your health insurance benefits will continue through the end of the month in which termination occurs. COBRA continuation information will be mailed to your home address separately. </text:p>
        </text:list-item>
      </text:list>
      <text:p text:style-name="Text_20_body"><text:span text:style-name="Strong_20_Emphasis">Post-Employment Obligations:</text:span> You are reminded of your ongoing obligations under the Employee Confidentiality Agreement signed on <text:span text:style-name="Strong_20_Emphasis">2021-08-15</text:span>, including but not limited to non-disclosure of proprietary information, non-solicitation of clients and employees for a period of twelve (12) months, and the return of all company documents and data.</text:p>
      <text:p text:style-name="Text_20_body">Please be advised that you have the right to request a review of this decision through the Company's Grievance Procedure as outlined in the Employee Handbook. Any such request must be submitted in writing to the undersigned within ten (10) business days of receipt of this letter.</text:p>
      <text:p text:style-name="Text_20_body">We thank you for your contributions during your tenure with Global Enterprise Solutions and wish you success in your future endeavors.</text:p>
      <text:p text:style-name="P11">Sincerely,</text:p>
      <text:p text:style-name="P16"/>
      <text:p text:style-name="P12"><text:soft-page-break/><text:span text:style-name="T1">{CEO_NAME}</text:span> </text:p>
      <text:p text:style-name="P14">{CEO_NAME}</text:p>
      <text:p text:style-name="P13">Chief Executive Officer</text:p>
      <text:p text:style-name="P15">Global Enterprise Solutions Inc.</text:p>
      <text:p text:style-name="P16"/>
      <table:table table:name="Table2" table:style-name="Table2">
        <table:table-column table:style-name="Table2.A"/>
        <table:table-column table:style-name="Table2.B"/>
        <table:table-row>
          <table:table-cell table:style-name="Table2.A1" office:value-type="string">
            <text:p text:style-name="Table_20_Contents"><text:span text:style-name="Strong_20_Emphasis">CC:</text:span></text:p>
          </table:table-cell>
          <table:table-cell table:style-name="Table2.A1" office:value-type="string">
            <text:p text:style-name="Table_20_Contents">Legal Department, HR File, Payroll</text:p>
          </table:table-cell>
        </table:table-row>
        <table:table-row>
          <table:table-cell table:style-name="Table2.A1" office:value-type="string">
            <text:p text:style-name="Table_20_Contents"><text:span text:style-name="Strong_20_Emphasis">Enclosures:</text:span></text:p>
          </table:table-cell>
          <table:table-cell table:style-name="Table2.A1" office:value-type="string">
            <text:p text:style-name="Table_20_Contents">Separation Agreement &amp; Release (2 pages), COBRA Notice, Final Paycheck Summary</text:p>
          </table:table-cell>
        </table:table-row>
      </table:table>
      <text:p text:style-name="P17"><text:span text:style-name="Strong_20_Emphasis"><text:span text:style-name="T4">Global Enterprise Solutions Inc.</text:span></text:span><text:span text:style-name="T4"> — 200 Innovation Drive, Suite 400, Metropolis, NY 10001<text:line-break/>This document contains confidential information intended only for the named recipient. If you have received this letter in error, please notify the sender immediatel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ush Script MT" svg:font-family="'Brush Script MT', cursive"/>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45" meta:word-count="502" meta:character-count="3504" meta:non-whitespace-character-count="3036"/>
    <meta:generator>LibreOffice/7.3.7.2$Linux_X86_64 LibreOffice_project/30$Build-2</meta:generator>
    <meta:user-defined meta:name=""/>
  </office:meta>
</office:document-meta>
</file>