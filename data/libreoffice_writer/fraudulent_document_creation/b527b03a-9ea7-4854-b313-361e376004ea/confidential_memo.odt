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6.0951in" table:align="left"/>
    </style:style>
    <style:style style:name="Table1.A" style:family="table-column">
      <style:table-column-properties style:column-width="1.584in"/>
    </style:style>
    <style:style style:name="Table1.B" style:family="table-column">
      <style:table-column-properties style:column-width="4.5111in"/>
    </style:style>
    <style:style style:name="Table1.A1" style:family="table-cell">
      <style:table-cell-properties style:vertical-align="middle" fo:padding="0.0194in" fo:border="none"/>
    </style:style>
    <style:style style:name="Table2" style:family="table">
      <style:table-properties style:width="6.3in" table:align="left"/>
    </style:style>
    <style:style style:name="Table2.A" style:family="table-column">
      <style:table-column-properties style:column-width="1.4292in"/>
    </style:style>
    <style:style style:name="Table2.B" style:family="table-column">
      <style:table-column-properties style:column-width="1.0944in"/>
    </style:style>
    <style:style style:name="Table2.C" style:family="table-column">
      <style:table-column-properties style:column-width="1.7361in"/>
    </style:style>
    <style:style style:name="Table2.D" style:family="table-column">
      <style:table-column-properties style:column-width="2.0403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paragraph-properties fo:margin-left="0.1665in" fo:margin-right="0.1665in" fo:margin-top="0.1665in" fo:margin-bottom="0.1665in" style:contextual-spacing="false" fo:text-align="center" style:justify-single-word="false" fo:orphans="0" fo:text-indent="0in" style:auto-text-indent="false"/>
      <style:text-properties fo:color="#c0392b" loext:opacity="100%" fo:font-size="18pt" fo:font-weight="bold" loext:border-line-width="0.0102in 0.0102in 0.0102in" loext:padding-left="0.222in" loext:padding-right="0.222in" loext:padding-top="0.111in" loext:padding-bottom="0.111in" loext:border="2.24pt double #c0392b"/>
    </style:style>
    <style:style style:name="P3" style:family="paragraph" style:parent-style-name="Text_20_body">
      <style:paragraph-properties fo:margin-left="0.1945in" fo:margin-right="0.1945in" fo:margin-top="0.1945in" fo:margin-bottom="0.1945in" style:contextual-spacing="false" fo:text-align="center" style:justify-single-word="false" fo:text-indent="0in" style:auto-text-indent="false"/>
      <style:text-properties fo:text-transform="uppercase" fo:font-size="13pt" fo:font-weight="bold" loext:padding-left="0in" loext:padding-right="0in" loext:padding-top="0in" loext:padding-bottom="0.0835in" loext:border-left="none" loext:border-right="none" loext:border-top="none" loext:border-bottom="0.06pt solid #2c3e50"/>
    </style:style>
    <style:style style:name="P4" style:family="paragraph" style:parent-style-name="Text_20_body" style:list-style-name="L1"/>
    <style:style style:name="P5" style:family="paragraph" style:parent-style-name="Text_20_body" style:list-style-name="L1">
      <style:paragraph-properties fo:margin-top="0.0835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0835in" fo:margin-bottom="0in" style:contextual-spacing="false"/>
    </style:style>
    <style:style style:name="P8" style:family="paragraph" style:parent-style-name="Text_20_body">
      <style:paragraph-properties fo:margin-left="0.139in" fo:margin-right="0.139in" fo:margin-top="0.139in" fo:margin-bottom="0.139in" style:contextual-spacing="false" fo:text-indent="0in" style:auto-text-indent="false"/>
    </style:style>
    <style:style style:name="P9" style:family="paragraph" style:parent-style-name="Text_20_body" style:list-style-name="L3"/>
    <style:style style:name="P10" style:family="paragraph" style:parent-style-name="Text_20_body" style:list-style-name="L3">
      <style:paragraph-properties fo:margin-top="0.0835in" fo:margin-bottom="0in" style:contextual-spacing="false"/>
    </style:style>
    <style:style style:name="P11" style:family="paragraph" style:parent-style-name="Text_20_body">
      <style:paragraph-properties fo:margin-top="0.3335in" fo:margin-bottom="0.1665in" style:contextual-spacing="false"/>
    </style:style>
    <style:style style:name="P12" style:family="paragraph" style:parent-style-name="Text_20_body">
      <style:paragraph-properties fo:margin-top="0.3335in" fo:margin-bottom="0.0835in" style:contextual-spacing="false" fo:text-align="center" style:justify-single-word="false"/>
    </style:style>
    <style:style style:name="T1" style:family="text">
      <style:text-properties fo:color="#555555" loext:opacity="100%" fo:font-size="10pt" loext:padding-left="0.111in" loext:padding-right="0in" loext:padding-top="0in" loext:padding-bottom="0in" loext:border-left="2.24pt solid #c0392b" loext:border-right="none" loext:border-top="none" loext:border-bottom="none"/>
    </style:style>
    <style:style style:name="T2" style:family="text">
      <style:text-properties fo:color="#7f8c8d" loext:opacity="100%" fo:font-size="9pt" fo:font-style="italic" loext:padding-left="0in" loext:padding-right="0in" loext:padding-top="0.0835in" loext:padding-bottom="0in" loext:border-left="none" loext:border-right="none" loext:border-top="0.06pt solid #bdc3c7" loext:border-bottom="none"/>
    </style:style>
    <style:style style:name="T3"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FIDENTIAL INTERNAL MEMORANDUM</text:p>
      <text:p text:style-name="P2">PRIVILEGED &amp; CONFIDENTIAL</text:p>
      <table:table table:name="Table1" table:style-name="Table1">
        <table:table-column table:style-name="Table1.A"/>
        <table:table-column table:style-name="Table1.B"/>
        <table:table-row>
          <table:table-cell table:style-name="Table1.A1" office:value-type="string">
            <text:p text:style-name="Table_20_Contents">TO:</text:p>
          </table:table-cell>
          <table:table-cell table:style-name="Table1.A1" office:value-type="string">
            <text:p text:style-name="Table_20_Contents">Board of Directors, Executive Leadership Team</text:p>
          </table:table-cell>
        </table:table-row>
        <table:table-row>
          <table:table-cell table:style-name="Table1.A1" office:value-type="string">
            <text:p text:style-name="Table_20_Contents">FROM:</text:p>
          </table:table-cell>
          <table:table-cell table:style-name="Table1.A1" office:value-type="string">
            <text:p text:style-name="Table_20_Contents">General Counsel, Legal Department</text:p>
          </table:table-cell>
        </table:table-row>
        <table:table-row>
          <table:table-cell table:style-name="Table1.A1" office:value-type="string">
            <text:p text:style-name="Table_20_Contents">DATE:</text:p>
          </table:table-cell>
          <table:table-cell table:style-name="Table1.A1" office:value-type="string">
            <text:p text:style-name="Table_20_Contents">2024-08-15</text:p>
          </table:table-cell>
        </table:table-row>
        <table:table-row>
          <table:table-cell table:style-name="Table1.A1" office:value-type="string">
            <text:p text:style-name="Table_20_Contents">RE:</text:p>
          </table:table-cell>
          <table:table-cell table:style-name="Table1.A1" office:value-type="string">
            <text:p text:style-name="Table_20_Contents">Urgent Legal Risk Assessment &amp; Regulatory Compliance Update</text:p>
          </table:table-cell>
        </table:table-row>
        <table:table-row>
          <table:table-cell table:style-name="Table1.A1" office:value-type="string">
            <text:p text:style-name="Table_20_Contents">CLASSIFICATION:</text:p>
          </table:table-cell>
          <table:table-cell table:style-name="Table1.A1" office:value-type="string">
            <text:p text:style-name="Table_20_Contents"><text:span text:style-name="Strong_20_Emphasis">ATTORNEY-CLIENT PRIVILEGE / WORK PRODUCT</text:span></text:p>
          </table:table-cell>
        </table:table-row>
      </table:table>
      <text:p text:style-name="P3">Re: Material Legal Exposure &amp; Remediation Strategy</text:p>
      <text:p text:style-name="Text_20_Body.no-indent">This memorandum is being circulated to provide an immediate and comprehensive overview of material legal risks that have come to light during the ongoing internal investigation into <text:span text:style-name="Strong_20_Emphasis">{PLACEHOLDER_INVESTIGATION_MATTER}</text:span>. Please treat this document with the utmost confidentiality. It contains privileged legal analysis and is not to be shared outside of the recipients listed above without explicit authorization from the Legal Department.</text:p>
      <text:h text:style-name="Heading_20_2" text:outline-level="2">I. Executive Summary of Findings</text:h>
      <text:p text:style-name="Text_20_body">Following a detailed review of contracts, internal communications, and financial records spanning Q3 2023 through Q2 2024, the Legal Department has identified <text:span text:style-name="Strong_20_Emphasis">three primary areas of concern</text:span> that require immediate board-level attention and strategic decision-making. These findings are preliminary and subject to further verification, but the potential exposure to the organization is significant.</text:p>
      <text:list xml:id="list3994159148" text:style-name="L1">
        <text:list-item>
          <text:p text:style-name="P5"><text:span text:style-name="Strong_20_Emphasis">Regulatory Non-Compliance (Securities &amp; Exchange Commission):</text:span> Potential violations related to disclosure obligations under Section 10(b) of the Securities Exchange Act of 1934 and SEC Rule 10b-5. Specifically, there are indications that material information regarding {PLACEHOLDER_SPECIFIC_EVENT} was not timely disclosed. </text:p>
        </text:list-item>
        <text:list-item>
          <text:p text:style-name="P5"><text:span text:style-name="Strong_20_Emphasis">Contractual Breach &amp; Liability:</text:span> A material breach of contract with {PLACEHOLDER_COUNTERPARTY_NAME} appears to have occurred due to delays in {PLACEHOLDER_PERFORMANCE_OBLIGATION}. The counterparty has retained outside counsel and has signaled intent to pursue litigation. </text:p>
        </text:list-item>
        <text:list-item>
          <text:p text:style-name="P4"><text:span text:style-name="Strong_20_Emphasis">Internal Governance &amp; Whistleblower Allegations:</text:span> A formal complaint was filed under the company's whistleblower policy by {PLACEHOLDER_EMPLOYEE_ROLE}, alleging irregularities in {PLACEHOLDER_ACCOUNTING_PRACTICE}. The complaint has been escalated to the Audit Committee. </text:p>
        </text:list-item>
      </text:list>
      <text:h text:style-name="Heading_20_2" text:outline-level="2">II. Detailed Analysis of Exposure</text:h>
      <text:h text:style-name="Heading_20_3" text:outline-level="3">A. Securities Law Exposure</text:h>
      <text:p text:style-name="Text_20_body">The review of the company's public filings and internal communications reveals a potential gap in the timely disclosure of adverse information. On <text:span text:style-name="Strong_20_Emphasis">{PLACEHOLDER_DATE}</text:span>, the company became aware of data indicating a material downturn in projected revenue for the {PLACEHOLDER_FISCAL_QUARTER}. However, a public announcement was not made until {PLACEHOLDER_LATER_DATE}. During this interim period, certain insiders engaged in transactions that may be subject to scrutiny. The potential liability includes shareholder derivative actions, SEC enforcement proceedings, and reputational damag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Risk Factor</text:p>
          </table:table-cell>
          <table:table-cell table:style-name="Table2.A1" office:value-type="string">
            <text:p text:style-name="Table_20_Heading">Probability</text:p>
          </table:table-cell>
          <table:table-cell table:style-name="Table2.A1" office:value-type="string">
            <text:p text:style-name="Table_20_Heading">Estimated Exposure (USD)</text:p>
          </table:table-cell>
          <table:table-cell table:style-name="Table2.A1" office:value-type="string">
            <text:p text:style-name="Table_20_Heading">Recommended Action</text:p>
          </table:table-cell>
        </table:table-row>
        <table:table-row>
          <table:table-cell table:style-name="Table2.A1" office:value-type="string">
            <text:p text:style-name="Table_20_Contents">SEC Investigation</text:p>
          </table:table-cell>
          <table:table-cell table:style-name="Table2.A1" office:value-type="string">
            <text:p text:style-name="Table_20_Contents">High</text:p>
          </table:table-cell>
          <table:table-cell table:style-name="Table2.A1" office:value-type="string">
            <text:p text:style-name="Table_20_Contents">$2,000,000 - $15,000,000</text:p>
          </table:table-cell>
          <table:table-cell table:style-name="Table2.A1" office:value-type="string">
            <text:p text:style-name="Table_20_Contents">Engage external securities counsel immediately</text:p>
          </table:table-cell>
        </table:table-row>
        <table:table-row>
          <table:table-cell table:style-name="Table2.A1" office:value-type="string">
            <text:p text:style-name="Table_20_Contents">Shareholder Class Action</text:p>
          </table:table-cell>
          <table:table-cell table:style-name="Table2.A1" office:value-type="string">
            <text:p text:style-name="Table_20_Contents">Medium-High</text:p>
          </table:table-cell>
          <table:table-cell table:style-name="Table2.A1" office:value-type="string">
            <text:p text:style-name="Table_20_Contents">$10,000,000 - $50,000,000</text:p>
          </table:table-cell>
          <table:table-cell table:style-name="Table2.A1" office:value-type="string">
            <text:p text:style-name="Table_20_Contents">Preserve all relevant documents; issue litigation hold</text:p>
          </table:table-cell>
        </table:table-row>
        <table:table-row>
          <table:table-cell table:style-name="Table2.A1" office:value-type="string">
            <text:p text:style-name="Table_20_Contents">Individual Director/Officer Liability</text:p>
          </table:table-cell>
          <table:table-cell table:style-name="Table2.A1" office:value-type="string">
            <text:p text:style-name="Table_20_Contents">Medium</text:p>
          </table:table-cell>
          <table:table-cell table:style-name="Table2.A1" office:value-type="string">
            <text:p text:style-name="Table_20_Contents">Indemnification claims; D&amp;O insurance limits</text:p>
          </table:table-cell>
          <table:table-cell table:style-name="Table2.A1" office:value-type="string">
            <text:p text:style-name="Table_20_Contents">Review D&amp;O policy; separate representation for individuals</text:p>
          </table:table-cell>
        </table:table-row>
      </table:table>
      <text:h text:style-name="Heading_20_3" text:outline-level="3">B. Contractual Liability &amp; Litigation Risk</text:h>
      <text:p text:style-name="Text_20_body">Our analysis of the master services agreement with <text:span text:style-name="Strong_20_Emphasis">{PLACEHOLDER_COUNTERPARTY_NAME}</text:span> indicates that the company is likely in material breach of Sections {PLACEHOLDER_CONTRACT_SECTIONS}. The counterparty has already sent a formal notice of default and has demanded specific performance plus damages. The Legal Department has prepared a preliminary response, but we recommend authorizing settlement discussions to mitigate litigation costs and potential adverse judgments.</text:p>
      <text:p text:style-name="Text_20_body">The key contractual obligations at issue are as follows:</text:p>
      <text:list xml:id="list2809573165" text:style-name="L2">
        <text:list-item>
          <text:p text:style-name="P7">Delivery of {PLACEHOLDER_PRODUCT_SERVICE} by {PLACEHOLDER_DEADLINE_DATE}. </text:p>
        </text:list-item>
        <text:list-item>
          <text:p text:style-name="P7"><text:soft-page-break/>Maintenance of minimum service levels as defined in Schedule A of the agreement. </text:p>
        </text:list-item>
        <text:list-item>
          <text:p text:style-name="P6">Compliance with data privacy and security provisions under applicable law. </text:p>
        </text:list-item>
      </text:list>
      <text:h text:style-name="Heading_20_3" text:outline-level="3">C. Whistleblower Complaint &amp; Internal Controls</text:h>
      <text:p text:style-name="Text_20_body">The whistleblower complaint, filed by <text:span text:style-name="Strong_20_Emphasis">{PLACEHOLDER_EMPLOYEE_NAME}</text:span> (a senior analyst in the finance department), raises serious concerns about the accuracy of financial reporting related to {PLACEHOLDER_ACCOUNTING_ISSUE}. The complaint alleges that revenue recognition practices were accelerated improperly to meet quarterly targets. The Audit Committee has been briefed, and an independent investigation is being launched. The Legal Department is coordinating with external forensic accountants.</text:p>
      <text:p text:style-name="P8"><text:span text:style-name="Strong_20_Emphasis"><text:span text:style-name="T1">ATTACHMENT A:</text:span></text:span><text:span text:style-name="T1"> Redacted copy of whistleblower complaint (dated {PLACEHOLDER_COMPLAINT_DATE})<text:line-break/></text:span><text:span text:style-name="Strong_20_Emphasis"><text:span text:style-name="T1">ATTACHMENT B:</text:span></text:span><text:span text:style-name="T1"> Preliminary timeline of relevant events (privileged)<text:line-break/></text:span><text:span text:style-name="Strong_20_Emphasis"><text:span text:style-name="T1">ATTACHMENT C:</text:span></text:span><text:span text:style-name="T1"> Document preservation notice (to be distributed) </text:span></text:p>
      <text:h text:style-name="Heading_20_2" text:outline-level="2">III. Recommended Immediate Actions</text:h>
      <text:p text:style-name="Text_20_body">Based on the foregoing analysis, the Legal Department recommends the following actions be taken immediately:</text:p>
      <text:list xml:id="list1201109554" text:style-name="L3">
        <text:list-item>
          <text:p text:style-name="P10"><text:span text:style-name="Strong_20_Emphasis">Document Preservation:</text:span> Issue an immediate litigation hold to all employees in the relevant departments (Finance, Sales, Operations, and Executive Office). No documents, emails, or electronic records relating to {PLACEHOLDER_MATTER} are to be destroyed or altered. </text:p>
        </text:list-item>
        <text:list-item>
          <text:p text:style-name="P10"><text:span text:style-name="Strong_20_Emphasis">Engagement of External Counsel:</text:span> Retain a law firm with specific expertise in securities litigation and SEC defense. The recommended firms are {PLACEHOLDER_FIRM_1} or {PLACEHOLDER_FIRM_2}. Estimated retainer: $500,000. </text:p>
        </text:list-item>
        <text:list-item>
          <text:p text:style-name="P10"><text:span text:style-name="Strong_20_Emphasis">Board Briefing:</text:span> Schedule an emergency executive session of the Board of Directors within the next 48 hours to discuss this memorandum and approve the proposed response strategy. </text:p>
        </text:list-item>
        <text:list-item>
          <text:p text:style-name="P10"><text:span text:style-name="Strong_20_Emphasis">Communication Hold:</text:span> All external communications regarding these matters must be cleared by the Legal Department. No statements are to be made to the press, analysts, or counterparties without prior review. </text:p>
        </text:list-item>
        <text:list-item>
          <text:p text:style-name="P9"><text:span text:style-name="Strong_20_Emphasis">Internal Investigation:</text:span> Authorize a full internal investigation under the direction of the General Counsel, with the assistance of external forensic accountants and e-discovery vendors. </text:p>
        </text:list-item>
      </text:list>
      <text:h text:style-name="Heading_20_2" text:outline-level="2">IV. Conclusion &amp; Next Steps</text:h>
      <text:p text:style-name="Text_20_body">The organization faces a confluence of serious legal challenges that, if not addressed promptly and strategically, could result in substantial financial penalties, regulatory sanctions, and irreparable harm to our reputation. The Legal Department stands ready to execute the recommended actions upon receiving board approval. A follow-up memorandum will be provided within <text:span text:style-name="Strong_20_Emphasis">{PLACEHOLDER_NUMBER_OF_DAYS} business days</text:span> with a detailed action plan and budget.</text:p>
      <text:p text:style-name="Text_20_body">Please confirm receipt of this memorandum by replying to this secure channel. The next scheduled update will be provided at the emergency board meeting.</text:p>
      <text:p text:style-name="P11">Respectfully submitted,</text:p>
      <text:p text:style-name="P11"><text:span text:style-name="Strong_20_Emphasis">General Counsel, Legal Department</text:span></text:p>
      <text:p text:style-name="P11">Office of the General Counsel</text:p>
      <text:p text:style-name="P11">{PLACEHOLDER_COMPANY_NAME}</text:p>
      <text:p text:style-name="P11">Direct: {PLACEHOLDER_PHONE_NUMBER}</text:p>
      <text:p text:style-name="P11">Email: {PLACEHOLDER_EMAIL_ADDRESS}</text:p>
      <text:p text:style-name="P12"><text:span text:style-name="T2">This document contains confidential and privileged information intended solely for the use of the addressee. If you are not the intended recipient, you are hereby notified that any review, dissemination, distribution, or copying of this communication is strictly prohibited. If you have received this communication in error, please notify the sender immediately and destroy all copies.<text:line-break/><text:line-break/></text:span><text:span text:style-name="Strong_20_Emphasis"><text:span text:style-name="T2">PRIVILEGED AND CONFIDENTIAL — ATTORNEY-CLIENT COMMUNICATION / ATTORNEY WORK PRODUCT</text:span></text:span><text:span text:style-name="T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a1a1a"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55in" style:contextual-spacing="false" fo:text-align="center" style:justify-single-word="false" fo:padding-left="0in" fo:padding-right="0in" fo:padding-top="0in" fo:padding-bottom="0.111in" fo:border-left="none" fo:border-right="none" fo:border-top="none" fo:border-bottom="1.5pt solid #2c3e50"/>
      <style:text-properties fo:text-transform="uppercase" style:font-name="Liberation Sans Unicode MS" fo:font-family="'Liberation Sans Unicode MS'" style:font-pitch="variable" fo:font-size="16pt" fo:letter-spacing="0.0102in"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style:text-properties fo:color="#2c3e50"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945in" fo:margin-bottom="0.0555in" style:contextual-spacing="false"/>
      <style:text-properties style:font-name="Liberation Serif" fo:font-family="'Liberation Serif'"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no-indent" style:display-name="Text Body.no-indent"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2" meta:paragraph-count="64" meta:word-count="935" meta:character-count="7168" meta:non-whitespace-character-count="6293"/>
    <meta:generator>LibreOffice/7.3.7.2$Linux_X86_64 LibreOffice_project/30$Build-2</meta:generator>
  </office:meta>
</office:document-meta>
</file>