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rush Script MT" svg:font-family="'Brush Script MT', 'Lucida Handwriting', cursiv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ans1" svg:font-family="'Liberation Sans', Arial, sans-serif"/>
    <style:font-face style:name="Liberation Serif" svg:font-family="'Liberation Serif'" style:font-family-generic="roman" style:font-pitch="variable"/>
    <style:font-face style:name="Liberation Serif1" svg:font-family="'Liberation Serif', 'Times New Roman', serif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master-page-name="HTML">
      <style:paragraph-properties fo:margin-top="0in" fo:margin-bottom="0.139in" style:contextual-spacing="false" style:line-height-at-least="0.8335in" fo:text-align="center" style:justify-single-word="false" style:page-number="auto"/>
      <style:text-properties fo:color="#003366" loext:opacity="100%" fo:font-size="36pt" fo:font-weight="bold" fo:background-color="#f0f4f8" loext:padding-left="0.0193in" loext:padding-right="0in" loext:padding-top="0.0193in" loext:padding-bottom="0.0193in" loext:border-left="1.5pt solid #003366" loext:border-right="none" loext:border-top="1.5pt solid #003366" loext:border-bottom="1.5pt solid #003366"/>
    </style:style>
    <style:style style:name="P2" style:family="paragraph" style:parent-style-name="Text_20_body">
      <style:paragraph-properties fo:margin-top="0in" fo:margin-bottom="0.028in" style:contextual-spacing="false" fo:text-align="center" style:justify-single-word="false"/>
      <style:text-properties fo:color="#003366" loext:opacity="100%" style:font-name="Liberation Sans1" fo:font-size="22pt" fo:letter-spacing="0.0209in" fo:font-weight="bold" loext:padding-left="0in" loext:padding-right="0in" loext:padding-top="0in" loext:padding-bottom="0.1665in" loext:border-left="none" loext:border-right="none" loext:border-top="none" loext:border-bottom="2.24pt solid #003366"/>
    </style:style>
    <style:style style:name="P3" style:family="paragraph" style:parent-style-name="Text_20_body">
      <style:paragraph-properties fo:margin-top="0in" fo:margin-bottom="0.111in" style:contextual-spacing="false" fo:text-align="center" style:justify-single-word="false"/>
      <style:text-properties fo:color="#555555" loext:opacity="100%" style:font-name="Liberation Sans1" fo:font-size="10pt" loext:padding-left="0in" loext:padding-right="0in" loext:padding-top="0in" loext:padding-bottom="0.1665in" loext:border-left="none" loext:border-right="none" loext:border-top="none" loext:border-bottom="2.24pt solid #003366"/>
    </style:style>
    <style:style style:name="P4" style:family="paragraph" style:parent-style-name="Text_20_body">
      <style:paragraph-properties fo:margin-left="0.028in" fo:margin-right="0.028in" fo:margin-top="0.028in" fo:margin-bottom="0.028in" style:contextual-spacing="false" fo:text-align="center" style:justify-single-word="false" fo:text-indent="0in" style:auto-text-indent="false"/>
      <style:text-properties fo:color="#333333" loext:opacity="100%" style:font-name="Liberation Sans1" fo:font-size="9pt" loext:padding-left="0in" loext:padding-right="0in" loext:padding-top="0in" loext:padding-bottom="0.1665in" loext:border-left="none" loext:border-right="none" loext:border-top="none" loext:border-bottom="2.24pt solid #003366"/>
    </style:style>
    <style:style style:name="P5" style:family="paragraph" style:parent-style-name="Text_20_body">
      <style:paragraph-properties fo:margin-top="0.278in" fo:margin-bottom="0.278in" style:contextual-spacing="false" fo:text-align="end" style:justify-single-word="false"/>
      <style:text-properties fo:font-size="11pt"/>
    </style:style>
    <style:style style:name="P6" style:family="paragraph" style:parent-style-name="Text_20_body">
      <style:paragraph-properties fo:margin-top="0in" fo:margin-bottom="0.278in" style:contextual-spacing="false"/>
    </style:style>
    <style:style style:name="P7" style:family="paragraph" style:parent-style-name="Text_20_body">
      <style:paragraph-properties fo:margin-top="0in" fo:margin-bottom="0.1665in" style:contextual-spacing="false"/>
    </style:style>
    <style:style style:name="P8" style:family="paragraph" style:parent-style-name="Text_20_body">
      <style:paragraph-properties fo:margin-top="0in" fo:margin-bottom="0.139in" style:contextual-spacing="false" fo:text-align="justify" style:justify-single-word="false"/>
    </style:style>
    <style:style style:name="P9" style:family="paragraph" style:parent-style-name="Text_20_body">
      <style:paragraph-properties fo:margin-left="0.1665in" fo:margin-right="0.1665in" fo:margin-top="0in" fo:margin-bottom="0.139in" style:contextual-spacing="false" fo:text-align="justify" style:justify-single-word="false" fo:text-indent="0in" style:auto-text-indent="false"/>
    </style:style>
    <style:style style:name="P10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/>
    </style:style>
    <style:style style:name="P11" style:family="paragraph" style:parent-style-name="Text_20_body" style:list-style-name="L1">
      <style:paragraph-properties fo:margin-left="0.1665in" fo:margin-right="0.1665in" fo:margin-top="0.1665in" fo:margin-bottom="0.1665in" style:contextual-spacing="false" fo:text-indent="0in" style:auto-text-indent="false"/>
      <style:text-properties fo:background-color="#f9f9f9" loext:padding-left="0.1665in" loext:padding-right="0in" loext:padding-top="0in" loext:padding-bottom="0in" loext:border-left="3pt solid #003366" loext:border-right="none" loext:border-top="none" loext:border-bottom="none"/>
    </style:style>
    <style:style style:name="P12" style:family="paragraph" style:parent-style-name="Text_20_body">
      <style:paragraph-properties fo:margin-top="0.111in" fo:margin-bottom="0.1965in" style:contextual-spacing="false"/>
      <style:text-properties fo:color="#1a1a1a" loext:opacity="100%" style:font-name="Brush Script MT" fo:font-size="18pt"/>
    </style:style>
    <style:style style:name="P13" style:family="paragraph" style:parent-style-name="Text_20_body">
      <style:paragraph-properties fo:margin-top="0.139in" fo:margin-bottom="0.1965in" style:contextual-spacing="false"/>
      <style:text-properties fo:text-transform="uppercase" fo:color="#cc0000" loext:opacity="100%" fo:font-size="9pt" fo:letter-spacing="0.0138in" fo:font-weight="bold" fo:background-color="#fff5f5" loext:padding-left="0.1665in" loext:padding-right="0in" loext:padding-top="0.0835in" loext:padding-bottom="0.0835in" loext:border-left="1.5pt solid #cc0000" loext:border-right="none" loext:border-top="1.5pt solid #cc0000" loext:border-bottom="1.5pt solid #cc0000"/>
    </style:style>
    <style:style style:name="P14" style:family="paragraph" style:parent-style-name="Text_20_body">
      <style:paragraph-properties fo:margin-left="0.278in" fo:margin-right="0in" fo:margin-top="0.2083in" fo:margin-bottom="0.1965in" style:contextual-spacing="false" fo:line-height="120%" fo:text-align="center" style:justify-single-word="false" fo:text-indent="0in" style:auto-text-indent="false"/>
      <style:text-properties fo:color="#cc0000" loext:opacity="100%" fo:font-size="7pt" fo:font-weight="bold" fo:background-color="#fff5f5" loext:padding-left="0.0193in" loext:padding-right="0in" loext:padding-top="0.1252in" loext:padding-bottom="0.0193in" loext:border-left="1.5pt solid #cc0000" loext:border-right="none" loext:border-top="1.5pt solid #cc0000" loext:border-bottom="1.5pt solid #cc0000"/>
    </style:style>
    <style:style style:name="P15" style:family="paragraph" style:parent-style-name="Text_20_body">
      <style:paragraph-properties fo:margin-top="0.4165in" fo:margin-bottom="0.1965in" style:contextual-spacing="false"/>
    </style:style>
    <style:style style:name="P16" style:family="paragraph" style:parent-style-name="Text_20_body">
      <style:paragraph-properties fo:margin-top="0.5555in" fo:margin-bottom="0.1965in" style:contextual-spacing="false" fo:text-align="center" style:justify-single-word="false"/>
    </style:style>
    <style:style style:name="T1" style:family="text">
      <style:text-properties fo:background-color="#f9f9f9" loext:char-shading-value="0" loext:padding-left="0.1665in" loext:padding-right="0in" loext:padding-top="0in" loext:padding-bottom="0in" loext:border-left="3pt solid #003366" loext:border-right="none" loext:border-top="none" loext:border-bottom="none"/>
    </style:style>
    <style:style style:name="T2" style:family="text">
      <style:text-properties fo:color="#777777" loext:opacity="100%" fo:font-size="8pt" loext:padding-left="0in" loext:padding-right="0in" loext:padding-top="0.111in" loext:padding-bottom="0in" loext:border-left="none" loext:border-right="none" loext:border-top="0.06pt solid #cccccc" loext:border-bottom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</text:p>
      <text:p text:style-name="P2">UNIVERSITY OF {PLACEHOLDER_UNIVERSITY}</text:p>
      <text:p text:style-name="P3">College of {PLACEHOLDER_COLLEGE} · Department of {PLACEHOLDER_DEPARTMENT}</text:p>
      <text:p text:style-name="P4">123 Academic Drive, {PLACEHOLDER_CITY}, {PLACEHOLDER_STATE} {PLACEHOLDER_ZIP}</text:p>
      <text:p text:style-name="P4">Phone: (555) {PLACEHOLDER_PHONE} · Fax: (555) {PLACEHOLDER_FAX}</text:p>
      <text:p text:style-name="P4">Email: {PLACEHOLDER_EMAIL} · Website: www.{PLACEHOLDER_WEBSITE}.edu</text:p>
      <text:p text:style-name="P5">{PLACEHOLDER_DATE} </text:p>
      <text:p text:style-name="P6"><text:span text:style-name="Strong_20_Emphasis">To the Hiring Committee</text:span><text:line-break/>{PLACEHOLDER_COMPANY_NAME}<text:line-break/>{PLACEHOLDER_COMPANY_ADDRESS}<text:line-break/>{PLACEHOLDER_COMPANY_CITY}, {PLACEHOLDER_COMPANY_STATE} {PLACEHOLDER_COMPANY_ZIP} </text:p>
      <text:p text:style-name="P7"><text:span text:style-name="Strong_20_Emphasis">Re: Letter of Recommendation for {PLACEHOLDER_CANDIDATE_NAME}</text:span><text:line-break/><text:line-break/>Dear Members of the Hiring Committee, </text:p>
      <text:p text:style-name="P8">It is with exceptional enthusiasm and confidence that I write this letter of recommendation for <text:span text:style-name="Strong_20_Emphasis">{PLACEHOLDER_CANDIDATE_NAME}</text:span>, who has been under my academic supervision for the past <text:span text:style-name="Strong_20_Emphasis">{PLACEHOLDER_YEARS}</text:span> years. I have had the privilege of serving as {PLACEHOLDER_CANDIDATE_NAME}'s academic advisor and primary instructor for multiple advanced courses in the Department of {PLACEHOLDER_DEPARTMENT} at the University of {PLACEHOLDER_UNIVERSITY}. In all my years of teaching and mentoring, I have rarely encountered a student with such a remarkable combination of intellectual curiosity, analytical rigor, and professional maturity. </text:p>
      <text:p text:style-name="P8">{PLACEHOLDER_CANDIDATE_NAME} first distinguished themselves in my <text:span text:style-name="Emphasis">{PLACEHOLDER_COURSE_NAME}</text:span> course during the {PLACEHOLDER_SEMESTER} semester. Their performance was consistently at the top of a class of over {PLACEHOLDER_CLASS_SIZE} students. What set them apart was not merely their academic aptitude, but their ability to synthesize complex theoretical concepts and apply them to real-world problems with creativity and precision. Their final research project on <text:span text:style-name="Emphasis">{PLACEHOLDER_TOPIC}</text:span> was, without exaggeration, one of the most insightful undergraduate papers I have supervised in my {PLACEHOLDER_PROFESSOR_EXPERIENCE} years at this university. </text:p>
      <text:p text:style-name="P8">Beyond the classroom, {PLACEHOLDER_CANDIDATE_NAME} has demonstrated outstanding leadership and initiative. As a research assistant in my laboratory, they contributed significantly to our ongoing project on <text:span text:style-name="Strong_20_Emphasis">{PLACEHOLDER_RESEARCH_TOPIC}</text:span>. Their responsibilities included designing experimental protocols, analyzing complex datasets using {PLACEHOLDER_SOFTWARE_TOOLS}, and co-authoring a manuscript that is currently under review for publication in the <text:span text:style-name="Emphasis">Journal of {PLACEHOLDER_JOURNAL}</text:span>. Their ability to work independently, troubleshoot challenges, and collaborate effectively with graduate students and faculty alike has been truly impressive. </text:p>
      <text:p text:style-name="P10"><text:span text:style-name="Strong_20_Emphasis"><text:span text:style-name="T1">Key Strengths:</text:span></text:span><text:span text:style-name="T1"> </text:span></text:p>
      <text:list xml:id="list2156205997" text:style-name="L1">
        <text:list-item>
          <text:p text:style-name="P11">Exceptional analytical and problem-solving abilities, particularly in {PLACEHOLDER_SKILL_1} </text:p>
        </text:list-item>
        <text:list-item>
          <text:p text:style-name="P11">Strong written and oral communication skills, demonstrated through multiple conference presentations and publications </text:p>
        </text:list-item>
        <text:list-item>
          <text:p text:style-name="P11">Proven leadership in team-based research environments and student organizations </text:p>
        </text:list-item>
        <text:list-item>
          <text:p text:style-name="P11">Remarkable dedication to ethical research practices and academic integrity </text:p>
        </text:list-item>
        <text:list-item>
          <text:p text:style-name="P11">Ability to master new concepts and technologies rapidly, including {PLACEHOLDER_SKILL_2} and {PLACEHOLDER_SKILL_3} </text:p>
        </text:list-item>
      </text:list>
      <text:p text:style-name="P9">On a personal level, {PLACEHOLDER_CANDIDATE_NAME} is a person of great integrity, humility, and perseverance. I have seen them overcome significant challenges, including {PLACEHOLDER_CHALLENGE}, with grace and determination. They are a natural collaborator who elevates the work of those around them, and they possess the emotional intelligence to navigate complex professional relationships with tact and diplomacy. </text:p>
      <text:p text:style-name="P8">In comparison to the many talented students I have mentored over the years, I would rank {PLACEHOLDER_CANDIDATE_NAME} in the top <text:span text:style-name="Strong_20_Emphasis">{PLACEHOLDER_PERCENTILE}%</text:span>. Their combination of intellectual ability, work ethic, and interpersonal skills makes them an ideal candidate for the position at your esteemed organization. I am confident that they will bring the same level of dedication, innovation, and professionalism to your team that they have demonstrated throughout their academic career. </text:p>
      <text:p text:style-name="P8">I should also note that {PLACEHOLDER_CANDIDATE_NAME} has received multiple academic honors, including {PLACEHOLDER_HONOR_1} and {PLACEHOLDER_HONOR_2}, and has been an active member of {PLACEHOLDER_ORGANIZATION}. Their commitment to community service, particularly through {PLACEHOLDER_SERVICE_ACTIVITY}, further reflects their well-rounded character and desire to make a positive impact beyond the academic sphere. </text:p>
      <text:p text:style-name="P8">In conclusion, I recommend {PLACEHOLDER_CANDIDATE_NAME} without reservation for the position of <text:span text:style-name="Strong_20_Emphasis">{PLACEHOLDER_POSITION}</text:span> at {PLACEHOLDER_COMPANY_NAME}. I am certain that they will be a valuable asset to your organization and will exceed your expectations. Please do not hesitate to contact me if you require any additional information or clarification regarding {PLACEHOLDER_CANDIDATE_NAME}'s qualifications and performance. </text:p>
      <text:p text:style-name="P15">Sincerely,</text:p>
      <text:p text:style-name="P12">{PLACEHOLDER_SIGNATURE} </text:p>
      <text:p text:style-name="P15"><text:span text:style-name="Strong_20_Emphasis">Dr. {PLACEHOLDER_DEAN_NAME}</text:span><text:line-break/>Dean, College of {PLACEHOLDER_COLLEGE}<text:line-break/>Department of {PLACEHOLDER_DEPARTMENT}<text:line-break/>University of {PLACEHOLDER_UNIVERSITY} </text:p>
      <text:p text:style-name="P13"><text:soft-page-break/>APPROVED &amp; AUTHORIZED </text:p>
      <text:p text:style-name="P14">OFFICIAL<text:line-break/>SEAL<text:line-break/>UNIVERSITY OF<text:line-break/>{PLACEHOLDER_UNIVERSITY} </text:p>
      <text:p text:style-name="P16"><text:span text:style-name="Emphasis"><text:span text:style-name="T2">This document is an official recommendation from the University of {PLACEHOLDER_UNIVERSITY}. Verification may be obtained by contacting the Dean's Office at (555) {PLACEHOLDER_PHONE} or emailing {PLACEHOLDER_EMAIL}.</text:span></text:span><text:span text:style-name="T2"><text:line-break/>Document ID: {PLACEHOLDER_DOC_ID} · Issued: {PLACEHOLDER_DATE}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rush Script MT" svg:font-family="'Brush Script MT', 'Lucida Handwriting', cursiv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ans1" svg:font-family="'Liberation Sans', Arial, sans-serif"/>
    <style:font-face style:name="Liberation Serif" svg:font-family="'Liberation Serif'" style:font-family-generic="roman" style:font-pitch="variable"/>
    <style:font-face style:name="Liberation Serif1" svg:font-family="'Liberation Serif', 'Times New Roman', serif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DejaVu Sans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fo:color="#1a1a1a" loext:opacity="100%" style:font-name="Liberation Serif1" fo:font-family="'Liberation Serif', 'Times New Roman', serif" fo:font-size="12pt" style:font-name-asian="Liberation Serif1" style:font-family-asian="'Liberation Serif', 'Times New Roman', serif" style:font-size-asian="12pt" style:font-name-complex="Liberation Serif1" style:font-family-complex="'Liberation Serif', 'Times New Roman', serif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Liberation Sans Unicode MS" fo:font-family="'Liberation Sans Unicode MS'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9839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2" meta:paragraph-count="28" meta:word-count="622" meta:character-count="5291" meta:non-whitespace-character-count="4680"/>
    <meta:generator>LibreOffice/7.3.7.2$Linux_X86_64 LibreOffice_project/30$Build-2</meta:generator>
  </office:meta>
</office:document-meta>
</file>