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3549in"/>
    </style:style>
    <style:style style:name="Table1.B" style:family="table-column">
      <style:table-column-properties style:column-width="1.5826in"/>
    </style:style>
    <style:style style:name="Table1.C" style:family="table-column">
      <style:table-column-properties style:column-width="1.5938in"/>
    </style:style>
    <style:style style:name="Table1.D" style:family="table-column">
      <style:table-column-properties style:column-width="1.5667in"/>
    </style:style>
    <style:style style:name="Table1.E" style:family="table-column">
      <style:table-column-properties style:column-width="1.5951in"/>
    </style:style>
    <style:style style:name="Table1.A1" style:family="table-cell">
      <style:table-cell-properties style:vertical-align="middle" fo:padding="0.0194in" fo:border="none"/>
    </style:style>
    <style:style style:name="P1" style:family="paragraph" style:parent-style-name="Heading_20_1">
      <style:paragraph-properties fo:margin-top="0in" fo:margin-bottom="0.3126in" style:contextual-spacing="false" fo:text-align="center" style:justify-single-word="false"/>
      <style:text-properties loext:padding-left="0in" loext:padding-right="0in" loext:padding-top="0in" loext:padding-bottom="0.2083in" loext:border-left="none" loext:border-right="none" loext:border-top="none" loext:border-bottom="2.24pt solid #003366"/>
    </style:style>
    <style:style style:name="P2" style:family="paragraph" style:parent-style-name="Heading_20_2">
      <style:paragraph-properties fo:margin-left="0.2083in" fo:margin-right="0.2083in" fo:margin-top="0.2083in" fo:margin-bottom="0.2083in" style:contextual-spacing="false" fo:text-indent="0in" style:auto-text-indent="false"/>
    </style:style>
    <style:style style:name="P3" style:family="paragraph" style:parent-style-name="Heading_20_3">
      <style:paragraph-properties fo:margin-left="0.2083in" fo:margin-right="0.2083in" fo:margin-top="0.3126in" fo:margin-bottom="0.1965in" style:contextual-spacing="false" fo:text-indent="0in" style:auto-text-indent="false"/>
    </style:style>
    <style:style style:name="P4" style:family="paragraph" style:parent-style-name="Heading_20_3">
      <style:paragraph-properties fo:margin-top="0.3126in" fo:margin-bottom="0.1965in" style:contextual-spacing="false"/>
    </style:style>
    <style:style style:name="P5" style:family="paragraph" style:parent-style-name="Text_20_Body.operative-paragraph">
      <style:paragraph-properties fo:margin-left="0.2083in" fo:margin-right="0.2083in" fo:margin-top="0.2083in" fo:margin-bottom="0.2083in" style:contextual-spacing="false" fo:text-indent="-0.2083in" style:auto-text-indent="false"/>
    </style:style>
    <style:style style:name="P6" style:family="paragraph" style:parent-style-name="Text_20_body" style:master-page-name="HTML">
      <style:paragraph-properties fo:margin-top="0in" fo:margin-bottom="0.3126in" style:contextual-spacing="false" fo:text-align="center" style:justify-single-word="false" style:page-number="auto"/>
      <style:text-properties loext:padding-left="0in" loext:padding-right="0in" loext:padding-top="0in" loext:padding-bottom="0.2083in" loext:border-left="none" loext:border-right="none" loext:border-top="none" loext:border-bottom="2.24pt solid #003366"/>
    </style:style>
    <style:style style:name="P7" style:family="paragraph" style:parent-style-name="Text_20_body">
      <style:paragraph-properties fo:margin-top="0in" fo:margin-bottom="0.3126in" style:contextual-spacing="false" fo:text-align="center" style:justify-single-word="false"/>
      <style:text-properties fo:color="#666666" loext:opacity="100%" loext:padding-left="0in" loext:padding-right="0in" loext:padding-top="0in" loext:padding-bottom="0.2083in" loext:border-left="none" loext:border-right="none" loext:border-top="none" loext:border-bottom="2.24pt solid #003366"/>
    </style:style>
    <style:style style:name="P8" style:family="paragraph" style:parent-style-name="Text_20_body">
      <style:paragraph-properties fo:margin-top="0.2083in" fo:margin-bottom="0.1965in" style:contextual-spacing="false" fo:text-align="center" style:justify-single-word="false"/>
      <style:text-properties fo:color="#666666" loext:opacity="100%" fo:font-size="9pt" loext:padding-left="0in" loext:padding-right="0in" loext:padding-top="0.1043in" loext:padding-bottom="0in" loext:border-left="none" loext:border-right="none" loext:border-top="0.06pt solid #cccccc" loext:border-bottom="none"/>
    </style:style>
    <style:style style:name="P9" style:family="paragraph" style:parent-style-name="Text_20_body">
      <style:paragraph-properties fo:margin-top="0in" fo:margin-bottom="0.052in" style:contextual-spacing="false" fo:text-align="end" style:justify-single-word="false"/>
    </style:style>
    <style:style style:name="P10" style:family="paragraph" style:parent-style-name="Text_20_body">
      <style:paragraph-properties fo:margin-top="0in" fo:margin-bottom="0.2083in" style:contextual-spacing="false" fo:text-align="end" style:justify-single-word="false"/>
    </style:style>
    <style:style style:name="P11" style:family="paragraph" style:parent-style-name="Text_20_body">
      <style:paragraph-properties fo:margin-left="0.2083in" fo:margin-right="0.2083in" fo:margin-top="0.2083in" fo:margin-bottom="0.1563in" style:contextual-spacing="false" fo:text-indent="0in" style:auto-text-indent="false"/>
      <style:text-properties fo:text-transform="uppercase" fo:font-size="12pt" fo:font-weight="bold" loext:padding-left="0.1043in" loext:padding-right="0in" loext:padding-top="0in" loext:padding-bottom="0in" loext:border-left="3pt solid #003366" loext:border-right="none" loext:border-top="none" loext:border-bottom="none"/>
    </style:style>
    <style:style style:name="P12" style:family="paragraph" style:parent-style-name="Text_20_body">
      <style:paragraph-properties fo:margin-top="0.3126in" fo:margin-bottom="0.1965in" style:contextual-spacing="false" fo:text-align="center" style:justify-single-word="false"/>
      <style:text-properties fo:text-transform="uppercase" fo:color="#cc0000" loext:opacity="100%" fo:font-size="11pt" fo:font-weight="bold" loext:padding="0.052in" loext:border="0.06pt solid #cc0000"/>
    </style:style>
    <style:style style:name="P13" style:family="paragraph" style:parent-style-name="Text_20_body" style:list-style-name="L1">
      <style:paragraph-properties fo:margin-left="0.2083in" fo:margin-right="0.2083in" fo:margin-top="0.2083in" fo:margin-bottom="0.2083in" style:contextual-spacing="false" fo:text-indent="0in" style:auto-text-indent="false"/>
    </style:style>
    <style:style style:name="P14" style:family="paragraph" style:parent-style-name="Text_20_body">
      <style:paragraph-properties fo:margin-top="0.3126in" fo:margin-bottom="0.1965in" style:contextual-spacing="false"/>
    </style:style>
    <style:style style:name="P15" style:family="paragraph" style:parent-style-name="Text_20_body">
      <style:paragraph-properties fo:margin-top="0.3126in" fo:margin-bottom="0.1043in" style:contextual-spacing="false"/>
    </style:style>
    <style:style style:name="P16" style:family="paragraph" style:parent-style-name="Text_20_body" style:list-style-name="L2">
      <style:paragraph-properties fo:margin-top="0.3126in" fo:margin-bottom="0.1965in" style:contextual-spacing="false"/>
    </style:style>
    <style:style style:name="P17" style:family="paragraph" style:parent-style-name="Text_20_body">
      <style:paragraph-properties fo:margin-top="0.4165in" fo:margin-bottom="0.2083in" style:contextual-spacing="false"/>
      <style:text-properties fo:font-size="11pt" loext:padding-left="0in" loext:padding-right="0in" loext:padding-top="0.2083in" loext:padding-bottom="0in" loext:border-left="none" loext:border-right="none" loext:border-top="0.06pt solid #999999" loext:border-bottom="none"/>
    </style:style>
    <style:style style:name="P18" style:family="paragraph" style:parent-style-name="Text_20_body">
      <style:paragraph-properties fo:margin-top="0.3126in" fo:margin-bottom="0.1965in" style:contextual-spacing="false"/>
      <style:text-properties fo:font-size="11pt" loext:padding-left="0in" loext:padding-right="0in" loext:padding-top="0.2083in" loext:padding-bottom="0in" loext:border-left="none" loext:border-right="none" loext:border-top="0.06pt solid #999999" loext:border-bottom="none"/>
    </style:style>
    <style:style style:name="P19" style:family="paragraph" style:parent-style-name="Text_20_body">
      <style:paragraph-properties fo:margin-top="0.4165in" fo:margin-bottom="0.052in" style:contextual-spacing="false"/>
    </style:style>
    <style:style style:name="T1" style:family="text">
      <style:text-properties fo:font-size="10pt"/>
    </style:style>
    <style:style style:name="T2" style:family="text">
      <style:text-properties style:font-size-complex="10pt"/>
    </style:style>
    <style:style style:name="T3" style:family="text">
      <style:text-properties fo:color="#333333" loext:opacity="100%" fo:font-size="11pt"/>
    </style:style>
    <style:style style:name="T4" style:family="text">
      <style:text-properties fo:font-size="11pt" loext:padding-left="0in" loext:padding-right="0in" loext:padding-top="0.2083in" loext:padding-bottom="0in" loext:border-left="none" loext:border-right="none" loext:border-top="0.06pt solid #999999" loext:border-bottom="none"/>
    </style:style>
    <style:style style:name="T5" style:family="text">
      <style:text-properties fo:color="#555555" loext:opacity="100%" fo:font-size="10pt"/>
    </style:style>
    <style:style style:name="fr1" style:family="graphic" style:parent-style-name="Graphics">
      <style:graphic-properties fo:margin-top="0in" fo:margin-bottom="0.1043in"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as-char" svg:width="1.0417in" svg:height="0.3937in" draw:z-index="0"><draw:image xlink:href="https://upload.wikimedia.org/wikipedia/commons/thumb/5/5b/Emblem_of_the_United_Nations.svg/120px-Emblem_of_the_United_Nations.svg.png" xlink:type="simple" xlink:show="embed" xlink:actuate="onLoad"/><svg:title>UN Emblem</svg:title></draw:frame><text:s/></text:p>
      <text:p text:style-name="P1">UNITED NATIONS - OFFICIAL MEMORANDUM</text:p>
      <text:p text:style-name="P7"><text:span text:style-name="T1">NATIONS UNIES • МЕЖДУНАРОДНЫЙ СУД • </text:span><text:span text:style-name="T2">الأمم المتحدة</text:span></text:p>
      <text:p text:style-name="P9"><text:span text:style-name="Strong_20_Emphasis"><text:span text:style-name="T3">Reference:</text:span></text:span><text:span text:style-name="T3"> UNSC/RES/{PLACEHOLDER_RESOLUTION_NUMBER} </text:span></text:p>
      <text:p text:style-name="P10"><text:span text:style-name="Strong_20_Emphasis"><text:span text:style-name="T3">Date:</text:span></text:span><text:span text:style-name="T3"> {PLACEHOLDER_DATE} </text:span></text:p>
      <text:p text:style-name="P11">Subject: IMPOSITION OF TARGETED SANCTIONS PURSUANT TO CHAPTER VII OF THE CHARTER OF THE UNITED NATIONS </text:p>
      <text:p text:style-name="Text_20_Body.preamble"><text:span text:style-name="Strong_20_Emphasis">The Security Council,</text:span><text:line-break/><text:line-break/><text:span text:style-name="Emphasis">Reaffirming</text:span> its primary responsibility for the maintenance of international peace and security under the Charter of the United Nations,<text:line-break/><text:line-break/><text:span text:style-name="Emphasis">Recalling</text:span> its previous resolutions {PLACEHOLDER_PREVIOUS_RESOLUTIONS}, and the statements by its President concerning the situation,<text:line-break/><text:line-break/><text:span text:style-name="Emphasis">Expressing grave concern</text:span> over the continued activities that threaten international peace and security, including the proliferation of weapons of mass destruction, acts of terrorism, and systematic violations of human rights and international humanitarian law,<text:line-break/><text:line-break/><text:span text:style-name="Emphasis">Determining</text:span> that the situation constitutes a threat to international peace and security,<text:line-break/><text:line-break/><text:span text:style-name="Emphasis">Acting</text:span> under Chapter VII of the Charter of the United Nations, and taking measures under Article 41 thereof, </text:p>
      <text:h text:style-name="P2" text:outline-level="2">Operative Provisions</text:h>
      <text:p text:style-name="P5"><text:span text:style-name="Strong_20_Emphasis">1.</text:span> Decides that all Member States shall, without delay, freeze all funds, other financial assets, and economic resources which are owned or controlled, directly or indirectly, by the individuals and entities designated in the Annex to this resolution, or by individuals or entities acting on their behalf or at their direction, as well as funds derived from property owned or controlled by them; </text:p>
      <text:p text:style-name="P5"><text:span text:style-name="Strong_20_Emphasis">2.</text:span> Decides further that all Member States shall prevent the entry into or transit through their territories of all individuals designated in the Annex, provided that nothing in this paragraph shall oblige a State to refuse entry to its own nationals; </text:p>
      <text:p text:style-name="P5"><text:span text:style-name="Strong_20_Emphasis">3.</text:span> Decides that all Member States shall prevent the direct or indirect supply, sale, or transfer of arms and related materiel of all types, including weapons and ammunition, military vehicles and equipment, paramilitary equipment, and spare parts for the aforementioned, to the designated individuals and entities; </text:p>
      <text:p text:style-name="P5"><text:span text:style-name="Strong_20_Emphasis">4.</text:span> Demands that all States, particularly those in the region, cooperate fully in the implementation of the measures imposed by this resolution, including by sharing relevant information with the Committee established pursuant to paragraph 8 below; </text:p>
      <text:p text:style-name="P5"><text:span text:style-name="Strong_20_Emphasis">5.</text:span> Decides that the measures imposed by paragraphs 1, 2, and 3 shall not apply to funds, assets, or resources that the Committee determines to be necessary for basic expenses, including payment for foodstuffs, rent or mortgage, medicines and medical treatment, taxes, insurance premiums, and public utility charges, or for extraordinary expenses, provided that the Committee has notified the relevant States; </text:p>
      <text:p text:style-name="P5"><text:span text:style-name="Strong_20_Emphasis">6.</text:span> Decides that all Member States shall take the necessary measures to prevent the provision of technical assistance, training, financial or other assistance, and the transfer of technology related to the development, production, or use of nuclear, biological, or chemical weapons and their means of delivery, to the designated individuals and entities; </text:p>
      <text:p text:style-name="P5"><text:span text:style-name="Strong_20_Emphasis">7.</text:span> Decides that all States shall inspect, in accordance with their national authorities and legislation and consistent with international law, all cargo bound to or from the designated individuals and entities, if the State concerned has reasonable grounds to believe that the cargo contains items prohibited by this resolution; </text:p>
      <text:p text:style-name="P5"><text:span text:style-name="Strong_20_Emphasis">8.</text:span> Decides to establish, in accordance with rule 28 of its provisional rules of procedure, a Committee of the Security Council consisting of all the members of the Council, to undertake the following tasks: </text:p>
      <text:list xml:id="list3470963989" text:style-name="L1">
        <text:list-item>
          <text:p text:style-name="P13">To monitor the implementation of the measures imposed by this resolution; </text:p>
        </text:list-item>
        <text:list-item>
          <text:p text:style-name="P13">To designate individuals and entities subject to the measures imposed by paragraphs 1, 2, and 3; </text:p>
        </text:list-item>
        <text:list-item>
          <text:p text:style-name="P13">To consider requests for exemptions from the measures imposed by this resolution; </text:p>
        </text:list-item>
        <text:list-item>
          <text:p text:style-name="P13">To examine and act upon information regarding alleged violations of the measures; </text:p>
        </text:list-item>
        <text:list-item>
          <text:p text:style-name="P13">To report periodically to the Security Council on its work; </text:p>
        </text:list-item>
        <text:list-item>
          <text:p text:style-name="P13">To update the list of designated individuals and entities as necessary. </text:p>
        </text:list-item>
      </text:list>
      <text:p text:style-name="P5"><text:span text:style-name="Strong_20_Emphasis">9.</text:span> Calls upon all States to report to the Committee within 60 days from the adoption of this resolution on the steps they have taken with a view to implementing effectively the measures imposed by paragraphs 1, 2, 3, 6, and 7; </text:p>
      <text:p text:style-name="P5"><text:span text:style-name="Strong_20_Emphasis">10.</text:span> Decides that the measures imposed by this resolution shall enter into force at 00:01 Eastern Standard Time on {PLACEHOLDER_EFFECTIVE_DATE}; </text:p>
      <text:p text:style-name="P5"><text:span text:style-name="Strong_20_Emphasis">11.</text:span> Decides to remain actively seized of the matter. </text:p>
      <text:h text:style-name="P3" text:outline-level="3">Annex I: List of Designated Individuals and Entities</text:h>
      <text:p text:style-name="P15"><text:span text:style-name="Emphasis"><text:span text:style-name="T5">Pursuant to operative paragraph 1, 2, and 3 of UNSC Resolution {PLACEHOLDER_RESOLUTION_NUMBER}</text:spa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No.</text:p>
            </table:table-cell>
            <table:table-cell table:style-name="Table1.A1" office:value-type="string">
              <text:p text:style-name="Table_20_Heading">Name / Entity</text:p>
            </table:table-cell>
            <table:table-cell table:style-name="Table1.A1" office:value-type="string">
              <text:p text:style-name="Table_20_Heading">Identifier</text:p>
            </table:table-cell>
            <table:table-cell table:style-name="Table1.A1" office:value-type="string">
              <text:p text:style-name="Table_20_Heading">Designation Date</text:p>
            </table:table-cell>
            <table:table-cell table:style-name="Table1.A1" office:value-type="string">
              <text:p text:style-name="Table_20_Heading">Basis for Designatio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PLACEHOLDER_NAME_1}</text:p>
          </table:table-cell>
          <table:table-cell table:style-name="Table1.A1" office:value-type="string">
            <text:p text:style-name="Table_20_Contents">UNSC-{PLACEHOLDER_ID_1}</text:p>
          </table:table-cell>
          <table:table-cell table:style-name="Table1.A1" office:value-type="string">
            <text:p text:style-name="Table_20_Contents">{PLACEHOLDER_DATE_1}</text:p>
          </table:table-cell>
          <table:table-cell table:style-name="Table1.A1" office:value-type="string">
            <text:p text:style-name="Table_20_Contents">Involvement in prohibited weapons programs; violation of previous resolutions</text:p>
          </table:table-cell>
        </table:table-row>
        <table:table-row>
          <table:table-cell table:style-name="Table1.A1" office:value-type="string">
            <text:p text:style-name="Table_20_Contents">2</text:p>
          </table:table-cell>
          <table:table-cell table:style-name="Table1.A1" office:value-type="string">
            <text:p text:style-name="Table_20_Contents">{PLACEHOLDER_NAME_2}</text:p>
          </table:table-cell>
          <table:table-cell table:style-name="Table1.A1" office:value-type="string">
            <text:p text:style-name="Table_20_Contents">UNSC-{PLACEHOLDER_ID_2}</text:p>
          </table:table-cell>
          <table:table-cell table:style-name="Table1.A1" office:value-type="string">
            <text:p text:style-name="Table_20_Contents">{PLACEHOLDER_DATE_2}</text:p>
          </table:table-cell>
          <table:table-cell table:style-name="Table1.A1" office:value-type="string">
            <text:p text:style-name="Table_20_Contents">Financing and facilitation of terrorist activities; arms trafficking</text:p>
          </table:table-cell>
        </table:table-row>
        <table:table-row>
          <table:table-cell table:style-name="Table1.A1" office:value-type="string">
            <text:p text:style-name="Table_20_Contents">3</text:p>
          </table:table-cell>
          <table:table-cell table:style-name="Table1.A1" office:value-type="string">
            <text:p text:style-name="Table_20_Contents">{PLACEHOLDER_NAME_3}</text:p>
          </table:table-cell>
          <table:table-cell table:style-name="Table1.A1" office:value-type="string">
            <text:p text:style-name="Table_20_Contents">UNSC-{PLACEHOLDER_ID_3}</text:p>
          </table:table-cell>
          <table:table-cell table:style-name="Table1.A1" office:value-type="string">
            <text:p text:style-name="Table_20_Contents">{PLACEHOLDER_DATE_3}</text:p>
          </table:table-cell>
          <table:table-cell table:style-name="Table1.A1" office:value-type="string">
            <text:p text:style-name="Table_20_Contents">Systematic human rights abuses; obstruction of humanitarian assistance</text:p>
          </table:table-cell>
        </table:table-row>
        <table:table-row>
          <table:table-cell table:style-name="Table1.A1" office:value-type="string">
            <text:p text:style-name="Table_20_Contents">4</text:p>
          </table:table-cell>
          <table:table-cell table:style-name="Table1.A1" office:value-type="string">
            <text:p text:style-name="Table_20_Contents">{PLACEHOLDER_ENTITY_1}</text:p>
          </table:table-cell>
          <table:table-cell table:style-name="Table1.A1" office:value-type="string">
            <text:p text:style-name="Table_20_Contents">UNSC-{PLACEHOLDER_ID_4}</text:p>
          </table:table-cell>
          <table:table-cell table:style-name="Table1.A1" office:value-type="string">
            <text:p text:style-name="Table_20_Contents">{PLACEHOLDER_DATE_4}</text:p>
          </table:table-cell>
          <table:table-cell table:style-name="Table1.A1" office:value-type="string">
            <text:p text:style-name="Table_20_Contents">Front company for sanctioned entity; illicit financial transfers</text:p>
          </table:table-cell>
        </table:table-row>
        <table:table-row>
          <table:table-cell table:style-name="Table1.A1" office:value-type="string">
            <text:p text:style-name="Table_20_Contents">5</text:p>
          </table:table-cell>
          <table:table-cell table:style-name="Table1.A1" office:value-type="string">
            <text:p text:style-name="Table_20_Contents">{PLACEHOLDER_NAME_4}</text:p>
          </table:table-cell>
          <table:table-cell table:style-name="Table1.A1" office:value-type="string">
            <text:p text:style-name="Table_20_Contents">UNSC-{PLACEHOLDER_ID_5}</text:p>
          </table:table-cell>
          <table:table-cell table:style-name="Table1.A1" office:value-type="string">
            <text:p text:style-name="Table_20_Contents">{PLACEHOLDER_DATE_5}</text:p>
          </table:table-cell>
          <table:table-cell table:style-name="Table1.A1" office:value-type="string">
            <text:p text:style-name="Table_20_Contents">Procurement of sensitive materials for prohibited purposes</text:p>
          </table:table-cell>
        </table:table-row>
      </table:table>
      <text:h text:style-name="P4" text:outline-level="3">Annex II: Prohibited Items and Technologies</text:h>
      <text:p text:style-name="P15"><text:span text:style-name="Emphasis"><text:span text:style-name="T5">Pursuant to operative paragraph 6 of UNSC Resolution {PLACEHOLDER_RESOLUTION_NUMBER}</text:span></text:span></text:p>
      <text:list xml:id="list4003206118" text:style-name="L2">
        <text:list-item>
          <text:p text:style-name="P16">All items, materials, equipment, goods, and technology included in the Nuclear Suppliers Group (NSG) Trigger List and Dual-Use List; </text:p>
        </text:list-item>
        <text:list-item>
          <text:p text:style-name="P16">All items included in the Australia Group List for chemical and biological weapons non-proliferation; </text:p>
        </text:list-item>
        <text:list-item>
          <text:p text:style-name="P16">All items included in the Missile Technology Control Regime (MTCR) Equipment, Software, and Technology Annex; </text:p>
        </text:list-item>
        <text:list-item>
          <text:p text:style-name="P16">All items included in the Wassenaar Arrangement Munitions List and Dual-Use List; </text:p>
        </text:list-item>
        <text:list-item>
          <text:p text:style-name="P16">Any related technical data, software, and training directly associated with the above items. </text:p>
        </text:list-item>
      </text:list>
      <text:p text:style-name="P19"><text:span text:style-name="Strong_20_Emphasis"><text:span text:style-name="T4">Adopted by the Security Council at its {PLACEHOLDER_MEETING_NUMBER}th meeting</text:span></text:span></text:p>
      <text:p text:style-name="P17">on {PLACEHOLDER_DATE} by {PLACEHOLDER_VOTE_RESULT} votes in favor, {PLACEHOLDER_VOTE_AGAINST} against, with {PLACEHOLDER_ABSTENTIONS} abstentions.</text:p>
      <text:p text:style-name="P14"><text:span text:style-name="Strong_20_Emphasis"><text:span text:style-name="T4">{PLACEHOLDER_SIGNATORY_NAME}</text:span></text:span></text:p>
      <text:p text:style-name="P18">President of the Security Council</text:p>
      <text:p text:style-name="P18">Permanent Representative of {PLACEHOLDER_COUNTRY} to the United Nations</text:p>
      <text:p text:style-name="P12">CONFIDENTIAL - FOR OFFICIAL USE ONLY </text:p>
      <text:p text:style-name="P8">This document is an official memorandum of the United Nations Security Council. Any unauthorized reproduction, distribution, or disclosure is strictly prohibited.</text:p>
      <text:p text:style-name="P8">UNSC Document Symbol: S/RES/{PLACEHOLDER_RESOLUTION_NUMBER} (2025) | Original: English | Distribution: Gener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Arial" fo:font-family="Arial, sans-serif" fo:font-size="12pt" style:font-name-asian="Arial" style:font-family-asian="Arial, sans-serif" style:font-size-asian="12pt" style:font-name-complex="Arial" style:font-family-complex="Arial, sans-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preamble" style:display-name="Text Body.preamble" style:family="paragraph" style:parent-style-name="Text_20_body">
      <style:paragraph-properties fo:margin-top="0in" fo:margin-bottom="0.2083in" style:contextual-spacing="false" fo:text-align="justify" style:justify-single-word="false"/>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ext_20_Body.operative-paragraph" style:display-name="Text Body.operative-paragraph" style:family="paragraph" style:parent-style-name="Text_20_body">
      <style:paragraph-properties fo:margin-left="0in" fo:margin-right="0in" fo:margin-top="0in" fo:margin-bottom="0.1252in" style:contextual-spacing="false" fo:text-align="justify" style:justify-single-word="false" fo:text-indent="-0.2083in" style:auto-text-indent="false" fo:padding="0in" fo:border="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1" meta:object-count="0" meta:page-count="1" meta:paragraph-count="72" meta:word-count="922" meta:character-count="6630" meta:non-whitespace-character-count="5757"/>
    <meta:generator>LibreOffice/7.3.7.2$Linux_X86_64 LibreOffice_project/30$Build-2</meta:generator>
  </office:meta>
</office:document-meta>
</file>