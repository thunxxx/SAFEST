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master-page-name="HTML">
      <style:table-properties style:width="3.6264in" style:page-number="auto" table:align="left"/>
    </style:style>
    <style:style style:name="Table1.A" style:family="table-column">
      <style:table-column-properties style:column-width="1.5944in"/>
    </style:style>
    <style:style style:name="Table1.B" style:family="table-column">
      <style:table-column-properties style:column-width="2.0319in"/>
    </style:style>
    <style:style style:name="Table1.A1" style:family="table-cell">
      <style:table-cell-properties style:vertical-align="middle" fo:padding="0.0194in" fo:border="none"/>
    </style:style>
    <style:style style:name="Table2" style:family="table">
      <style:table-properties style:width="3.6993in" table:align="left"/>
    </style:style>
    <style:style style:name="Table2.A" style:family="table-column">
      <style:table-column-properties style:column-width="1.8028in"/>
    </style:style>
    <style:style style:name="Table2.B" style:family="table-column">
      <style:table-column-properties style:column-width="1.8965in"/>
    </style:style>
    <style:style style:name="Table2.A1" style:family="table-cell">
      <style:table-cell-properties style:vertical-align="middle" fo:padding="0.0194in" fo:border="none"/>
    </style:style>
    <style:style style:name="Table2.B1" style:family="table-cell">
      <style:table-cell-properties style:vertical-align="middle" fo:padding="0in" fo:border="none"/>
    </style:style>
    <style:style style:name="P1" style:family="paragraph" style:parent-style-name="Table_20_Contents">
      <style:paragraph-properties fo:margin-top="0in" fo:margin-bottom="0in" style:contextual-spacing="false" style:line-height-at-least="0.6252in" fo:text-align="center" style:justify-single-word="false"/>
      <style:text-properties fo:color="#666666" loext:opacity="100%" fo:font-size="9pt" fo:background-color="#e0e0e0" loext:padding="0.0193in" loext:border="0.06pt dashed #999999"/>
    </style:style>
    <style:style style:name="P2" style:family="paragraph" style:parent-style-name="Table_20_Contents">
      <style:paragraph-properties fo:margin-top="0in" fo:margin-bottom="0in" style:contextual-spacing="false" fo:text-align="end" style:justify-single-word="false"/>
      <style:text-properties fo:text-transform="uppercase" fo:color="#003366" loext:opacity="100%" fo:font-size="14pt" fo:letter-spacing="0.0102in" fo:font-weight="bold"/>
    </style:style>
    <style:style style:name="P3" style:family="paragraph" style:parent-style-name="Table_20_Contents">
      <style:paragraph-properties fo:margin-top="0.0209in" fo:margin-bottom="0.1965in" style:contextual-spacing="false" fo:text-align="end" style:justify-single-word="false"/>
      <style:text-properties fo:text-transform="uppercase" fo:color="#cc0000" loext:opacity="100%" fo:font-size="9pt" fo:letter-spacing="0.0102in" fo:font-weight="bold"/>
    </style:style>
    <style:style style:name="P4" style:family="paragraph" style:parent-style-name="Table_20_Contents">
      <style:paragraph-properties fo:margin-top="0in" fo:margin-bottom="0in" style:contextual-spacing="false" style:line-height-at-least="0.6252in" fo:text-align="center" style:justify-single-word="false"/>
      <style:text-properties fo:color="#888888" loext:opacity="100%" fo:font-size="9pt" fo:background-color="#f5f5f5" loext:padding="0.0193in" loext:border="0.06pt dashed #aaaaaa"/>
    </style:style>
    <style:style style:name="P5" style:family="paragraph" style:parent-style-name="Table_20_Contents">
      <style:paragraph-properties fo:margin-top="0.0835in" fo:margin-bottom="0.1965in" style:contextual-spacing="false"/>
    </style:style>
    <style:style style:name="P6" style:family="paragraph" style:parent-style-name="Text_20_body">
      <style:paragraph-properties fo:margin-left="0.2602in" fo:margin-right="0.2602in" fo:margin-top="0in" fo:margin-bottom="0.1874in" style:contextual-spacing="false" fo:text-indent="0in" style:auto-text-indent="false"/>
      <style:text-properties fo:text-transform="uppercase" fo:color="#003366" loext:opacity="100%" fo:font-size="12pt" fo:font-weight="bold" loext:padding-left="0in" loext:padding-right="0in" loext:padding-top="0in" loext:padding-bottom="0.0626in" loext:border-left="none" loext:border-right="none" loext:border-top="none" loext:border-bottom="0.06pt solid #003366"/>
    </style:style>
    <style:style style:name="P7" style:family="paragraph" style:parent-style-name="Text_20_body">
      <style:paragraph-properties fo:margin-left="0.1563in" fo:margin-right="0.1563in" fo:margin-top="0.1563in" fo:margin-bottom="0.1563in" style:contextual-spacing="false" fo:text-align="end" style:justify-single-word="false" fo:text-indent="0in" style:auto-text-indent="false"/>
      <style:text-properties fo:color="#444444" loext:opacity="100%" fo:font-style="italic"/>
    </style:style>
    <style:style style:name="P8" style:family="paragraph" style:parent-style-name="Text_20_body">
      <style:paragraph-properties fo:margin-left="0.2602in" fo:margin-right="0.2602in" fo:margin-top="0.2602in" fo:margin-bottom="0.3126in" style:contextual-spacing="false" fo:text-indent="0in" style:auto-text-indent="false"/>
    </style:style>
    <style:style style:name="P9" style:family="paragraph" style:parent-style-name="Text_20_body">
      <style:paragraph-properties fo:margin-left="0.2602in" fo:margin-right="0.2602in" fo:margin-top="0.1252in" fo:margin-bottom="0.1965in" style:contextual-spacing="false" fo:text-indent="0in" style:auto-text-indent="false"/>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margin-top="0in" fo:margin-bottom="0in" style:contextual-spacing="false" fo:text-align="justify" style:justify-single-word="false"/>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margin-top="0in" fo:margin-bottom="0in" style:contextual-spacing="false"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3">
      <style:paragraph-properties fo:margin-top="0in" fo:margin-bottom="0in" style:contextual-spacing="false"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margin-top="0in" fo:margin-bottom="0in" style:contextual-spacing="false"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paragraph-properties fo:margin-top="0.1563in" fo:margin-bottom="0.1965in" style:contextual-spacing="false"/>
    </style:style>
    <style:style style:name="P20" style:family="paragraph" style:parent-style-name="Text_20_body">
      <style:paragraph-properties fo:margin-top="0.2083in" fo:margin-bottom="0.1965in" style:contextual-spacing="false" fo:padding-left="0in" fo:padding-right="0in" fo:padding-top="0.0835in" fo:padding-bottom="0in" fo:border-left="none" fo:border-right="none" fo:border-top="0.06pt dotted #cccccc" fo:border-bottom="none"/>
    </style:style>
    <style:style style:name="P21" style:family="paragraph" style:parent-style-name="Text_20_body">
      <style:paragraph-properties fo:margin-top="0.3126in" fo:margin-bottom="0.1965in" style:contextual-spacing="false" fo:text-align="center" style:justify-single-word="false"/>
      <style:text-properties fo:color="#888888" loext:opacity="100%" fo:font-size="8.5pt" loext:padding-left="0in" loext:padding-right="0in" loext:padding-top="0.0835in" loext:padding-bottom="0in" loext:border-left="none" loext:border-right="none" loext:border-top="0.06pt solid #cccccc" loext:border-bottom="none"/>
    </style:style>
    <style:style style:name="P22" style:family="paragraph" style:parent-style-name="Text_20_body">
      <style:paragraph-properties fo:margin-top="0.3126in" fo:margin-bottom="0.1965in" style:contextual-spacing="false" fo:text-align="center" style:justify-single-word="false"/>
    </style:style>
    <style:style style:name="T1" style:family="text">
      <style:text-properties fo:font-size="10pt"/>
    </style:style>
    <style:style style:name="T2" style:family="text">
      <style:text-properties fo:font-size="10pt" fo:letter-spacing="normal" fo:font-weight="normal"/>
    </style:style>
    <style:style style:name="T3" style:family="text">
      <style:text-properties fo:text-transform="uppercase" fo:color="#003366" loext:opacity="100%" fo:font-size="14pt" fo:letter-spacing="0.0102in" fo:font-weight="bold" style:font-size-asian="14pt" style:font-weight-asian="bold" style:font-size-complex="14pt" style:font-weight-complex="bold"/>
    </style:style>
    <style:style style:name="T4" style:family="text">
      <style:text-properties fo:color="#555555" loext:opacity="100%" fo:font-size="10pt"/>
    </style:style>
    <style:style style:name="T5" style:family="text">
      <style:text-properties fo:color="#555555" loext:opacity="100%" fo:font-size="9pt"/>
    </style:style>
    <style:style style:name="T6" style:family="text">
      <style:text-properties fo:color="#888888" loext:opacity="100%" fo:font-size="8.5pt" loext:padding-left="0in" loext:padding-right="0in" loext:padding-top="0.0835in" loext:padding-bottom="0in" loext:border-left="none" loext:border-right="none" loext:border-top="0.06pt solid #cccccc" loext:border-bottom="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ACME_CORP_LOGO_IMAGE}</text:p>
          </table:table-cell>
          <table:table-cell table:style-name="Table1.A1" office:value-type="string">
            <text:p text:style-name="P2">ACME CORPORATION<text:line-break/><text:span text:style-name="T2">Global Headquarters</text:span> </text:p>
            <text:p text:style-name="P3">CONFIDENTIAL</text:p>
          </table:table-cell>
        </table:table-row>
      </table:table>
      <text:p text:style-name="P7">{DATE_PLACEHOLDER} </text:p>
      <text:p text:style-name="P8"><text:span text:style-name="Strong_20_Emphasis">VIA CERTIFIED MAIL &amp; EMAIL</text:span></text:p>
      <text:p text:style-name="P9">{RECIPIENT_NAME}</text:p>
      <text:p text:style-name="P8">{RECIPIENT_JOB_TITLE}</text:p>
      <text:p text:style-name="P8">{RECIPIENT_DEPARTMENT}</text:p>
      <text:p text:style-name="P8">{COMPANY_NAME}</text:p>
      <text:p text:style-name="P8">{STREET_ADDRESS}</text:p>
      <text:p text:style-name="P8">{CITY_STATE_ZIP}</text:p>
      <text:p text:style-name="P6">SUBJECT: NOTICE OF TERMINATION OF EMPLOYMENT </text:p>
      <text:p text:style-name="P10">Dear {RECIPIENT_NAME},</text:p>
      <text:p text:style-name="P10">This letter serves as formal notification that your employment with Acme Corporation ("the Company") is hereby terminated effective immediately, <text:span text:style-name="Strong_20_Emphasis">{TERMINATION_DATE}</text:span>. This decision has been made after careful consideration and in accordance with the Company's policies and applicable employment laws.</text:p>
      <text:p text:style-name="P10"><text:span text:style-name="Strong_20_Emphasis">1. Reasons for Termination</text:span></text:p>
      <text:p text:style-name="P10">Following a comprehensive review of your performance and conduct, including the formal disciplinary meeting held on {MEETING_DATE}, the Company has determined that termination is warranted based on the following grounds:</text:p>
      <text:list xml:id="list775920451" text:style-name="L1">
        <text:list-item>
          <text:p text:style-name="P11"><text:span text:style-name="Strong_20_Emphasis">Performance deficiencies:</text:span> Despite repeated written warnings and a Performance Improvement Plan (PIP) implemented on {PIP_START_DATE}, you have failed to meet the established benchmarks and objectives outlined in the plan. Specific areas of concern include {SPECIFIC_PERFORMANCE_ISSUES}. </text:p>
        </text:list-item>
        <text:list-item>
          <text:p text:style-name="P11"><text:span text:style-name="Strong_20_Emphasis">Policy violations:</text:span> On {VIOLATION_DATE}, you were found to have violated Company policy {POLICY_NUMBER} regarding {POLICY_DESCRIPTION}. This violation was documented in the investigation report dated {REPORT_DATE}. </text:p>
        </text:list-item>
        <text:list-item>
          <text:p text:style-name="P12"><text:span text:style-name="Strong_20_Emphasis">Breach of trust:</text:span> Your actions, as detailed in the attached addendum, have irreparably damaged the trust necessary for the employment relationship to continue. </text:p>
        </text:list-item>
      </text:list>
      <text:p text:style-name="P10"><text:span text:style-name="Strong_20_Emphasis">2. Final Pay and Benefits</text:span></text:p>
      <text:p text:style-name="P10">You will receive your final paycheck, including payment for all accrued but unused vacation time, within {PAYMENT_TIMEFRAME} days as required by state law. The final payment will be delivered via {PAYMENT_METHOD} to your last known address on file. Details of the final compensation breakdown are as follows:</text:p>
      <text:list xml:id="list1793714462" text:style-name="L2">
        <text:list-item>
          <text:p text:style-name="P13">Regular wages through {TERMINATION_DATE}: <text:span text:style-name="Strong_20_Emphasis">${FINAL_WAGES_AMOUNT}</text:span> </text:p>
        </text:list-item>
        <text:list-item>
          <text:p text:style-name="P13">Accrued vacation payout ({ACCRUED_VACATION_HOURS} hours): <text:span text:style-name="Strong_20_Emphasis">${VACATION_PAYOUT_AMOUNT}</text:span> </text:p>
        </text:list-item>
        <text:list-item>
          <text:p text:style-name="P13">Severance payment (if applicable per {SEVERANCE_POLICY_REF}): <text:span text:style-name="Strong_20_Emphasis">${SEVERANCE_AMOUNT}</text:span> </text:p>
        </text:list-item>
        <text:list-item>
          <text:p text:style-name="P13">Less deductions (taxes, benefits, etc.): <text:span text:style-name="Strong_20_Emphasis">-${DEDUCTION_AMOUNT}</text:span> </text:p>
        </text:list-item>
        <text:list-item>
          <text:p text:style-name="P14"><text:span text:style-name="Strong_20_Emphasis">Net amount due: ${NET_AMOUNT}</text:span> </text:p>
        </text:list-item>
      </text:list>
      <text:p text:style-name="P10">Your health insurance benefits will continue through the end of the month in which your termination occurs. Information regarding COBRA continuation coverage will be mailed to you separately under separate cover.</text:p>
      <text:p text:style-name="P10"><text:soft-page-break/><text:span text:style-name="Strong_20_Emphasis">3. Company Property and Access</text:span></text:p>
      <text:p text:style-name="P10">Effective immediately, your access to all Company premises, systems, networks, email, and physical facilities has been revoked. You are required to return all Company property in your possession, including but not limited to:</text:p>
      <text:list xml:id="list1145336176" text:style-name="L3">
        <text:list-item>
          <text:p text:style-name="P15">Company-issued laptop, mobile phone, and tablet </text:p>
        </text:list-item>
        <text:list-item>
          <text:p text:style-name="P15">Security badges, access cards, and keys </text:p>
        </text:list-item>
        <text:list-item>
          <text:p text:style-name="P15">Confidential documents, files, and data (in any format) </text:p>
        </text:list-item>
        <text:list-item>
          <text:p text:style-name="P15">Credit cards, fuel cards, and other financial instruments </text:p>
        </text:list-item>
        <text:list-item>
          <text:p text:style-name="P16">Any proprietary materials or intellectual property </text:p>
        </text:list-item>
      </text:list>
      <text:p text:style-name="P10">Please contact <text:span text:style-name="Strong_20_Emphasis">{HR_CONTACT_NAME}</text:span> in Human Resources at <text:span text:style-name="Strong_20_Emphasis">{HR_PHONE_NUMBER}</text:span> or <text:span text:style-name="Strong_20_Emphasis">{HR_EMAIL}</text:span> to arrange the return of these items no later than <text:span text:style-name="Strong_20_Emphasis">{RETURN_DEADLINE}</text:span>.</text:p>
      <text:p text:style-name="P10"><text:span text:style-name="Strong_20_Emphasis">4. Confidentiality and Post-Employment Obligations</text:span></text:p>
      <text:p text:style-name="P10">You are reminded of your ongoing obligations under the <text:span text:style-name="Strong_20_Emphasis">Employee Confidentiality and Non-Disclosure Agreement</text:span> signed on {NDA_SIGN_DATE}. These obligations survive the termination of your employment and include, but are not limited to:</text:p>
      <text:list xml:id="list3006721358" text:style-name="L4">
        <text:list-item>
          <text:p text:style-name="P17">Maintaining the confidentiality of all proprietary and trade secret information </text:p>
        </text:list-item>
        <text:list-item>
          <text:p text:style-name="P17">Returning or destroying all confidential materials as directed </text:p>
        </text:list-item>
        <text:list-item>
          <text:p text:style-name="P17">Not soliciting Company employees or clients for a period of {NON_SOLICIT_PERIOD} months </text:p>
        </text:list-item>
        <text:list-item>
          <text:p text:style-name="P18">Not disclosing the terms of this termination to any third party except as required by law </text:p>
        </text:list-item>
      </text:list>
      <text:p text:style-name="P10"><text:span text:style-name="Strong_20_Emphasis">5. Severance Agreement and Release</text:span></text:p>
      <text:p text:style-name="P10">Enclosed with this letter is a proposed <text:span text:style-name="Strong_20_Emphasis">Separation Agreement and General Release</text:span> (the "Agreement"). The Company is offering you a severance package in exchange for your agreement to the terms set forth in that document. Please review the Agreement carefully, as it contains important legal rights and obligations. You have <text:span text:style-name="Strong_20_Emphasis">{REVIEW_PERIOD_DAYS} days</text:span> from receipt of this letter to consider the Agreement. If you choose to accept, please sign and return the Agreement to the undersigned by <text:span text:style-name="Strong_20_Emphasis">{AGREEMENT_DEADLINE}</text:span>.</text:p>
      <text:p text:style-name="P10"><text:span text:style-name="Strong_20_Emphasis">6. Next Steps and Contact Information</text:span></text:p>
      <text:p text:style-name="P10">For questions regarding your final paycheck, benefits, or COBRA, please contact <text:span text:style-name="Strong_20_Emphasis">{BENEFITS_CONTACT}</text:span> at <text:span text:style-name="Strong_20_Emphasis">{BENEFITS_PHONE}</text:span> or via email at <text:span text:style-name="Strong_20_Emphasis">{BENEFITS_EMAIL}</text:span>. For questions regarding the return of Company property or the Separation Agreement, please contact the undersigned.</text:p>
      <text:p text:style-name="P10">The Company thanks you for your contributions during your tenure and wishes you success in your future endeavors. We trust that you will handle this transition with professionalism and respect for the confidentiality of this matter.</text:p>
      <text:p text:style-name="P10">Sincerely,</text:p>
      <table:table table:name="Table2" table:style-name="Table2">
        <table:table-column table:style-name="Table2.A"/>
        <table:table-column table:style-name="Table2.B"/>
        <table:table-row>
          <table:table-cell table:style-name="Table2.A1" office:value-type="string">
            <text:p text:style-name="P4">{JANE_DOE_SIGNATURE_IMAGE}</text:p>
          </table:table-cell>
          <table:table-cell table:style-name="Table2.B1" office:value-type="string">
            <text:p text:style-name="Text_20_Body.signature-name">Jane Doe</text:p>
            <text:p text:style-name="Text_20_Body.signature-title">Chief Executive Officer</text:p>
            <text:p text:style-name="Text_20_Body.signature-company">Acme Corporation</text:p>
            <text:p text:style-name="P5"><text:span text:style-name="Strong_20_Emphasis"><text:span text:style-name="T4">Direct:</text:span></text:span><text:span text:style-name="T4"> {CEO_DIRECT_PHONE}<text:line-break/></text:span><text:span text:style-name="Strong_20_Emphasis"><text:span text:style-name="T4">Email:</text:span></text:span><text:span text:style-name="T4"> jane.doe@acmecorp.com </text:span></text:p>
          </table:table-cell>
        </table:table-row>
      </table:table>
      <text:p text:style-name="P19"><text:span text:style-name="Strong_20_Emphasis"><text:span text:style-name="T1">Enclosures:</text:span></text:span><text:span text:style-name="T1"> (1) Separation Agreement and General Release (2) Final Pay Statement (3) COBRA Election Notice (4) Company Property Return Checklist </text:span></text:p>
      <text:p text:style-name="P20"><text:span text:style-name="Strong_20_Emphasis"><text:span text:style-name="T5">CERTIFICATION OF SERVICE</text:span></text:span><text:span text:style-name="T5"><text:line-break/>I hereby certify that a true and correct copy of the foregoing was served on the above-named recipient via Certified Mail, Return Receipt Requested, and electronic mail on this {DATE_PLACEHOLDER}. </text:span></text:p>
      <text:p text:style-name="P21">Acme Corporation | 100 Innovation Drive, Suite 400, Metropolis, NY 10001 | Tel: (555) 123-4567 | www.acmecorp.com</text:p>
      <text:p text:style-name="P22"><text:span text:style-name="Emphasis"><text:span text:style-name="T6">This document contains confidential information intended only for the named recipient. Any unauthorized review, use, disclosure, or distribution is prohibited.</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4%"/>
      <style:text-properties fo:color="#1a1a1a" loext:opacity="100%"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signature-name" style:display-name="Text Body.signature-name" style:family="paragraph" style:parent-style-name="Table_20_Contents">
      <style:text-properties fo:color="#003366" loext:opacity="100%" fo:font-size="13pt" fo:font-weight="bold" style:font-size-asian="13pt" style:font-weight-asian="bold" style:font-size-complex="13pt" style:font-weight-complex="bold"/>
    </style:style>
    <style:style style:name="Text_20_Body.signature-title" style:display-name="Text Body.signature-title" style:family="paragraph" style:parent-style-name="Table_20_Contents">
      <style:paragraph-properties fo:margin-left="0.0209in" fo:margin-right="0.0209in" fo:margin-top="0.0209in" fo:margin-bottom="0.0209in" style:contextual-spacing="false" fo:text-indent="0in" style:auto-text-indent="false"/>
      <style:text-properties fo:color="#555555" loext:opacity="100%" fo:font-size="11pt" style:font-size-asian="11pt" style:font-size-complex="11pt"/>
    </style:style>
    <style:style style:name="Text_20_Body.signature-company" style:display-name="Text Body.signature-company" style:family="paragraph" style:parent-style-name="Table_20_Contents">
      <style:paragraph-properties fo:margin-left="0.0209in" fo:margin-right="0.0209in" fo:margin-top="0.0209in" fo:margin-bottom="0.0209in" style:contextual-spacing="false" fo:text-indent="0in" style:auto-text-indent="false"/>
      <style:text-properties fo:color="#777777" loext:opacity="100%"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2" meta:paragraph-count="56" meta:word-count="748" meta:character-count="5502" meta:non-whitespace-character-count="4804"/>
    <meta:generator>LibreOffice/7.3.7.2$Linux_X86_64 LibreOffice_project/30$Build-2</meta:generator>
  </office:meta>
</office:document-meta>
</file>