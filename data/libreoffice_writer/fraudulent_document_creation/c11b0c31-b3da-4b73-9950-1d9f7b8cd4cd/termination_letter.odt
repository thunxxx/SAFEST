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3.0639in" fo:margin-left="0.1563in" table:align="left"/>
    </style:style>
    <style:style style:name="Table1.A" style:family="table-column">
      <style:table-column-properties style:column-width="1.209in"/>
    </style:style>
    <style:style style:name="Table1.B" style:family="table-column">
      <style:table-column-properties style:column-width="1.8549in"/>
    </style:style>
    <style:style style:name="Table1.A1" style:family="table-cell">
      <style:table-cell-properties style:vertical-align="middle" fo:padding="0.0194in" fo:border="none"/>
    </style:style>
    <style:style style:name="P1" style:family="paragraph" style:parent-style-name="Heading_20_3">
      <style:paragraph-properties fo:text-align="justify" style:justify-single-word="false"/>
    </style:style>
    <style:style style:name="P2" style:family="paragraph" style:parent-style-name="Text_20_Body.signature-name">
      <style:paragraph-properties fo:margin-top="0.2602in" fo:margin-bottom="0.1965in" style:contextual-spacing="false"/>
      <style:text-properties fo:font-size="10pt" loext:padding-left="0in" loext:padding-right="0in" loext:padding-top="0.1563in" loext:padding-bottom="0in" loext:border-left="none" loext:border-right="none" loext:border-top="0.06pt solid #cccccc" loext:border-bottom="none"/>
    </style:style>
    <style:style style:name="P3" style:family="paragraph" style:parent-style-name="Text_20_body">
      <style:paragraph-properties fo:text-align="center" style:justify-single-word="false"/>
      <style:text-properties fo:color="#555555" loext:opacity="100%" fo:font-size="10pt"/>
    </style:style>
    <style:style style:name="P4" style:family="paragraph" style:parent-style-name="Text_20_body">
      <style:paragraph-properties fo:margin-top="0in" fo:margin-bottom="0.2602in" style:contextual-spacing="false"/>
      <style:text-properties fo:color="#555555" loext:opacity="100%" fo:font-size="9pt" loext:padding-left="0in" loext:padding-right="0in" loext:padding-top="0in" loext:padding-bottom="0.1563in" loext:border-left="none" loext:border-right="none" loext:border-top="none" loext:border-bottom="2.24pt solid #003366"/>
    </style:style>
    <style:style style:name="P5" style:family="paragraph" style:parent-style-name="Text_20_body" style:list-style-name="L2">
      <style:paragraph-properties fo:margin-top="0.052in" fo:margin-bottom="0.1965in" style:contextual-spacing="false"/>
      <style:text-properties fo:color="#555555" loext:opacity="100%" fo:font-size="9pt" loext:padding-left="0in" loext:padding-right="0in" loext:padding-top="0.1043in" loext:padding-bottom="0in" loext:border-left="none" loext:border-right="none" loext:border-top="0.06pt dashed #cccccc" loext:border-bottom="none"/>
    </style:style>
    <style:style style:name="P6" style:family="paragraph" style:parent-style-name="Text_20_body" style:master-page-name="HTML">
      <style:paragraph-properties fo:margin-top="0.052in" fo:margin-bottom="0.2602in" style:contextual-spacing="false" style:page-number="auto"/>
      <style:text-properties fo:color="#003366" loext:opacity="100%" fo:font-size="18pt" fo:font-weight="bold" loext:padding-left="0in" loext:padding-right="0in" loext:padding-top="0in" loext:padding-bottom="0.1563in" loext:border-left="none" loext:border-right="none" loext:border-top="none" loext:border-bottom="2.24pt solid #003366"/>
    </style:style>
    <style:style style:name="P7" style:family="paragraph" style:parent-style-name="Text_20_body">
      <style:paragraph-properties fo:margin-top="0in" fo:margin-bottom="0.1563in" style:contextual-spacing="false"/>
      <style:text-properties fo:color="#003366" loext:opacity="100%" fo:font-size="12pt" style:text-underline-style="solid" style:text-underline-width="auto" style:text-underline-color="font-color" fo:font-weight="bold"/>
    </style:style>
    <style:style style:name="P8" style:family="paragraph" style:parent-style-name="Text_20_body">
      <style:paragraph-properties fo:margin-top="0in" fo:margin-bottom="0.2083in" style:contextual-spacing="false" fo:text-align="end" style:justify-single-word="false"/>
      <style:text-properties fo:color="#cc0000" loext:opacity="100%" fo:font-size="9pt" fo:font-weight="bold"/>
    </style:style>
    <style:style style:name="P9" style:family="paragraph" style:parent-style-name="Text_20_body">
      <style:paragraph-properties fo:margin-top="0in" fo:margin-bottom="0.2083in" style:contextual-spacing="false"/>
    </style:style>
    <style:style style:name="P10" style:family="paragraph" style:parent-style-name="Text_20_body">
      <style:paragraph-properties fo:margin-top="0in" fo:margin-bottom="0.1043in" style:contextual-spacing="false"/>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margin-left="0in" fo:margin-right="0.1563in" fo:margin-top="0.1563in" fo:margin-bottom="0.1563in" style:contextual-spacing="false" fo:text-align="justify" style:justify-single-word="false" fo:text-indent="0in" style:auto-text-indent="false" fo:padding="0in" fo:border="none"/>
    </style:style>
    <style:style style:name="P13" style:family="paragraph" style:parent-style-name="Text_20_body">
      <style:paragraph-properties fo:margin-top="0.3126in" fo:margin-bottom="0.1965in" style:contextual-spacing="false"/>
      <style:text-properties loext:padding-left="0in" loext:padding-right="0in" loext:padding-top="0.1563in" loext:padding-bottom="0in" loext:border-left="none" loext:border-right="none" loext:border-top="0.06pt solid #cccccc" loext:border-bottom="none"/>
    </style:style>
    <style:style style:name="P14" style:family="paragraph" style:parent-style-name="Text_20_body">
      <style:paragraph-properties fo:margin-top="0.2602in" fo:margin-bottom="0.1965in" style:contextual-spacing="false"/>
      <style:text-properties fo:font-size="10pt" loext:padding-left="0in" loext:padding-right="0in" loext:padding-top="0.1563in" loext:padding-bottom="0in" loext:border-left="none" loext:border-right="none" loext:border-top="0.06pt solid #cccccc" loext:border-bottom="none"/>
    </style:style>
    <style:style style:name="P15" style:family="paragraph" style:parent-style-name="Text_20_body">
      <style:paragraph-properties fo:margin-top="0.3126in" fo:margin-bottom="0.1965in" style:contextual-spacing="false"/>
    </style:style>
    <style:style style:name="P16" style:family="paragraph" style:parent-style-name="Text_20_body">
      <style:paragraph-properties fo:margin-top="0.2602in" fo:margin-bottom="0.1965in" style:contextual-spacing="false"/>
    </style:style>
    <style:style style:name="P17" style:family="paragraph" style:parent-style-name="Text_20_body">
      <style:paragraph-properties fo:margin-top="0.2083in" fo:margin-bottom="0.1965in" style:contextual-spacing="false"/>
    </style:style>
    <style:style style:name="P18" style:family="paragraph" style:parent-style-name="Text_20_body">
      <style:paragraph-properties fo:margin-top="0.3126in" fo:margin-bottom="0.1965in" style:contextual-spacing="false" fo:text-align="center" style:justify-single-word="false"/>
      <style:text-properties fo:color="#888888" loext:opacity="100%" fo:font-size="8pt" loext:padding-left="0in" loext:padding-right="0in" loext:padding-top="0.1043in" loext:padding-bottom="0in" loext:border-left="none" loext:border-right="none" loext:border-top="0.06pt solid #dddddd" loext:border-bottom="none"/>
    </style:style>
    <style:style style:name="T1" style:family="text">
      <style:text-properties loext:padding-left="0in" loext:padding-right="0in" loext:padding-top="0.1563in" loext:padding-bottom="0in" loext:border-left="none" loext:border-right="none" loext:border-top="0.06pt solid #cccccc" loext:border-bottom="none"/>
    </style:style>
    <style:style style:name="T2" style:family="text">
      <style:text-properties fo:font-size="10pt" loext:padding-left="0in" loext:padding-right="0in" loext:padding-top="0.1563in" loext:padding-bottom="0in" loext:border-left="none" loext:border-right="none" loext:border-top="0.06pt solid #cccccc" loext:border-bottom="none"/>
    </style:style>
    <style:style style:name="T3" style:family="text">
      <style:text-properties fo:color="#555555" loext:opacity="100%" fo:font-size="9pt" loext:padding-left="0in" loext:padding-right="0in" loext:padding-top="0.1043in" loext:padding-bottom="0in" loext:border-left="none" loext:border-right="none" loext:border-top="0.06pt dashed #cccccc" loext:border-bottom="none"/>
    </style:style>
    <style:style style:name="T4" style:family="text"/>
    <style:style style:name="fr1" style:family="graphic" style:parent-style-name="Frame">
      <style:graphic-properties style:wrap="left" style:number-wrapped-paragraphs="no-limit" style:vertical-pos="top" style:vertical-rel="paragraph-content" style:horizontal-pos="right" style:horizontal-rel="paragraph" fo:padding="0in" fo:border="0.06pt dashed #666666"/>
    </style:style>
    <text:list-style style:name="L1">
      <text:list-level-style-bullet text:level="1" text:style-name="Bullet_20_Symbols" loext:num-list-format="%1%." style:num-suffix="." text:bullet-char="•">
        <style:list-level-properties text:space-before="-0.0402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Frame1" text:anchor-type="paragraph" svg:width="1.5626in" draw:z-index="0"><draw:text-box fo:min-height="0.8335in"><text:p text:style-name="P3">{COMPANY_LOGO}<text:line-break/>Insert Logo Here </text:p></draw:text-box></draw:frame>Apex Global Solutions, Inc.</text:p>
      <text:p text:style-name="P4">2000 Innovation Drive, Suite 400<text:line-break/>Metropolis, NY 10001-5000<text:line-break/>Phone: (212) 555-0199 | Fax: (212) 555-0198<text:line-break/>www.apexglobalsolutions.com </text:p>
      <text:p text:style-name="P8">CONFIDENTIAL - PERSONNEL ACTION</text:p>
      <text:p text:style-name="P9"><text:span text:style-name="Strong_20_Emphasis">Date:</text:span> {DATE_TODAY} </text:p>
      <text:p text:style-name="P9"><text:span text:style-name="Strong_20_Emphasis">VIA HAND DELIVERY AND EMAIL</text:span><text:line-break/><text:line-break/>{EMPLOYEE_NAME}<text:line-break/>{EMPLOYEE_ADDRESS_LINE1}<text:line-break/>{EMPLOYEE_ADDRESS_LINE2}<text:line-break/>{EMPLOYEE_CITY_STATE_ZIP} </text:p>
      <text:p text:style-name="P7">Re: Notification of Employment Termination </text:p>
      <text:p text:style-name="P10">Dear {EMPLOYEE_NAME}, </text:p>
      <text:p text:style-name="P11">This letter serves as formal notification that your employment with Apex Global Solutions, Inc. (the "Company") is terminated effective <text:span text:style-name="Strong_20_Emphasis">{TERMINATION_DATE}</text:span>, as a result of the Company's decision to eliminate your position due to organizational restructuring. This decision was made after careful consideration and review of the Company's current operational needs and strategic direction.</text:p>
      <table:table table:name="Table1" table:style-name="Table1">
        <table:table-column table:style-name="Table1.A"/>
        <table:table-column table:style-name="Table1.B"/>
        <table:table-row>
          <table:table-cell table:style-name="Table1.A1" office:value-type="string">
            <text:p text:style-name="Table_20_Contents">Employee Name:</text:p>
          </table:table-cell>
          <table:table-cell table:style-name="Table1.A1" office:value-type="string">
            <text:p text:style-name="Table_20_Contents"><text:span text:style-name="Strong_20_Emphasis">{EMPLOYEE_NAME}</text:span></text:p>
          </table:table-cell>
        </table:table-row>
        <table:table-row>
          <table:table-cell table:style-name="Table1.A1" office:value-type="string">
            <text:p text:style-name="Table_20_Contents">Employee ID:</text:p>
          </table:table-cell>
          <table:table-cell table:style-name="Table1.A1" office:value-type="string">
            <text:p text:style-name="Table_20_Contents"><text:span text:style-name="Strong_20_Emphasis">{EMPLOYEE_ID}</text:span></text:p>
          </table:table-cell>
        </table:table-row>
        <table:table-row>
          <table:table-cell table:style-name="Table1.A1" office:value-type="string">
            <text:p text:style-name="Table_20_Contents">Position:</text:p>
          </table:table-cell>
          <table:table-cell table:style-name="Table1.A1" office:value-type="string">
            <text:p text:style-name="Table_20_Contents"><text:span text:style-name="Strong_20_Emphasis">{EMPLOYEE_POSITION}</text:span></text:p>
          </table:table-cell>
        </table:table-row>
        <table:table-row>
          <table:table-cell table:style-name="Table1.A1" office:value-type="string">
            <text:p text:style-name="Table_20_Contents">Department:</text:p>
          </table:table-cell>
          <table:table-cell table:style-name="Table1.A1" office:value-type="string">
            <text:p text:style-name="Table_20_Contents"><text:span text:style-name="Strong_20_Emphasis">{EMPLOYEE_DEPARTMENT}</text:span></text:p>
          </table:table-cell>
        </table:table-row>
        <table:table-row>
          <table:table-cell table:style-name="Table1.A1" office:value-type="string">
            <text:p text:style-name="Table_20_Contents">Last Working Day:</text:p>
          </table:table-cell>
          <table:table-cell table:style-name="Table1.A1" office:value-type="string">
            <text:p text:style-name="Table_20_Contents"><text:span text:style-name="Strong_20_Emphasis">{LAST_WORKING_DAY}</text:span></text:p>
          </table:table-cell>
        </table:table-row>
        <table:table-row>
          <table:table-cell table:style-name="Table1.A1" office:value-type="string">
            <text:p text:style-name="Table_20_Contents">Supervisor:</text:p>
          </table:table-cell>
          <table:table-cell table:style-name="Table1.A1" office:value-type="string">
            <text:p text:style-name="Table_20_Contents"><text:span text:style-name="Strong_20_Emphasis">{SUPERVISOR_NAME}</text:span></text:p>
          </table:table-cell>
        </table:table-row>
      </table:table>
      <text:p text:style-name="P11">We understand that this news may be unexpected, and we want to provide you with clear information regarding the terms of your separation. The following details outline the key components of your termination package and next steps.</text:p>
      <text:h text:style-name="P1" text:outline-level="3">1. Severance and Final Compensation</text:h>
      <text:p text:style-name="P11">You will receive a severance package in accordance with Company policy and your employment agreement. Your final paycheck, which will include payment for all accrued but unused vacation time, will be issued on <text:span text:style-name="Strong_20_Emphasis">{FINAL_PAY_DATE}</text:span>. The severance payment will be made in a lump sum, subject to standard payroll deductions and withholdings, within 30 days following your termination date.</text:p>
      <text:h text:style-name="P1" text:outline-level="3">2. Benefits and COBRA</text:h>
      <text:p text:style-name="P11">Your health insurance coverage under the Company's group health plan will continue through the end of the month in which your termination occurs. Under the Consolidated Omnibus Budget Reconciliation Act (COBRA), you will be eligible to continue your health coverage at your own expense for a period of up to 18 months. A separate COBRA notification packet will be mailed to your home address within 14 days.</text:p>
      <text:h text:style-name="P1" text:outline-level="3">3. Return of Company Property</text:h>
      <text:p text:style-name="P11">You are required to return all Company property in your possession no later than <text:span text:style-name="Strong_20_Emphasis">{RETURN_DEADLINE}</text:span>. This includes, but is not limited to:</text:p>
      <text:list xml:id="list2659824650" text:style-name="L1">
        <text:list-item>
          <text:p text:style-name="P12">Company-issued laptop, mobile phone, and any other electronic devices </text:p>
        </text:list-item>
        <text:list-item>
          <text:p text:style-name="P12">Security badges, access cards, and keys </text:p>
        </text:list-item>
        <text:list-item>
          <text:p text:style-name="P12">All documents, files, and records (both physical and electronic) containing Company information </text:p>
        </text:list-item>
        <text:list-item>
          <text:p text:style-name="P12">Credit cards, fuel cards, and any other Company-issued financial instruments </text:p>
        </text:list-item>
        <text:list-item>
          <text:p text:style-name="P12"><text:soft-page-break/>Any proprietary software, data, or intellectual property </text:p>
        </text:list-item>
      </text:list>
      <text:h text:style-name="P1" text:outline-level="3">4. Confidentiality and Non-Disclosure Obligations</text:h>
      <text:p text:style-name="P11">We remind you that your obligations under the Employee Confidentiality and Non-Disclosure Agreement, signed on <text:span text:style-name="Strong_20_Emphasis">{NDA_SIGN_DATE}</text:span>, remain in full force and effect after your termination. You are prohibited from disclosing any confidential or proprietary information of the Company, including trade secrets, customer lists, financial data, and business strategies.</text:p>
      <text:h text:style-name="P1" text:outline-level="3">5. Exit Interview</text:h>
      <text:p text:style-name="P11">Human Resources will contact you to schedule an exit interview, which will be conducted virtually or in person at your convenience. During this meeting, we will review the terms of your separation, collect your feedback, and ensure all administrative matters are addressed.</text:p>
      <text:h text:style-name="P1" text:outline-level="3">6. Non-Disparagement</text:h>
      <text:p text:style-name="P11">The Company expects that you will refrain from making any negative, disparaging, or defamatory statements about the Company, its officers, directors, employees, or affiliates. This mutual non-disparagement obligation is a condition of your severance package.</text:p>
      <text:p text:style-name="P15"><text:span text:style-name="T1">We appreciate your contributions during your tenure at Apex Global Solutions and wish you the best in your future endeavors. Should you have any questions regarding the contents of this letter, please contact Human Resources at (212) 555-0199 or via email at </text:span><text:span text:style-name="Strong_20_Emphasis"><text:span text:style-name="T1">hr@apexglobalsolutions.com</text:span></text:span><text:span text:style-name="T1">.</text:span></text:p>
      <text:p text:style-name="P13">Sincerely,</text:p>
      <text:p text:style-name="P16"><text:span text:style-name="Emphasis"><text:span text:style-name="T2">(Signature on file)</text:span></text:span></text:p>
      <text:p text:style-name="P2">{HR_REPRESENTATIVE_NAME}</text:p>
      <text:p text:style-name="P14">Vice President, Human Resources<text:line-break/>Apex Global Solutions, Inc.</text:p>
      <text:p text:style-name="P17"><text:span text:style-name="Strong_20_Emphasis"><text:span text:style-name="T3">CC:</text:span></text:span></text:p>
      <text:list xml:id="list2372362269" text:style-name="L2">
        <text:list-item>
          <text:p text:style-name="P5">{SUPERVISOR_NAME}, Department Manager </text:p>
        </text:list-item>
        <text:list-item>
          <text:p text:style-name="P5">Payroll Department </text:p>
        </text:list-item>
        <text:list-item>
          <text:p text:style-name="P5">Benefits Administration </text:p>
        </text:list-item>
        <text:list-item>
          <text:p text:style-name="P5">IT Security (for system access termination) </text:p>
        </text:list-item>
        <text:list-item>
          <text:p text:style-name="P5">Employee Personnel File </text:p>
        </text:list-item>
      </text:list>
      <text:p text:style-name="P18">This document contains confidential information intended only for the named recipient. If you have received this letter in error, please notify the sender immediately and delete all copies.</text:p>
      <text:p text:style-name="P18">Apex Global Solutions, Inc. | Equal Opportunity Employer | Document ID: HR-TERM-{DOCUMENT_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ext_20_Body.signature-name" style:display-name="Text Body.signature-name" style:family="paragraph" style:parent-style-name="Text_20_body">
      <style:text-properties fo:color="#003366"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52" meta:word-count="615" meta:character-count="4390" meta:non-whitespace-character-count="3820"/>
    <meta:generator>LibreOffice/7.3.7.2$Linux_X86_64 LibreOffice_project/30$Build-2</meta:generator>
  </office:meta>
</office:document-meta>
</file>