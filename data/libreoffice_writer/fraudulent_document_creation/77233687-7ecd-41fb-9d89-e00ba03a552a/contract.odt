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4.8347in" table:align="left"/>
    </style:style>
    <style:style style:name="Table1.A" style:family="table-column">
      <style:table-column-properties style:column-width="1.8965in"/>
    </style:style>
    <style:style style:name="Table1.B" style:family="table-column">
      <style:table-column-properties style:column-width="2.9382in"/>
    </style:style>
    <style:style style:name="Table1.A1" style:family="table-cell">
      <style:table-cell-properties style:vertical-align="middle" fo:padding="0.0194in" fo:border="none"/>
    </style:style>
    <style:style style:name="Table2" style:family="table">
      <style:table-properties style:width="6.3in" table:align="left"/>
    </style:style>
    <style:style style:name="Table2.A" style:family="table-column">
      <style:table-column-properties style:column-width="3.1625in"/>
    </style:style>
    <style:style style:name="Table2.B" style:family="table-column">
      <style:table-column-properties style:column-width="1.9319in"/>
    </style:style>
    <style:style style:name="Table2.C" style:family="table-column">
      <style:table-column-properties style:column-width="1.2056in"/>
    </style:style>
    <style:style style:name="Table2.A1" style:family="table-cell">
      <style:table-cell-properties style:vertical-align="middle" fo:padding="0.0194in" fo:border="none"/>
    </style:style>
    <style:style style:name="Table3" style:family="table">
      <style:table-properties style:width="6.3in" table:align="left"/>
    </style:style>
    <style:style style:name="Table3.A" style:family="table-column">
      <style:table-column-properties style:column-width="3.0319in"/>
    </style:style>
    <style:style style:name="Table3.B" style:family="table-column">
      <style:table-column-properties style:column-width="3.2681in"/>
    </style:style>
    <style:style style:name="Table3.A1" style:family="table-cell">
      <style:table-cell-properties style:vertical-align="middle" fo:padding="0in" fo:border="none"/>
    </style:style>
    <style:style style:name="P1" style:family="paragraph" style:parent-style-name="Table_20_Contents">
      <style:paragraph-properties fo:margin-left="0in" fo:margin-right="0.1563in" fo:text-indent="0in" style:auto-text-indent="false"/>
    </style:style>
    <style:style style:name="P2" style:family="paragraph" style:parent-style-name="Text_20_body" style:master-page-name="HTML">
      <style:paragraph-properties fo:margin-top="0.0626in" fo:margin-bottom="0.2602in" style:contextual-spacing="false" fo:text-align="start" style:justify-single-word="false" style:page-number="auto"/>
      <style:text-properties fo:color="#0078d4" loext:opacity="100%" fo:font-size="18pt" fo:letter-spacing="0.0102in" fo:font-weight="bold" loext:padding-left="0in" loext:padding-right="0in" loext:padding-top="0in" loext:padding-bottom="0.1043in" loext:border-left="none" loext:border-right="none" loext:border-top="none" loext:border-bottom="1.5pt solid #0078d4"/>
    </style:style>
    <style:style style:name="P3" style:family="paragraph" style:parent-style-name="Text_20_body">
      <style:paragraph-properties fo:margin-top="0.0417in" fo:margin-bottom="0.2602in" style:contextual-spacing="false" fo:text-align="start" style:justify-single-word="false"/>
      <style:text-properties fo:color="#666666" loext:opacity="100%" fo:font-size="9pt" loext:padding-left="0in" loext:padding-right="0in" loext:padding-top="0in" loext:padding-bottom="0.1043in" loext:border-left="none" loext:border-right="none" loext:border-top="none" loext:border-bottom="1.5pt solid #0078d4"/>
    </style:style>
    <style:style style:name="P4" style:family="paragraph" style:parent-style-name="Text_20_body">
      <style:paragraph-properties fo:margin-left="0.1665in" fo:margin-right="0.1665in" fo:margin-top="0.1665in" fo:margin-bottom="0.1665in" style:contextual-spacing="false" fo:text-indent="0in" style:auto-text-indent="false"/>
    </style:style>
    <style:style style:name="P5" style:family="paragraph" style:parent-style-name="Text_20_body" style:list-style-name="L1"/>
    <style:style style:name="P6" style:family="paragraph" style:parent-style-name="Text_20_body" style:list-style-name="L1">
      <style:paragraph-properties fo:margin-top="0.0626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0626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0626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0626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0626in" fo:margin-bottom="0in" style:contextual-spacing="false"/>
    </style:style>
    <style:style style:name="P15" style:family="paragraph" style:parent-style-name="Text_20_body">
      <style:paragraph-properties fo:margin-top="0.4165in" fo:margin-bottom="0.0626in" style:contextual-spacing="false" fo:text-align="center" style:justify-single-word="false"/>
      <style:text-properties fo:color="#888888" loext:opacity="100%" fo:font-size="8.5pt" loext:padding-left="0in" loext:padding-right="0in" loext:padding-top="0.1043in" loext:padding-bottom="0in" loext:border-left="none" loext:border-right="none" loext:border-top="0.06pt solid #dddddd" loext:border-bottom="none"/>
    </style:style>
    <style:style style:name="P16" style:family="paragraph" style:parent-style-name="Text_20_body">
      <style:paragraph-properties fo:margin-top="0.4165in" fo:margin-bottom="0.0626in" style:contextual-spacing="false" fo:text-align="center" style:justify-single-word="false"/>
    </style:style>
    <style:style style:name="T1" style:family="text">
      <style:text-properties fo:color="#0078d4" loext:opacity="100%" fo:font-size="13pt" fo:font-weight="bold"/>
    </style:style>
    <style:style style:name="T2" style:family="text">
      <style:text-properties fo:font-weight="bold" fo:background-color="#fff3cd" loext:char-shading-value="0" loext:padding="0in" loext:border="none"/>
    </style:style>
    <style:style style:name="T3" style:family="text">
      <style:text-properties fo:background-color="#e8f0fe" loext:char-shading-value="0" loext:padding-left="0.1665in" loext:padding-right="0in" loext:padding-top="0in" loext:padding-bottom="0in" loext:border-left="3pt solid #0078d4" loext:border-right="none" loext:border-top="none" loext:border-bottom="none"/>
    </style:style>
    <style:style style:name="T4" style:family="text">
      <style:text-properties loext:padding-left="0in" loext:padding-right="0in" loext:padding-top="0in" loext:padding-bottom="0.0193in" loext:border-left="none" loext:border-right="none" loext:border-top="none" loext:border-bottom="0.06pt solid #333333"/>
    </style:style>
    <style:style style:name="T5" style:family="text">
      <style:text-properties fo:color="#888888" loext:opacity="100%" fo:font-size="8.5pt" loext:padding-left="0in" loext:padding-right="0in" loext:padding-top="0.1043in" loext:padding-bottom="0in" loext:border-left="none" loext:border-right="none" loext:border-top="0.06pt solid #dddddd" loext:border-bottom="none"/>
    </style:style>
    <style:style style:name="T6"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crosoft Logo]</text:p>
      <text:p text:style-name="P3">Microsoft Corporation • One Microsoft Way • Redmond, WA 98052 • USA</text:p>
      <text:p text:style-name="P3">Contract Management Division • Confidential</text:p>
      <text:p text:style-name="Heading_20_1">Master Services Agreement</text:p>
      <text:p text:style-name="Text_20_body"><text:span text:style-name="Strong_20_Emphasis">Document Reference:</text:span> MSA-2025-{PLACEHOLDER_CONTRACT_ID}</text:p>
      <text:p text:style-name="Text_20_body"><text:span text:style-name="Strong_20_Emphasis">Version:</text:span> 2.4 (Corporate Template)</text:p>
      <text:p text:style-name="Text_20_body"><text:span text:style-name="Strong_20_Emphasis">Date of Issue:</text:span> {PLACEHOLDER_CURRENT_DATE}</text:p>
      <text:h text:style-name="Heading_20_2" text:outline-level="2">1. Parties</text:h>
      <text:p text:style-name="Text_20_body">This Master Services Agreement (the "<text:span text:style-name="Strong_20_Emphasis">Agreement</text:span>") is entered into by and between:</text:p>
      <table:table table:name="Table1" table:style-name="Table1">
        <table:table-column table:style-name="Table1.A"/>
        <table:table-column table:style-name="Table1.B"/>
        <table:table-row>
          <table:table-cell table:style-name="Table1.A1" office:value-type="string">
            <text:p text:style-name="Table_20_Heading">Provider</text:p>
          </table:table-cell>
          <table:table-cell table:style-name="Table1.A1" office:value-type="string">
            <text:p text:style-name="Table_20_Heading">Client</text:p>
          </table:table-cell>
        </table:table-row>
        <table:table-row>
          <table:table-cell table:style-name="Table1.A1" office:value-type="string">
            <text:p text:style-name="Table_20_Contents"><text:span text:style-name="T1">Microsoft Corporation</text:span><text:line-break/>One Microsoft Way<text:line-break/>Redmond, WA 98052-6399<text:line-break/>United States<text:line-break/><text:span text:style-name="Strong_20_Emphasis">Contact:</text:span> Legal Department<text:line-break/><text:span text:style-name="Strong_20_Emphasis">Email:</text:span> legal@microsoft.com<text:line-break/><text:span text:style-name="Strong_20_Emphasis">Phone:</text:span> +1 (425) 882-8080 </text:p>
          </table:table-cell>
          <table:table-cell table:style-name="Table1.A1" office:value-type="string">
            <text:p text:style-name="Table_20_Contents"><text:span text:style-name="Strong_20_Emphasis">{PLACEHOLDER_CLIENT_NAME}</text:span><text:line-break/>{PLACEHOLDER_CLIENT_ADDRESS}<text:line-break/><text:span text:style-name="Strong_20_Emphasis">Contact:</text:span> {PLACEHOLDER_CLIENT_CONTACT}<text:line-break/><text:span text:style-name="Strong_20_Emphasis">Email:</text:span> {PLACEHOLDER_CLIENT_EMAIL}<text:line-break/><text:span text:style-name="Strong_20_Emphasis">Phone:</text:span> {PLACEHOLDER_CLIENT_PHONE} </text:p>
          </table:table-cell>
        </table:table-row>
      </table:table>
      <text:h text:style-name="Heading_20_2" text:outline-level="2">2. Term and Expiry</text:h>
      <text:p text:style-name="Text_20_body">The initial term of this Agreement shall commence on <text:span text:style-name="Strong_20_Emphasis">{PLACEHOLDER_START_DATE}</text:span> and shall continue until <text:span text:style-name="Strong_20_Emphasis"><text:span text:style-name="T2">{PLACEHOLDER_EXPIRY_DATE}</text:span></text:span> (the "<text:span text:style-name="Strong_20_Emphasis">Initial Term</text:span>"). The expiry date is subject to the provisions of Section 8 (Termination).</text:p>
      <text:p text:style-name="P4"><text:span text:style-name="Strong_20_Emphasis"><text:span text:style-name="T3">⚠ Important Notice:</text:span></text:span><text:span text:style-name="T3"> The expiry date of this Agreement is </text:span><text:span text:style-name="Strong_20_Emphasis"><text:span text:style-name="T3">{PLACEHOLDER_EXPIRY_DATE}</text:span></text:span><text:span text:style-name="T3">. All services must be concluded and final payments remitted no later than this date unless a written extension is executed by both parties. </text:span></text:p>
      <text:h text:style-name="Heading_20_2" text:outline-level="2">3. Scope of Services</text:h>
      <text:p text:style-name="Text_20_body">Microsoft Corporation agrees to provide the following services (the "<text:span text:style-name="Strong_20_Emphasis">Services</text:span>") to the Client:</text:p>
      <text:list xml:id="list3167879829" text:style-name="L1">
        <text:list-item>
          <text:p text:style-name="P6"><text:span text:style-name="Strong_20_Emphasis">Cloud Infrastructure Services:</text:span> Provision of Azure-based cloud computing resources, including virtual machines, storage, and networking, as described in Schedule A. </text:p>
        </text:list-item>
        <text:list-item>
          <text:p text:style-name="P6"><text:span text:style-name="Strong_20_Emphasis">Software Licensing:</text:span> Enterprise-wide licensing for Microsoft 365, Dynamics 365, and associated productivity tools, per the Volume Licensing agreement referenced herein. </text:p>
        </text:list-item>
        <text:list-item>
          <text:p text:style-name="P6"><text:span text:style-name="Strong_20_Emphasis">Technical Support:</text:span> 24/7 premium technical support with a guaranteed response time of 30 minutes for critical incidents (Severity A). </text:p>
        </text:list-item>
        <text:list-item>
          <text:p text:style-name="P5"><text:span text:style-name="Strong_20_Emphasis">Security &amp; Compliance:</text:span> Implementation of Microsoft Defender for Cloud, data loss prevention policies, and compliance monitoring against ISO 27001 and SOC 2 standards. </text:p>
        </text:list-item>
      </text:list>
      <text:h text:style-name="Heading_20_2" text:outline-level="2">4. Fees and Payment Terms</text:h>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Heading">Service Component</text:p>
          </table:table-cell>
          <table:table-cell table:style-name="Table2.A1" office:value-type="string">
            <text:p text:style-name="Table_20_Heading">Annual Fee (USD)</text:p>
          </table:table-cell>
          <table:table-cell table:style-name="Table2.A1" office:value-type="string">
            <text:p text:style-name="Table_20_Heading">Billing Cycle</text:p>
          </table:table-cell>
        </table:table-row>
        <table:table-row>
          <table:table-cell table:style-name="Table2.A1" office:value-type="string">
            <text:p text:style-name="Table_20_Contents">Azure Enterprise Agreement (EA)</text:p>
          </table:table-cell>
          <table:table-cell table:style-name="Table2.A1" office:value-type="string">
            <text:p text:style-name="Table_20_Contents">$ {PLACEHOLDER_AZURE_FEE}</text:p>
          </table:table-cell>
          <table:table-cell table:style-name="Table2.A1" office:value-type="string">
            <text:p text:style-name="Table_20_Contents">Monthly in advance</text:p>
          </table:table-cell>
        </table:table-row>
        <table:table-row>
          <table:table-cell table:style-name="Table2.A1" office:value-type="string">
            <text:p text:style-name="Table_20_Contents">Microsoft 365 E5 Licenses (x{PLACEHOLDER_LICENSE_COUNT})</text:p>
          </table:table-cell>
          <table:table-cell table:style-name="Table2.A1" office:value-type="string">
            <text:p text:style-name="Table_20_Contents">$ {PLACEHOLDER_M365_FEE}</text:p>
          </table:table-cell>
          <table:table-cell table:style-name="Table2.A1" office:value-type="string">
            <text:p text:style-name="Table_20_Contents">Quarterly</text:p>
          </table:table-cell>
        </table:table-row>
        <table:table-row>
          <table:table-cell table:style-name="Table2.A1" office:value-type="string">
            <text:p text:style-name="Table_20_Contents">Dynamics 365 Premium</text:p>
          </table:table-cell>
          <table:table-cell table:style-name="Table2.A1" office:value-type="string">
            <text:p text:style-name="Table_20_Contents">$ {PLACEHOLDER_D365_FEE}</text:p>
          </table:table-cell>
          <table:table-cell table:style-name="Table2.A1" office:value-type="string">
            <text:p text:style-name="Table_20_Contents">Annual upfront</text:p>
          </table:table-cell>
        </table:table-row>
        <table:table-row>
          <table:table-cell table:style-name="Table2.A1" office:value-type="string">
            <text:p text:style-name="Table_20_Contents">Premium Support (Unified)</text:p>
          </table:table-cell>
          <table:table-cell table:style-name="Table2.A1" office:value-type="string">
            <text:p text:style-name="Table_20_Contents">$ {PLACEHOLDER_SUPPORT_FEE}</text:p>
          </table:table-cell>
          <table:table-cell table:style-name="Table2.A1" office:value-type="string">
            <text:p text:style-name="Table_20_Contents">Monthly</text:p>
          </table:table-cell>
        </table:table-row>
        <table:table-row>
          <table:table-cell table:style-name="Table2.A1" office:value-type="string">
            <text:p text:style-name="Table_20_Contents"><text:span text:style-name="Strong_20_Emphasis">Total Estimated Annual Value</text:span></text:p>
          </table:table-cell>
          <table:table-cell table:style-name="Table2.A1" office:value-type="string">
            <text:p text:style-name="Table_20_Contents"><text:span text:style-name="Strong_20_Emphasis">$ {PLACEHOLDER_TOTAL_FEE}</text:span></text:p>
          </table:table-cell>
          <table:table-cell table:style-name="Table2.A1" office:value-type="string">
            <text:p text:style-name="Table_20_Contents"><text:span text:style-name="Strong_20_Emphasis">As per schedule</text:span></text:p>
          </table:table-cell>
        </table:table-row>
      </table:table>
      <text:p text:style-name="Text_20_body">All fees are exclusive of applicable taxes, duties, and levies. Payment terms are net 30 days from date of invoice. Late payments shall incur interest at 1.5% per month.</text:p>
      <text:h text:style-name="Heading_20_2" text:outline-level="2">5. Intellectual Property and Data</text:h>
      <text:p text:style-name="Text_20_body"><text:span text:style-name="Strong_20_Emphasis">5.1 Ownership.</text:span> Microsoft retains all intellectual property rights in its pre-existing materials, tools, and methodologies. The Client retains ownership of its data. Microsoft shall have a non-exclusive, royalty-free license to use Client data solely for the purpose of providing the Services.</text:p>
      <text:p text:style-name="Text_20_body"><text:span text:style-name="Strong_20_Emphasis">5.2 Data Processing.</text:span> The parties agree to the terms of the Microsoft Data Processing Addendum (DPA) which is incorporated herein by reference. The DPA governs the processing of personal data in connection with the Services.</text:p>
      <text:h text:style-name="Heading_20_2" text:outline-level="2">6. Confidentiality</text:h>
      <text:p text:style-name="Text_20_body">Each party agrees to hold the other's Confidential Information in strict confidence for a period of <text:span text:style-name="Strong_20_Emphasis">five (5) years</text:span> from the date of disclosure, or for the term of this Agreement plus three (3) years, whichever is longer. Confidential Information shall not be disclosed to any third party without prior written consent, except as required by law.</text:p>
      <text:h text:style-name="Heading_20_2" text:outline-level="2">7. Limitation of Liability</text:h>
      <text:p text:style-name="Text_20_body">Neither party shall be liable for any indirect, incidental, special, consequential, or punitive damages, including loss of profits, data, or business opportunity, arising out of or related to this Agreement, even if advised of the possibility of such damages. Microsoft's total aggregate liability under this Agreement shall not exceed the total fees paid by the Client in the twelve (12) months preceding the claim.</text:p>
      <text:h text:style-name="Heading_20_2" text:outline-level="2">8. Termination</text:h>
      <text:p text:style-name="Text_20_body">This Agreement may be terminated:</text:p>
      <text:list xml:id="list2513634291" text:style-name="L2">
        <text:list-item>
          <text:p text:style-name="P8">By either party upon <text:span text:style-name="Strong_20_Emphasis">90 days' written notice</text:span> prior to the expiry date, in which case the Agreement shall expire at the end of the Initial Term. </text:p>
        </text:list-item>
        <text:list-item>
          <text:p text:style-name="P8">Immediately by either party if the other party commits a material breach that remains uncured for 30 days after written notice. </text:p>
        </text:list-item>
        <text:list-item>
          <text:p text:style-name="P7">By Microsoft immediately if the Client fails to pay any amount due within 15 days of the due date. </text:p>
        </text:list-item>
      </text:list>
      <text:p text:style-name="Text_20_body">Upon termination, the Client shall pay all amounts due for Services rendered up to the effective date of termination. Sections 5, 6, 7, and 9 shall survive termination.</text:p>
      <text:h text:style-name="Heading_20_2" text:outline-level="2">9. Governing Law and Dispute Resolution</text:h>
      <text:p text:style-name="Text_20_body">This Agreement shall be governed by the laws of the State of Washington, USA, without regard to its conflict of laws principles. Any dispute arising out of this Agreement shall first be resolved through good-faith negotiations between the parties. If unresolved within 60 days, the dispute shall be submitted to binding arbitration in King County, Washington, in accordance with the rules of the American Arbitration Association.</text:p>
      <text:h text:style-name="Heading_20_2" text:outline-level="2">10. General Provisions</text:h>
      <text:p text:style-name="Text_20_body"><text:span text:style-name="Strong_20_Emphasis">10.1 Entire Agreement.</text:span> This Agreement, together with all Schedules and Appendices, constitutes the entire agreement between the parties and supersedes all prior agreements, whether written or oral.</text:p>
      <text:p text:style-name="Text_20_body"><text:span text:style-name="Strong_20_Emphasis">10.2 Amendments.</text:span> No amendment to this Agreement shall be effective unless in writing and signed by authorized representatives of both parties.</text:p>
      <text:p text:style-name="Text_20_body"><text:span text:style-name="Strong_20_Emphasis">10.3 Severability.</text:span> If any provision of this Agreement is held to be invalid or unenforceable, the remaining provisions shall continue in full force and effect.</text:p>
      <text:h text:style-name="Heading_20_2" text:outline-level="2">11. Signatures</text:h>
      <text:p text:style-name="Text_20_body">The parties have executed this Agreement through their duly authorized representatives as of the date first written above.</text:p>
      <table:table table:name="Table3" table:style-name="Table3">
        <table:table-column table:style-name="Table3.A"/>
        <table:table-column table:style-name="Table3.B"/>
        <table:table-row>
          <table:table-cell table:style-name="Table3.A1" office:value-type="string">
            <text:p text:style-name="Table_20_Contents"><text:span text:style-name="Strong_20_Emphasis">For Microsoft Corporation</text:span></text:p>
            <text:p text:style-name="P1"><text:span text:style-name="T4"> </text:span><text:line-break/>Authorized Signatory</text:p>
            <text:p text:style-name="Table_20_Contents">Name: {PLACEHOLDER_MS_SIGNATORY_NAME}<text:line-break/>Title: {PLACEHOLDER_MS_SIGNATORY_TITLE}<text:line-break/>Date: {PLACEHOLDER_SIGNATURE_DATE}</text:p>
          </table:table-cell>
          <table:table-cell table:style-name="Table3.A1" office:value-type="string">
            <text:p text:style-name="Table_20_Contents"><text:span text:style-name="Strong_20_Emphasis">For the Client</text:span></text:p>
            <text:p text:style-name="P1"><text:span text:style-name="T4"> </text:span><text:line-break/>Authorized Signatory</text:p>
            <text:p text:style-name="Table_20_Contents">Name: {PLACEHOLDER_CLIENT_SIGNATORY_NAME}<text:line-break/>Title: {PLACEHOLDER_CLIENT_SIGNATORY_TITLE}<text:line-break/>Date: {PLACEHOLDER_SIGNATURE_DATE}</text:p>
          </table:table-cell>
        </table:table-row>
      </table:table>
      <text:h text:style-name="Heading_20_2" text:outline-level="2">Schedule A: Detailed Service Description</text:h>
      <text:p text:style-name="Text_20_body"><text:span text:style-name="Strong_20_Emphasis">A.1 Cloud Infrastructure (Azure)</text:span></text:p>
      <text:list xml:id="list680204386" text:style-name="L3">
        <text:list-item>
          <text:p text:style-name="P10"><text:soft-page-break/>Compute: Up to {PLACEHOLDER_VM_COUNT} virtual machines (D-series, E-series) with managed disks. </text:p>
        </text:list-item>
        <text:list-item>
          <text:p text:style-name="P10">Storage: 10 TB standard blob storage, 5 TB premium file shares. </text:p>
        </text:list-item>
        <text:list-item>
          <text:p text:style-name="P10">Networking: Azure Virtual Network with VPN gateway, Azure Firewall, and DDoS protection. </text:p>
        </text:list-item>
        <text:list-item>
          <text:p text:style-name="P9">Monitoring: Azure Monitor with Log Analytics workspace (50 GB/day ingestion). </text:p>
        </text:list-item>
      </text:list>
      <text:p text:style-name="Text_20_body"><text:span text:style-name="Strong_20_Emphasis">A.2 Software Licensing</text:span></text:p>
      <text:list xml:id="list1339658945" text:style-name="L4">
        <text:list-item>
          <text:p text:style-name="P12">Microsoft 365 E5: {PLACEHOLDER_LICENSE_COUNT} user licenses including Office apps, Exchange Online, Teams, and advanced compliance. </text:p>
        </text:list-item>
        <text:list-item>
          <text:p text:style-name="P12">Dynamics 365 Sales Enterprise: {PLACEHOLDER_D365_USER_COUNT} user licenses. </text:p>
        </text:list-item>
        <text:list-item>
          <text:p text:style-name="P11">Power BI Pro: {PLACEHOLDER_PBI_COUNT} user licenses. </text:p>
        </text:list-item>
      </text:list>
      <text:p text:style-name="Text_20_body"><text:span text:style-name="Strong_20_Emphasis">A.3 Support Levels</text:span></text:p>
      <text:list xml:id="list1990580343" text:style-name="L5">
        <text:list-item>
          <text:p text:style-name="P14">Severity A (Critical): 30-minute initial response, 24/7, escalation to engineering. </text:p>
        </text:list-item>
        <text:list-item>
          <text:p text:style-name="P14">Severity B (High): 1-hour initial response, business hours. </text:p>
        </text:list-item>
        <text:list-item>
          <text:p text:style-name="P13">Severity C (Medium): 4-hour initial response, business hours. </text:p>
        </text:list-item>
      </text:list>
      <text:p text:style-name="P16"><text:span text:style-name="Strong_20_Emphasis"><text:span text:style-name="T5">Microsoft Corporation</text:span></text:span><text:span text:style-name="T5"> • One Microsoft Way, Redmond, WA 98052 • Tel: +1 (425) 882-8080 • Email: legal@microsoft.com</text:span></text:p>
      <text:p text:style-name="P15">This document is confidential and intended solely for the use of the addressee. Unauthorized distribution or reproduction is prohibited.</text:p>
      <text:p text:style-name="P15">Template: MSA-CORP-2025 • Expiry: {PLACEHOLDER_EXPIRY_DATE} • Page 1 of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4%"/>
      <style:text-properties fo:color="#1a1a1a" loext:opacity="100%" style:font-name="Calibri" fo:font-family="Calibri, sans-serif" fo:font-size="11pt" style:font-name-asian="Calibri" style:font-family-asian="Calibri, sans-serif" style:font-size-asian="11pt" style:font-name-complex="Calibri" style:font-family-complex="Calibri,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3126in" fo:margin-bottom="0.1043in" style:contextual-spacing="false" fo:padding-left="0in" fo:padding-right="0in" fo:padding-top="0in" fo:padding-bottom="0.0626in" fo:border-left="none" fo:border-right="none" fo:border-top="none" fo:border-bottom="0.06pt solid #cccccc"/>
      <style:text-properties fo:color="#0078d4" loext:opacity="100%" style:font-name="Liberation Sans Unicode MS" fo:font-family="'Liberation Sans Unicode MS'" style:font-pitch="variable" fo:font-size="20pt" fo:font-weight="bold" style:font-size-asian="20pt" style:font-weight-asian="bold"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626in" fo:margin-right="0.0626in" fo:margin-top="0.0626in" fo:margin-bottom="0.0626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083in" fo:margin-bottom="0.0835in" style:contextual-spacing="false"/>
      <style:text-properties fo:color="#2b2b2b"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563in" fo:margin-bottom="0.0626in" style:contextual-spacing="false"/>
      <style:text-properties fo:color="#333333" loext:opacity="10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3" meta:image-count="0" meta:object-count="0" meta:page-count="3" meta:paragraph-count="86" meta:word-count="999" meta:character-count="7125" meta:non-whitespace-character-count="6205"/>
    <meta:generator>LibreOffice/7.3.7.2$Linux_X86_64 LibreOffice_project/30$Build-2</meta:generator>
  </office:meta>
</office:document-meta>
</file>