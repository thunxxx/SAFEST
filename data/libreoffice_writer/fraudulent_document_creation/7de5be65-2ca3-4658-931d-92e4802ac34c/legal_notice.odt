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3.2201in" table:align="left"/>
    </style:style>
    <style:style style:name="Table1.A" style:family="table-column">
      <style:table-column-properties style:column-width="1.1569in"/>
    </style:style>
    <style:style style:name="Table1.B" style:family="table-column">
      <style:table-column-properties style:column-width="2.0632in"/>
    </style:style>
    <style:style style:name="Table1.A1" style:family="table-cell">
      <style:table-cell-properties style:vertical-align="middle" fo:padding="0.0194in" fo:border="none"/>
    </style:style>
    <style:style style:name="Table2" style:family="table">
      <style:table-properties style:width="5.2313in" table:align="left"/>
    </style:style>
    <style:style style:name="Table2.A" style:family="table-column">
      <style:table-column-properties style:column-width="2.1257in"/>
    </style:style>
    <style:style style:name="Table2.B" style:family="table-column">
      <style:table-column-properties style:column-width="1.6465in"/>
    </style:style>
    <style:style style:name="Table2.C" style:family="table-column">
      <style:table-column-properties style:column-width="1.459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fo:margin-top="0in" fo:margin-bottom="0.2083in" style:contextual-spacing="false" fo:text-align="center" style:justify-single-word="false" style:page-number="auto"/>
      <style:text-properties loext:padding-left="0in" loext:padding-right="0in" loext:padding-top="0in" loext:padding-bottom="0.1043in" loext:border-left="none" loext:border-right="none" loext:border-top="none" loext:border-bottom="1.5pt solid #000000"/>
    </style:style>
    <style:style style:name="P2" style:family="paragraph" style:parent-style-name="Table_20_Contents">
      <style:text-properties fo:font-size="2pt" style:font-size-asian="2pt" style:font-size-complex="2pt"/>
    </style:style>
    <style:style style:name="P3" style:family="paragraph" style:parent-style-name="Text_20_Body.body-text">
      <style:paragraph-properties fo:text-align="center" style:justify-single-word="false"/>
      <style:text-properties fo:font-size="13pt" fo:font-weight="bold"/>
    </style:style>
    <style:style style:name="P4" style:family="paragraph" style:parent-style-name="Text_20_Body.body-text">
      <style:paragraph-properties fo:margin-top="0.3126in" fo:margin-bottom="0.1965in" style:contextual-spacing="false"/>
      <style:text-properties fo:font-size="13pt" fo:font-weight="bold"/>
    </style:style>
    <style:style style:name="P5" style:family="paragraph" style:parent-style-name="Text_20_Body.body-text">
      <style:paragraph-properties fo:margin-top="0in" fo:margin-bottom="0.2602in" style:contextual-spacing="false" fo:text-align="center" style:justify-single-word="false"/>
    </style:style>
    <style:style style:name="P6" style:family="paragraph" style:parent-style-name="Text_20_Body.body-text">
      <style:paragraph-properties fo:margin-top="0.2602in" fo:margin-bottom="0.1965in" style:contextual-spacing="false"/>
    </style:style>
    <style:style style:name="P7" style:family="paragraph" style:parent-style-name="Text_20_Body.body-text">
      <style:paragraph-properties fo:margin-top="0.2083in" fo:margin-bottom="0.1965in" style:contextual-spacing="false"/>
    </style:style>
    <style:style style:name="P8" style:family="paragraph" style:parent-style-name="Text_20_Body.body-text">
      <style:paragraph-properties fo:margin-top="0.3126in" fo:margin-bottom="0.1965in" style:contextual-spacing="false"/>
    </style:style>
    <style:style style:name="P9" style:family="paragraph" style:parent-style-name="Text_20_body">
      <style:paragraph-properties fo:margin-top="0in" fo:margin-bottom="0.2083in" style:contextual-spacing="false" fo:text-align="center" style:justify-single-word="false"/>
      <style:text-properties loext:padding-left="0in" loext:padding-right="0in" loext:padding-top="0in" loext:padding-bottom="0.1043in" loext:border-left="none" loext:border-right="none" loext:border-top="none" loext:border-bottom="1.5pt solid #000000"/>
    </style:style>
    <style:style style:name="P10" style:family="paragraph" style:parent-style-name="Text_20_body">
      <style:paragraph-properties fo:margin-top="0.3126in" fo:margin-bottom="0.2083in" style:contextual-spacing="false" fo:text-align="center" style:justify-single-word="false"/>
      <style:text-properties fo:text-transform="uppercase" fo:font-size="16pt" style:text-underline-style="solid" style:text-underline-width="auto" style:text-underline-color="font-color" fo:font-weight="bold"/>
    </style:style>
    <style:style style:name="P11" style:family="paragraph" style:parent-style-name="Text_20_body">
      <style:paragraph-properties fo:margin-left="0.2083in" fo:margin-right="0.2083in" fo:margin-top="0.2083in" fo:margin-bottom="0.2083in" style:contextual-spacing="false" fo:text-indent="0in" style:auto-text-indent="false"/>
    </style:style>
    <style:style style:name="P12" style:family="paragraph" style:parent-style-name="Text_20_body" style:list-style-name="L1">
      <style:paragraph-properties fo:margin-top="0in" fo:margin-bottom="0.2083in" style:contextual-spacing="false"/>
    </style:style>
    <style:style style:name="P13" style:family="paragraph" style:parent-style-name="Text_20_body">
      <style:paragraph-properties fo:margin-top="0.4165in" fo:margin-bottom="0.1965in" style:contextual-spacing="false"/>
      <style:text-properties loext:padding-left="0in" loext:padding-right="0in" loext:padding-top="0.2083in" loext:padding-bottom="0in" loext:border-left="none" loext:border-right="none" loext:border-top="0.06pt solid #000000" loext:border-bottom="none"/>
    </style:style>
    <style:style style:name="P14" style:family="paragraph" style:parent-style-name="Text_20_body">
      <style:paragraph-properties fo:margin-top="0.052in" fo:margin-bottom="0.1965in" style:contextual-spacing="false"/>
      <style:text-properties loext:padding-left="0in" loext:padding-right="0in" loext:padding-top="0.2083in" loext:padding-bottom="0in" loext:border-left="none" loext:border-right="none" loext:border-top="0.06pt solid #000000" loext:border-bottom="none"/>
    </style:style>
    <style:style style:name="P15" style:family="paragraph" style:parent-style-name="Text_20_body">
      <style:paragraph-properties fo:margin-top="0.3126in" fo:margin-bottom="0.1965in" style:contextual-spacing="false"/>
      <style:text-properties fo:font-size="11pt" loext:padding-left="0in" loext:padding-right="0in" loext:padding-top="0.052in" loext:padding-bottom="0in" loext:border-left="none" loext:border-right="none" loext:border-top="0.06pt solid #000000" loext:border-bottom="none"/>
    </style:style>
    <style:style style:name="P16" style:family="paragraph" style:parent-style-name="Text_20_body">
      <style:paragraph-properties fo:margin-top="0.3126in" fo:margin-bottom="0.1965in" style:contextual-spacing="false"/>
      <style:text-properties fo:font-size="10pt" loext:padding-left="0in" loext:padding-right="0in" loext:padding-top="0.052in" loext:padding-bottom="0in" loext:border-left="none" loext:border-right="none" loext:border-top="0.06pt solid #000000" loext:border-bottom="none"/>
    </style:style>
    <style:style style:name="P17" style:family="paragraph" style:parent-style-name="Text_20_body">
      <style:paragraph-properties fo:margin-top="0.4165in" fo:margin-bottom="0.1965in" style:contextual-spacing="false"/>
    </style:style>
    <style:style style:name="P18" style:family="paragraph" style:parent-style-name="Text_20_body">
      <style:paragraph-properties fo:margin-top="0.052in" fo:margin-bottom="0.1965in" style:contextual-spacing="false"/>
    </style:style>
    <style:style style:name="P19" style:family="paragraph" style:parent-style-name="Text_20_body">
      <style:paragraph-properties fo:margin-top="0.3126in" fo:margin-bottom="0.1965in" style:contextual-spacing="false"/>
    </style:style>
    <style:style style:name="P20" style:family="paragraph" style:parent-style-name="Text_20_body">
      <style:paragraph-properties fo:margin-top="0.5209in" fo:margin-bottom="0.1965in" style:contextual-spacing="false" fo:text-align="center" style:justify-single-word="false"/>
      <style:text-properties fo:color="#333333" loext:opacity="100%" fo:font-size="10pt" loext:padding-left="0in" loext:padding-right="0in" loext:padding-top="0.1043in" loext:padding-bottom="0in" loext:border-left="none" loext:border-right="none" loext:border-top="0.06pt solid #cccccc" loext:border-bottom="none"/>
    </style:style>
    <style:style style:name="T1" style:family="text">
      <style:text-properties fo:font-size="12pt"/>
    </style:style>
    <style:style style:name="T2" style:family="text">
      <style:text-properties style:text-underline-style="solid" style:text-underline-width="auto" style:text-underline-color="font-color"/>
    </style:style>
    <style:style style:name="T3" style:family="text">
      <style:text-properties fo:font-size="11pt" fo:background-color="#fffff0" loext:char-shading-value="0" loext:padding-left="0.1563in" loext:padding-right="0.1563in" loext:padding-top="0.1043in" loext:padding-bottom="0.1043in" loext:border="0.06pt solid #cccc00"/>
    </style:style>
    <style:style style:name="T4" style:family="text">
      <style:text-properties fo:font-size="11pt" loext:padding-left="0in" loext:padding-right="0in" loext:padding-top="0.052in" loext:padding-bottom="0in" loext:border-left="none" loext:border-right="none" loext:border-top="0.06pt solid #000000" loext:border-bottom="none"/>
    </style:style>
    <style:style style:name="T5" style:family="text">
      <style:text-properties loext:padding-left="0in" loext:padding-right="0in" loext:padding-top="0.2083in" loext:padding-bottom="0in" loext:border-left="none" loext:border-right="none" loext:border-top="0.06pt solid #000000" loext:border-bottom="none"/>
    </style:style>
    <style:style style:name="T6" style:family="text">
      <style:text-properties fo:font-size="10pt" fo:font-style="italic"/>
    </style:style>
    <style:style style:name="T7" style:family="text"/>
    <text:list-style style:name="L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erson, Blackwell &amp; Hartley, P.C.</text:p>
      <text:p text:style-name="P9">ATTORNEYS AT LAW</text:p>
      <text:p text:style-name="P9">4500 Commerce Boulevard, Suite 300 | Metropolis, NY 10001</text:p>
      <text:p text:style-name="P9">Tel: (212) 555-0198 | Fax: (212) 555-0199 | Email: service@abhlaw.com</text:p>
      <text:p text:style-name="P10">SUMMONS AND NOTICE OF LAWSUIT </text:p>
      <text:p text:style-name="P3">IN THE CIVIL COURT OF THE STATE OF NEW YORK<text:line-break/>COUNTY OF METROPOLIS </text:p>
      <text:p text:style-name="P5"><text:span text:style-name="Strong_20_Emphasis"><text:span text:style-name="T1">Index No.:</text:span></text:span><text:span text:style-name="T1"> 2025-CV-004872 </text:span></text:p>
      <table:table table:name="Table1" table:style-name="Table1">
        <table:table-column table:style-name="Table1.A"/>
        <table:table-column table:style-name="Table1.B"/>
        <table:table-row>
          <table:table-cell table:style-name="Table1.A1" office:value-type="string">
            <text:p text:style-name="Table_20_Contents">PLAINTIFF:</text:p>
          </table:table-cell>
          <table:table-cell table:style-name="Table1.A1" office:value-type="string">
            <text:p text:style-name="Table_20_Contents"><text:span text:style-name="Strong_20_Emphasis">First National Credit Union</text:span></text:p>
          </table:table-cell>
        </table:table-row>
        <table:table-row>
          <table:table-cell table:style-name="Table1.A1" office:value-type="string">
            <text:p text:style-name="Table_20_Contents">vs.</text:p>
          </table:table-cell>
          <table:table-cell table:style-name="Table1.A1" office:value-type="string">
            <text:p text:style-name="P2"/>
          </table:table-cell>
        </table:table-row>
        <table:table-row>
          <table:table-cell table:style-name="Table1.A1" office:value-type="string">
            <text:p text:style-name="Table_20_Contents">DEFENDANT:</text:p>
          </table:table-cell>
          <table:table-cell table:style-name="Table1.A1" office:value-type="string">
            <text:p text:style-name="Table_20_Contents"><text:span text:style-name="Strong_20_Emphasis">Jane Smith</text:span></text:p>
          </table:table-cell>
        </table:table-row>
      </table:table>
      <text:p text:style-name="P4">TO THE DEFENDANT, JANE SMITH: </text:p>
      <text:p text:style-name="Text_20_Body.body-text">You are hereby <text:span text:style-name="Strong_20_Emphasis">SUMMONED</text:span> and required to appear and answer the complaint filed against you by the Plaintiff, <text:span text:style-name="Strong_20_Emphasis">First National Credit Union</text:span>, in the above-entitled action. The nature of this action is for <text:span text:style-name="Strong_20_Emphasis">debt collection</text:span> arising from an unpaid credit account balance. </text:p>
      <text:p text:style-name="Text_20_Body.body-text">The relief sought against you is a money judgment in the amount of <text:span text:style-name="Strong_20_Emphasis">$12,500.00</text:span>, together with accrued interest at the contractual rate of 8.5% per annum from the date of default, plus court costs and such other relief as the Court deems just and proper.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COURT DATE AND TIME</text:p>
          </table:table-cell>
          <table:table-cell table:style-name="Table2.A1" office:value-type="string">
            <text:p text:style-name="Table_20_Heading">COURT LOCATION</text:p>
          </table:table-cell>
          <table:table-cell table:style-name="Table2.A1" office:value-type="string">
            <text:p text:style-name="Table_20_Heading">PART NUMBER</text:p>
          </table:table-cell>
        </table:table-row>
        <table:table-row>
          <table:table-cell table:style-name="Table2.A1" office:value-type="string">
            <text:p text:style-name="Table_20_Contents"><text:span text:style-name="Strong_20_Emphasis">2025-06-15</text:span> at 9:30 AM</text:p>
          </table:table-cell>
          <table:table-cell table:style-name="Table2.A1" office:value-type="string">
            <text:p text:style-name="Table_20_Contents">500 Justice Avenue<text:line-break/>Metropolis, NY 10001<text:line-break/>Room 4B</text:p>
          </table:table-cell>
          <table:table-cell table:style-name="Table2.A1" office:value-type="string">
            <text:p text:style-name="Table_20_Contents">Part 42 – Civil Term</text:p>
          </table:table-cell>
        </table:table-row>
      </table:table>
      <text:p text:style-name="Text_20_Body.body-text"><text:span text:style-name="Strong_20_Emphasis">FAILURE TO APPEAR</text:span> on the date and time specified above may result in a <text:span text:style-name="T2">default judgment</text:span> being entered against you for the full amount demanded, plus interest and costs. You are advised to consult with an attorney immediately. </text:p>
      <text:p text:style-name="P11"><text:span text:style-name="Strong_20_Emphasis"><text:span text:style-name="T3">IMPORTANT NOTICE:</text:span></text:span><text:span text:style-name="T3"> If you do not respond to this summons within </text:span><text:span text:style-name="Strong_20_Emphasis"><text:span text:style-name="T3">20 days</text:span></text:span><text:span text:style-name="T3"> after service (excluding the date of service), a judgment may be entered against you by default. If you dispute the claim, you must serve a written answer upon the Plaintiff's attorney and file it with the Clerk of the Court. You may also be required to appear for a mandatory settlement conference. </text:span></text:p>
      <text:p text:style-name="P6"><text:span text:style-name="Strong_20_Emphasis">DESCRIPTION OF THE CLAIM:</text:span> </text:p>
      <text:p text:style-name="Text_20_Body.body-text">The Plaintiff, <text:span text:style-name="Strong_20_Emphasis">First National Credit Union</text:span>, alleges that the Defendant, <text:span text:style-name="Strong_20_Emphasis">Jane Smith</text:span>, entered into a credit agreement on or about March 15, 2022, under Account Number XXXX-XXXX-4821. The Defendant used the credit facility and made partial payments, but defaulted on the obligation as of November 1, 2024. Despite repeated demands for payment, the Defendant has failed and refused to pay the outstanding balance of <text:span text:style-name="Strong_20_Emphasis">$12,500.00</text:span>, plus accrued interest and late fees. </text:p>
      <text:p text:style-name="Text_20_Body.body-text">A copy of the complaint and supporting affidavits are attached hereto and made a part hereof. The Defendant is entitled to inspect the original documents at the office of the Plaintiff's attorney during regular business hours. </text:p>
      <text:p text:style-name="P7"><text:span text:style-name="Strong_20_Emphasis">ADDITIONAL INFORMATION FOR DEFENDANT:</text:span> </text:p>
      <text:list xml:id="list1343188659" text:style-name="L1">
        <text:list-item>
          <text:p text:style-name="P12">You have the right to <text:span text:style-name="Strong_20_Emphasis">represent yourself</text:span> in this matter, or to be represented by an attorney of your choice. </text:p>
        </text:list-item>
        <text:list-item>
          <text:p text:style-name="P12">If you cannot afford an attorney, you may contact the <text:span text:style-name="Strong_20_Emphasis">Legal Aid Society</text:span> at (212) 555-0200 for assistance. </text:p>
        </text:list-item>
        <text:list-item>
          <text:p text:style-name="P12">All documents filed with the Court must be served on the Plaintiff's attorney at the address listed below. </text:p>
        </text:list-item>
        <text:list-item>
          <text:p text:style-name="P12">If you admit the debt but need time to pay, you may contact the Plaintiff's attorney to discuss a <text:span text:style-name="Strong_20_Emphasis">payment plan</text:span> before the court date. </text:p>
        </text:list-item>
      </text:list>
      <text:p text:style-name="Text_20_Body.body-text"><text:soft-page-break/><text:span text:style-name="Strong_20_Emphasis">Dated:</text:span> May 28, 2025 </text:p>
      <text:p text:style-name="P17"><text:span text:style-name="Strong_20_Emphasis"><text:span text:style-name="T5">Respectfully submitted,</text:span></text:span></text:p>
      <text:p text:style-name="P18"><text:span text:style-name="Strong_20_Emphasis"><text:span text:style-name="T5">Anderson, Blackwell &amp; Hartley, P.C.</text:span></text:span></text:p>
      <text:p text:style-name="P13">Attorneys for Plaintiff</text:p>
      <text:p text:style-name="P13">4500 Commerce Boulevard, Suite 300</text:p>
      <text:p text:style-name="P13">Metropolis, NY 10001</text:p>
      <text:p text:style-name="P13">Tel: (212) 555-0198</text:p>
      <text:p text:style-name="P13">Email: service@abhlaw.com</text:p>
      <text:p text:style-name="P14">File No.: 2025-ABH-4872</text:p>
      <text:p text:style-name="P15">_____________________________</text:p>
      <text:p text:style-name="P19"><text:span text:style-name="Strong_20_Emphasis"><text:span text:style-name="T4">Rebecca A. Hartley, Esq.</text:span></text:span></text:p>
      <text:p text:style-name="P16">Attorney for Plaintiff</text:p>
      <text:p text:style-name="P16">NY Bar No. 2847301</text:p>
      <text:p text:style-name="P8"><text:span text:style-name="Strong_20_Emphasis"><text:span text:style-name="T6">CERTIFICATE OF SERVICE:</text:span></text:span><text:span text:style-name="T6"> I hereby certify that a true copy of the foregoing Summons and Notice of Lawsuit was served upon the Defendant, Jane Smith, by personal delivery on May 29, 2025, at 10:15 AM, at 742 Evergreen Terrace, Apartment 3B, Metropolis, NY 10001, and by first-class mail to the same address. </text:span></text:p>
      <text:p text:style-name="P20">This is an official court document. Your prompt attention is required.</text:p>
      <text:p text:style-name="P20">Anderson, Blackwell &amp; Hartley, P.C. | 4500 Commerce Boulevard, Suite 300 | Metropolis, NY 1000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body-text" style:display-name="Text Body.body-text" style:family="paragraph" style:parent-style-name="Text_20_body">
      <style:paragraph-properties fo:margin-top="0in" fo:margin-bottom="0.1563in" style: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47" meta:word-count="596" meta:character-count="3631" meta:non-whitespace-character-count="3067"/>
    <meta:generator>LibreOffice/7.3.7.2$Linux_X86_64 LibreOffice_project/30$Build-2</meta:generator>
  </office:meta>
</office:document-meta>
</file>