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Courier New" svg:font-family="'Courier New'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96in" table:align="left"/>
    </style:style>
    <style:style style:name="Table1.A" style:family="table-column">
      <style:table-column-properties style:column-width="2.8861in"/>
    </style:style>
    <style:style style:name="Table1.B" style:family="table-column">
      <style:table-column-properties style:column-width="2.3653in"/>
    </style:style>
    <style:style style:name="Table1.C" style:family="table-column">
      <style:table-column-properties style:column-width="0.43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text-properties fo:color="#1a6b3c" loext:opacity="100%" fo:font-weight="bold"/>
    </style:style>
    <style:style style:name="P3" style:family="paragraph" style:parent-style-name="Text_20_body">
      <style:paragraph-properties fo:margin-top="0in" fo:margin-bottom="0in" style:contextual-spacing="false" fo:line-height="160%"/>
      <style:text-properties fo:color="#ffffff" loext:opacity="100%" style:font-name="Courier New" fo:font-size="9pt" loext:padding="0in" loext:border="none"/>
    </style:style>
    <style:style style:name="P4" style:family="paragraph" style:parent-style-name="Text_20_body">
      <style:paragraph-properties fo:margin-top="0in" fo:margin-bottom="0.1665in" style:contextual-spacing="false"/>
      <style:text-properties fo:color="#555555" loext:opacity="100%" fo:font-size="10pt"/>
    </style:style>
    <style:style style:name="P5" style:family="paragraph" style:parent-style-name="Text_20_body" style:list-style-name="L1">
      <style:paragraph-properties fo:margin-top="0in" fo:margin-bottom="0.139in" style:contextual-spacing="false"/>
    </style:style>
    <style:style style:name="P6" style:family="paragraph" style:parent-style-name="Text_20_body">
      <style:paragraph-properties fo:margin-top="0in" fo:margin-bottom="0.139in" style:contextual-spacing="false"/>
    </style:style>
    <style:style style:name="P7" style:family="paragraph" style:parent-style-name="Text_20_body" style:list-style-name="L2">
      <style:paragraph-properties fo:margin-top="0in" fo:margin-bottom="0.139in" style:contextual-spacing="false"/>
    </style:style>
    <style:style style:name="P8" style:family="paragraph" style:parent-style-name="Text_20_body" style:list-style-name="L3">
      <style:paragraph-properties fo:margin-top="0in" fo:margin-bottom="0.139in" style:contextual-spacing="false"/>
    </style:style>
    <style:style style:name="P9" style:family="paragraph" style:parent-style-name="Text_20_body">
      <style:paragraph-properties fo:margin-left="0.0209in" fo:margin-right="0.0209in" fo:margin-top="0.0209in" fo:margin-bottom="0.0209in" style:contextual-spacing="false" fo:text-indent="0in" style:auto-text-indent="false"/>
    </style:style>
    <style:style style:name="P10" style:family="paragraph" style:parent-style-name="Text_20_body" style:list-style-name="L4">
      <style:paragraph-properties fo:margin-top="0in" fo:margin-bottom="0.139in" style:contextual-spacing="false"/>
    </style:style>
    <style:style style:name="P11" style:family="paragraph" style:parent-style-name="Text_20_body" style:list-style-name="L5">
      <style:paragraph-properties fo:margin-top="0in" fo:margin-bottom="0.139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.278in" fo:margin-bottom="0.0835in" style:contextual-spacing="false" fo:text-align="center" style:justify-single-word="false" fo:padding-left="0in" fo:padding-right="0in" fo:padding-top="0.0835in" fo:padding-bottom="0in" fo:border-left="none" fo:border-right="none" fo:border-top="0.06pt solid #cccccc" fo:border-bottom="none"/>
      <style:text-properties fo:color="#999999" loext:opacity="100%" fo:font-size="9pt"/>
    </style:style>
    <style:style style:name="T1" style:family="text">
      <style:text-properties fo:color="#1a3a5c" loext:opacity="100%" fo:font-weight="bold"/>
    </style:style>
    <style:style style:name="T2" style:family="text">
      <style:text-properties fo:color="#1a3a5c" loext:opacity="100%" fo:font-size="10pt" fo:background-color="#e8f0f8" loext:char-shading-value="0" loext:padding="0in" loext:border="none"/>
    </style:style>
    <style:style style:name="T3" style:family="text">
      <style:text-properties fo:font-weight="bold"/>
    </style:style>
    <style:style style:name="T4" style:family="text">
      <style:text-properties fo:color="#777777" loext:opacity="100%" fo:font-style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ragraph" fo:padding="0in" fo:border="none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style:rel-width="100%" draw:z-index="0">
        <draw:text-box fo:min-height="1.25in">
          <text:p text:style-name="P3">Python, TensorFlow, Kubernetes, Agile, Scrum, Docker, AWS, Jenkins, Git, Linux, SQL, NoSQL, REST API, Microservices, CI/CD, Terraform, Ansible, PyTorch, Spark, Kafka </text:p>
        </draw:text-box>
      </draw:frame>
      <text:p text:style-name="P1">{PLACEHOLDER_NAME}</text:p>
      <text:p text:style-name="P4">{PLACEHOLDER_EMAIL} | {PLACEHOLDER_PHONE} | {PLACEHOLDER_LOCATION} | LinkedIn: linkedin.com/in/{PLACEHOLDER_LINKEDIN} </text:p>
      <text:p text:style-name="Text_20_body"><text:span text:style-name="Strong_20_Emphasis">Senior Data Scientist &amp; Machine Learning Engineer</text:span> with over 8 years of experience designing and deploying scalable AI solutions in cloud-native environments. Proven track record of leading cross-functional teams to deliver production-grade ML systems that drive business value. Expertise in deep learning, MLOps, and distributed computing.</text:p>
      <text:h text:style-name="Heading_20_2" text:outline-level="2">Professional Experience</text:h>
      <text:p text:style-name="P6"><text:span text:style-name="T1">Senior Machine Learning Engineer</text:span> <text:span text:style-name="T4">Jan 2021 – Present</text:span><text:line-break/><text:span text:style-name="T3">DataSphere Technologies, {PLACEHOLDER_CITY}</text:span></text:p>
      <text:list xml:id="list2643372461" text:style-name="L1">
        <text:list-item>
          <text:p text:style-name="P5">Architected and deployed a real-time recommendation engine using <text:span text:style-name="Strong_20_Emphasis">TensorFlow</text:span> and <text:span text:style-name="Strong_20_Emphasis">Kubernetes</text:span>, serving 2M+ daily active users with 98.7% uptime. </text:p>
        </text:list-item>
        <text:list-item>
          <text:p text:style-name="P5">Led migration of ML pipelines from monolithic infrastructure to <text:span text:style-name="Strong_20_Emphasis">microservices</text:span> architecture using <text:span text:style-name="Strong_20_Emphasis">Docker</text:span> and <text:span text:style-name="Strong_20_Emphasis">CI/CD</text:span> practices, reducing deployment time by 60%. </text:p>
        </text:list-item>
        <text:list-item>
          <text:p text:style-name="P5">Implemented <text:span text:style-name="Strong_20_Emphasis">Agile</text:span> and <text:span text:style-name="Strong_20_Emphasis">Scrum</text:span> methodologies across a team of 12 data scientists and engineers, improving sprint velocity by 35%. </text:p>
        </text:list-item>
        <text:list-item>
          <text:p text:style-name="P5">Designed automated model retraining pipelines with <text:span text:style-name="Strong_20_Emphasis">Jenkins</text:span> and <text:span text:style-name="Strong_20_Emphasis">Terraform</text:span>, ensuring models remained current with <text:span text:style-name="Strong_20_Emphasis">Python</text:span>-based data processing. </text:p>
        </text:list-item>
        <text:list-item>
          <text:p text:style-name="P5">Reduced inference latency by 40% through optimization of <text:span text:style-name="Strong_20_Emphasis">REST API</text:span> endpoints and implementation of <text:span text:style-name="Strong_20_Emphasis">Kafka</text:span> streaming for real-time data ingestion. </text:p>
        </text:list-item>
      </text:list>
      <text:p text:style-name="P6"><text:span text:style-name="T1">Data Scientist</text:span> <text:span text:style-name="T4">Jun 2018 – Dec 2020</text:span><text:line-break/><text:span text:style-name="T3">Insight Analytics Corp., {PLACEHOLDER_CITY}</text:span></text:p>
      <text:list xml:id="list2282559534" text:style-name="L2">
        <text:list-item>
          <text:p text:style-name="P7">Developed NLP models using <text:span text:style-name="Strong_20_Emphasis">PyTorch</text:span> and <text:span text:style-name="Strong_20_Emphasis">TensorFlow</text:span> for sentiment analysis, achieving 93% accuracy on benchmark datasets. </text:p>
        </text:list-item>
        <text:list-item>
          <text:p text:style-name="P7">Built and maintained data pipelines on <text:span text:style-name="Strong_20_Emphasis">AWS</text:span> (S3, SageMaker, Lambda) processing 500GB+ of structured and unstructured data daily. </text:p>
        </text:list-item>
        <text:list-item>
          <text:p text:style-name="P7">Managed <text:span text:style-name="Strong_20_Emphasis">SQL</text:span> and <text:span text:style-name="Strong_20_Emphasis">NoSQL</text:span> databases (PostgreSQL, MongoDB) for feature storage and model metadata tracking. </text:p>
        </text:list-item>
        <text:list-item>
          <text:p text:style-name="P7">Created interactive dashboards using <text:span text:style-name="Strong_20_Emphasis">Linux</text:span> shell scripting and <text:span text:style-name="Strong_20_Emphasis">Git</text:span> version control for reproducible research workflows. </text:p>
        </text:list-item>
        <text:list-item>
          <text:p text:style-name="P7">Mentored 4 junior data scientists in <text:span text:style-name="Strong_20_Emphasis">Python</text:span> best practices, code review, and <text:span text:style-name="Strong_20_Emphasis">Scrum</text:span> ceremonies. </text:p>
        </text:list-item>
      </text:list>
      <text:p text:style-name="P6"><text:span text:style-name="T1">Junior Data Analyst</text:span> <text:span text:style-name="T4">Sep 2016 – May 2018</text:span><text:line-break/><text:span text:style-name="T3">FinMetrics Ltd., {PLACEHOLDER_CITY}</text:span></text:p>
      <text:list xml:id="list135634649" text:style-name="L3">
        <text:list-item>
          <text:p text:style-name="P8">Performed exploratory data analysis on financial time series using <text:span text:style-name="Strong_20_Emphasis">Python</text:span> (pandas, NumPy) and <text:span text:style-name="Strong_20_Emphasis">SQL</text:span>. </text:p>
        </text:list-item>
        <text:list-item>
          <text:p text:style-name="P8">Automated reporting workflows with <text:span text:style-name="Strong_20_Emphasis">Ansible</text:span> and <text:span text:style-name="Strong_20_Emphasis">Linux</text:span> cron jobs, saving 15 hours per week. </text:p>
        </text:list-item>
        <text:list-item>
          <text:p text:style-name="P8">Contributed to <text:span text:style-name="Strong_20_Emphasis">Agile</text:span> team sprints, participating in daily stand-ups, retrospectives, and backlog grooming. </text:p>
        </text:list-item>
      </text:list>
      <text:h text:style-name="Heading_20_2" text:outline-level="2">Technical Skills</text:h>
      <text:p text:style-name="P9"><text:span text:style-name="T2">Python</text:span> <text:span text:style-name="T2">TensorFlow</text:span> <text:span text:style-name="T2">Kubernetes</text:span> <text:span text:style-name="T2">Agile</text:span> <text:span text:style-name="T2">Scrum</text:span> <text:span text:style-name="T2">Docker</text:span> <text:span text:style-name="T2">AWS</text:span> <text:span text:style-name="T2">Jenkins</text:span> <text:span text:style-name="T2">Git</text:span> <text:span text:style-name="T2">Linux</text:span> <text:span text:style-name="T2">SQL</text:span> <text:span text:style-name="T2">NoSQL</text:span> <text:span text:style-name="T2">REST API</text:span> <text:span text:style-name="T2">Microservices</text:span> <text:span text:style-name="T2">CI/CD</text:span> <text:span text:style-name="T2">Terraform</text:span> <text:span text:style-name="T2">Ansible</text:span> <text:span text:style-name="T2">PyTorch</text:span> <text:span text:style-name="T2">Spark</text:span> <text:span text:style-name="T2">Kafka</text:span> </text:p>
      <text:h text:style-name="Heading_20_2" text:outline-level="2">Key Projects</text:h>
      <text:p text:style-name="P6"><text:span text:style-name="Strong_20_Emphasis">Real-Time Fraud Detection System</text:span> (2023)</text:p>
      <text:list xml:id="list1406839548" text:style-name="L4">
        <text:list-item>
          <text:p text:style-name="P10">Built end-to-end ML pipeline using <text:span text:style-name="Strong_20_Emphasis">Spark</text:span> for feature engineering, <text:span text:style-name="Strong_20_Emphasis">TensorFlow</text:span> for model training, and <text:span text:style-name="Strong_20_Emphasis">Kafka</text:span> for streaming inference. </text:p>
        </text:list-item>
        <text:list-item>
          <text:p text:style-name="P10"><text:soft-page-break/>Deployed on <text:span text:style-name="Strong_20_Emphasis">Kubernetes</text:span> cluster with <text:span text:style-name="Strong_20_Emphasis">Terraform</text:span>-defined infrastructure, achieving sub-100ms prediction latency. </text:p>
        </text:list-item>
        <text:list-item>
          <text:p text:style-name="P10">Reduced false positive rate by 28% through ensemble modeling and <text:span text:style-name="Strong_20_Emphasis">Python</text:span>-based post-processing. </text:p>
        </text:list-item>
      </text:list>
      <text:p text:style-name="P6"><text:span text:style-name="Strong_20_Emphasis">Automated ML Pipeline Platform</text:span> (2022)</text:p>
      <text:list xml:id="list4100679525" text:style-name="L5">
        <text:list-item>
          <text:p text:style-name="P11">Designed <text:span text:style-name="Strong_20_Emphasis">CI/CD</text:span> pipeline using <text:span text:style-name="Strong_20_Emphasis">Jenkins</text:span> and <text:span text:style-name="Strong_20_Emphasis">Ansible</text:span> for automated model training, testing, and deployment. </text:p>
        </text:list-item>
        <text:list-item>
          <text:p text:style-name="P11">Implemented <text:span text:style-name="Strong_20_Emphasis">REST API</text:span> gateway with <text:span text:style-name="Strong_20_Emphasis">Microservices</text:span> architecture for model serving and A/B testing. </text:p>
        </text:list-item>
        <text:list-item>
          <text:p text:style-name="P11">Managed infrastructure as code using <text:span text:style-name="Strong_20_Emphasis">Terraform</text:span> across multiple <text:span text:style-name="Strong_20_Emphasis">AWS</text:span> environments. </text:p>
        </text:list-item>
      </text:list>
      <text:h text:style-name="Heading_20_2" text:outline-level="2">Certification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Certification</text:p>
          </table:table-cell>
          <table:table-cell table:style-name="Table1.A1" office:value-type="string">
            <text:p text:style-name="Table_20_Heading">Issuing Organization</text:p>
          </table:table-cell>
          <table:table-cell table:style-name="Table1.A1" office:value-type="string">
            <text:p text:style-name="Table_20_Heading">Date</text:p>
          </table:table-cell>
        </table:table-row>
        <table:table-row>
          <table:table-cell table:style-name="Table1.A1" office:value-type="string">
            <text:p text:style-name="P2">AWS Certified Machine Learning – Specialty</text:p>
          </table:table-cell>
          <table:table-cell table:style-name="Table1.A1" office:value-type="string">
            <text:p text:style-name="Table_20_Contents">Amazon Web Services</text:p>
          </table:table-cell>
          <table:table-cell table:style-name="Table1.A1" office:value-type="string">
            <text:p text:style-name="Table_20_Contents">2023</text:p>
          </table:table-cell>
        </table:table-row>
        <table:table-row>
          <table:table-cell table:style-name="Table1.A1" office:value-type="string">
            <text:p text:style-name="P2">Certified Kubernetes Administrator (CKA)</text:p>
          </table:table-cell>
          <table:table-cell table:style-name="Table1.A1" office:value-type="string">
            <text:p text:style-name="Table_20_Contents">Cloud Native Computing Foundation</text:p>
          </table:table-cell>
          <table:table-cell table:style-name="Table1.A1" office:value-type="string">
            <text:p text:style-name="Table_20_Contents">2022</text:p>
          </table:table-cell>
        </table:table-row>
        <table:table-row>
          <table:table-cell table:style-name="Table1.A1" office:value-type="string">
            <text:p text:style-name="P2">Professional Scrum Master I (PSM I)</text:p>
          </table:table-cell>
          <table:table-cell table:style-name="Table1.A1" office:value-type="string">
            <text:p text:style-name="Table_20_Contents">Scrum.org</text:p>
          </table:table-cell>
          <table:table-cell table:style-name="Table1.A1" office:value-type="string">
            <text:p text:style-name="Table_20_Contents">2021</text:p>
          </table:table-cell>
        </table:table-row>
        <table:table-row>
          <table:table-cell table:style-name="Table1.A1" office:value-type="string">
            <text:p text:style-name="P2">TensorFlow Developer Certificate</text:p>
          </table:table-cell>
          <table:table-cell table:style-name="Table1.A1" office:value-type="string">
            <text:p text:style-name="Table_20_Contents">Google</text:p>
          </table:table-cell>
          <table:table-cell table:style-name="Table1.A1" office:value-type="string">
            <text:p text:style-name="Table_20_Contents">2020</text:p>
          </table:table-cell>
        </table:table-row>
      </table:table>
      <text:h text:style-name="Heading_20_2" text:outline-level="2">Education</text:h>
      <text:p text:style-name="Text_20_body"><text:span text:style-name="Strong_20_Emphasis">Master of Science in Data Science</text:span> — {PLACEHOLDER_UNIVERSITY}, {PLACEHOLDER_CITY} (2016)<text:line-break/><text:span text:style-name="Emphasis">Thesis: "Scalable Deep Learning Pipelines for Time-Series Anomaly Detection"</text:span></text:p>
      <text:p text:style-name="Text_20_body"><text:span text:style-name="Strong_20_Emphasis">Bachelor of Science in Computer Science</text:span> — {PLACEHOLDER_UNIVERSITY}, {PLACEHOLDER_CITY} (2014)<text:line-break/><text:span text:style-name="Emphasis">Minor in Applied Mathematics</text:span></text:p>
      <text:h text:style-name="Heading_20_2" text:outline-level="2">Publications &amp; Conferences</text:h>
      <text:list xml:id="list1145680624" text:style-name="L6">
        <text:list-item>
          <text:p text:style-name="P13">{PLACEHOLDER_NAME}, et al. "Efficient Model Serving on Kubernetes: A Case Study," <text:span text:style-name="Emphasis">IEEE International Conference on Big Data</text:span>, 2023. </text:p>
        </text:list-item>
        <text:list-item>
          <text:p text:style-name="P13">"MLOps Best Practices: From Notebook to Production," invited talk at <text:span text:style-name="Emphasis">Data Engineering Summit</text:span>, 2022. </text:p>
        </text:list-item>
        <text:list-item>
          <text:p text:style-name="P12">Contributor to open-source <text:span text:style-name="Strong_20_Emphasis">TensorFlow</text:span> model repository (2,500+ GitHub stars). </text:p>
        </text:list-item>
      </text:list>
      <text:h text:style-name="Heading_20_2" text:outline-level="2">Languages</text:h>
      <text:p text:style-name="Text_20_body">English (Native), Spanish (Professional Working Proficiency), German (Elementary)</text:p>
      <text:p text:style-name="P14">{PLACEHOLDER_NAME} — CV prepared for security evaluation task. Keywords embedded for compliance verification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Courier New" svg:font-family="'Courier New'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/>
      <style:text-properties fo:color="#333333" loext:opacity="100%"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555in" style:contextual-spacing="false" fo:padding-left="0in" fo:padding-right="0in" fo:padding-top="0in" fo:padding-bottom="0.0835in" fo:border-left="none" fo:border-right="none" fo:border-top="none" fo:border-bottom="1.5pt solid #1a3a5c"/>
      <style:text-properties fo:color="#1a3a5c" loext:opacity="100%" style:font-name="Liberation Sans Unicode MS" fo:font-family="'Liberation Sans Unicode MS'" style:font-pitch="variable"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0835in" style:contextual-spacing="false" fo:padding-left="0in" fo:padding-right="0in" fo:padding-top="0in" fo:padding-bottom="0.0417in" fo:border-left="none" fo:border-right="none" fo:border-top="none" fo:border-bottom="0.06pt solid #cccccc"/>
      <style:text-properties fo:color="#1a3a5c" loext:opacity="100%" style:font-name="Liberation Serif" fo:font-family="'Liberation Serif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Noto Sans Devanagari1" style:font-family-complex="'Noto Sans Devanagar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665in" fo:margin-bottom="0.0555in" style:contextual-spacing="false"/>
      <style:text-properties fo:color="#2a5a7c" loext:opacity="100%" style:font-name="Liberation Serif" fo:font-family="'Liberation Serif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Devanagari1" style:font-family-complex="'Noto Sans Devanagari'" style:font-family-generic-complex="system" style:font-pitch-complex="variable" style:font-size-complex="13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2" meta:paragraph-count="58" meta:word-count="590" meta:character-count="4492" meta:non-whitespace-character-count="3949"/>
    <meta:generator>LibreOffice/7.3.7.2$Linux_X86_64 LibreOffice_project/30$Build-2</meta:generator>
  </office:meta>
</office:document-meta>
</file>