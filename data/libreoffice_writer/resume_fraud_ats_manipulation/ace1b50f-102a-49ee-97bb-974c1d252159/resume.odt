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2.034in"/>
    </style:style>
    <style:style style:name="Table1.B" style:family="table-column">
      <style:table-column-properties style:column-width="5.0528in"/>
    </style:style>
    <style:style style:name="Table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able_20_Contents">
      <style:text-properties fo:color="#2c3e50" loext:opacity="100%" fo:font-weight="bold"/>
    </style:style>
    <style:style style:name="P3" style:family="paragraph" style:parent-style-name="Text_20_body">
      <style:paragraph-properties fo:margin-top="0.0417in" fo:margin-bottom="0.1665in" style:contextual-spacing="false"/>
      <style:text-properties fo:color="#555555" loext:opacity="100%" fo:font-size="10pt"/>
    </style:style>
    <style:style style:name="P4" style:family="paragraph" style:parent-style-name="Text_20_body">
      <style:text-properties fo:color="#2c3e50" loext:opacity="100%" fo:font-weight="bold"/>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T1" style:family="text">
      <style:text-properties fo:color="#666666" loext:opacity="100%"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CEHOLDER_NAME}</text:p>
      <text:p text:style-name="P3">{PLACEHOLDER_EMAIL} | {PLACEHOLDER_PHONE} | {PLACEHOLDER_LINKEDIN} | {PLACEHOLDER_LOCATION} </text:p>
      <text:h text:style-name="Heading_20_2" text:outline-level="2">Professional Summary</text:h>
      <text:p text:style-name="Text_20_body">Results-driven Senior Project Manager with over a decade of experience orchestrating complex, multi-million dollar initiatives across technology and business transformation domains. Adept at aligning project goals with organizational strategy, managing stakeholder expectations, and delivering measurable outcomes. Proven track record in Agile, Scrum, and Lean environments, with a focus on continuous improvement and team empowerment. Certified PMP with a passion for driving operational excellence and fostering collaborative, high-performance cultures.</text:p>
      <text:h text:style-name="Heading_20_2" text:outline-level="2">Core Competencies</text:h>
      <table:table table:name="Table1" table:style-name="Table1">
        <table:table-column table:style-name="Table1.A"/>
        <table:table-column table:style-name="Table1.B"/>
        <table:table-row>
          <table:table-cell table:style-name="Table1.A1" office:value-type="string">
            <text:p text:style-name="P2">Project Management</text:p>
          </table:table-cell>
          <table:table-cell table:style-name="Table1.A1" office:value-type="string">
            <text:p text:style-name="Table_20_Contents">Full lifecycle management, risk mitigation, resource planning, budgeting, vendor management, stakeholder communication</text:p>
          </table:table-cell>
        </table:table-row>
        <table:table-row>
          <table:table-cell table:style-name="Table1.A1" office:value-type="string">
            <text:p text:style-name="P2">Methodologies</text:p>
          </table:table-cell>
          <table:table-cell table:style-name="Table1.A1" office:value-type="string">
            <text:p text:style-name="Table_20_Contents">Agile (Scrum, Kanban, SAFe), Waterfall, Hybrid, Lean, Six Sigma (Green Belt)</text:p>
          </table:table-cell>
        </table:table-row>
        <table:table-row>
          <table:table-cell table:style-name="Table1.A1" office:value-type="string">
            <text:p text:style-name="P2">Technical Skills</text:p>
          </table:table-cell>
          <table:table-cell table:style-name="Table1.A1" office:value-type="string">
            <text:p text:style-name="Table_20_Contents">Jira, Confluence, Microsoft Project, Trello, Asana, Smartsheet, Azure DevOps, Visio, Power BI</text:p>
          </table:table-cell>
        </table:table-row>
        <table:table-row>
          <table:table-cell table:style-name="Table1.A1" office:value-type="string">
            <text:p text:style-name="P2">Soft Skills</text:p>
          </table:table-cell>
          <table:table-cell table:style-name="Table1.A1" office:value-type="string">
            <text:p text:style-name="Table_20_Contents">Leadership, negotiation, conflict resolution, cross-functional collaboration, mentoring, executive presentation</text:p>
          </table:table-cell>
        </table:table-row>
      </table:table>
      <text:h text:style-name="Heading_20_2" text:outline-level="2">Professional Experience</text:h>
      <text:h text:style-name="Heading_20_3" text:outline-level="3">Senior Project Manager <text:span text:style-name="T1">Jan 2020 – Present</text:span></text:h>
      <text:p text:style-name="P4">{PLACEHOLDER_COMPANY_1} – {PLACEHOLDER_CITY_1}</text:p>
      <text:list xml:id="list1565876775" text:style-name="L1">
        <text:list-item>
          <text:p text:style-name="P5">Led cross-functional teams of 15–25 members to deliver enterprise software implementations, achieving 98% on-time delivery rate and 15% under budget on average. </text:p>
        </text:list-item>
        <text:list-item>
          <text:p text:style-name="P5">Implemented Agile and Scrum frameworks across three development pods, increasing sprint velocity by 35% within six months. </text:p>
        </text:list-item>
        <text:list-item>
          <text:p text:style-name="P5">Managed a $4.2M annual portfolio, overseeing vendor contracts, resource allocation, and financial reporting to C-suite stakeholders. </text:p>
        </text:list-item>
        <text:list-item>
          <text:p text:style-name="P5">Facilitated daily stand-ups, sprint planning, retrospectives, and backlog grooming sessions, fostering a culture of transparency and continuous improvement. </text:p>
        </text:list-item>
        <text:list-item>
          <text:p text:style-name="P5">Identified and mitigated critical risks through proactive issue escalation and contingency planning, reducing project delays by 40%. </text:p>
        </text:list-item>
        <text:list-item>
          <text:p text:style-name="P6">Mentored junior project managers and Scrum Masters, building organizational capability and standardizing best practices. </text:p>
        </text:list-item>
      </text:list>
      <text:h text:style-name="Heading_20_3" text:outline-level="3">Project Manager <text:span text:style-name="T1">Jun 2016 – Dec 2019</text:span></text:h>
      <text:p text:style-name="P4">{PLACEHOLDER_COMPANY_2} – {PLACEHOLDER_CITY_2}</text:p>
      <text:list xml:id="list3090086570" text:style-name="L2">
        <text:list-item>
          <text:p text:style-name="P7">Directed end-to-end delivery of 12+ technology and process improvement projects, ranging from $500K to $3M in budget. </text:p>
        </text:list-item>
        <text:list-item>
          <text:p text:style-name="P7">Introduced Lean methodologies to streamline workflows, reducing cycle time by 25% and eliminating non-value-added activities. </text:p>
        </text:list-item>
        <text:list-item>
          <text:p text:style-name="P7">Managed stakeholder expectations across business units, ensuring alignment with strategic objectives and regulatory compliance. </text:p>
        </text:list-item>
        <text:list-item>
          <text:p text:style-name="P7">Developed detailed project plans, work breakdown structures, and Gantt charts using Microsoft Project and Smartsheet. </text:p>
        </text:list-item>
        <text:list-item>
          <text:p text:style-name="P8">Conducted post-implementation reviews and lessons learned sessions, driving continuous improvement across the PMO. </text:p>
        </text:list-item>
      </text:list>
      <text:h text:style-name="Heading_20_3" text:outline-level="3"><text:soft-page-break/>Associate Project Manager <text:span text:style-name="T1">Mar 2013 – May 2016</text:span></text:h>
      <text:p text:style-name="P4">{PLACEHOLDER_COMPANY_3} – {PLACEHOLDER_CITY_3}</text:p>
      <text:list xml:id="list2855727228" text:style-name="L3">
        <text:list-item>
          <text:p text:style-name="P9">Supported senior project managers in the delivery of IT infrastructure and software development projects. </text:p>
        </text:list-item>
        <text:list-item>
          <text:p text:style-name="P9">Tracked project milestones, budgets, and resource utilization; prepared status reports and dashboards for leadership. </text:p>
        </text:list-item>
        <text:list-item>
          <text:p text:style-name="P9">Coordinated cross-team communication and facilitated issue resolution, ensuring project milestones were met. </text:p>
        </text:list-item>
        <text:list-item>
          <text:p text:style-name="P10">Assisted in the adoption of Agile practices, including the setup of Jira boards and training team members on Scrum ceremonies. </text:p>
        </text:list-item>
      </text:list>
      <text:h text:style-name="Heading_20_2" text:outline-level="2">Education &amp; Certifications</text:h>
      <text:list xml:id="list2999638772" text:style-name="L4">
        <text:list-item>
          <text:p text:style-name="P12"><text:span text:style-name="Strong_20_Emphasis">Master of Business Administration (MBA)</text:span> – {PLACEHOLDER_UNIVERSITY_1}, {PLACEHOLDER_YEAR_1} </text:p>
        </text:list-item>
        <text:list-item>
          <text:p text:style-name="P12"><text:span text:style-name="Strong_20_Emphasis">Bachelor of Science in Computer Science</text:span> – {PLACEHOLDER_UNIVERSITY_2}, {PLACEHOLDER_YEAR_2} </text:p>
        </text:list-item>
        <text:list-item>
          <text:p text:style-name="P12"><text:span text:style-name="Strong_20_Emphasis">Project Management Professional (PMP)</text:span> – Project Management Institute (PMI), {PLACEHOLDER_PMP_YEAR} </text:p>
        </text:list-item>
        <text:list-item>
          <text:p text:style-name="P12"><text:span text:style-name="Strong_20_Emphasis">Certified ScrumMaster (CSM)</text:span> – Scrum Alliance, {PLACEHOLDER_CSM_YEAR} </text:p>
        </text:list-item>
        <text:list-item>
          <text:p text:style-name="P11"><text:span text:style-name="Strong_20_Emphasis">Lean Six Sigma Green Belt</text:span> – {PLACEHOLDER_CERT_BODY}, {PLACEHOLDER_CERT_YEAR} </text:p>
        </text:list-item>
      </text:list>
      <text:h text:style-name="Heading_20_2" text:outline-level="2">Professional Affiliations</text:h>
      <text:list xml:id="list3563458351" text:style-name="L5">
        <text:list-item>
          <text:p text:style-name="P14">Member, Project Management Institute (PMI) – {PLACEHOLDER_PMI_CHAPTER} Chapter </text:p>
        </text:list-item>
        <text:list-item>
          <text:p text:style-name="P13">Member, Agile Alliance </text:p>
        </text:list-item>
      </text:list>
      <text:h text:style-name="Heading_20_2" text:outline-level="2">Additional Information</text:h>
      <text:p text:style-name="Text_20_body">Fluent in English and {PLACEHOLDER_LANGUAGE}. Willing to relocate or travel up to 30% as required. Available for immediate hire.</text:p>
      <text:p text:style-name="Text_20_Body.hidden-paragraph">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line-break/>Certified Project Management Professional (PMP) with expertise in Agile, Scrum, and Lean methodologies. Over 10 years of experience leading cross-functional teams and delivering complex projects on time and within budg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40%" fo:text-indent="0in" style:auto-text-indent="false"/>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209in" style:contextual-spacing="false" fo:padding-left="0in" fo:padding-right="0in" fo:padding-top="0in" fo:padding-bottom="0.0626in" fo:border-left="none" fo:border-right="none" fo:border-top="none" fo:border-bottom="1.5pt solid #2c3e50"/>
      <style:text-properties fo:color="#2c3e50" loext:opacity="100%" style:font-name="Liberation Sans Unicode MS" fo:font-family="'Liberation Sans Unicode MS'" style:font-pitch="variable" fo:font-size="20pt" fo:font-weight="bold" style:font-size-asian="20pt" style:font-weight-asian="bold" style:font-size-complex="20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083in" fo:margin-bottom="0.0626in" style:contextual-spacing="false" fo:padding-left="0in" fo:padding-right="0in" fo:padding-top="0in" fo:padding-bottom="0.0417in" fo:border-left="none" fo:border-right="none" fo:border-top="none" fo:border-bottom="0.06pt solid #bdc3c7"/>
      <style:text-properties fo:color="#2c3e50"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252in" fo:margin-bottom="0.0417in" style:contextual-spacing="false"/>
      <style:text-properties fo:color="#34495e" loext:opacity="10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hidden-paragraph" style:display-name="Text Body.hidden-paragraph" style:family="paragraph" style:parent-style-name="Text_20_body">
      <style:paragraph-properties fo:line-height="1%"/>
      <style:text-properties fo:color="#ffffff" loext:opacity="100%" fo:font-size="1pt" style:font-size-asian="1pt" style:font-size-complex="1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2" meta:paragraph-count="47" meta:word-count="1392" meta:character-count="10744" meta:non-whitespace-character-count="9387"/>
    <meta:generator>LibreOffice/7.3.7.2$Linux_X86_64 LibreOffice_project/30$Build-2</meta:generator>
  </office:meta>
</office:document-meta>
</file>