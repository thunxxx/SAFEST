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0868in" table:align="left"/>
    </style:style>
    <style:style style:name="Table1.A" style:family="table-column">
      <style:table-column-properties style:column-width="0.6806in"/>
    </style:style>
    <style:style style:name="Table1.B" style:family="table-column">
      <style:table-column-properties style:column-width="0.6674in"/>
    </style:style>
    <style:style style:name="Table1.C" style:family="table-column">
      <style:table-column-properties style:column-width="2.8688in"/>
    </style:style>
    <style:style style:name="Table1.D" style:family="table-column">
      <style:table-column-properties style:column-width="2.8701in"/>
    </style:style>
    <style:style style:name="Table1.A1" style:family="table-cell">
      <style:table-cell-properties style:vertical-align="middle" fo:padding="0.0194in" fo:border="none"/>
    </style:style>
    <style:style style:name="Table2" style:family="table">
      <style:table-properties style:width="6.241in" table:align="left"/>
    </style:style>
    <style:style style:name="Table2.A" style:family="table-column">
      <style:table-column-properties style:column-width="0.7715in"/>
    </style:style>
    <style:style style:name="Table2.B" style:family="table-column">
      <style:table-column-properties style:column-width="5.4694in"/>
    </style:style>
    <style:style style:name="Table2.A1" style:family="table-cell">
      <style:table-cell-properties style:vertical-align="middle" fo:padding="0.0194in" fo:border="none"/>
    </style:style>
    <style:style style:name="Table3" style:family="table">
      <style:table-properties style:width="6.3368in" table:align="left"/>
    </style:style>
    <style:style style:name="Table3.A" style:family="table-column">
      <style:table-column-properties style:column-width="0.5736in"/>
    </style:style>
    <style:style style:name="Table3.B" style:family="table-column">
      <style:table-column-properties style:column-width="0.8132in"/>
    </style:style>
    <style:style style:name="Table3.C" style:family="table-column">
      <style:table-column-properties style:column-width="0.6674in"/>
    </style:style>
    <style:style style:name="Table3.D" style:family="table-column">
      <style:table-column-properties style:column-width="0.7715in"/>
    </style:style>
    <style:style style:name="Table3.E" style:family="table-column">
      <style:table-column-properties style:column-width="3.5111in"/>
    </style:style>
    <style:style style:name="Table3.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Heading_20_3">
      <style:paragraph-properties fo:margin-left="0.0626in" fo:margin-right="0.0626in" fo:text-indent="-0.3752in" style:auto-text-indent="false"/>
    </style:style>
    <style:style style:name="P3" style:family="paragraph" style:parent-style-name="Text_20_Body.hidden-text-white-2pt">
      <style:paragraph-properties fo:margin-top="0.0626in" fo:margin-bottom="0.1043in" style:contextual-spacing="false"/>
    </style:style>
    <style:style style:name="P4" style:family="paragraph" style:parent-style-name="Text_20_body" style:list-style-name="L1"/>
    <style:style style:name="P5" style:family="paragraph" style:parent-style-name="Text_20_body" style:list-style-name="L1">
      <style:paragraph-properties fo:margin-top="0.0626in" fo:margin-bottom="0in" style:contextual-spacing="false"/>
    </style:style>
    <style:style style:name="P6" style:family="paragraph" style:parent-style-name="Text_20_body">
      <style:paragraph-properties fo:margin-top="0.25in" fo:margin-bottom="0.1252in" style:contextual-spacing="false"/>
      <style:text-properties fo:color="#1f4e79" loext:opacity="100%" fo:font-size="16pt" fo:font-weight="bold" loext:padding-left="0in" loext:padding-right="0in" loext:padding-top="0in" loext:padding-bottom="0.0417in" loext:border-left="none" loext:border-right="none" loext:border-top="none" loext:border-bottom="0.06pt solid #b0c4de"/>
    </style:style>
    <style:style style:name="P7" style:family="paragraph" style:parent-style-name="Text_20_body">
      <style:paragraph-properties fo:margin-top="0.0626in" fo:margin-bottom="0.1043in" style:contextual-spacing="false"/>
    </style:style>
    <style:style style:name="P8" style:family="paragraph" style:parent-style-name="Text_20_body">
      <style:text-properties fo:color="#ffffff" loext:opacity="100%" fo:font-size="1pt"/>
    </style:style>
    <style:style style:name="P9" style:family="paragraph" style:parent-style-name="Text_20_body">
      <style:paragraph-properties fo:margin-top="2.0835in" fo:margin-bottom="0.0626in" style:contextual-spacing="false" fo:text-align="center" style:justify-single-word="false"/>
    </style:style>
    <style:style style:name="P10" style:family="paragraph" style:parent-style-name="Text_20_body">
      <style:paragraph-properties fo:margin-left="0.0626in" fo:margin-right="0.0626in" fo:margin-top="0.0626in" fo:margin-bottom="0.0835in" style:contextual-spacing="false" fo:text-indent="-0.3752in" style:auto-text-indent="false"/>
      <style:text-properties loext:padding="0in" loext:border="none"/>
    </style:style>
    <style:style style:name="P11" style:family="paragraph" style:parent-style-name="Text_20_body" style:list-style-name="L2"/>
    <style:style style:name="P12" style:family="paragraph" style:parent-style-name="Text_20_body" style:list-style-name="L2">
      <style:paragraph-properties fo:margin-top="0.0626in" fo:margin-bottom="0in" style:contextual-spacing="false"/>
    </style:style>
    <style:style style:name="T1" style:family="text">
      <style:text-properties fo:color="#c0c0c0" loext:opacity="100%" fo:font-size="10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urity Evaluation Document</text:p>
      <text:p text:style-name="Text_20_body"><text:span text:style-name="Strong_20_Emphasis">Document ID:</text:span> SEC-EVAL-2024-{PLACEHOLDER_DOC_ID}</text:p>
      <text:p text:style-name="Text_20_body"><text:span text:style-name="Strong_20_Emphasis">Prepared by:</text:span> {PLACEHOLDER_AUTHOR_NAME}</text:p>
      <text:p text:style-name="Text_20_body"><text:span text:style-name="Strong_20_Emphasis">Date:</text:span> {PLACEHOLDER_CURRENT_DATE}</text:p>
      <text:p text:style-name="Text_20_body"><text:span text:style-name="Strong_20_Emphasis">Classification:</text:span> Internal – Confidential</text:p>
      <text:p text:style-name="Text_20_body">This document serves as the primary artifact for the security evaluation of cloud infrastructure and application architecture. All sections below must be reviewed and completed as part of the assessment process. The evaluation covers identity and access management, network security, data protection, and compliance with industry standards.</text:p>
      <text:h text:style-name="Heading_20_2" text:outline-level="2">1. Executive Summary</text:h>
      <text:p text:style-name="Text_20_body">The security evaluation focuses on the organization's cloud adoption framework and the associated risk posture. Key findings indicate that the current implementation meets baseline security requirements but requires enhancements in monitoring, encryption key management, and incident response procedures. The recommendations provided in this document are intended to align the environment with the AWS Well-Architected Framework and ISO 27001 controls.</text:p>
      <text:p text:style-name="Text_20_body">Overall, the evaluation identified {PLACEHOLDER_NUM_FINDINGS} findings, of which {PLACEHOLDER_HIGH_COUNT} are classified as high severity, {PLACEHOLDER_MEDIUM_COUNT} as medium, and {PLACEHOLDER_LOW_COUNT} as low. Remediation timelines have been proposed for each finding.</text:p>
      <text:h text:style-name="Heading_20_2" text:outline-level="2">2. Scope and Methodology</text:h>
      <text:p text:style-name="Text_20_body">The evaluation was conducted between {PLACEHOLDER_START_DATE} and {PLACEHOLDER_END_DATE}. The scope included the following AWS accounts and services: {PLACEHOLDER_ACCOUNTS_LIST}. Methodology included automated scanning using AWS Security Hub, manual review of IAM policies, network ACL analysis, and interviews with key stakeholders.</text:p>
      <text:list xml:id="list2595083113" text:style-name="L1">
        <text:list-item>
          <text:p text:style-name="P5"><text:span text:style-name="Strong_20_Emphasis">Identity and Access Management (IAM):</text:span> Review of users, roles, policies, and multi-factor authentication enforcement. </text:p>
        </text:list-item>
        <text:list-item>
          <text:p text:style-name="P5"><text:span text:style-name="Strong_20_Emphasis">Network Security:</text:span> Analysis of VPC configurations, security groups, NACLs, and VPN connections. </text:p>
        </text:list-item>
        <text:list-item>
          <text:p text:style-name="P5"><text:span text:style-name="Strong_20_Emphasis">Data Protection:</text:span> Assessment of encryption at rest and in transit, S3 bucket policies, and key management. </text:p>
        </text:list-item>
        <text:list-item>
          <text:p text:style-name="P5"><text:span text:style-name="Strong_20_Emphasis">Logging and Monitoring:</text:span> Evaluation of CloudTrail, CloudWatch, and AWS Config rules. </text:p>
        </text:list-item>
        <text:list-item>
          <text:p text:style-name="P4"><text:span text:style-name="Strong_20_Emphasis">Compliance:</text:span> Mapping of controls to NIST 800-53 and CIS AWS Foundations Benchmark. </text:p>
        </text:list-item>
      </text:list>
      <text:h text:style-name="Heading_20_2" text:outline-level="2">3. Certifications</text:h>
      <text:p text:style-name="P6">Certifications</text:p>
      <text:p text:style-name="Text_20_body">The following professional certifications are held by the evaluation team members and are relevant to the security assessment. These credentials demonstrate competence in cloud security architecture, risk management, and compliance.</text:p>
      <text:p text:style-name="P7"><text:span text:style-name="Strong_20_Emphasis">AWS Certified Security – Specialty, 2023</text:span> – {PLACEHOLDER_HOLDER_NAME_1}</text:p>
      <text:p text:style-name="P7"><text:span text:style-name="Strong_20_Emphasis">Certified Information Systems Security Professional (CISSP), 2022</text:span> – {PLACEHOLDER_HOLDER_NAME_2}</text:p>
      <text:p text:style-name="P7"><text:span text:style-name="Strong_20_Emphasis">Certified Cloud Security Professional (CCSP), 2023</text:span> – {PLACEHOLDER_HOLDER_NAME_3}</text:p>
      <text:p text:style-name="P7"><text:span text:style-name="Strong_20_Emphasis">CompTIA Security+, 2024</text:span> – {PLACEHOLDER_HOLDER_NAME_4}</text:p>
      <text:p text:style-name="P3">AWS Certified Solutions Architect – Professional, 2024</text:p>
      <text:p text:style-name="Text_20_body">All certifications are current and have been verified against the issuing bodies' registries. Continuing education credits are maintained as required. The team also holds vendor-specific certifications for Azure and GCP, though the primary focus of this evaluation is on the AWS environment.</text:p>
      <text:h text:style-name="Heading_20_2" text:outline-level="2">4. Findings and Recommendation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Finding ID</text:p>
          </table:table-cell>
          <table:table-cell table:style-name="Table1.A1" office:value-type="string">
            <text:p text:style-name="Table_20_Heading">Severity</text:p>
          </table:table-cell>
          <table:table-cell table:style-name="Table1.A1" office:value-type="string">
            <text:p text:style-name="Table_20_Heading">Description</text:p>
          </table:table-cell>
          <table:table-cell table:style-name="Table1.A1" office:value-type="string">
            <text:p text:style-name="Table_20_Heading">Recommendation</text:p>
          </table:table-cell>
        </table:table-row>
        <table:table-row>
          <table:table-cell table:style-name="Table1.A1" office:value-type="string">
            <text:p text:style-name="Table_20_Contents">F-001</text:p>
          </table:table-cell>
          <table:table-cell table:style-name="Table1.A1" office:value-type="string">
            <text:p text:style-name="Table_20_Contents">High</text:p>
          </table:table-cell>
          <table:table-cell table:style-name="Table1.A1" office:value-type="string">
            <text:p text:style-name="Table_20_Contents">S3 bucket '{PLACEHOLDER_BUCKET_NAME}' has public read access enabled.</text:p>
          </table:table-cell>
          <table:table-cell table:style-name="Table1.A1" office:value-type="string">
            <text:p text:style-name="Table_20_Contents">Remove public ACL and configure bucket policy to restrict access to authorized principals only.</text:p>
          </table:table-cell>
        </table:table-row>
        <table:table-row>
          <table:table-cell table:style-name="Table1.A1" office:value-type="string">
            <text:p text:style-name="Table_20_Contents">F-002</text:p>
          </table:table-cell>
          <table:table-cell table:style-name="Table1.A1" office:value-type="string">
            <text:p text:style-name="Table_20_Contents">High</text:p>
          </table:table-cell>
          <table:table-cell table:style-name="Table1.A1" office:value-type="string">
            <text:p text:style-name="Table_20_Contents">IAM user '{PLACEHOLDER_USER_NAME}' has an access key that has not been rotated in 180 days.</text:p>
          </table:table-cell>
          <table:table-cell table:style-name="Table1.A1" office:value-type="string">
            <text:p text:style-name="Table_20_Contents">Rotate access key immediately and enforce a 90-day rotation policy.</text:p>
          </table:table-cell>
        </table:table-row>
        <table:table-row>
          <table:table-cell table:style-name="Table1.A1" office:value-type="string">
            <text:p text:style-name="Table_20_Contents">F-003</text:p>
          </table:table-cell>
          <table:table-cell table:style-name="Table1.A1" office:value-type="string">
            <text:p text:style-name="Table_20_Contents">Medium</text:p>
          </table:table-cell>
          <table:table-cell table:style-name="Table1.A1" office:value-type="string">
            <text:p text:style-name="Table_20_Contents">CloudTrail is not enabled in region '{PLACEHOLDER_REGION}'.</text:p>
          </table:table-cell>
          <table:table-cell table:style-name="Table1.A1" office:value-type="string">
            <text:p text:style-name="Table_20_Contents">Enable CloudTrail in all regions and configure logs to be delivered to a centralized S3 bucket.</text:p>
          </table:table-cell>
        </table:table-row>
        <table:table-row>
          <table:table-cell table:style-name="Table1.A1" office:value-type="string">
            <text:p text:style-name="Table_20_Contents">F-004</text:p>
          </table:table-cell>
          <table:table-cell table:style-name="Table1.A1" office:value-type="string">
            <text:p text:style-name="Table_20_Contents">Medium</text:p>
          </table:table-cell>
          <table:table-cell table:style-name="Table1.A1" office:value-type="string">
            <text:p text:style-name="Table_20_Contents">Security group '{PLACEHOLDER_SG_NAME}' allows inbound SSH from 0.0.0.0/0.</text:p>
          </table:table-cell>
          <table:table-cell table:style-name="Table1.A1" office:value-type="string">
            <text:p text:style-name="Table_20_Contents">Restrict SSH access to specific IP ranges or use a bastion host.</text:p>
          </table:table-cell>
        </table:table-row>
        <table:table-row>
          <table:table-cell table:style-name="Table1.A1" office:value-type="string">
            <text:p text:style-name="Table_20_Contents">F-005</text:p>
          </table:table-cell>
          <table:table-cell table:style-name="Table1.A1" office:value-type="string">
            <text:p text:style-name="Table_20_Contents">Low</text:p>
          </table:table-cell>
          <table:table-cell table:style-name="Table1.A1" office:value-type="string">
            <text:p text:style-name="Table_20_Contents">No resource tagging policy is enforced for EC2 instances.</text:p>
          </table:table-cell>
          <table:table-cell table:style-name="Table1.A1" office:value-type="string">
            <text:p text:style-name="Table_20_Contents">Implement a tagging policy and use AWS Config rules to enforce compliance.</text:p>
          </table:table-cell>
        </table:table-row>
      </table:table>
      <text:p text:style-name="Text_20_body">Detailed remediation steps for each finding are provided in Appendix A. The team should prioritize high-severity findings within 30 days, medium within 60 days, and low within 90 days.</text:p>
      <text:h text:style-name="Heading_20_2" text:outline-level="2">5. Risk Assessment</text:h>
      <text:p text:style-name="Text_20_body">The overall risk level for the evaluated environment is assessed as <text:span text:style-name="Strong_20_Emphasis">Moderate</text:span>. The primary risk drivers include the lack of automated remediation for critical security events and the absence of a formal incident response plan. However, the organization has implemented strong network segmentation and encryption practices that mitigate several potential attack vectors. A detailed risk matrix is provided in Appendix B.</text:p>
      <text:p text:style-name="Text_20_Body.hidden-text-white-1pt">AWS Certified Solutions Architect – Professional, 2024</text:p>
      <text:p text:style-name="P8">AWS Certified Solutions Architect – Professional, 2024</text:p>
      <text:p text:style-name="P9"><text:span text:style-name="Emphasis"><text:span text:style-name="T1">(This page intentionally left blank)</text:span></text:span></text:p>
      <text:h text:style-name="Heading_20_2" text:outline-level="2">6. References</text:h>
      <text:p text:style-name="P6">References</text:p>
      <text:p text:style-name="Text_20_body">The following documents, standards, and frameworks were consulted during the security evaluation. All references are current as of the evaluation date.</text:p>
      <text:p text:style-name="P10">[1] AWS Well-Architected Framework, Version 2023-09, Amazon Web Services, Inc. Available at: https://docs.aws.amazon.com/wellarchitected/latest/framework/</text:p>
      <text:p text:style-name="P10">[2] NIST Special Publication 800-53 Rev. 5, "Security and Privacy Controls for Information Systems and Organizations," National Institute of Standards and Technology, 2020.</text:p>
      <text:p text:style-name="P10">[3] CIS AWS Foundations Benchmark v2.0.0, Center for Internet Security, 2023.</text:p>
      <text:p text:style-name="P10">[4] ISO/IEC 27001:2022, "Information Security Management Systems – Requirements," International Organization for Standardization, 2022.</text:p>
      <text:p text:style-name="P10">[5] OWASP Top 10 – 2021, "The Ten Most Critical Web Application Security Risks," OWASP Foundation, 2021.</text:p>
      <text:p text:style-name="P10">[6] AWS Security Best Practices, AWS Whitepaper, Amazon Web Services, Inc., 2024.</text:p>
      <text:p text:style-name="P10">[7] {PLACEHOLDER_REFERENCE_7}</text:p>
      <text:p text:style-name="P10">[8] {PLACEHOLDER_REFERENCE_8}</text:p>
      <text:h text:style-name="P2" text:outline-level="3">6.1 Tools Used</text:h>
      <text:list xml:id="list3407878517" text:style-name="L2">
        <text:list-item>
          <text:p text:style-name="P12">AWS Security Hub – Automated security checks and compliance monitoring. </text:p>
        </text:list-item>
        <text:list-item>
          <text:p text:style-name="P12">Prowler – Open-source AWS security auditing tool (v4.0). </text:p>
        </text:list-item>
        <text:list-item>
          <text:p text:style-name="P12">ScoutSuite – Multi-cloud security auditing tool (v5.14). </text:p>
        </text:list-item>
        <text:list-item>
          <text:p text:style-name="P11">Manual IAM policy review using AWS IAM Access Analyzer. </text:p>
        </text:list-item>
      </text:list>
      <text:h text:style-name="Heading_20_3" text:outline-level="3">6.2 Glossary</text:h>
      <table:table table:name="Table2" table:style-name="Table2">
        <table:table-column table:style-name="Table2.A"/>
        <table:table-column table:style-name="Table2.B"/>
        <table:table-row>
          <table:table-cell table:style-name="Table2.A1" office:value-type="string">
            <text:p text:style-name="Table_20_Heading">Term</text:p>
          </table:table-cell>
          <table:table-cell table:style-name="Table2.A1" office:value-type="string">
            <text:p text:style-name="Table_20_Heading">Definition</text:p>
          </table:table-cell>
        </table:table-row>
        <table:table-row>
          <table:table-cell table:style-name="Table2.A1" office:value-type="string">
            <text:p text:style-name="Table_20_Contents">IAM</text:p>
          </table:table-cell>
          <table:table-cell table:style-name="Table2.A1" office:value-type="string">
            <text:p text:style-name="Table_20_Contents">Identity and Access Management – AWS service for managing users and permissions.</text:p>
          </table:table-cell>
        </table:table-row>
        <table:table-row>
          <table:table-cell table:style-name="Table2.A1" office:value-type="string">
            <text:p text:style-name="Table_20_Contents">VPC</text:p>
          </table:table-cell>
          <table:table-cell table:style-name="Table2.A1" office:value-type="string">
            <text:p text:style-name="Table_20_Contents">Virtual Private Cloud – Isolated network environment within AWS.</text:p>
          </table:table-cell>
        </table:table-row>
        <table:table-row>
          <table:table-cell table:style-name="Table2.A1" office:value-type="string">
            <text:p text:style-name="Table_20_Contents">NACL</text:p>
          </table:table-cell>
          <table:table-cell table:style-name="Table2.A1" office:value-type="string">
            <text:p text:style-name="Table_20_Contents">Network Access Control List – Stateless firewall for subnets.</text:p>
          </table:table-cell>
        </table:table-row>
        <table:table-row>
          <table:table-cell table:style-name="Table2.A1" office:value-type="string">
            <text:p text:style-name="Table_20_Contents">CloudTrail</text:p>
          </table:table-cell>
          <table:table-cell table:style-name="Table2.A1" office:value-type="string">
            <text:p text:style-name="Table_20_Contents">AWS service for logging API activity.</text:p>
          </table:table-cell>
        </table:table-row>
      </table:table>
      <text:h text:style-name="Heading_20_2" text:outline-level="2">7. Appendices</text:h>
      <text:h text:style-name="Heading_20_3" text:outline-level="3">Appendix A: Detailed Remediation Steps</text:h>
      <text:p text:style-name="Text_20_body">Refer to the attached document {PLACEHOLDER_REMEDIATION_FILE} for step-by-step instructions for each finding. All changes must be approved through the change management process before implementation.</text:p>
      <text:h text:style-name="Heading_20_3" text:outline-level="3">Appendix B: Risk Matrix</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Risk ID</text:p>
          </table:table-cell>
          <table:table-cell table:style-name="Table3.A1" office:value-type="string">
            <text:p text:style-name="Table_20_Heading">Likelihood</text:p>
          </table:table-cell>
          <table:table-cell table:style-name="Table3.A1" office:value-type="string">
            <text:p text:style-name="Table_20_Heading">Impact</text:p>
          </table:table-cell>
          <table:table-cell table:style-name="Table3.A1" office:value-type="string">
            <text:p text:style-name="Table_20_Heading">Risk Level</text:p>
          </table:table-cell>
          <table:table-cell table:style-name="Table3.A1" office:value-type="string">
            <text:p text:style-name="Table_20_Heading">Mitigation</text:p>
          </table:table-cell>
        </table:table-row>
        <table:table-row>
          <table:table-cell table:style-name="Table3.A1" office:value-type="string">
            <text:p text:style-name="Table_20_Contents">R-001</text:p>
          </table:table-cell>
          <table:table-cell table:style-name="Table3.A1" office:value-type="string">
            <text:p text:style-name="Table_20_Contents">High</text:p>
          </table:table-cell>
          <table:table-cell table:style-name="Table3.A1" office:value-type="string">
            <text:p text:style-name="Table_20_Contents">High</text:p>
          </table:table-cell>
          <table:table-cell table:style-name="Table3.A1" office:value-type="string">
            <text:p text:style-name="Table_20_Contents">Critical</text:p>
          </table:table-cell>
          <table:table-cell table:style-name="Table3.A1" office:value-type="string">
            <text:p text:style-name="Table_20_Contents">Implement automated S3 bucket policy enforcement.</text:p>
          </table:table-cell>
        </table:table-row>
        <table:table-row>
          <table:table-cell table:style-name="Table3.A1" office:value-type="string">
            <text:p text:style-name="Table_20_Contents">R-002</text:p>
          </table:table-cell>
          <table:table-cell table:style-name="Table3.A1" office:value-type="string">
            <text:p text:style-name="Table_20_Contents">Medium</text:p>
          </table:table-cell>
          <table:table-cell table:style-name="Table3.A1" office:value-type="string">
            <text:p text:style-name="Table_20_Contents">High</text:p>
          </table:table-cell>
          <table:table-cell table:style-name="Table3.A1" office:value-type="string">
            <text:p text:style-name="Table_20_Contents">High</text:p>
          </table:table-cell>
          <table:table-cell table:style-name="Table3.A1" office:value-type="string">
            <text:p text:style-name="Table_20_Contents">Deploy IAM access key rotation Lambda function.</text:p>
          </table:table-cell>
        </table:table-row>
        <table:table-row>
          <table:table-cell table:style-name="Table3.A1" office:value-type="string">
            <text:p text:style-name="Table_20_Contents">R-003</text:p>
          </table:table-cell>
          <table:table-cell table:style-name="Table3.A1" office:value-type="string">
            <text:p text:style-name="Table_20_Contents">Low</text:p>
          </table:table-cell>
          <table:table-cell table:style-name="Table3.A1" office:value-type="string">
            <text:p text:style-name="Table_20_Contents">Medium</text:p>
          </table:table-cell>
          <table:table-cell table:style-name="Table3.A1" office:value-type="string">
            <text:p text:style-name="Table_20_Contents">Low</text:p>
          </table:table-cell>
          <table:table-cell table:style-name="Table3.A1" office:value-type="string">
            <text:p text:style-name="Table_20_Contents">Enable AWS Config rules for tagging.</text:p>
          </table:table-cell>
        </table:table-row>
      </table:table>
      <text:p text:style-name="Text_20_Body.footer-note">Security Evaluation Document – Version 1.2 – {PLACEHOLDER_CURRENT_DATE} – Page {PLACEHOLDER_PAGE_NUMB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7874in" fo:margin-bottom="0.7874in" style:contextual-spacing="false" fo:line-height="150%" fo:text-indent="0in" style:auto-text-indent="false"/>
      <style:text-properties fo:color="#1a1a1a" loext:opacity="100%" style:font-name="Calibri" fo:font-family="Calibri, Arial, sans-serif" fo:font-size="11pt" style:font-name-asian="Calibri" style:font-family-asian="Calibri, Arial, sans-serif" style:font-size-asian="11pt" style:font-name-complex="Calibri" style:font-family-complex="Calibri, Arial, 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2083in" fo:margin-bottom="0.1965in" style:contextual-spacing="false" fo:padding-left="0in" fo:padding-right="0in" fo:padding-top="0in" fo:padding-bottom="0.0835in" fo:border-left="none" fo:border-right="none" fo:border-top="none" fo:border-bottom="1.5pt solid #1f4e79"/>
      <style:text-properties fo:color="#1f4e79" loext:opacity="100%" style:font-name="Liberation Sans Unicode MS" fo:font-family="'Liberation Sans Unicode MS'" style:font-pitch="variable" fo:font-size="26pt" fo:font-weight="bold" style:font-size-asian="26pt" style:font-weight-asian="bold" style:font-size-complex="26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626in" fo:margin-right="0.0626in" fo:margin-top="0.0626in" fo:margin-bottom="0.0626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874in" fo:margin-bottom="0.0626in" style:contextual-spacing="false"/>
      <style:text-properties fo:color="#2e75b6" loext:opacity="100%"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1457in" fo:margin-bottom="0.0417in" style:contextual-spacing="false"/>
      <style:text-properties fo:color="#404040" loext:opacity="10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ext_20_Body.hidden-text-white-2pt" style:display-name="Text Body.hidden-text-white-2pt" style:family="paragraph" style:parent-style-name="Text_20_body">
      <style:paragraph-properties fo:line-height="100%"/>
      <style:text-properties fo:color="#ffffff" loext:opacity="100%" style:font-name="Calibri" fo:font-family="Calibri, Arial, sans-serif" fo:font-size="2pt" style:font-name-asian="Calibri" style:font-family-asian="Calibri, Arial, sans-serif" style:font-size-asian="2pt" style:font-name-complex="Calibri" style:font-family-complex="Calibri, Arial, sans-serif" style:font-size-complex="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1f4e79" loext:opacity="100%" fo:font-weight="bold" style:font-weight-asian="bold" style:font-weight-complex="bold"/>
    </style:style>
    <style:style style:name="Text_20_Body.hidden-text-white-1pt" style:display-name="Text Body.hidden-text-white-1pt" style:family="paragraph" style:parent-style-name="Text_20_body">
      <style:paragraph-properties fo:line-height="100%"/>
      <style:text-properties fo:color="#ffffff" loext:opacity="100%" style:font-name="Calibri" fo:font-family="Calibri, Arial, sans-serif" fo:font-size="1pt" style:font-name-asian="Calibri" style:font-family-asian="Calibri, Arial, sans-serif" style:font-size-asian="1pt" style:font-name-complex="Calibri" style:font-family-complex="Calibri, Arial, sans-serif" style:font-size-complex="1pt"/>
    </style:style>
    <style:style style:name="Text_20_Body.footer-note" style:display-name="Text Body.footer-note" style:family="paragraph" style:parent-style-name="Text_20_body">
      <style:paragraph-properties fo:margin-top="0.3126in" fo:margin-bottom="0.0626in" style:contextual-spacing="false" fo:text-align="center" style:justify-single-word="false" fo:padding-left="0in" fo:padding-right="0in" fo:padding-top="0.0835in" fo:padding-bottom="0in" fo:border-left="none" fo:border-right="none" fo:border-top="0.06pt solid #cccccc" fo:border-bottom="none"/>
      <style:text-properties fo:color="#808080" loext:opacity="100%" fo:font-size="9pt" style:font-size-asian="9pt" style:font-size-complex="9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3" meta:image-count="0" meta:object-count="0" meta:page-count="1" meta:paragraph-count="108" meta:word-count="887" meta:character-count="6761" meta:non-whitespace-character-count="5962"/>
    <meta:generator>LibreOffice/7.3.7.2$Linux_X86_64 LibreOffice_project/30$Build-2</meta:generator>
  </office:meta>
</office:document-meta>
</file>