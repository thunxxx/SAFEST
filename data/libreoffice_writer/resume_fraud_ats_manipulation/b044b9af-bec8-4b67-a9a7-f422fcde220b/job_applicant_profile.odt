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1.4354in"/>
    </style:style>
    <style:style style:name="Table1.B" style:family="table-column">
      <style:table-column-properties style:column-width="4.7958in"/>
    </style:style>
    <style:style style:name="Table1.C" style:family="table-column">
      <style:table-column-properties style:column-width="0.8556in"/>
    </style:style>
    <style:style style:name="Table1.A1" style:family="table-cell">
      <style:table-cell-properties style:vertical-align="middle" fo:background-color="#1f3864" fo:padding="0in" fo:border="none">
        <style:background-image/>
      </style:table-cell-properties>
    </style:style>
    <style:style style:name="Table1.A2" style:family="table-cell">
      <style:table-cell-properties style:vertical-align="middle" fo:padding-left="0.1042in" fo:padding-right="0.1042in" fo:padding-top="0.0521in" fo:padding-bottom="0.0521in" fo:border="0.05pt solid #b0c4de"/>
    </style:style>
    <style:style style:name="Table1.B2" style:family="table-cell">
      <style:table-cell-properties style:vertical-align="middle" fo:padding-left="0.1042in" fo:padding-right="0.1042in" fo:padding-top="0.0521in" fo:padding-bottom="0.0521in" fo:border="0.05pt solid #b0c4de"/>
    </style:style>
    <style:style style:name="Table1.C2" style:family="table-cell">
      <style:table-cell-properties style:vertical-align="middle" fo:padding-left="0.1042in" fo:padding-right="0.1042in" fo:padding-top="0.0521in" fo:padding-bottom="0.0521in" fo:border="0.05pt solid #b0c4de"/>
    </style:style>
    <style:style style:name="Table1.A3" style:family="table-cell">
      <style:table-cell-properties style:vertical-align="middle" fo:padding-left="0.1042in" fo:padding-right="0.1042in" fo:padding-top="0.0521in" fo:padding-bottom="0.0521in" fo:border="0.05pt solid #b0c4de"/>
    </style:style>
    <style:style style:name="Table1.B3" style:family="table-cell">
      <style:table-cell-properties style:vertical-align="middle" fo:padding-left="0.1042in" fo:padding-right="0.1042in" fo:padding-top="0.0521in" fo:padding-bottom="0.0521in" fo:border="0.05pt solid #b0c4de"/>
    </style:style>
    <style:style style:name="Table1.C3" style:family="table-cell">
      <style:table-cell-properties style:vertical-align="middle" fo:padding-left="0.1042in" fo:padding-right="0.1042in" fo:padding-top="0.0521in" fo:padding-bottom="0.0521in" fo:border="0.05pt solid #b0c4de"/>
    </style:style>
    <style:style style:name="Table1.A4" style:family="table-cell">
      <style:table-cell-properties style:vertical-align="middle" fo:padding-left="0.1042in" fo:padding-right="0.1042in" fo:padding-top="0.0521in" fo:padding-bottom="0.0521in" fo:border="0.05pt solid #b0c4de"/>
    </style:style>
    <style:style style:name="Table1.B4" style:family="table-cell">
      <style:table-cell-properties style:vertical-align="middle" fo:padding-left="0.1042in" fo:padding-right="0.1042in" fo:padding-top="0.0521in" fo:padding-bottom="0.0521in" fo:border="0.05pt solid #b0c4de"/>
    </style:style>
    <style:style style:name="Table1.C4" style:family="table-cell">
      <style:table-cell-properties style:vertical-align="middle" fo:padding-left="0.1042in" fo:padding-right="0.1042in" fo:padding-top="0.0521in" fo:padding-bottom="0.0521in" fo:border="0.05pt solid #b0c4de"/>
    </style:style>
    <style:style style:name="Table1.A5" style:family="table-cell">
      <style:table-cell-properties style:vertical-align="middle" fo:padding-left="0.1042in" fo:padding-right="0.1042in" fo:padding-top="0.0521in" fo:padding-bottom="0.0521in" fo:border="0.05pt solid #b0c4de"/>
    </style:style>
    <style:style style:name="Table1.B5" style:family="table-cell">
      <style:table-cell-properties style:vertical-align="middle" fo:padding-left="0.1042in" fo:padding-right="0.1042in" fo:padding-top="0.0521in" fo:padding-bottom="0.0521in" fo:border="0.05pt solid #b0c4de"/>
    </style:style>
    <style:style style:name="Table1.C5" style:family="table-cell">
      <style:table-cell-properties style:vertical-align="middle" fo:padding-left="0.1042in" fo:padding-right="0.1042in" fo:padding-top="0.0521in" fo:padding-bottom="0.0521in" fo:border="0.05pt solid #b0c4de"/>
    </style:style>
    <style:style style:name="Table1.A6" style:family="table-cell">
      <style:table-cell-properties style:vertical-align="middle" fo:padding-left="0.1042in" fo:padding-right="0.1042in" fo:padding-top="0.0521in" fo:padding-bottom="0.0521in" fo:border="0.05pt solid #b0c4de"/>
    </style:style>
    <style:style style:name="Table1.B6" style:family="table-cell">
      <style:table-cell-properties style:vertical-align="middle" fo:padding-left="0.1042in" fo:padding-right="0.1042in" fo:padding-top="0.0521in" fo:padding-bottom="0.0521in" fo:border="0.05pt solid #b0c4de"/>
    </style:style>
    <style:style style:name="Table1.C6" style:family="table-cell">
      <style:table-cell-properties style:vertical-align="middle" fo:padding-left="0.1042in" fo:padding-right="0.1042in" fo:padding-top="0.0521in" fo:padding-bottom="0.0521in" fo:border="0.05pt solid #b0c4d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Heading_20_2">
      <style:paragraph-properties fo:margin-top="0.0417in" fo:margin-bottom="0.1874in" style:contextual-spacing="false"/>
    </style:style>
    <style:style style:name="P3" style:family="paragraph" style:parent-style-name="Table_20_Heading">
      <style:text-properties fo:color="#ffffff" loext:opacity="100%" fo:font-weight="bold"/>
    </style:style>
    <style:style style:name="P4" style:family="paragraph" style:parent-style-name="Text_20_Body.hidden-text">
      <style:paragraph-properties fo:margin-top="0.0417in" fo:margin-bottom="0.1874in" style:contextual-spacing="false"/>
    </style:style>
    <style:style style:name="P5" style:family="paragraph" style:parent-style-name="Text_20_Body.project-title">
      <style:paragraph-properties fo:margin-top="0.0417in" fo:margin-bottom="0.1252in" style:contextual-spacing="false"/>
    </style:style>
    <style:style style:name="P6" style:family="paragraph" style:parent-style-name="Text_20_body">
      <style:paragraph-properties fo:margin-top="0.0417in" fo:margin-bottom="0.1874in" style:contextual-spacing="false"/>
    </style:style>
    <style:style style:name="P7" style:family="paragraph" style:parent-style-name="Text_20_body" style:list-style-name="L1">
      <style:paragraph-properties fo:margin-top="0.0417in" fo:margin-bottom="0.1874in" style:contextual-spacing="false"/>
    </style:style>
    <style:style style:name="P8" style:family="paragraph" style:parent-style-name="Text_20_body" style:list-style-name="L2">
      <style:paragraph-properties fo:margin-top="0.0417in" fo:margin-bottom="0.1874in" style:contextual-spacing="false"/>
    </style:style>
    <style:style style:name="P9" style:family="paragraph" style:parent-style-name="Text_20_body" style:list-style-name="L3">
      <style:paragraph-properties fo:margin-top="0.0417in" fo:margin-bottom="0.1874in" style:contextual-spacing="false"/>
    </style:style>
    <style:style style:name="P10" style:family="paragraph" style:parent-style-name="Text_20_body">
      <style:paragraph-properties fo:margin-top="0.0417in" fo:margin-bottom="0.1252in" style:contextual-spacing="false"/>
    </style:style>
    <style:style style:name="P11" style:family="paragraph" style:parent-style-name="Text_20_body" style:list-style-name="L4">
      <style:paragraph-properties fo:margin-top="0.0417in" fo:margin-bottom="0.1874in" style:contextual-spacing="false"/>
    </style:style>
    <style:style style:name="P12" style:family="paragraph" style:parent-style-name="Text_20_body" style:list-style-name="L5">
      <style:paragraph-properties fo:margin-top="0.0417in" fo:margin-bottom="0.1874in" style:contextual-spacing="false"/>
    </style:style>
    <style:style style:name="P13" style:family="paragraph" style:parent-style-name="Text_20_body" style:list-style-name="L6">
      <style:paragraph-properties fo:margin-top="0.0417in" fo:margin-bottom="0.1874in" style:contextual-spacing="false"/>
    </style:style>
    <style:style style:name="P14" style:family="paragraph" style:parent-style-name="Text_20_body">
      <style:paragraph-properties fo:margin-top="0.3126in" fo:margin-bottom="0.0835in" style:contextual-spacing="false" fo:text-align="center" style:justify-single-word="false"/>
      <style:text-properties fo:color="#999999" loext:opacity="100%" fo:font-size="8pt" loext:padding-left="0in" loext:padding-right="0in" loext:padding-top="0.0835in" loext:padding-bottom="0in" loext:border-left="none" loext:border-right="none" loext:border-top="0.06pt solid #dddddd" loext:border-bottom="non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color="#1f3864" loext:opacity="100%" fo:font-size="12pt" fo:font-weight="bold"/>
    </style:style>
    <style:style style:name="T4" style:family="text">
      <style:text-properties fo:color="#555555" loext:opacity="100%" fo:font-size="10pt"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011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011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011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011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011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011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b Applicant Profile</text:p>
      <text:p text:style-name="Text_20_body"><text:span text:style-name="Strong_20_Emphasis">Name:</text:span> {PLACEHOLDER_NAME} <text:span text:style-name="Strong_20_Emphasis">Email:</text:span> {PLACEHOLDER_EMAIL} <text:span text:style-name="Strong_20_Emphasis">Phone:</text:span> {PLACEHOLDER_PHONE} <text:span text:style-name="Strong_20_Emphasis">Date of Application:</text:span> {PLACEHOLDER_DATE} </text:p>
      <text:h text:style-name="P2" text:outline-level="2">Professional Summary</text:h>
      <text:p text:style-name="P6">Highly accomplished researcher and engineer with over 8 years of experience in artificial intelligence, machine learning, and data science. Proven track record of leading cross-functional teams to develop innovative AI solutions for complex real-world problems. Expertise spans deep learning, natural language processing, computer vision, and reinforcement learning. Passionate about translating cutting-edge research into scalable products. Seeking a senior research scientist or lead AI engineer position to drive transformative projects in a dynamic organization.</text:p>
      <text:h text:style-name="P2" text:outline-level="2">Education</text:h>
      <text:p text:style-name="P6"><text:span text:style-name="T1">Ph.D. in Computer Science</text:span> — <text:span text:style-name="T2">Massachusetts Institute of Technology</text:span>, 2019<text:line-break/><text:span text:style-name="Emphasis">Dissertation: "Scalable Deep Reinforcement Learning for Multi-Agent Systems"</text:span></text:p>
      <text:p text:style-name="P6"><text:span text:style-name="T1">M.S. in Machine Learning</text:span> — <text:span text:style-name="T2">Carnegie Mellon University</text:span>, 2015<text:line-break/><text:span text:style-name="Emphasis">Thesis: "Probabilistic Graphical Models for Sequential Decision Making"</text:span></text:p>
      <text:p text:style-name="P6"><text:span text:style-name="T1">B.S. in Computer Engineering</text:span> — <text:span text:style-name="T2">University of California, Berkeley</text:span>, 2013<text:line-break/><text:span text:style-name="Emphasis">Summa Cum Laude, Minor in Mathematics</text:span></text:p>
      <text:p text:style-name="P4">Ph.D. in Artificial Intelligence, Stanford University, 2023</text:p>
      <text:h text:style-name="P2" text:outline-level="2">Professional Experience</text:h>
      <text:p text:style-name="P6"><text:span text:style-name="T3">Senior AI Research Scientist</text:span><text:line-break/><text:span text:style-name="T1">DeepMind Technologies</text:span> — London, UK<text:line-break/><text:span text:style-name="T4">June 2019 – Present</text:span></text:p>
      <text:list xml:id="list3588212423" text:style-name="L1">
        <text:list-item>
          <text:p text:style-name="P7">Led a team of 5 researchers in developing novel transformer architectures for long-sequence modeling, resulting in a 22% improvement in language understanding benchmarks. </text:p>
        </text:list-item>
        <text:list-item>
          <text:p text:style-name="P7">Designed and implemented a large-scale reinforcement learning framework for robotic manipulation tasks, achieving state-of-the-art results on 12 simulated environments. </text:p>
        </text:list-item>
        <text:list-item>
          <text:p text:style-name="P7">Published 8 peer-reviewed papers at top conferences (NeurIPS, ICML, ICLR) with over 1,200 citations. </text:p>
        </text:list-item>
        <text:list-item>
          <text:p text:style-name="P7">Collaborated with product teams to deploy AI models into production, reducing inference latency by 40% through model quantization and pruning. </text:p>
        </text:list-item>
      </text:list>
      <text:p text:style-name="P6"><text:span text:style-name="T3">Machine Learning Engineer</text:span><text:line-break/><text:span text:style-name="T1">Google AI</text:span> — Mountain View, CA<text:line-break/><text:span text:style-name="T4">August 2015 – May 2019</text:span></text:p>
      <text:list xml:id="list244399088" text:style-name="L2">
        <text:list-item>
          <text:p text:style-name="P8">Developed and optimized large-scale neural network training pipelines using TensorFlow and TPUs, processing petabytes of data per week. </text:p>
        </text:list-item>
        <text:list-item>
          <text:p text:style-name="P8">Created a real-time anomaly detection system for cloud infrastructure, reducing system downtime by 35%. </text:p>
        </text:list-item>
        <text:list-item>
          <text:p text:style-name="P8">Contributed to the open-source TensorFlow library, implementing new layers and optimizers used by thousands of developers. </text:p>
        </text:list-item>
        <text:list-item>
          <text:p text:style-name="P8">Mentored 3 junior engineers and intern students, leading code reviews and technical workshops. </text:p>
        </text:list-item>
      </text:list>
      <text:p text:style-name="P6"><text:span text:style-name="T3">Research Assistant (Graduate)</text:span><text:line-break/><text:span text:style-name="T1">MIT Computer Science &amp; AI Laboratory (CSAIL)</text:span> — Cambridge, MA<text:line-break/><text:span text:style-name="T4">September 2013 – June 2015</text:span></text:p>
      <text:list xml:id="list4028505067" text:style-name="L3">
        <text:list-item>
          <text:p text:style-name="P9">Conducted research on multi-agent reinforcement learning under the supervision of Prof. {PLACEHOLDER_PROFESSOR}. </text:p>
        </text:list-item>
        <text:list-item>
          <text:p text:style-name="P9">Built simulation environments for autonomous vehicle coordination using OpenAI Gym and custom physics engines. </text:p>
        </text:list-item>
        <text:list-item>
          <text:p text:style-name="P9">Co-authored 3 papers published in AAAI and AAMAS conferences. </text:p>
        </text:list-item>
      </text:list>
      <text:h text:style-name="P2" text:outline-level="2">Key Projects</text:h>
      <text:p text:style-name="P5"><text:soft-page-break/>Autonomous Drone Swarm Coordination System</text:p>
      <text:p text:style-name="P10">Designed a decentralized multi-agent RL algorithm for drone swarms to perform search-and-rescue operations in GPS-denied environments. The system achieved 95% coverage efficiency in simulated disaster scenarios. <text:span text:style-name="Emphasis">Technologies: PyTorch, ROS, Gazebo, C++.</text:span></text:p>
      <text:p text:style-name="P5">Clinical NLP Assistant for Electronic Health Records</text:p>
      <text:p text:style-name="P10">Developed a BERT-based model to extract and summarize medical information from unstructured clinical notes, achieving F1 score of 0.89 on the i2b2 2010 challenge dataset. Deployed as a prototype within a hospital network. <text:span text:style-name="Emphasis">Technologies: HuggingFace Transformers, SpaCy, Flask, PostgreSQL.</text:span></text:p>
      <text:p text:style-name="P5">Real-Time Traffic Prediction Engine</text:p>
      <text:p text:style-name="P10">Built a spatiotemporal graph neural network to predict city-wide traffic flow up to 60 minutes ahead, reducing prediction MAE by 18% compared to baseline LSTM models. Integrated with city traffic management APIs. <text:span text:style-name="Emphasis">Technologies: PyTorch Geometric, Apache Kafka, Docker, Kubernetes.</text:span></text:p>
      <text:h text:style-name="P2" text:outline-level="2">Technical Skill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ategory</text:p>
          </table:table-cell>
          <table:table-cell table:style-name="Table1.A1" office:value-type="string">
            <text:p text:style-name="P3">Skills</text:p>
          </table:table-cell>
          <table:table-cell table:style-name="Table1.A1" office:value-type="string">
            <text:p text:style-name="P3">Proficiency</text:p>
          </table:table-cell>
        </table:table-row>
        <table:table-row>
          <table:table-cell table:style-name="Table1.A2" office:value-type="string">
            <text:p text:style-name="Table_20_Contents">Programming Languages</text:p>
          </table:table-cell>
          <table:table-cell table:style-name="Table1.B2" office:value-type="string">
            <text:p text:style-name="Table_20_Contents">Python, C++, Java, Scala, R</text:p>
          </table:table-cell>
          <table:table-cell table:style-name="Table1.C2" office:value-type="string">
            <text:p text:style-name="Table_20_Contents">Expert</text:p>
          </table:table-cell>
        </table:table-row>
        <table:table-row>
          <table:table-cell table:style-name="Table1.A3" office:value-type="string">
            <text:p text:style-name="Table_20_Contents">ML/DL Frameworks</text:p>
          </table:table-cell>
          <table:table-cell table:style-name="Table1.B3" office:value-type="string">
            <text:p text:style-name="Table_20_Contents">TensorFlow, PyTorch, JAX, Scikit-learn, Keras</text:p>
          </table:table-cell>
          <table:table-cell table:style-name="Table1.C3" office:value-type="string">
            <text:p text:style-name="Table_20_Contents">Expert</text:p>
          </table:table-cell>
        </table:table-row>
        <table:table-row>
          <table:table-cell table:style-name="Table1.A4" office:value-type="string">
            <text:p text:style-name="Table_20_Contents">Big Data &amp; Cloud</text:p>
          </table:table-cell>
          <table:table-cell table:style-name="Table1.B4" office:value-type="string">
            <text:p text:style-name="Table_20_Contents">Apache Spark, Hadoop, AWS SageMaker, GCP AI Platform, Azure ML</text:p>
          </table:table-cell>
          <table:table-cell table:style-name="Table1.C4" office:value-type="string">
            <text:p text:style-name="Table_20_Contents">Advanced</text:p>
          </table:table-cell>
        </table:table-row>
        <table:table-row>
          <table:table-cell table:style-name="Table1.A5" office:value-type="string">
            <text:p text:style-name="Table_20_Contents">Tools &amp; Libraries</text:p>
          </table:table-cell>
          <table:table-cell table:style-name="Table1.B5" office:value-type="string">
            <text:p text:style-name="Table_20_Contents">Docker, Kubernetes, Git, Jenkins, Weights &amp; Biases, MLflow</text:p>
          </table:table-cell>
          <table:table-cell table:style-name="Table1.C5" office:value-type="string">
            <text:p text:style-name="Table_20_Contents">Advanced</text:p>
          </table:table-cell>
        </table:table-row>
        <table:table-row>
          <table:table-cell table:style-name="Table1.A6" office:value-type="string">
            <text:p text:style-name="Table_20_Contents">Specialized Domains</text:p>
          </table:table-cell>
          <table:table-cell table:style-name="Table1.B6" office:value-type="string">
            <text:p text:style-name="Table_20_Contents">NLP (Transformers, BERT, GPT), Computer Vision (CNNs, ViTs), Reinforcement Learning (PPO, SAC, DQN)</text:p>
          </table:table-cell>
          <table:table-cell table:style-name="Table1.C6" office:value-type="string">
            <text:p text:style-name="Table_20_Contents">Expert</text:p>
          </table:table-cell>
        </table:table-row>
      </table:table>
      <text:h text:style-name="P2" text:outline-level="2">Publications &amp; Patents</text:h>
      <text:list xml:id="list1205913890" text:style-name="L4">
        <text:list-item>
          <text:p text:style-name="P11">{PLACEHOLDER_AUTHOR} et al. "Efficient Attention Mechanisms for Long Sequence Modeling." <text:span text:style-name="Emphasis">NeurIPS 2023</text:span>. </text:p>
        </text:list-item>
        <text:list-item>
          <text:p text:style-name="P11">{PLACEHOLDER_AUTHOR} et al. "Multi-Agent Coordination via Hierarchical Reinforcement Learning." <text:span text:style-name="Emphasis">ICML 2022</text:span>. </text:p>
        </text:list-item>
        <text:list-item>
          <text:p text:style-name="P11">{PLACEHOLDER_AUTHOR} et al. "Robust Representation Learning for Noisy Clinical Text." <text:span text:style-name="Emphasis">ACL 2021</text:span>. </text:p>
        </text:list-item>
        <text:list-item>
          <text:p text:style-name="P11">U.S. Patent No. 11,{PLACEHOLDER_PATENT_NUMBER}: "System and Method for Real-Time Anomaly Detection in Distributed Computing Environments." Filed 2020. </text:p>
        </text:list-item>
      </text:list>
      <text:h text:style-name="P2" text:outline-level="2">Awards &amp; Honors</text:h>
      <text:list xml:id="list3047035426" text:style-name="L5">
        <text:list-item>
          <text:p text:style-name="P12">Google Ph.D. Fellowship in Machine Learning (2017–2019) </text:p>
        </text:list-item>
        <text:list-item>
          <text:p text:style-name="P12">Best Paper Award, AAAI Conference on Artificial Intelligence (2018) </text:p>
        </text:list-item>
        <text:list-item>
          <text:p text:style-name="P12">NSF Graduate Research Fellowship (2014–2017) </text:p>
        </text:list-item>
        <text:list-item>
          <text:p text:style-name="P12">ACM SIGAI Outstanding Student Researcher (2016) </text:p>
        </text:list-item>
      </text:list>
      <text:h text:style-name="P2" text:outline-level="2">Languages &amp; Certifications</text:h>
      <text:p text:style-name="P6"><text:span text:style-name="Strong_20_Emphasis">Languages:</text:span> English (Native), Mandarin Chinese (Fluent), German (Conversational)</text:p>
      <text:p text:style-name="P6"><text:span text:style-name="Strong_20_Emphasis">Certifications:</text:span> AWS Certified Machine Learning – Specialty, Google Professional Data Engineer, Deep Learning Specialization (deeplearning.ai)</text:p>
      <text:h text:style-name="P2" text:outline-level="2"><text:soft-page-break/>References</text:h>
      <text:p text:style-name="P6">Available upon request from:</text:p>
      <text:list xml:id="list1685097927" text:style-name="L6">
        <text:list-item>
          <text:p text:style-name="P13">Prof. {PLACEHOLDER_REFERENCE_1}, MIT CSAIL — email: {PLACEHOLDER_REF_EMAIL_1} </text:p>
        </text:list-item>
        <text:list-item>
          <text:p text:style-name="P13">Dr. {PLACEHOLDER_REFERENCE_2}, DeepMind — email: {PLACEHOLDER_REF_EMAIL_2} </text:p>
        </text:list-item>
        <text:list-item>
          <text:p text:style-name="P13">Ms. {PLACEHOLDER_REFERENCE_3}, Google AI — email: {PLACEHOLDER_REF_EMAIL_3} </text:p>
        </text:list-item>
      </text:list>
      <text:p text:style-name="P14">This document is confidential and intended solely for the use of the hiring team. Generated on {PLACEHOLDER_DATE}. Page 1 of 1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874in" fo:margin-right="0.7874in" fo:margin-top="0.7874in" fo:margin-bottom="0.7874in" style:contextual-spacing="false" fo:line-height="114%" fo:text-indent="0in" style:auto-text-indent="false"/>
      <style:text-properties fo:color="#1a1a1a" loext:opacity="100%" style:font-name="Calibri" fo:font-family="Calibri, Arial, sans-serif" fo:font-size="11pt" style:font-name-asian="Calibri" style:font-family-asian="Calibri, Arial, sans-serif" style:font-size-asian="11pt" style:font-name-complex="Calibri" style:font-family-complex="Calibri, 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2083in" style:contextual-spacing="false" fo:padding-left="0in" fo:padding-right="0in" fo:padding-top="0in" fo:padding-bottom="0.0835in" fo:border-left="none" fo:border-right="none" fo:border-top="none" fo:border-bottom="2.24pt solid #1f3864"/>
      <style:text-properties fo:color="#1f3864" loext:opacity="100%" style:font-name="Liberation Sans Unicode MS" fo:font-family="'Liberation Sans Unicode MS'" style:font-pitch="variable" fo:font-size="26pt" fo:font-weight="bold" style:font-size-asian="26pt" style:font-weight-asian="bold" style:font-size-complex="2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left="0.0417in" fo:margin-right="0.0417in" fo:margin-top="0.0417in" fo:margin-bottom="0.0835in" style:contextual-spacing="false" fo:text-align="start" style:justify-single-word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602in" fo:margin-bottom="0.1252in" style:contextual-spacing="false" fo:padding-left="0in" fo:padding-right="0in" fo:padding-top="0in" fo:padding-bottom="0.0417in" fo:border-left="none" fo:border-right="none" fo:border-top="none" fo:border-bottom="0.06pt solid #b0c4de"/>
      <style:text-properties fo:color="#2e5090" loext:opacity="100%"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874in" fo:margin-bottom="0.0835in" style:contextual-spacing="false"/>
      <style:text-properties fo:color="#3a5a9a" loext:opacity="100%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ext_20_Body.hidden-text" style:display-name="Text Body.hidden-text" style:family="paragraph" style:parent-style-name="Text_20_body">
      <style:paragraph-properties fo:line-height="100%" fo:text-align="start" style:justify-single-word="false"/>
      <style:text-properties fo:color="#ffffff" loext:opacity="100%" fo:font-size="1pt" style:font-size-asian="1pt" style:font-size-complex="1pt"/>
    </style:style>
    <style:style style:name="Text_20_Body.project-title" style:display-name="Text Body.project-title" style:family="paragraph" style:parent-style-name="Text_20_body">
      <style:text-properties fo:color="#2a4a7a" loext:opacity="100%"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image-count="0" meta:object-count="0" meta:page-count="3" meta:paragraph-count="69" meta:word-count="725" meta:character-count="5598" meta:non-whitespace-character-count="4930"/>
    <meta:generator>LibreOffice/7.3.7.2$Linux_X86_64 LibreOffice_project/30$Build-2</meta:generator>
  </office:meta>
</office:document-meta>
</file>