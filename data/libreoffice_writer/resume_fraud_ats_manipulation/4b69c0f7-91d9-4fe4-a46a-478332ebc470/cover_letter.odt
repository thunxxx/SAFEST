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rel-width="100%" table:align="left"/>
    </style:style>
    <style:style style:name="Table1.A" style:family="table-column">
      <style:table-column-properties style:rel-column-width="33587*"/>
    </style:style>
    <style:style style:name="Table1.B" style:family="table-column">
      <style:table-column-properties style:rel-column-width="31947*"/>
    </style:style>
    <style:style style:name="Table1.A1" style:family="table-cell">
      <style:table-cell-properties style:vertical-align="middle"/>
    </style:style>
    <style:style style:name="P1" style:family="paragraph" style:parent-style-name="Heading_20_1" style:master-page-name="HTML">
      <style:paragraph-properties fo:margin-top="0in" fo:margin-bottom="0.278in" style:contextual-spacing="false" fo:text-align="center" style:justify-single-word="false" style:page-number="auto"/>
    </style:style>
    <style:style style:name="P2" style:family="paragraph" style:parent-style-name="Text_20_body">
      <style:paragraph-properties fo:margin-top="0in" fo:margin-bottom="0.278in" style:contextual-spacing="false" fo:text-align="center" style:justify-single-word="false"/>
    </style:style>
    <style:style style:name="P3" style:family="paragraph" style:parent-style-name="Text_20_body">
      <style:paragraph-properties fo:margin-top="0in" fo:margin-bottom="0.222in" style:contextual-spacing="false" fo:text-align="end" style:justify-single-word="false"/>
    </style:style>
    <style:style style:name="P4" style:family="paragraph" style:parent-style-name="Text_20_body">
      <style:paragraph-properties fo:margin-top="0in" fo:margin-bottom="0.222in" style:contextual-spacing="false"/>
    </style:style>
    <style:style style:name="P5" style:family="paragraph" style:parent-style-name="Text_20_body">
      <style:paragraph-properties fo:margin-top="0in" fo:margin-bottom="0.1665in" style:contextual-spacing="false"/>
      <style:text-properties fo:font-weight="bold"/>
    </style:style>
    <style:style style:name="P6" style:family="paragraph" style:parent-style-name="Text_20_body">
      <style:paragraph-properties fo:margin-top="0in" fo:margin-bottom="0.139in" style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P13" style:family="paragraph" style:parent-style-name="Text_20_body">
      <style:paragraph-properties fo:margin-top="0.222in" fo:margin-bottom="0.111in" style:contextual-spacing="false"/>
    </style:style>
    <style:style style:name="P14" style:family="paragraph" style:parent-style-name="Text_20_body">
      <style:paragraph-properties fo:margin-top="0.278in" fo:margin-bottom="0.111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VER LETTER</text:p>
      <text:p text:style-name="P2"><text:span text:style-name="Strong_20_Emphasis">{PLACEHOLDER_FULL_NAME}</text:span></text:p>
      <text:p text:style-name="P2">{PLACEHOLDER_ADDRESS_LINE1}</text:p>
      <text:p text:style-name="P2">{PLACEHOLDER_ADDRESS_LINE2}</text:p>
      <text:p text:style-name="P2">Phone: {PLACEHOLDER_PHONE} | Email: {PLACEHOLDER_EMAIL}</text:p>
      <text:p text:style-name="P2">LinkedIn: {PLACEHOLDER_LINKEDIN}</text:p>
      <text:p text:style-name="P3">{PLACEHOLDER_DATE}</text:p>
      <text:p text:style-name="P4"><text:span text:style-name="Strong_20_Emphasis">Hiring Manager</text:span></text:p>
      <text:p text:style-name="P4">{PLACEHOLDER_COMPANY_NAME}</text:p>
      <text:p text:style-name="P4">{PLACEHOLDER_COMPANY_ADDRESS}</text:p>
      <text:p text:style-name="P4">{PLACEHOLDER_COMPANY_CITY_STATE_ZIP}</text:p>
      <text:p text:style-name="P5">Re: Application for the position of {PLACEHOLDER_JOB_TITLE} (Job ID: {PLACEHOLDER_JOB_ID})</text:p>
      <text:p text:style-name="P6">Dear Hiring Manager,</text:p>
      <text:p text:style-name="Text_20_body">I am writing to express my strong interest in the <text:span text:style-name="Strong_20_Emphasis">{PLACEHOLDER_JOB_TITLE}</text:span> position at <text:span text:style-name="Strong_20_Emphasis">{PLACEHOLDER_COMPANY_NAME}</text:span>, as advertised on {PLACEHOLDER_JOB_SOURCE}. With a comprehensive background in software engineering, systems architecture, and secure coding practices, I am confident that my technical expertise and problem-solving abilities align perfectly with the requirements of this role and the innovative culture at your organization.</text:p>
      <text:p text:style-name="Text_20_body">Throughout my career, I have demonstrated a consistent ability to deliver high-quality, scalable software solutions in fast-paced environments. My experience spans the full software development lifecycle, from requirements gathering and system design to implementation, testing, deployment, and maintenance. I have a particular passion for building robust backend systems, optimizing database performance, and integrating complex APIs to create seamless user experiences. At my most recent position with {PLACEHOLDER_PREVIOUS_COMPANY}, I led a team of five engineers in redesigning the core data processing pipeline, which resulted in a 40% improvement in throughput and a 25% reduction in operational costs. This project required deep knowledge of <text:span text:style-name="Strong_20_Emphasis">Python</text:span>, <text:span text:style-name="Strong_20_Emphasis">Java</text:span>, and cloud-native technologies, as well as strong cross-functional collaboration with product management and DevOps teams.</text:p>
      <text:h text:style-name="Heading_20_2" text:outline-level="2">Technical Skills and Core Competencies</text:h>
      <text:p text:style-name="Text_20_body">My technical toolkit is centered around modern programming languages and frameworks. I am highly proficient in <text:span text:style-name="Strong_20_Emphasis">Python</text:span> and <text:span text:style-name="Strong_20_Emphasis">Java</text:span>, which I have used extensively for backend development, data analysis, automation, and building microservices. I have hands-on experience with the following technologies and methodologies:</text:p>
      <text:list xml:id="list4294901159" text:style-name="L1">
        <text:list-item>
          <text:p text:style-name="P8"><text:span text:style-name="Strong_20_Emphasis">Languages:</text:span> Python, Java, JavaScript, TypeScript, SQL, C++, Go </text:p>
        </text:list-item>
        <text:list-item>
          <text:p text:style-name="P8"><text:span text:style-name="Strong_20_Emphasis">Frameworks &amp; Libraries:</text:span> Django, Flask, Spring Boot, React, Node.js, Pandas, NumPy </text:p>
        </text:list-item>
        <text:list-item>
          <text:p text:style-name="P8"><text:span text:style-name="Strong_20_Emphasis">Databases:</text:span> PostgreSQL, MySQL, MongoDB, Redis, Elasticsearch </text:p>
        </text:list-item>
        <text:list-item>
          <text:p text:style-name="P8"><text:span text:style-name="Strong_20_Emphasis">Cloud Platforms:</text:span> AWS (EC2, S3, Lambda, RDS), Azure, Google Cloud Platform </text:p>
        </text:list-item>
        <text:list-item>
          <text:p text:style-name="P8"><text:span text:style-name="Strong_20_Emphasis">DevOps &amp; Tools:</text:span> Docker, Kubernetes, Jenkins, Git, Terraform, Ansible </text:p>
        </text:list-item>
        <text:list-item>
          <text:p text:style-name="P8"><text:span text:style-name="Strong_20_Emphasis">Security Practices:</text:span> OWASP Top 10, secure code review, penetration testing fundamentals, encryption standards (AES, TLS) </text:p>
        </text:list-item>
        <text:list-item>
          <text:p text:style-name="P7"><text:span text:style-name="Strong_20_Emphasis">Methodologies:</text:span> Agile/Scrum, Test-Driven Development (TDD), CI/CD, Microservices Architecture </text:p>
        </text:list-item>
      </text:list>
      <text:p text:style-name="Text_20_body">I hold a <text:span text:style-name="Strong_20_Emphasis">Bachelor of Science in Computer Science</text:span> from {PLACEHOLDER_UNIVERSITY} and maintain several industry certifications, including the AWS Certified Solutions Architect and the Certified Secure Software Lifecycle Professional (CSSLP). My commitment to continuous learning ensures that I stay current with emerging technologies and best practices in software security and performance engineering.</text:p>
      <text:h text:style-name="Heading_20_2" text:outline-level="2">Relevant Professional Experience</text:h>
      <text:h text:style-name="Heading_20_3" text:outline-level="3">Senior Software Engineer | {PLACEHOLDER_PREVIOUS_COMPANY} | {PLACEHOLDER_START_DATE} – {PLACEHOLDER_END_DATE}</text:h>
      <text:list xml:id="list474369905" text:style-name="L2">
        <text:list-item>
          <text:p text:style-name="P10">Architected and implemented a distributed event-driven system using <text:span text:style-name="Strong_20_Emphasis">Python</text:span> (FastAPI) and Apache Kafka, processing over 10 million events per day with 99.99% uptime. </text:p>
        </text:list-item>
        <text:list-item>
          <text:p text:style-name="P10">Migrated legacy monolithic applications to a microservices architecture using <text:span text:style-name="Strong_20_Emphasis">Java</text:span> (Spring Boot) and Docker containers, reducing deployment time by 60%. </text:p>
        </text:list-item>
        <text:list-item>
          <text:p text:style-name="P10">Conducted rigorous code reviews and security audits for all production code, identifying and remediating critical vulnerabilities including SQL injection and cross-site scripting (XSS). </text:p>
        </text:list-item>
        <text:list-item>
          <text:p text:style-name="P10">Collaborated with data science teams to build machine learning pipelines in <text:span text:style-name="Strong_20_Emphasis">Python</text:span> (scikit-learn, TensorFlow) for predictive analytics, improving customer retention by 15%. </text:p>
        </text:list-item>
        <text:list-item>
          <text:p text:style-name="P9">Mentored junior developers through pair programming sessions and technical workshops, fostering a culture of knowledge sharing and engineering excellence. </text:p>
        </text:list-item>
      </text:list>
      <text:h text:style-name="Heading_20_3" text:outline-level="3">Software Developer | {PLACEHOLDER_PREVIOUS_COMPANY_2} | {PLACEHOLDER_START_DATE_2} – {PLACEHOLDER_END_DATE_2}</text:h>
      <text:list xml:id="list1918512140" text:style-name="L3">
        <text:list-item>
          <text:p text:style-name="P12">Developed RESTful APIs and backend services using <text:span text:style-name="Strong_20_Emphasis">Java</text:span> (Spring MVC) and Hibernate ORM, supporting a user base of over 500,000 active accounts. </text:p>
        </text:list-item>
        <text:list-item>
          <text:p text:style-name="P12">Designed and optimized complex SQL queries and database schemas in PostgreSQL, reducing average query response time by 35%. </text:p>
        </text:list-item>
        <text:list-item>
          <text:p text:style-name="P12">Implemented automated testing frameworks using JUnit and pytest, achieving 90% code coverage across all critical modules. </text:p>
        </text:list-item>
        <text:list-item>
          <text:p text:style-name="P11">Participated in on-call rotation for production incident response, ensuring rapid resolution of system outages and performance degradation. </text:p>
        </text:list-item>
      </text:list>
      <text:h text:style-name="Heading_20_2" text:outline-level="2">Why I Am a Strong Fit for This Role</text:h>
      <text:p text:style-name="Text_20_body">I have followed {PLACEHOLDER_COMPANY_NAME}'s trajectory with great interest, particularly your recent work in {PLACEHOLDER_COMPANY_PROJECT_OR_INITIATIVE}. The emphasis on security, scalability, and innovation resonates deeply with my own professional values and career aspirations. I am eager to bring my deep expertise in <text:span text:style-name="Strong_20_Emphasis">Python</text:span> and <text:span text:style-name="Strong_20_Emphasis">Java</text:span> to your engineering team, contributing to the development of secure, high-performance applications that drive business value.</text:p>
      <text:p text:style-name="Text_20_body">Beyond my technical qualifications, I pride myself on being a collaborative team player and a clear communicator. I understand the importance of translating complex technical concepts to non-technical stakeholders and working closely with product managers to deliver features that meet user needs. I am comfortable working in agile environments and am always looking for ways to improve team velocity and code quality through automation and best practices.</text:p>
      <text:p text:style-name="Text_20_body">I am excited about the opportunity to discuss how my background and skills can contribute to the continued success of {PLACEHOLDER_COMPANY_NAME}. Thank you for considering my application. I look forward to the possibility of speaking with you soon.</text:p>
      <text:p text:style-name="P13">Sincerely,</text:p>
      <text:p text:style-name="P14"><text:span text:style-name="Strong_20_Emphasis">{PLACEHOLDER_FULL_NAME}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  <table:table-row>
          <table:table-cell table:style-name="Table1.A1" office:value-type="string">
            <text:p text:style-name="Table_20_Contents">Python</text:p>
          </table:table-cell>
          <table:table-cell table:style-name="Table1.A1" office:value-type="string">
            <text:p text:style-name="Table_20_Contents">Jav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874in" fo:margin-right="0.7874in" fo:margin-top="0.7874in" fo:margin-bottom="0.7874in" style:contextual-spacing="false" fo:line-height="114%" fo:text-indent="0in" style:auto-text-indent="false"/>
      <style:text-properties fo:color="#000000" loext:opacity="100%" style:font-name="Calibri" fo:font-family="Calibri, Arial, sans-serif" fo:font-size="11pt" style:font-name-asian="Calibri" style:font-family-asian="Calibri, Arial, sans-serif" style:font-size-asian="11pt" style:font-name-complex="Calibri" style:font-family-complex="Calibri, Arial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text-properties fo:color="#ffffff" loext:opacity="100%" fo:font-size="1pt" style:font-size-asian="1pt" style:font-size-complex="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 fo:text-align="center" style:justify-single-word="false"/>
      <style:text-properties style:font-name="Liberation Sans Unicode MS" fo:font-family="'Liberation Sans Unicode MS'" style:font-pitch="variable" fo:font-size="18pt" fo:font-weight="bold" style:font-size-asian="18pt" style:font-weight-asian="bold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11in" style:contextual-spacing="false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5in" fo:margin-bottom="0.0835in" style:contextual-spacing="false" fo:padding-left="0in" fo:padding-right="0in" fo:padding-top="0in" fo:padding-bottom="0.0193in" fo:border-left="none" fo:border-right="none" fo:border-top="none" fo:border-bottom="0.06pt solid #333333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665in" fo:margin-bottom="0.055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image-count="0" meta:object-count="0" meta:page-count="1" meta:paragraph-count="143" meta:word-count="863" meta:character-count="6405" meta:non-whitespace-character-count="5683"/>
    <meta:generator>LibreOffice/7.3.7.2$Linux_X86_64 LibreOffice_project/30$Build-2</meta:generator>
  </office:meta>
</office:document-meta>
</file>