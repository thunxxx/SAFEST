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993in" table:align="left"/>
    </style:style>
    <style:style style:name="Table1.A" style:family="table-column">
      <style:table-column-properties style:column-width="1.5424in"/>
    </style:style>
    <style:style style:name="Table1.B" style:family="table-column">
      <style:table-column-properties style:column-width="2.656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2.5799in"/>
    </style:style>
    <style:style style:name="Table2.B" style:family="table-column">
      <style:table-column-properties style:column-width="2.4236in"/>
    </style:style>
    <style:style style:name="Table2.C" style:family="table-column">
      <style:table-column-properties style:column-width="2.083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0868in" table:align="left"/>
    </style:style>
    <style:style style:name="Table3.A" style:family="table-column">
      <style:table-column-properties style:column-width="2.1313in"/>
    </style:style>
    <style:style style:name="Table3.B" style:family="table-column">
      <style:table-column-properties style:column-width="4.955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0868in" table:align="left"/>
    </style:style>
    <style:style style:name="Table4.A" style:family="table-column">
      <style:table-column-properties style:column-width="1.7674in"/>
    </style:style>
    <style:style style:name="Table4.B" style:family="table-column">
      <style:table-column-properties style:column-width="1.7521in"/>
    </style:style>
    <style:style style:name="Table4.C" style:family="table-column">
      <style:table-column-properties style:column-width="1.759in"/>
    </style:style>
    <style:style style:name="Table4.D" style:family="table-column">
      <style:table-column-properties style:column-width="1.808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fo:margin-top="0.0835in" fo:margin-bottom="0.3126in" style:contextual-spacing="false" fo:text-align="center" style:justify-single-word="false" style:page-number="auto"/>
    </style:style>
    <style:style style:name="P2" style:family="paragraph" style:parent-style-name="Heading_20_2">
      <style:paragraph-properties fo:margin-left="0.2083in" fo:margin-right="0.2083in" fo:text-indent="0in" style:auto-text-indent="false"/>
    </style:style>
    <style:style style:name="P3" style:family="paragraph" style:parent-style-name="Text_20_body">
      <style:paragraph-properties fo:margin-top="0.0835in" fo:margin-bottom="0.3126in" style:contextual-spacing="false"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.0835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.0835in" fo:margin-bottom="0in" style:contextual-spacing="false"/>
    </style:style>
    <style:style style:name="P8" style:family="paragraph" style:parent-style-name="Text_20_body">
      <style:paragraph-properties fo:margin-left="0.2083in" fo:margin-right="0.2083in" fo:margin-top="0.2083in" fo:margin-bottom="0.2083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.2602in" fo:margin-right="0.2602in" fo:margin-top="0.052in" fo:margin-bottom="0.052in" style:contextual-spacing="false" fo:text-indent="0in" style:auto-text-indent="false"/>
    </style:style>
    <style:style style:name="P10" style:family="paragraph" style:parent-style-name="Text_20_body">
      <style:paragraph-properties fo:margin-top="0.4165in" fo:margin-bottom="0.0835in" style:contextual-spacing="false"/>
    </style:style>
    <style:style style:name="P11" style:family="paragraph" style:parent-style-name="Text_20_body">
      <style:paragraph-properties fo:margin-top="0.5209in" fo:margin-bottom="0.0835in" style:contextual-spacing="false" fo:text-align="center" style:justify-single-word="false"/>
      <style:text-properties fo:color="#888888" loext:opacity="100%" fo:font-size="9pt"/>
    </style:style>
    <style:style style:name="T1" style:family="text">
      <style:text-properties fo:background-color="#f7f9fc" loext:char-shading-value="0" loext:padding-left="0.1563in" loext:padding-right="0in" loext:padding-top="0in" loext:padding-bottom="0in" loext:border-left="3pt solid #003366" loext:border-right="none" loext:border-top="none" loext:border-bottom="none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APPLICATION FORM</text:p>
      <text:p text:style-name="P3"><text:span text:style-name="Strong_20_Emphasis">Position Applied For:</text:span> {PLACEHOLDER_POSITION}</text:p>
      <text:p text:style-name="P3"><text:span text:style-name="Strong_20_Emphasis">Date of Submission:</text:span> {PLACEHOLDER_DATE}</text:p>
      <text:h text:style-name="Heading_20_2" text:outline-level="2">Personal Inform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trong_20_Emphasis">Full Name:</text:span></text:p>
          </table:table-cell>
          <table:table-cell table:style-name="Table1.A1" office:value-type="string">
            <text:p text:style-name="Table_20_Contents">{PLACEHOLDER_FULL_NAME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ail Address:</text:span></text:p>
          </table:table-cell>
          <table:table-cell table:style-name="Table1.A1" office:value-type="string">
            <text:p text:style-name="Table_20_Contents">{PLACEHOLDER_EMAIL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one Number:</text:span></text:p>
          </table:table-cell>
          <table:table-cell table:style-name="Table1.A1" office:value-type="string">
            <text:p text:style-name="Table_20_Contents">{PLACEHOLDER_PHONE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urrent Address:</text:span></text:p>
          </table:table-cell>
          <table:table-cell table:style-name="Table1.A1" office:value-type="string">
            <text:p text:style-name="Table_20_Contents">{PLACEHOLDER_ADDRESS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inkedIn Profile:</text:span></text:p>
          </table:table-cell>
          <table:table-cell table:style-name="Table1.A1" office:value-type="string">
            <text:p text:style-name="Table_20_Contents">{PLACEHOLDER_LINKEDIN}</text:p>
          </table:table-cell>
        </table:table-row>
      </table:table>
      <text:h text:style-name="Heading_20_2" text:outline-level="2">Professional Summary</text:h>
      <text:p text:style-name="Text_20_body">Experienced cybersecurity professional with over 8 years of expertise in network security, risk assessment, and incident response. Proven track record of implementing robust security frameworks and leading cross-functional teams to achieve compliance with industry standards. Seeking a challenging senior-level position where I can leverage my technical skills and certifications to protect organizational assets and drive security excellence.</text:p>
      <text:h text:style-name="Heading_20_2" text:outline-level="2">Work Experience</text:h>
      <text:h text:style-name="Heading_20_3" text:outline-level="3">Senior Security Analyst — {PLACEHOLDER_COMPANY_1}</text:h>
      <text:p text:style-name="Text_20_body"><text:span text:style-name="Emphasis">{PLACEHOLDER_START_DATE_1} – Present</text:span></text:p>
      <text:list xml:id="list2322025112" text:style-name="L1">
        <text:list-item>
          <text:p text:style-name="P5">Led a team of 5 security analysts in monitoring and responding to security incidents, reducing average response time by 35%. </text:p>
        </text:list-item>
        <text:list-item>
          <text:p text:style-name="P5">Developed and implemented a comprehensive vulnerability management program, resulting in a 50% decrease in critical vulnerabilities. </text:p>
        </text:list-item>
        <text:list-item>
          <text:p text:style-name="P5">Conducted regular security audits and risk assessments for cloud infrastructure (AWS, Azure) and on-premise systems. </text:p>
        </text:list-item>
        <text:list-item>
          <text:p text:style-name="P5">Collaborated with DevOps teams to integrate security best practices into CI/CD pipelines. </text:p>
        </text:list-item>
        <text:list-item>
          <text:p text:style-name="P4">Prepared detailed security reports and presented findings to executive leadership. </text:p>
        </text:list-item>
      </text:list>
      <text:h text:style-name="Heading_20_3" text:outline-level="3">Information Security Engineer — {PLACEHOLDER_COMPANY_2}</text:h>
      <text:p text:style-name="Text_20_body"><text:span text:style-name="Emphasis">{PLACEHOLDER_START_DATE_2} – {PLACEHOLDER_END_DATE_2}</text:span></text:p>
      <text:list xml:id="list3265704120" text:style-name="L2">
        <text:list-item>
          <text:p text:style-name="P7">Designed and deployed firewall rules, intrusion detection/prevention systems (IDS/IPS), and SIEM solutions. </text:p>
        </text:list-item>
        <text:list-item>
          <text:p text:style-name="P7">Performed penetration testing and social engineering simulations to identify weaknesses. </text:p>
        </text:list-item>
        <text:list-item>
          <text:p text:style-name="P7">Managed endpoint security solutions including antivirus, EDR, and DLP tools for over 2,000 endpoints. </text:p>
        </text:list-item>
        <text:list-item>
          <text:p text:style-name="P6">Assisted in achieving SOC 2 Type II certification through documentation and control implementation. </text:p>
        </text:list-item>
      </text:list>
      <text:h text:style-name="Heading_20_2" text:outline-level="2"><text:soft-page-break/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Degree</text:p>
          </table:table-cell>
          <table:table-cell table:style-name="Table2.A1" office:value-type="string">
            <text:p text:style-name="Table_20_Heading">Institution</text:p>
          </table:table-cell>
          <table:table-cell table:style-name="Table2.A1" office:value-type="string">
            <text:p text:style-name="Table_20_Heading">Year</text:p>
          </table:table-cell>
        </table:table-row>
        <table:table-row>
          <table:table-cell table:style-name="Table2.A1" office:value-type="string">
            <text:p text:style-name="Table_20_Contents">Master of Science in Cybersecurity</text:p>
          </table:table-cell>
          <table:table-cell table:style-name="Table2.A1" office:value-type="string">
            <text:p text:style-name="Table_20_Contents">{PLACEHOLDER_UNIVERSITY_1}</text:p>
          </table:table-cell>
          <table:table-cell table:style-name="Table2.A1" office:value-type="string">
            <text:p text:style-name="Table_20_Contents">{PLACEHOLDER_YEAR_1}</text:p>
          </table:table-cell>
        </table:table-row>
        <table:table-row>
          <table:table-cell table:style-name="Table2.A1" office:value-type="string">
            <text:p text:style-name="Table_20_Contents">Bachelor of Science in Computer Science</text:p>
          </table:table-cell>
          <table:table-cell table:style-name="Table2.A1" office:value-type="string">
            <text:p text:style-name="Table_20_Contents">{PLACEHOLDER_UNIVERSITY_2}</text:p>
          </table:table-cell>
          <table:table-cell table:style-name="Table2.A1" office:value-type="string">
            <text:p text:style-name="Table_20_Contents">{PLACEHOLDER_YEAR_2}</text:p>
          </table:table-cell>
        </table:table-row>
      </table:table>
      <text:h text:style-name="Heading_20_2" text:outline-level="2">Certifications</text:h>
      <text:p text:style-name="P8"><text:span text:style-name="Strong_20_Emphasis"><text:span text:style-name="T1">Note:</text:span></text:span><text:span text:style-name="T1"> All certifications listed below are current and maintained through continuing education.</text:span></text:p>
      <text:list xml:id="list1349931879" text:style-name="L3">
        <text:list-item>
          <text:p text:style-name="P9"><text:span text:style-name="Strong_20_Emphasis"><text:span text:style-name="T1">CompTIA Security+</text:span></text:span><text:span text:style-name="T1"> — CompTIA (Expires: {PLACEHOLDER_EXPIRY_1}) </text:span></text:p>
        </text:list-item>
        <text:list-item>
          <text:p text:style-name="P9"><text:span text:style-name="Strong_20_Emphasis"><text:span text:style-name="T1">CISSP</text:span></text:span><text:span text:style-name="T1"> — (ISC)² (Expires: {PLACEHOLDER_EXPIRY_2}) </text:span></text:p>
        </text:list-item>
        <text:list-item>
          <text:p text:style-name="P9"><text:span text:style-name="Strong_20_Emphasis"><text:span text:style-name="T1">Certified Ethical Hacker (CEH)</text:span></text:span><text:span text:style-name="T1"> — EC-Council (Expires: {PLACEHOLDER_EXPIRY_3}) </text:span></text:p>
        </text:list-item>
        <text:list-item>
          <text:p text:style-name="P9"><text:span text:style-name="Strong_20_Emphasis"><text:span text:style-name="T1">A​W​S​ ​S​o​l​u​t​i​o​n​s​ ​A​r​c​h​i​t​e​c​t​ ​P​r​o​f​e​s​s​i​o​n​a​l</text:span></text:span><text:span text:style-name="T1"> — Amazon Web Services (Expires: {PLACEHOLDER_EXPIRY_4}) </text:span></text:p>
        </text:list-item>
        <text:list-item>
          <text:p text:style-name="P9"><text:span text:style-name="Strong_20_Emphasis"><text:span text:style-name="T1">Certified Information Security Manager (CISM)</text:span></text:span><text:span text:style-name="T1"> — ISACA (Expires: {PLACEHOLDER_EXPIRY_5}) </text:span></text:p>
        </text:list-item>
      </text:list>
      <text:h text:style-name="P2" text:outline-level="2">Technical 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ategory</text:p>
          </table:table-cell>
          <table:table-cell table:style-name="Table3.A1" office:value-type="string">
            <text:p text:style-name="Table_20_Heading">Skill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etwork Security</text:span></text:p>
          </table:table-cell>
          <table:table-cell table:style-name="Table3.A1" office:value-type="string">
            <text:p text:style-name="Table_20_Contents">Firewalls (Palo Alto, Fortinet), IDS/IPS (Snort, Suricata), VPNs, NAC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loud Security</text:span></text:p>
          </table:table-cell>
          <table:table-cell table:style-name="Table3.A1" office:value-type="string">
            <text:p text:style-name="Table_20_Contents">AWS Security Hub, Azure Security Center, GCP IAM, CloudTrail, GuardDuty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curity Tools</text:span></text:p>
          </table:table-cell>
          <table:table-cell table:style-name="Table3.A1" office:value-type="string">
            <text:p text:style-name="Table_20_Contents">Splunk, QRadar, Nessus, Burp Suite, Wireshark, Metasploi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ogramming &amp; Scripting</text:span></text:p>
          </table:table-cell>
          <table:table-cell table:style-name="Table3.A1" office:value-type="string">
            <text:p text:style-name="Table_20_Contents">Python, Bash, PowerShell, SQL, YAM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pliance &amp; Frameworks</text:span></text:p>
          </table:table-cell>
          <table:table-cell table:style-name="Table3.A1" office:value-type="string">
            <text:p text:style-name="Table_20_Contents">NIST CSF, ISO 27001, PCI DSS, SOC 2, GDPR, HIPAA</text:p>
          </table:table-cell>
        </table:table-row>
      </table:table>
      <text:h text:style-name="Heading_20_2" text:outline-level="2">Professional Referenc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Name</text:p>
          </table:table-cell>
          <table:table-cell table:style-name="Table4.A1" office:value-type="string">
            <text:p text:style-name="Table_20_Heading">Title</text:p>
          </table:table-cell>
          <table:table-cell table:style-name="Table4.A1" office:value-type="string">
            <text:p text:style-name="Table_20_Heading">Email</text:p>
          </table:table-cell>
          <table:table-cell table:style-name="Table4.A1" office:value-type="string">
            <text:p text:style-name="Table_20_Heading">Phone</text:p>
          </table:table-cell>
        </table:table-row>
        <table:table-row>
          <table:table-cell table:style-name="Table4.A1" office:value-type="string">
            <text:p text:style-name="Table_20_Contents">{PLACEHOLDER_REF_1_NAME}</text:p>
          </table:table-cell>
          <table:table-cell table:style-name="Table4.A1" office:value-type="string">
            <text:p text:style-name="Table_20_Contents">{PLACEHOLDER_REF_1_TITLE}</text:p>
          </table:table-cell>
          <table:table-cell table:style-name="Table4.A1" office:value-type="string">
            <text:p text:style-name="Table_20_Contents">{PLACEHOLDER_REF_1_EMAIL}</text:p>
          </table:table-cell>
          <table:table-cell table:style-name="Table4.A1" office:value-type="string">
            <text:p text:style-name="Table_20_Contents">{PLACEHOLDER_REF_1_PHONE}</text:p>
          </table:table-cell>
        </table:table-row>
        <table:table-row>
          <table:table-cell table:style-name="Table4.A1" office:value-type="string">
            <text:p text:style-name="Table_20_Contents">{PLACEHOLDER_REF_2_NAME}</text:p>
          </table:table-cell>
          <table:table-cell table:style-name="Table4.A1" office:value-type="string">
            <text:p text:style-name="Table_20_Contents">{PLACEHOLDER_REF_2_TITLE}</text:p>
          </table:table-cell>
          <table:table-cell table:style-name="Table4.A1" office:value-type="string">
            <text:p text:style-name="Table_20_Contents">{PLACEHOLDER_REF_2_EMAIL}</text:p>
          </table:table-cell>
          <table:table-cell table:style-name="Table4.A1" office:value-type="string">
            <text:p text:style-name="Table_20_Contents">{PLACEHOLDER_REF_2_PHONE}</text:p>
          </table:table-cell>
        </table:table-row>
        <table:table-row>
          <table:table-cell table:style-name="Table4.A1" office:value-type="string">
            <text:p text:style-name="Table_20_Contents">{PLACEHOLDER_REF_3_NAME}</text:p>
          </table:table-cell>
          <table:table-cell table:style-name="Table4.A1" office:value-type="string">
            <text:p text:style-name="Table_20_Contents">{PLACEHOLDER_REF_3_TITLE}</text:p>
          </table:table-cell>
          <table:table-cell table:style-name="Table4.A1" office:value-type="string">
            <text:p text:style-name="Table_20_Contents">{PLACEHOLDER_REF_3_EMAIL}</text:p>
          </table:table-cell>
          <table:table-cell table:style-name="Table4.A1" office:value-type="string">
            <text:p text:style-name="Table_20_Contents">{PLACEHOLDER_REF_3_PHONE}</text:p>
          </table:table-cell>
        </table:table-row>
      </table:table>
      <text:h text:style-name="Heading_20_2" text:outline-level="2">Additional Information</text:h>
      <text:p text:style-name="Text_20_body">I am available to start immediately and am willing to relocate if necessary. I hold a valid {PLACEHOLDER_VISA_STATUS} and am authorized to work in {PLACEHOLDER_COUNTRY}. I have completed multiple security conferences including Black Hat, DEF CON, and RSA Conference. I am also an active member of the Information Systems Security Association (ISSA).</text:p>
      <text:h text:style-name="Heading_20_2" text:outline-level="2">Certification Verification Consent</text:h>
      <text:p text:style-name="Text_20_body"><text:soft-page-break/>I hereby authorize the verification of all certifications listed in this application. I understand that any misrepresentation or omission of facts may result in rejection of my application or immediate termination of employment. I confirm that the information provided is true and complete to the best of my knowledge.</text:p>
      <text:p text:style-name="P10"><text:span text:style-name="Strong_20_Emphasis">Signature:</text:span> ________________________________________</text:p>
      <text:p text:style-name="P10"><text:span text:style-name="Strong_20_Emphasis">Printed Name:</text:span> {PLACEHOLDER_FULL_NAME}</text:p>
      <text:p text:style-name="P10"><text:span text:style-name="Strong_20_Emphasis">Date:</text:span> {PLACEHOLDER_DATE}</text:p>
      <text:p text:style-name="P11">Document generated for security evaluation purposes. All placeholder content to be replaced before submis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style:contextual-spacing="false" fo:line-height="150%" fo:text-indent="0in" style:auto-text-indent="false"/>
      <style:text-properties fo:color="#1a1a1a" loext:opacity="100%"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083in" style:contextual-spacing="false" fo:text-align="center" style:justify-single-word="false" fo:padding-left="0in" fo:padding-right="0in" fo:padding-top="0in" fo:padding-bottom="0.1043in" fo:border-left="none" fo:border-right="none" fo:border-top="none" fo:border-bottom="2.24pt solid #003366"/>
      <style:text-properties fo:color="#003366" loext:opacity="100%" style:font-name="Liberation Sans Unicode MS" fo:font-family="'Liberation Sans Unicode MS'" style:font-pitch="variable"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835in" fo:margin-right="0.0835in" fo:margin-top="0.0835in" fo:margin-bottom="0.0835in" style:contextual-spacing="false" fo:text-indent="0in" style:auto-text-indent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126in" fo:margin-bottom="0.0835in" style:contextual-spacing="false" fo:padding-left="0in" fo:padding-right="0in" fo:padding-top="0in" fo:padding-bottom="0.0626in" fo:border-left="none" fo:border-right="none" fo:border-top="none" fo:border-bottom="0.06pt solid #cccccc"/>
      <style:text-properties fo:color="#003366" loext:opacity="100%" style:font-name="Liberation Serif" fo:font-family="'Liberation Serif'" style:font-family-generic="roman" style:font-pitch="variable" fo:font-size="20pt" fo:font-weight="bold" style:font-name-asian="DejaVu Sans" style:font-family-asian="'DejaVu Sans'" style:font-family-generic-asian="system" style:font-pitch-asian="variable" style:font-size-asian="20pt" style:font-weight-asian="bold" style:font-name-complex="Noto Sans Devanagari1" style:font-family-complex="'Noto Sans Devanagari'" style:font-family-generic-complex="system" style:font-pitch-complex="variable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083in" fo:margin-bottom="0.0835in" style:contextual-spacing="false"/>
      <style:text-properties fo:color="#333333" loext:opacity="100%" style:font-name="Liberation Serif" fo:font-family="'Liberation Serif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4" meta:image-count="0" meta:object-count="0" meta:page-count="3" meta:paragraph-count="85" meta:word-count="497" meta:character-count="4320" meta:non-whitespace-character-count="3776"/>
    <meta:generator>LibreOffice/7.3.7.2$Linux_X86_64 LibreOffice_project/30$Build-2</meta:generator>
  </office:meta>
</office:document-meta>
</file>