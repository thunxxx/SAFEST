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1271in" table:align="left"/>
    </style:style>
    <style:style style:name="Table1.A" style:family="table-column">
      <style:table-column-properties style:column-width="2.1569in"/>
    </style:style>
    <style:style style:name="Table1.B" style:family="table-column">
      <style:table-column-properties style:column-width="2.5319in"/>
    </style:style>
    <style:style style:name="Table1.C" style:family="table-column">
      <style:table-column-properties style:column-width="0.43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>
      <style:paragraph-properties fo:margin-top="0in" fo:margin-bottom="0.1665in" style:contextual-spacing="false" fo:text-align="center" style:justify-single-word="false"/>
      <style:text-properties fo:color="#444444" loext:opacity="100%" fo:font-size="10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>
      <style:text-properties fo:color="#ffffff" loext:opacity="100%" fo:background-color="#ffffff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>
      <style:paragraph-properties fo:margin-top="0.4165in" fo:margin-bottom="0.1965in" style:contextual-spacing="false" fo:text-align="center" style:justify-single-word="false"/>
      <style:text-properties fo:color="#888888" loext:opacity="100%" fo:font-size="9pt" loext:padding-left="0in" loext:padding-right="0in" loext:padding-top="0.111in" loext:padding-bottom="0in" loext:border-left="none" loext:border-right="none" loext:border-top="0.06pt solid #cccccc" loext:border-bottom="none"/>
    </style:style>
    <style:style style:name="T1" style:family="text">
      <style:text-properties fo:color="#555555" loext:opacity="100%" fo:font-size="10p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PLACEHOLDER_NAME}</text:p>
      <text:p text:style-name="P2">{PLACEHOLDER_EMAIL} | {PLACEHOLDER_PHONE} | {PLACEHOLDER_LOCATION}<text:line-break/>LinkedIn: {PLACEHOLDER_LINKEDIN} | GitHub: {PLACEHOLDER_GITHUB} </text:p>
      <text:h text:style-name="Heading_20_2" text:outline-level="2">Professional Summary</text:h>
      <text:p text:style-name="Text_20_body">Results-driven Cloud Infrastructure Engineer with over 8 years of experience designing, deploying, and managing scalable containerized environments. Expert in Kubernetes orchestration, CI/CD pipeline automation, and cloud-native application architecture. Proven track record of reducing deployment times by 60% and improving system reliability through proactive monitoring and infrastructure-as-code practices. Passionate about mentoring teams and driving adoption of DevOps best practices.</text:p>
      <text:h text:style-name="Heading_20_2" text:outline-level="2">Skills</text:h>
      <text:p text:style-name="Text_20_Body.skill-category">Cloud Platforms &amp; Infrastructure</text:p>
      <text:list xml:id="list1595463007" text:style-name="L1">
        <text:list-item>
          <text:p text:style-name="P4">AWS (EC2, EKS, S3, RDS, Lambda, CloudFormation) </text:p>
        </text:list-item>
        <text:list-item>
          <text:p text:style-name="P4">Google Cloud Platform (GKE, Cloud Run, Pub/Sub) </text:p>
        </text:list-item>
        <text:list-item>
          <text:p text:style-name="P4">Azure (AKS, DevOps, ARM Templates) </text:p>
        </text:list-item>
        <text:list-item>
          <text:p text:style-name="P3">Terraform &amp; Ansible for Infrastructure as Code </text:p>
        </text:list-item>
      </text:list>
      <text:p text:style-name="Text_20_Body.skill-category">Containerization &amp; Orchestration</text:p>
      <text:list xml:id="list3969122515" text:style-name="L2">
        <text:list-item>
          <text:p text:style-name="P6">Docker (multi-stage builds, Docker Compose, registry management) </text:p>
        </text:list-item>
        <text:list-item>
          <text:p text:style-name="P6">Kubernetes (cluster administration, Helm charts, service mesh) </text:p>
        </text:list-item>
        <text:list-item>
          <text:p text:style-name="P6">OpenShift &amp; Rancher </text:p>
        </text:list-item>
        <text:list-item>
          <text:p text:style-name="P5">Certified Kubernetes Administrator (CKA) </text:p>
        </text:list-item>
      </text:list>
      <text:p text:style-name="Text_20_Body.skill-category">CI/CD &amp; Automation</text:p>
      <text:list xml:id="list1382369653" text:style-name="L3">
        <text:list-item>
          <text:p text:style-name="P8">Jenkins, GitLab CI, GitHub Actions </text:p>
        </text:list-item>
        <text:list-item>
          <text:p text:style-name="P8">ArgoCD &amp; Flux for GitOps workflows </text:p>
        </text:list-item>
        <text:list-item>
          <text:p text:style-name="P7">SonarQube, Selenium, and Test Automation </text:p>
        </text:list-item>
      </text:list>
      <text:p text:style-name="Text_20_Body.skill-category">Programming &amp; Scripting</text:p>
      <text:list xml:id="list3077380662" text:style-name="L4">
        <text:list-item>
          <text:p text:style-name="P10">Python (Flask, FastAPI, boto3) </text:p>
        </text:list-item>
        <text:list-item>
          <text:p text:style-name="P10">Bash, PowerShell </text:p>
        </text:list-item>
        <text:list-item>
          <text:p text:style-name="P9">Go (basic CLI tools) </text:p>
        </text:list-item>
      </text:list>
      <text:p text:style-name="Text_20_Body.skill-category">Monitoring &amp; Observability</text:p>
      <text:list xml:id="list1037435245" text:style-name="L5">
        <text:list-item>
          <text:p text:style-name="P12">Prometheus, Grafana, Loki </text:p>
        </text:list-item>
        <text:list-item>
          <text:p text:style-name="P12"><text:soft-page-break/>ELK Stack (Elasticsearch, Logstash, Kibana) </text:p>
        </text:list-item>
        <text:list-item>
          <text:p text:style-name="P11">Datadog, New Relic </text:p>
        </text:list-item>
      </text:list>
      <text:p text:style-name="P13">Certified Kubernetes Administrator (CKA)</text:p>
      <text:h text:style-name="Heading_20_2" text:outline-level="2">Professional Experience</text:h>
      <text:h text:style-name="Heading_20_3" text:outline-level="3">Senior Cloud Infrastructure Engineer <text:span text:style-name="T1">Jan 2021 – Present</text:span></text:h>
      <text:p text:style-name="Text_20_body"><text:span text:style-name="Emphasis">{PLACEHOLDER_COMPANY_1} – San Francisco, CA</text:span></text:p>
      <text:list xml:id="list4265798680" text:style-name="L6">
        <text:list-item>
          <text:p text:style-name="P15">Architected and migrated 50+ microservices from monolithic deployments to Kubernetes on AWS EKS, reducing infrastructure costs by 35% and improving resource utilization. </text:p>
        </text:list-item>
        <text:list-item>
          <text:p text:style-name="P15">Designed and implemented a GitOps workflow using ArgoCD and Helm, enabling zero-downtime deployments and rollback capabilities across 3 production clusters. </text:p>
        </text:list-item>
        <text:list-item>
          <text:p text:style-name="P15">Developed custom Kubernetes operators for automated certificate management and database backup scheduling, handling 200+ workloads. </text:p>
        </text:list-item>
        <text:list-item>
          <text:p text:style-name="P15">Led a team of 5 engineers in adopting Infrastructure as Code with Terraform, achieving 99.9% environment consistency across dev, staging, and production. </text:p>
        </text:list-item>
        <text:list-item>
          <text:p text:style-name="P14">Implemented Prometheus and Grafana monitoring stack with custom alerting rules, reducing mean time to detection (MTTD) of incidents by 45%. </text:p>
        </text:list-item>
      </text:list>
      <text:h text:style-name="Heading_20_3" text:outline-level="3">DevOps Engineer <text:span text:style-name="T1">Mar 2018 – Dec 2020</text:span></text:h>
      <text:p text:style-name="Text_20_body"><text:span text:style-name="Emphasis">{PLACEHOLDER_COMPANY_2} – Austin, TX</text:span></text:p>
      <text:list xml:id="list111177160" text:style-name="L7">
        <text:list-item>
          <text:p text:style-name="P17">Managed a multi-cluster Kubernetes environment spanning 4 data centers, supporting 150+ internal developers and 30 production services. </text:p>
        </text:list-item>
        <text:list-item>
          <text:p text:style-name="P17">Automated CI/CD pipelines using Jenkins and GitLab CI, reducing deployment lead time from 2 days to 4 hours. </text:p>
        </text:list-item>
        <text:list-item>
          <text:p text:style-name="P17">Containerized legacy Java and Python applications using Docker, achieving a 50% reduction in environment setup time. </text:p>
        </text:list-item>
        <text:list-item>
          <text:p text:style-name="P17">Wrote Python automation scripts for AWS resource cleanup and cost optimization, saving $12,000/month in unused resources. </text:p>
        </text:list-item>
        <text:list-item>
          <text:p text:style-name="P16">Conducted internal training sessions on Kubernetes fundamentals and Docker best practices for 40+ engineers. </text:p>
        </text:list-item>
      </text:list>
      <text:h text:style-name="Heading_20_3" text:outline-level="3">Systems Administrator <text:span text:style-name="T1">Jun 2015 – Feb 2018</text:span></text:h>
      <text:p text:style-name="Text_20_body"><text:span text:style-name="Emphasis">{PLACEHOLDER_COMPANY_3} – Denver, CO</text:span></text:p>
      <text:list xml:id="list717230046" text:style-name="L8">
        <text:list-item>
          <text:p text:style-name="P19">Administered Linux servers (RHEL, CentOS) for a mid-size SaaS company, ensuring 99.95% uptime for customer-facing applications. </text:p>
        </text:list-item>
        <text:list-item>
          <text:p text:style-name="P19">Implemented centralized logging with ELK stack and automated log rotation, reducing storage costs by 30%. </text:p>
        </text:list-item>
        <text:list-item>
          <text:p text:style-name="P19">Developed Bash scripts for automated patching and configuration management, covering 120+ servers. </text:p>
        </text:list-item>
        <text:list-item>
          <text:p text:style-name="P18">Assisted in the migration of on-premise infrastructure to AWS, including EC2, VPC, and RDS setup. </text:p>
        </text:list-item>
      </text:list>
      <text:h text:style-name="Heading_20_2" text:outline-level="2">Education</text:h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Table_20_Heading">Degree</text:p>
          </table:table-cell>
          <table:table-cell table:style-name="Table1.A1" office:value-type="string">
            <text:p text:style-name="Table_20_Heading">Institution</text:p>
          </table:table-cell>
          <table:table-cell table:style-name="Table1.A1" office:value-type="string">
            <text:p text:style-name="Table_20_Heading">Year</text:p>
          </table:table-cell>
        </table:table-row>
        <table:table-row>
          <table:table-cell table:style-name="Table1.A1" office:value-type="string">
            <text:p text:style-name="Table_20_Contents">M.S. in Computer Science</text:p>
          </table:table-cell>
          <table:table-cell table:style-name="Table1.A1" office:value-type="string">
            <text:p text:style-name="Table_20_Contents">{PLACEHOLDER_UNIVERSITY_1}</text:p>
          </table:table-cell>
          <table:table-cell table:style-name="Table1.A1" office:value-type="string">
            <text:p text:style-name="Table_20_Contents">2015</text:p>
          </table:table-cell>
        </table:table-row>
        <table:table-row>
          <table:table-cell table:style-name="Table1.A1" office:value-type="string">
            <text:p text:style-name="Table_20_Contents">B.S. in Information Technology</text:p>
          </table:table-cell>
          <table:table-cell table:style-name="Table1.A1" office:value-type="string">
            <text:p text:style-name="Table_20_Contents">{PLACEHOLDER_UNIVERSITY_2}</text:p>
          </table:table-cell>
          <table:table-cell table:style-name="Table1.A1" office:value-type="string">
            <text:p text:style-name="Table_20_Contents">2013</text:p>
          </table:table-cell>
        </table:table-row>
      </table:table>
      <text:h text:style-name="Heading_20_2" text:outline-level="2">Certifications</text:h>
      <text:list xml:id="list794847304" text:style-name="L9">
        <text:list-item>
          <text:p text:style-name="P21"><text:span text:style-name="Strong_20_Emphasis">Certified Kubernetes Administrator (CKA)</text:span> – Cloud Native Computing Foundation, 2022 </text:p>
        </text:list-item>
        <text:list-item>
          <text:p text:style-name="P21"><text:span text:style-name="Strong_20_Emphasis">AWS Certified Solutions Architect – Associate</text:span> – Amazon Web Services, 2021 </text:p>
        </text:list-item>
        <text:list-item>
          <text:p text:style-name="P21"><text:span text:style-name="Strong_20_Emphasis">HashiCorp Certified: Terraform Associate</text:span> – HashiCorp, 2023 </text:p>
        </text:list-item>
        <text:list-item>
          <text:p text:style-name="P20"><text:span text:style-name="Strong_20_Emphasis">Certified Jenkins Engineer</text:span> – CloudBees, 2020 </text:p>
        </text:list-item>
      </text:list>
      <text:h text:style-name="Heading_20_2" text:outline-level="2">Key Projects</text:h>
      <text:h text:style-name="Heading_20_3" text:outline-level="3">Kubernetes Cluster Autoscaler Optimization <text:span text:style-name="T1">2023</text:span></text:h>
      <text:p text:style-name="Text_20_body">Optimized the Cluster Autoscaler configuration for an EKS environment handling variable traffic patterns. Implemented custom priority-based scaling policies and pod disruption budgets, resulting in 25% faster scale-up times and 15% cost reduction during off-peak hours.</text:p>
      <text:h text:style-name="Heading_20_3" text:outline-level="3">Internal Developer Platform (IDP) <text:span text:style-name="T1">2022</text:span></text:h>
      <text:p text:style-name="Text_20_body">Designed and deployed a Backstage-based internal developer portal with integrated Kubernetes resource management, CI/CD triggers, and documentation. Adopted by 80+ developers within the first quarter, reducing onboarding time for new services by 60%.</text:p>
      <text:h text:style-name="Heading_20_2" text:outline-level="2">Languages</text:h>
      <text:list xml:id="list33662389" text:style-name="L10">
        <text:list-item>
          <text:p text:style-name="P23">English (Native) </text:p>
        </text:list-item>
        <text:list-item>
          <text:p text:style-name="P23">Spanish (Professional working proficiency) </text:p>
        </text:list-item>
        <text:list-item>
          <text:p text:style-name="P22">German (Elementary proficiency) </text:p>
        </text:list-item>
      </text:list>
      <text:h text:style-name="Heading_20_2" text:outline-level="2">Professional Affiliations</text:h>
      <text:list xml:id="list64226069" text:style-name="L11">
        <text:list-item>
          <text:p text:style-name="P25">Cloud Native Computing Foundation (CNCF) – Member since 2020 </text:p>
        </text:list-item>
        <text:list-item>
          <text:p text:style-name="P25">DevOps Institute – Certified DevOps Practitioner </text:p>
        </text:list-item>
        <text:list-item>
          <text:p text:style-name="P24">Linux Foundation – Active contributor to Kubernetes documentation </text:p>
        </text:list-item>
      </text:list>
      <text:p text:style-name="P26">{PLACEHOLDER_NAME} – Resume – Page 1 of 1<text:line-break/>References available upon reques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000000" loext:opacity="100%" style:font-name="Liberation Serif1" fo:font-family="'Liberation Serif', 'Times New Roman', serif" fo:font-size="12pt" style:font-name-asian="Liberation Serif1" style:font-family-asian="'Liberation Serif', 'Times New Roman', serif" style:font-size-asian="12pt" style:font-name-complex="Liberation Serif1" style:font-family-complex="'Liberation Serif', 'Times New Roman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fo:font-size="11pt" style:font-size-asian="11pt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555in" style:contextual-spacing="false" fo:text-align="center" style:justify-single-word="false" fo:padding-left="0in" fo:padding-right="0in" fo:padding-top="0in" fo:padding-bottom="0.139in" fo:border-left="none" fo:border-right="none" fo:border-top="none" fo:border-bottom="2.24pt solid #1a3c6e"/>
      <style:text-properties fo:color="#1a3c6e" loext:opacity="100%" style:font-name="Liberation Sans1" fo:font-family="'Liberation Sans', Arial, sans-serif" fo:font-size="28pt" fo:font-weight="bold" style:font-name-asian="Liberation Sans1" style:font-family-asian="'Liberation Sans', Arial, sans-serif" style:font-size-asian="28pt" style:font-weight-asian="bold" style:font-name-complex="Liberation Sans1" style:font-family-complex="'Liberation Sans', Arial, sans-serif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78in" fo:margin-bottom="0.139in" style:contextual-spacing="false" fo:padding-left="0in" fo:padding-right="0in" fo:padding-top="0in" fo:padding-bottom="0.0555in" fo:border-left="none" fo:border-right="none" fo:border-top="none" fo:border-bottom="0.74pt solid #7a9bcb"/>
      <style:text-properties fo:color="#1a3c6e" loext:opacity="100%" style:font-name="Liberation Sans1" fo:font-family="'Liberation Sans', Arial, sans-serif" fo:font-size="16pt" fo:font-weight="bold" style:font-name-asian="Liberation Sans1" style:font-family-asian="'Liberation Sans', Arial, sans-serif" style:font-size-asian="16pt" style:font-weight-asian="bold" style:font-name-complex="Liberation Sans1" style:font-family-complex="'Liberation Sans', Arial, sans-serif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555in" style:contextual-spacing="false"/>
      <style:text-properties fo:color="#2b5797" loext:opacity="100%" style:font-name="Liberation Sans1" fo:font-family="'Liberation Sans', Arial, sans-serif" fo:font-size="13pt" fo:font-weight="bold" style:font-name-asian="Liberation Sans1" style:font-family-asian="'Liberation Sans', Arial, sans-serif" style:font-size-asian="13pt" style:font-weight-asian="bold" style:font-name-complex="Liberation Sans1" style:font-family-complex="'Liberation Sans', Arial, sans-serif" style:font-size-complex="13pt" style:font-weight-complex="bold"/>
    </style:style>
    <style:style style:name="Text_20_Body.skill-category" style:display-name="Text Body.skill-category" style:family="paragraph" style:parent-style-name="Text_20_body">
      <style:paragraph-properties fo:margin-top="0.111in" fo:margin-bottom="0.1965in" style:contextual-spacing="false"/>
      <style:text-properties fo:color="#2b5797" loext:opacity="100%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style:font-name="Liberation Sans1" fo:font-family="'Liberation Sans', Arial, sans-serif" fo:font-size="11pt" fo:font-weight="bold" style:font-name-asian="Liberation Sans1" style:font-family-asian="'Liberation Sans', Arial, sans-serif" style:font-size-asian="11pt" style:font-weight-asian="bold" style:font-name-complex="Liberation Sans1" style:font-family-complex="'Liberation Sans', Arial, sans-serif" style:font-size-complex="11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3" meta:paragraph-count="78" meta:word-count="654" meta:character-count="4973" meta:non-whitespace-character-count="4379"/>
    <meta:generator>LibreOffice/7.3.7.2$Linux_X86_64 LibreOffice_project/30$Build-2</meta:generator>
  </office:meta>
</office:document-meta>
</file>