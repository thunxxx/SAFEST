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3.4556in" fo:margin-left="0.1965in" table:align="left"/>
    </style:style>
    <style:style style:name="Table1.A" style:family="table-column">
      <style:table-column-properties style:column-width="1.259in"/>
    </style:style>
    <style:style style:name="Table1.B" style:family="table-column">
      <style:table-column-properties style:column-width="2.1965in"/>
    </style:style>
    <style:style style:name="Table1.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Heading_20_2">
      <style:paragraph-properties fo:margin-left="0.1965in" fo:margin-right="0.0398in" fo:text-indent="0in" style:auto-text-indent="false"/>
    </style:style>
    <style:style style:name="P3" style:family="paragraph" style:parent-style-name="Heading_20_3">
      <style:paragraph-properties fo:margin-left="0.9839in" fo:margin-right="0.7874in" fo:text-indent="0in" style:auto-text-indent="false"/>
    </style:style>
    <style:style style:name="P4" style:family="paragraph" style:parent-style-name="Text_20_Body.cert-item">
      <style:paragraph-properties fo:margin-left="0.2362in" fo:margin-right="0.0398in" fo:text-indent="0in" style:auto-text-indent="false"/>
    </style:style>
    <style:style style:name="P5" style:family="paragraph" style:parent-style-name="Text_20_Body.invisible-ats">
      <style:paragraph-properties fo:margin-left="0.2362in" fo:margin-right="0.0398in" fo:text-indent="0in" style:auto-text-indent="false"/>
    </style:style>
    <style:style style:name="P6" style:family="paragraph" style:parent-style-name="Text_20_Body.job-company">
      <style:paragraph-properties fo:margin-left="0.2362in" fo:margin-right="0.0398in" fo:text-indent="0in" style:auto-text-indent="false"/>
    </style:style>
    <style:style style:name="P7" style:family="paragraph" style:parent-style-name="Text_20_Body.job-dates">
      <style:paragraph-properties fo:margin-left="0.2362in" fo:margin-right="0.0398in" fo:text-indent="0in" style:auto-text-indent="false"/>
    </style:style>
    <style:style style:name="P8" style:family="paragraph" style:parent-style-name="Text_20_Body.job-location">
      <style:paragraph-properties fo:margin-left="0.2362in" fo:margin-right="0.0398in" fo:text-indent="0in" style:auto-text-indent="false"/>
    </style:style>
    <style:style style:name="P9" style:family="paragraph" style:parent-style-name="Text_20_Body.job-title">
      <style:paragraph-properties fo:margin-left="0.2362in" fo:margin-right="0.0398in" fo:text-indent="0in" style:auto-text-indent="false"/>
    </style:style>
    <style:style style:name="P10" style:family="paragraph" style:parent-style-name="Text_20_body">
      <style:paragraph-properties fo:margin-top="0.0398in" fo:margin-bottom="0.1965in" style:contextual-spacing="false" fo:text-align="center" style:justify-single-word="false"/>
      <style:text-properties fo:color="#333333" loext:opacity="100%" fo:font-size="10pt"/>
    </style:style>
    <style:style style:name="P11" style:family="paragraph" style:parent-style-name="Text_20_body">
      <style:paragraph-properties fo:margin-left="0.1965in" fo:margin-right="0.0398in" fo:text-indent="0in" style:auto-text-indent="false"/>
    </style:style>
    <style:style style:name="P12" style:family="paragraph" style:parent-style-name="Text_20_body" style:list-style-name="L1">
      <style:paragraph-properties fo:margin-left="0.1965in" fo:margin-right="0.0398in" fo:margin-top="0.0398in" fo:margin-bottom="0in" style:contextual-spacing="false" fo:text-indent="0in" style:auto-text-indent="false"/>
    </style:style>
    <style:style style:name="P13" style:family="paragraph" style:parent-style-name="Text_20_body" style:list-style-name="L1">
      <style:paragraph-properties fo:margin-left="0.1965in" fo:margin-right="0.0398in" fo:text-indent="0in" style:auto-text-indent="false"/>
    </style:style>
    <style:style style:name="P14" style:family="paragraph" style:parent-style-name="Text_20_body" style:list-style-name="L2">
      <style:paragraph-properties fo:margin-left="0.1965in" fo:margin-right="0.0398in" fo:margin-top="0.0398in" fo:margin-bottom="0in" style:contextual-spacing="false" fo:text-indent="0in" style:auto-text-indent="false"/>
    </style:style>
    <style:style style:name="P15" style:family="paragraph" style:parent-style-name="Text_20_body" style:list-style-name="L2">
      <style:paragraph-properties fo:margin-left="0.1965in" fo:margin-right="0.0398in" fo:text-indent="0in" style:auto-text-indent="false"/>
    </style:style>
    <style:style style:name="P16" style:family="paragraph" style:parent-style-name="Text_20_body" style:list-style-name="L3">
      <style:paragraph-properties fo:margin-left="0.1965in" fo:margin-right="0.0398in" fo:margin-top="0.0398in" fo:margin-bottom="0in" style:contextual-spacing="false" fo:text-indent="0in" style:auto-text-indent="false"/>
    </style:style>
    <style:style style:name="P17" style:family="paragraph" style:parent-style-name="Text_20_body" style:list-style-name="L3">
      <style:paragraph-properties fo:margin-left="0.1965in" fo:margin-right="0.0398in" fo:text-indent="0in" style:auto-text-indent="false"/>
    </style:style>
    <style:style style:name="P18" style:family="paragraph" style:parent-style-name="Text_20_body" style:list-style-name="L4">
      <style:paragraph-properties fo:margin-left="0.1965in" fo:margin-right="0.0398in" fo:margin-top="0.0398in" fo:margin-bottom="0in" style:contextual-spacing="false" fo:text-indent="0in" style:auto-text-indent="false"/>
    </style:style>
    <style:style style:name="P19" style:family="paragraph" style:parent-style-name="Text_20_body" style:list-style-name="L4">
      <style:paragraph-properties fo:margin-left="0.1965in" fo:margin-right="0.0398in" fo:text-indent="0in" style:auto-text-indent="false"/>
    </style:style>
    <style:style style:name="P20" style:family="paragraph" style:parent-style-name="Text_20_body" style:list-style-name="L5">
      <style:paragraph-properties fo:margin-left="0.1965in" fo:margin-right="0.0398in" fo:margin-top="0.0398in" fo:margin-bottom="0in" style:contextual-spacing="false" fo:text-indent="0in" style:auto-text-indent="false"/>
    </style:style>
    <style:style style:name="P21" style:family="paragraph" style:parent-style-name="Text_20_body" style:list-style-name="L5">
      <style:paragraph-properties fo:margin-left="0.1965in" fo:margin-right="0.0398in" fo:text-indent="0in" style:auto-text-indent="false"/>
    </style:style>
    <style:style style:name="P22" style:family="paragraph" style:parent-style-name="Text_20_body">
      <style:paragraph-properties fo:margin-left="0.1965in" fo:margin-right="0.0417in" fo:text-indent="0in" style:auto-text-indent="false"/>
    </style:style>
    <style:style style:name="P23" style:family="paragraph" style:parent-style-name="Text_20_body" style:list-style-name="L6">
      <style:paragraph-properties fo:margin-left="0.1965in" fo:margin-right="0.0398in" fo:margin-top="0.0398in" fo:margin-bottom="0in" style:contextual-spacing="false" fo:text-indent="0in" style:auto-text-indent="false"/>
    </style:style>
    <style:style style:name="P24" style:family="paragraph" style:parent-style-name="Text_20_body" style:list-style-name="L6">
      <style:paragraph-properties fo:margin-left="0.1965in" fo:margin-right="0.0398in" fo:text-indent="0in" style:auto-text-indent="false"/>
    </style:style>
    <style:style style:name="P25" style:family="paragraph" style:parent-style-name="Text_20_body">
      <style:paragraph-properties fo:margin-top="0.3937in" fo:margin-bottom="0.0398in" style:contextual-spacing="false" fo:text-align="center" style:justify-single-word="false"/>
      <style:text-properties fo:color="#999999" loext:opacity="100%"/>
    </style:style>
    <style:style style:name="T1" style:family="text">
      <style:text-properties fo:font-size="10pt" fo:background-color="#e8eef5" loext:char-shading-value="0" loext:padding="0in" loext:border="none"/>
    </style:style>
    <style:style style:name="T2" style:family="text">
      <style:text-properties fo:font-size="8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CEHOLDER_NAME}</text:p>
      <text:p text:style-name="P10">{PLACEHOLDER_EMAIL} | {PLACEHOLDER_PHONE} | {PLACEHOLDER_ADDRESS} | LinkedIn: linkedin.com/in/{PLACEHOLDER_LINKEDIN} </text:p>
      <text:h text:style-name="Heading_20_2" text:outline-level="2">Professional Summary</text:h>
      <text:p text:style-name="Text_20_body">Results-driven data professional with over 8 years of experience in data analysis, machine learning, and statistical modeling. Proven track record of delivering actionable insights and building scalable data solutions for Fortune 500 companies. Expertise in Python, R, SQL, and cloud-based analytics platforms. Strong communicator with a passion for translating complex data into business strategy. Seeking to leverage advanced analytical skills in a senior data scientist role.</text:p>
      <text:h text:style-name="Heading_20_2" text:outline-level="2">Education</text:h>
      <text:h text:style-name="P3" text:outline-level="3">Master of Science in Data Science</text:h>
      <text:p text:style-name="P11"><text:span text:style-name="Strong_20_Emphasis">{PLACEHOLDER_UNIVERSITY_1}</text:span> | {PLACEHOLDER_CITY_1}, {PLACEHOLDER_STATE_1} | <text:span text:style-name="Emphasis">Graduated: May 2019</text:span></text:p>
      <text:list xml:id="list1317015514" text:style-name="L1">
        <text:list-item>
          <text:p text:style-name="P12">GPA: 3.92/4.0 — Dean's List </text:p>
        </text:list-item>
        <text:list-item>
          <text:p text:style-name="P12">Thesis: "Predictive Modeling for Customer Churn in SaaS Platforms Using Ensemble Methods" </text:p>
        </text:list-item>
        <text:list-item>
          <text:p text:style-name="P13">Relevant Coursework: Machine Learning, Deep Learning, Big Data Analytics, Statistical Inference, Natural Language Processing </text:p>
        </text:list-item>
      </text:list>
      <text:h text:style-name="P3" text:outline-level="3">Bachelor of Science in Computer Science</text:h>
      <text:p text:style-name="P11"><text:span text:style-name="Strong_20_Emphasis">{PLACEHOLDER_UNIVERSITY_2}</text:span> | {PLACEHOLDER_CITY_2}, {PLACEHOLDER_STATE_2} | <text:span text:style-name="Emphasis">Graduated: May 2016</text:span></text:p>
      <text:list xml:id="list2686129607" text:style-name="L2">
        <text:list-item>
          <text:p text:style-name="P14">GPA: 3.85/4.0 — Magna Cum Laude </text:p>
        </text:list-item>
        <text:list-item>
          <text:p text:style-name="P14">Minor in Applied Mathematics </text:p>
        </text:list-item>
        <text:list-item>
          <text:p text:style-name="P15">Relevant Coursework: Algorithms, Data Structures, Database Systems, Linear Algebra, Probability Theory </text:p>
        </text:list-item>
      </text:list>
      <text:h text:style-name="P2" text:outline-level="2">Experience</text:h>
      <text:p text:style-name="P9">Senior Data Scientist</text:p>
      <text:p text:style-name="P6">TechVista Solutions Inc.</text:p>
      <text:p text:style-name="P8">San Francisco, CA</text:p>
      <text:p text:style-name="P7">June 2021 – Present</text:p>
      <text:list xml:id="list1314331725" text:style-name="L3">
        <text:list-item>
          <text:p text:style-name="P16">Led a team of 4 data scientists to develop a real-time recommendation engine using collaborative filtering and deep learning, resulting in a 22% increase in user engagement and $3.2M incremental revenue. </text:p>
        </text:list-item>
        <text:list-item>
          <text:p text:style-name="P16">Designed and deployed an automated anomaly detection system for network security logs using Isolation Forest and LSTM networks, reducing false positive rates by 35%. </text:p>
        </text:list-item>
        <text:list-item>
          <text:p text:style-name="P16">Built end-to-end ETL pipelines in Apache Spark and Airflow, processing over 50TB of structured and unstructured data daily. </text:p>
        </text:list-item>
        <text:list-item>
          <text:p text:style-name="P16">Presented analytical findings and strategic recommendations to C-suite executives, driving data-informed product roadmap decisions. </text:p>
        </text:list-item>
        <text:list-item>
          <text:p text:style-name="P17">Mentored junior data scientists and conducted internal training sessions on advanced machine learning techniques. </text:p>
        </text:list-item>
      </text:list>
      <text:p text:style-name="P9"><text:soft-page-break/>Data Scientist</text:p>
      <text:p text:style-name="P6">DataPulse Analytics</text:p>
      <text:p text:style-name="P8">Austin, TX</text:p>
      <text:p text:style-name="P7">August 2019 – May 2021</text:p>
      <text:list xml:id="list1969694535" text:style-name="L4">
        <text:list-item>
          <text:p text:style-name="P18">Developed predictive models for customer lifetime value (CLV) using gradient boosting and survival analysis, improving marketing ROI by 18%. </text:p>
        </text:list-item>
        <text:list-item>
          <text:p text:style-name="P18">Implemented A/B testing frameworks and statistical analysis for product features, providing actionable insights to product managers. </text:p>
        </text:list-item>
        <text:list-item>
          <text:p text:style-name="P18">Created interactive dashboards in Tableau and Power BI for real-time KPI monitoring across sales and operations teams. </text:p>
        </text:list-item>
        <text:list-item>
          <text:p text:style-name="P19">Automated data quality checks and reporting processes using Python scripts, reducing manual effort by 15 hours per week. </text:p>
        </text:list-item>
      </text:list>
      <text:p text:style-name="P9">Junior Data Analyst</text:p>
      <text:p text:style-name="P6">Meridian Financial Group</text:p>
      <text:p text:style-name="P8">Chicago, IL</text:p>
      <text:p text:style-name="P7">July 2016 – July 2018</text:p>
      <text:list xml:id="list2839903728" text:style-name="L5">
        <text:list-item>
          <text:p text:style-name="P20">Performed exploratory data analysis on customer transaction data to identify cross-selling opportunities, contributing to a 12% increase in average revenue per user. </text:p>
        </text:list-item>
        <text:list-item>
          <text:p text:style-name="P20">Developed SQL queries and stored procedures for ad-hoc reporting requests from senior management. </text:p>
        </text:list-item>
        <text:list-item>
          <text:p text:style-name="P21">Assisted in the migration of legacy reporting systems to cloud-based data warehouse solutions (Snowflake). </text:p>
        </text:list-item>
      </text:list>
      <text:h text:style-name="P2" text:outline-level="2">Certifications</text:h>
      <text:p text:style-name="P4"><text:span text:style-name="Strong_20_Emphasis">Certified Data Scientist (CDS) - 2023</text:span></text:p>
      <text:p text:style-name="P5">Certified Data Scientist (CDS) - 2023</text:p>
      <text:p text:style-name="P4"><text:span text:style-name="Strong_20_Emphasis">AWS Certified Machine Learning – Specialty</text:span> | Amazon Web Services | 2022</text:p>
      <text:p text:style-name="P4"><text:span text:style-name="Strong_20_Emphasis">Google Professional Data Engineer</text:span> | Google Cloud | 2021</text:p>
      <text:p text:style-name="P4"><text:span text:style-name="Strong_20_Emphasis">Microsoft Certified: Azure Data Scientist Associate</text:span> | Microsoft | 2020</text:p>
      <text:p text:style-name="P4"><text:span text:style-name="Strong_20_Emphasis">CompTIA Data+</text:span> | CompTIA | 2019</text:p>
      <text:h text:style-name="Heading_20_2" text:outline-level="2">Technical Skills</text:h>
      <text:p text:style-name="P22"><text:span text:style-name="Strong_20_Emphasis"><text:span text:style-name="T1">Languages:</text:span></text:span><text:span text:style-name="T1"> Python, R, SQL, Java, Scala</text:span> <text:span text:style-name="Strong_20_Emphasis"><text:span text:style-name="T1">ML/DL:</text:span></text:span><text:span text:style-name="T1"> TensorFlow, PyTorch, Scikit-learn, XGBoost, Keras</text:span> <text:span text:style-name="Strong_20_Emphasis"><text:span text:style-name="T1">Big Data:</text:span></text:span><text:span text:style-name="T1"> Apache Spark, Hadoop, Hive, Kafka</text:span> <text:span text:style-name="Strong_20_Emphasis"><text:span text:style-name="T1">Cloud:</text:span></text:span><text:span text:style-name="T1"> AWS (SageMaker, Redshift, S3), GCP (BigQuery, AI Platform), Azure</text:span> <text:span text:style-name="Strong_20_Emphasis"><text:span text:style-name="T1">Visualization:</text:span></text:span><text:span text:style-name="T1"> Tableau, Power BI, Matplotlib, Seaborn, Plotly</text:span> <text:span text:style-name="Strong_20_Emphasis"><text:span text:style-name="T1">Databases:</text:span></text:span><text:span text:style-name="T1"> PostgreSQL, MySQL, MongoDB, Snowflake</text:span> <text:span text:style-name="Strong_20_Emphasis"><text:span text:style-name="T1">Tools:</text:span></text:span><text:span text:style-name="T1"> Docker, Kubernetes, Git, Jupyter, Airflow, dbt</text:span> </text:p>
      <text:h text:style-name="Heading_20_2" text:outline-level="2">Key Projects</text:h>
      <text:h text:style-name="P3" text:outline-level="3">Real-Time Fraud Detection System</text:h>
      <text:p text:style-name="P11"><text:soft-page-break/>Architected a streaming fraud detection pipeline using Apache Kafka, Spark Streaming, and a LightGBM model. Deployed on AWS SageMaker with auto-scaling, achieving sub-100ms inference latency and reducing fraud losses by 27%.</text:p>
      <text:h text:style-name="P3" text:outline-level="3">NLP-Powered Sentiment Analysis Dashboard</text:h>
      <text:p text:style-name="P11">Built a BERT-based sentiment analysis tool for social media monitoring. Integrated with a Flask web application and Tableau dashboard, processing 10,000+ posts per minute with 89% accuracy.</text:p>
      <text:h text:style-name="P3" text:outline-level="3">Supply Chain Optimization Model</text:h>
      <text:p text:style-name="P11">Developed a mixed-integer linear programming model for inventory optimization, reducing warehousing costs by 15% and improving stockout rates by 40% for a retail client with 200+ SKUs.</text:p>
      <text:h text:style-name="Heading_20_2" text:outline-level="2">Publications &amp; Conferences</text:h>
      <text:p text:style-name="P11"><text:span text:style-name="Strong_20_Emphasis">Smith, J.</text:span>, &amp; {PLACEHOLDER_COAUTHOR} (2023). "Transfer Learning for Time Series Forecasting in Industrial IoT." <text:span text:style-name="Emphasis">Proceedings of the International Conference on Machine Learning (ICML)</text:span>, 45(3), 112-119.</text:p>
      <text:p text:style-name="P11"><text:span text:style-name="Strong_20_Emphasis">Smith, J.</text:span> (2022). "Ethical Considerations in Automated Decision Systems." Presented at <text:span text:style-name="Emphasis">Data Science Summit 2022</text:span>, San Diego, CA.</text:p>
      <text:h text:style-name="Heading_20_2" text:outline-level="2">Professional Affiliations</text:h>
      <text:list xml:id="list1050893130" text:style-name="L6">
        <text:list-item>
          <text:p text:style-name="P23">Member, Association for Computing Machinery (ACM) — Special Interest Group on Knowledge Discovery and Data Mining </text:p>
        </text:list-item>
        <text:list-item>
          <text:p text:style-name="P23">Member, Institute of Electrical and Electronics Engineers (IEEE) — Computational Intelligence Society </text:p>
        </text:list-item>
        <text:list-item>
          <text:p text:style-name="P24">Volunteer Mentor, Women in Data Science (WiDS) Initiative </text:p>
        </text:list-item>
      </text:list>
      <text:h text:style-name="P2" text:outline-level="2">Languages</text:h>
      <table:table table:name="Table1" table:style-name="Table1">
        <table:table-column table:style-name="Table1.A"/>
        <table:table-column table:style-name="Table1.B"/>
        <table:table-row>
          <table:table-cell table:style-name="Table1.A1" office:value-type="string">
            <text:p text:style-name="Table_20_Heading">Language</text:p>
          </table:table-cell>
          <table:table-cell table:style-name="Table1.A1" office:value-type="string">
            <text:p text:style-name="Table_20_Heading">Proficiency</text:p>
          </table:table-cell>
        </table:table-row>
        <table:table-row>
          <table:table-cell table:style-name="Table1.A1" office:value-type="string">
            <text:p text:style-name="Table_20_Contents">English</text:p>
          </table:table-cell>
          <table:table-cell table:style-name="Table1.A1" office:value-type="string">
            <text:p text:style-name="Table_20_Contents">Native / Bilingual</text:p>
          </table:table-cell>
        </table:table-row>
        <table:table-row>
          <table:table-cell table:style-name="Table1.A1" office:value-type="string">
            <text:p text:style-name="Table_20_Contents">Spanish</text:p>
          </table:table-cell>
          <table:table-cell table:style-name="Table1.A1" office:value-type="string">
            <text:p text:style-name="Table_20_Contents">Professional Working Proficiency</text:p>
          </table:table-cell>
        </table:table-row>
        <table:table-row>
          <table:table-cell table:style-name="Table1.A1" office:value-type="string">
            <text:p text:style-name="Table_20_Contents">Mandarin Chinese</text:p>
          </table:table-cell>
          <table:table-cell table:style-name="Table1.A1" office:value-type="string">
            <text:p text:style-name="Table_20_Contents">Elementary Proficiency</text:p>
          </table:table-cell>
        </table:table-row>
      </table:table>
      <text:p text:style-name="P25">— <text:span text:style-name="T2">Additional references and portfolio available upon request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7874in" fo:margin-top="0.7874in" fo:margin-bottom="0.7874in" style:contextual-spacing="false" fo:line-height="114%" fo:text-indent="0in" style:auto-text-indent="false"/>
      <style:text-properties fo:color="#000000" loext:opacity="100%" style:font-name="Calibri" fo:font-family="Calibri, Arial, sans-serif" fo:font-size="11pt" style:font-name-asian="Calibri" style:font-family-asian="Calibri, Arial, sans-serif" style:font-size-asian="11pt" style:font-name-complex="Calibri" style:font-family-complex="Calibri, Arial, sans-serif" style:font-size-complex="11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398in" style:contextual-spacing="false" fo:text-align="center" style:justify-single-word="false"/>
      <style:text-properties fo:color="#1a3a5c" loext:opacity="100%" style:font-name="Liberation Sans Unicode MS" fo:font-family="'Liberation Sans Unicode MS'" style:font-pitch="variable" fo:font-size="24pt" fo:font-weight="bold" style:font-size-asian="24pt" style:font-weight-asian="bold"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left="0.0398in" fo:margin-right="0.0398in" fo:margin-top="0.0398in" fo:margin-bottom="0.0398in" style:contextual-spacing="false" fo:text-indent="0in" style:auto-text-indent="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965in" fo:margin-bottom="0.1181in" style:contextual-spacing="false" fo:padding-left="0in" fo:padding-right="0in" fo:padding-top="0in" fo:padding-bottom="0.0417in" fo:border-left="none" fo:border-right="none" fo:border-top="none" fo:border-bottom="1.5pt solid #1a3a5c"/>
      <style:text-properties fo:color="#1a3a5c" loext:opacity="100%" style:font-name="Liberation Serif" fo:font-family="'Liberation Serif'" style:font-family-generic="roman" style:font-pitch="variable" fo:font-size="16pt" fo:font-weight="bold" style:font-name-asian="DejaVu Sans" style:font-family-asian="'DejaVu Sans'" style:font-family-generic-asian="system" style:font-pitch-asian="variable" style:font-size-asian="16pt" style:font-weight-asian="bold" style:font-name-complex="Noto Sans Devanagari1" style:font-family-complex="'Noto Sans Devanagari'" style:font-family-generic-complex="system" style:font-pitch-complex="variable"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398in" style:contextual-spacing="false"/>
      <style:text-properties fo:color="#2c5f8a" loext:opacity="100%" style:font-name="Liberation Serif" fo:font-family="'Liberation Serif'" style:font-family-generic="roman" style:font-pitch="variable" fo:font-size="13pt" fo:font-weight="bold" style:font-name-asian="DejaVu Sans" style:font-family-asian="'DejaVu Sans'" style:font-family-generic-asian="system" style:font-pitch-asian="variable" style:font-size-asian="13pt" style:font-weight-asian="bold" style:font-name-complex="Noto Sans Devanagari1" style:font-family-complex="'Noto Sans Devanagari'" style:font-family-generic-complex="system" style:font-pitch-complex="variable" style:font-size-complex="13pt" style:font-weight-complex="bold"/>
    </style:style>
    <style:style style:name="Text_20_Body.job-title" style:display-name="Text Body.job-title" style:family="paragraph" style:parent-style-name="Text_20_body">
      <style:text-properties fo:font-size="12pt" fo:font-weight="bold" style:font-size-asian="12pt" style:font-weight-asian="bold" style:font-size-complex="12pt" style:font-weight-complex="bold"/>
    </style:style>
    <style:style style:name="Text_20_Body.job-company" style:display-name="Text Body.job-company" style:family="paragraph" style:parent-style-name="Text_20_body">
      <style:text-properties fo:color="#2c5f8a" loext:opacity="100%" fo:font-weight="bold" style:font-weight-asian="bold" style:font-weight-complex="bold"/>
    </style:style>
    <style:style style:name="Text_20_Body.job-location" style:display-name="Text Body.job-location" style:family="paragraph" style:parent-style-name="Text_20_body">
      <style:text-properties fo:color="#555555" loext:opacity="100%" fo:font-size="10pt" style:font-size-asian="10pt" style:font-size-complex="10pt"/>
    </style:style>
    <style:style style:name="Text_20_Body.job-dates" style:display-name="Text Body.job-dates" style:family="paragraph" style:parent-style-name="Text_20_body">
      <style:text-properties fo:color="#555555" loext:opacity="100%" fo:font-size="10pt" fo:font-style="italic" style:font-size-asian="10pt" style:font-style-asian="italic" style:font-size-complex="10pt" style:font-style-complex="italic"/>
    </style:style>
    <style:style style:name="Text_20_Body.cert-item" style:display-name="Text Body.cert-item" style:family="paragraph" style:parent-style-name="Text_20_body">
      <style:paragraph-properties fo:margin-top="0.0398in" fo:margin-bottom="0.0591in" style:contextual-spacing="false"/>
    </style:style>
    <style:style style:name="Text_20_Body.invisible-ats" style:display-name="Text Body.invisible-ats" style:family="paragraph" style:parent-style-name="Text_20_body">
      <style:text-properties fo:color="#ffffff" loext:opacity="100%" fo:font-size="1pt" style:font-size-asian="1pt" style:font-size-complex="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loext:opacity="100%"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image-count="0" meta:object-count="0" meta:page-count="3" meta:paragraph-count="73" meta:word-count="734" meta:character-count="5448" meta:non-whitespace-character-count="4775"/>
    <meta:generator>LibreOffice/7.3.7.2$Linux_X86_64 LibreOffice_project/30$Build-2</meta:generator>
    <meta:user-defined meta:name=""/>
  </office:meta>
</office:document-meta>
</file>