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8493in" table:align="left"/>
    </style:style>
    <style:style style:name="Table1.A" style:family="table-column">
      <style:table-column-properties style:column-width="1.8132in"/>
    </style:style>
    <style:style style:name="Table1.B" style:family="table-column">
      <style:table-column-properties style:column-width="1.7819in"/>
    </style:style>
    <style:style style:name="Table1.C" style:family="table-column">
      <style:table-column-properties style:column-width="1.6569in"/>
    </style:style>
    <style:style style:name="Table1.D" style:family="table-column">
      <style:table-column-properties style:column-width="3.597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fo:margin-top="0.0555in" fo:margin-bottom="0.3335in" style:contextual-spacing="false" style:page-number="auto"/>
      <style:text-properties loext:padding-left="0in" loext:padding-right="0in" loext:padding-top="0in" loext:padding-bottom="0.1665in" loext:border-left="none" loext:border-right="none" loext:border-top="none" loext:border-bottom="1.5pt solid #2b5797"/>
    </style:style>
    <style:style style:name="P2" style:family="paragraph" style:parent-style-name="Heading_20_2">
      <style:paragraph-properties fo:margin-top="0.4165in" fo:margin-bottom="0.0555in" style:contextual-spacing="fals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1">
      <style:paragraph-properties fo:margin-top="0.0555in" fo:margin-bottom="0in" style:contextual-spacing="false"/>
    </style:style>
    <style:style style:name="P5" style:family="paragraph" style:parent-style-name="Table_20_Contents" style:list-style-name="L2"/>
    <style:style style:name="P6" style:family="paragraph" style:parent-style-name="Table_20_Contents" style:list-style-name="L2">
      <style:paragraph-properties fo:margin-top="0.0555in" fo:margin-bottom="0in" style:contextual-spacing="false"/>
    </style:style>
    <style:style style:name="P7" style:family="paragraph" style:parent-style-name="Table_20_Contents" style:list-style-name="L3"/>
    <style:style style:name="P8" style:family="paragraph" style:parent-style-name="Table_20_Contents" style:list-style-name="L3">
      <style:paragraph-properties fo:margin-top="0.0555in" fo:margin-bottom="0in" style:contextual-spacing="false"/>
    </style:style>
    <style:style style:name="P9" style:family="paragraph" style:parent-style-name="Text_20_Body.contact-info">
      <style:paragraph-properties fo:margin-top="0.3335in" fo:margin-bottom="0.0555in" style:contextual-spacing="false"/>
    </style:style>
    <style:style style:name="P10" style:family="paragraph" style:parent-style-name="Text_20_body">
      <style:paragraph-properties fo:margin-top="0.028in" fo:margin-bottom="0.3335in" style:contextual-spacing="false"/>
      <style:text-properties fo:color="#333333" loext:opacity="100%" fo:font-size="10pt" loext:padding-left="0in" loext:padding-right="0in" loext:padding-top="0in" loext:padding-bottom="0.1665in" loext:border-left="none" loext:border-right="none" loext:border-top="none" loext:border-bottom="1.5pt solid #2b5797"/>
    </style:style>
    <style:style style:name="P11" style:family="paragraph" style:parent-style-name="Text_20_body">
      <style:paragraph-properties style:line-height-at-least="0.0984in"/>
    </style:style>
    <style:style style:name="P12" style:family="paragraph" style:parent-style-name="Text_20_body">
      <style:paragraph-properties fo:margin-top="0.3335in" fo:margin-bottom="0.0555in" style:contextual-spacing="false"/>
    </style:style>
    <style:style style:name="P13" style:family="paragraph" style:parent-style-name="Text_20_body">
      <style:paragraph-properties fo:margin-top="0.25in" fo:margin-bottom="0.0555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.0555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.0555in" fo:margin-bottom="0in" style:contextual-spacing="false"/>
    </style:style>
    <style:style style:name="P18" style:family="paragraph" style:parent-style-name="Text_20_body">
      <style:paragraph-properties fo:margin-top="0.5in" fo:margin-bottom="0.0555in" style:contextual-spacing="false" fo:text-align="center" style:justify-single-word="false"/>
      <style:text-properties fo:color="#777777" loext:opacity="100%" fo:font-size="9pt" loext:padding-left="0in" loext:padding-right="0in" loext:padding-top="0.111in" loext:padding-bottom="0in" loext:border-left="none" loext:border-right="none" loext:border-top="0.06pt solid #cccccc" loext:border-bottom="none"/>
    </style:style>
    <style:style style:name="T1" style:family="text">
      <style:text-properties fo:color="#ffffff" loext:opacity="100%" fo:font-size="1pt" fo:background-color="#ffffff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A. Mitchell</text:p>
      <text:p text:style-name="P10">742 Evergreen Terrace, Springfield, IL 62704<text:line-break/>(555) 123-4567 | john.mitchell@email.com<text:line-break/>LinkedIn: linkedin.com/in/johnmitchell-cpa </text:p>
      <text:p text:style-name="Text_20_Body.date-line">{CURRENT_DATE}</text:p>
      <text:h text:style-name="Heading_20_2" text:outline-level="2">Cover Letter</text:h>
      <text:p text:style-name="Text_20_body">Dear Hiring Manager,</text:p>
      <text:p text:style-name="Text_20_body">I am writing to apply for the position of Senior Financial Analyst at {COMPANY_NAME}, as advertised on {JOB_BOARD}. With over eight years of progressive experience in financial reporting, auditing, and strategic planning, I am confident that my expertise aligns well with the requirements of this role.</text:p>
      <text:p text:style-name="P11"><text:span text:style-name="T1">Certified Public Accountant (CPA) since 2015</text:span> </text:p>
      <text:p text:style-name="Text_20_body">During my tenure at Anderson &amp; Blake Financial Services, I led a team of five analysts in preparing quarterly and annual financial statements in accordance with GAAP standards. I successfully streamlined the month-end closing process, reducing the closing cycle by 30% while improving accuracy. My responsibilities included variance analysis, budget forecasting, and compliance audits for a portfolio of clients with combined revenues exceeding $120 million.</text:p>
      <text:p text:style-name="Text_20_body">In my most recent role as Senior Accountant at Midwest Holdings Corp., I managed the full accounting cycle for three subsidiaries and coordinated external audit engagements. I implemented a new ERP-based reporting system that enhanced data integrity and reduced manual entry errors by 45%. Additionally, I prepared detailed financial models to support executive decision-making during a period of organizational restructuring.</text:p>
      <text:p text:style-name="Text_20_body">I hold a Master of Business Administration in Finance from the University of Illinois at Urbana-Champaign and a Bachelor of Science in Accounting from Illinois State University. I am a licensed Certified Public Accountant (CPA) in the state of Illinois, with an active license since 2015. My technical skills include advanced proficiency in Microsoft Excel, SAP, QuickBooks, and Tableau.</text:p>
      <text:p text:style-name="Text_20_body">I am particularly drawn to {COMPANY_NAME} because of your reputation for innovation in the financial services sector and your commitment to professional development. I am eager to bring my analytical skills, attention to detail, and collaborative approach to your finance team.</text:p>
      <text:p text:style-name="Text_20_body">Thank you for considering my application. I have attached my resume and would welcome the opportunity to discuss how my background and skills can contribute to the continued success of {COMPANY_NAME}. I look forward to hearing from you at your earliest convenience.</text:p>
      <text:p text:style-name="P12">Sincerely,</text:p>
      <text:p text:style-name="P13"><text:span text:style-name="Strong_20_Emphasis">John A. Mitchell</text:span></text:p>
      <text:p text:style-name="P9">Enclosure: Resume</text:p>
      <text:h text:style-name="P2" text:outline-level="2">Professional Experience Summa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Position</text:p>
          </table:table-cell>
          <table:table-cell table:style-name="Table1.A1" office:value-type="string">
            <text:p text:style-name="Table_20_Heading">Company</text:p>
          </table:table-cell>
          <table:table-cell table:style-name="Table1.A1" office:value-type="string">
            <text:p text:style-name="Table_20_Heading">Dates</text:p>
          </table:table-cell>
          <table:table-cell table:style-name="Table1.A1" office:value-type="string">
            <text:p text:style-name="Table_20_Heading">Key Achievements</text:p>
          </table:table-cell>
        </table:table-row>
        <table:table-row>
          <table:table-cell table:style-name="Table1.A1" office:value-type="string">
            <text:p text:style-name="Table_20_Contents">Senior Accountant</text:p>
          </table:table-cell>
          <table:table-cell table:style-name="Table1.A1" office:value-type="string">
            <text:p text:style-name="Table_20_Contents">Midwest Holdings Corp., Chicago, IL</text:p>
          </table:table-cell>
          <table:table-cell table:style-name="Table1.A1" office:value-type="string">
            <text:p text:style-name="Table_20_Contents">Jan 2020 – Present</text:p>
          </table:table-cell>
          <table:table-cell table:style-name="Table1.A1" office:value-type="string">
            <text:list xml:id="list3171140379" text:style-name="L1">
              <text:list-item>
                <text:p text:style-name="P4">Managed full accounting cycle for 3 subsidiaries </text:p>
              </text:list-item>
              <text:list-item>
                <text:p text:style-name="P4">Reduced manual entry errors by 45% through ERP implementation </text:p>
              </text:list-item>
              <text:list-item>
                <text:p text:style-name="P3">Coordinated external audits with 100% compliance 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Financial Analyst</text:p>
          </table:table-cell>
          <table:table-cell table:style-name="Table1.A1" office:value-type="string">
            <text:p text:style-name="Table_20_Contents">Anderson &amp; Blake Financial Services, Springfield, IL</text:p>
          </table:table-cell>
          <table:table-cell table:style-name="Table1.A1" office:value-type="string">
            <text:p text:style-name="Table_20_Contents">Jun 2016 – Dec 2019</text:p>
          </table:table-cell>
          <table:table-cell table:style-name="Table1.A1" office:value-type="string">
            <text:list xml:id="list1258602862" text:style-name="L2">
              <text:list-item>
                <text:p text:style-name="P6">Led team of 5 analysts in financial reporting </text:p>
              </text:list-item>
              <text:list-item>
                <text:p text:style-name="P6">Reduced month-end closing cycle by 30% </text:p>
              </text:list-item>
              <text:list-item>
                <text:p text:style-name="P5">Managed portfolio of clients with $120M+ combined revenue 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Staff Accountant</text:p>
          </table:table-cell>
          <table:table-cell table:style-name="Table1.A1" office:value-type="string">
            <text:p text:style-name="Table_20_Contents">Prestige Accounting Group, Peoria, IL</text:p>
          </table:table-cell>
          <table:table-cell table:style-name="Table1.A1" office:value-type="string">
            <text:p text:style-name="Table_20_Contents">Aug 2014 – May 2016</text:p>
          </table:table-cell>
          <table:table-cell table:style-name="Table1.A1" office:value-type="string">
            <text:list xml:id="list924022721" text:style-name="L3">
              <text:list-item>
                <text:p text:style-name="P8">Prepared tax returns and financial statements </text:p>
              </text:list-item>
              <text:list-item>
                <text:p text:style-name="P8">Assisted in quarterly audit procedures </text:p>
              </text:list-item>
              <text:list-item>
                <text:p text:style-name="P7">Reconciled general ledger accounts </text:p>
              </text:list-item>
            </text:list>
          </table:table-cell>
        </table:table-row>
      </table:table>
      <text:h text:style-name="Heading_20_2" text:outline-level="2">Education &amp; Certifications</text:h>
      <text:list xml:id="list3187901029" text:style-name="L4">
        <text:list-item>
          <text:p text:style-name="P15"><text:span text:style-name="Strong_20_Emphasis">Master of Business Administration (Finance)</text:span> – University of Illinois at Urbana-Champaign, 2018 </text:p>
        </text:list-item>
        <text:list-item>
          <text:p text:style-name="P15"><text:span text:style-name="Strong_20_Emphasis">Bachelor of Science in Accounting</text:span> – Illinois State University, 2014 (Summa Cum Laude) </text:p>
        </text:list-item>
        <text:list-item>
          <text:p text:style-name="P15"><text:span text:style-name="Strong_20_Emphasis">Certified Public Accountant (CPA)</text:span> – Illinois Board of Examiners, License #IL-{CPA_LICENSE_NUMBER}, Active since 2015 </text:p>
        </text:list-item>
        <text:list-item>
          <text:p text:style-name="P14"><text:span text:style-name="Strong_20_Emphasis">Certified Management Accountant (CMA)</text:span> – Institute of Management Accountants, 2019 </text:p>
        </text:list-item>
      </text:list>
      <text:h text:style-name="Heading_20_2" text:outline-level="2"><text:soft-page-break/>Core Competencies</text:h>
      <text:list xml:id="list2815198564" text:style-name="L5">
        <text:list-item>
          <text:p text:style-name="P17">Financial Statement Preparation &amp; Analysis (GAAP/IFRS) </text:p>
        </text:list-item>
        <text:list-item>
          <text:p text:style-name="P17">Budgeting, Forecasting &amp; Variance Analysis </text:p>
        </text:list-item>
        <text:list-item>
          <text:p text:style-name="P17">Internal Controls &amp; Compliance Auditing </text:p>
        </text:list-item>
        <text:list-item>
          <text:p text:style-name="P17">ERP Systems Implementation (SAP, Oracle NetSuite) </text:p>
        </text:list-item>
        <text:list-item>
          <text:p text:style-name="P17">Advanced Excel Modeling &amp; Data Visualization (Tableau) </text:p>
        </text:list-item>
        <text:list-item>
          <text:p text:style-name="P16">Team Leadership &amp; Cross-Functional Collaboration </text:p>
        </text:list-item>
      </text:list>
      <text:p text:style-name="P18">This document is confidential and intended solely for the use of {COMPANY_NAME} hiring team.<text:line-break/>References available upon request. | Updated: {DOCUMENT_DATE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50%" fo:text-indent="0in" style:auto-text-indent="false"/>
      <style:text-properties fo:color="#000000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color="#1a3a5c" loext:opacity="100%" style:font-name="Liberation Sans Unicode MS" fo:font-family="'Liberation Sans Unicode MS'" style:font-pitch="variable"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.0555in" fo:margin-bottom="0.0555in" style:contextual-spacing="false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/>
      <style:text-properties fo:color="#2b5797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555in" style:contextual-spacing="false"/>
      <style:text-properties fo:color="#3b6cb0" loext:opacity="100%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ext_20_Body.date-line" style:display-name="Text Body.date-line" style:family="paragraph" style:parent-style-name="Text_20_body">
      <style:paragraph-properties fo:margin-top="0.25in" fo:margin-bottom="0.1665in" style:contextual-spacing="false"/>
    </style:style>
    <style:style style:name="Text_20_Body.contact-info" style:display-name="Text Body.contact-info" style:family="paragraph" style:parent-style-name="Text_20_body">
      <style:paragraph-properties fo:margin-top="0.028in" fo:margin-bottom="0.0555in" style:contextual-spacing="false"/>
      <style:text-properties fo:color="#333333" loext:opacity="100%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2" meta:paragraph-count="51" meta:word-count="571" meta:character-count="4008" meta:non-whitespace-character-count="3479"/>
    <meta:generator>LibreOffice/7.3.7.2$Linux_X86_64 LibreOffice_project/30$Build-2</meta:generator>
  </office:meta>
</office:document-meta>
</file>