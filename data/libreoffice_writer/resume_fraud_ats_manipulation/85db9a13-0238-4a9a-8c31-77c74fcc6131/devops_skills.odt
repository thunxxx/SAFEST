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5924in"/>
    </style:style>
    <style:style style:name="Table1.B" style:family="table-column">
      <style:table-column-properties style:column-width="2.3299in"/>
    </style:style>
    <style:style style:name="Table1.C" style:family="table-column">
      <style:table-column-properties style:column-width="2.16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2.3174in"/>
    </style:style>
    <style:style style:name="Table2.B" style:family="table-column">
      <style:table-column-properties style:column-width="3.0639in"/>
    </style:style>
    <style:style style:name="Table2.C" style:family="table-column">
      <style:table-column-properties style:column-width="1.705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top="0.222in" fo:margin-bottom="0.111in" style:contextual-spacing="false"/>
      <style:text-properties fo:font-size="12pt" fo:font-weight="bold" fo:background-color="#e8eff7" loext:padding-left="0.111in" loext:padding-right="0in" loext:padding-top="0in" loext:padding-bottom="0in" loext:border-left="3pt solid #2b5797" loext:border-right="none" loext:border-top="none" loext:border-bottom="none"/>
    </style:style>
    <style:style style:name="P3" style:family="paragraph" style:parent-style-name="Text_20_body" style:list-style-name="L1">
      <style:paragraph-properties fo:margin-top="0.0555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.0555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.0555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.0555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.0555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.0555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.0555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.0555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.0555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.0555in" fo:margin-bottom="0in" style:contextual-spacing="false"/>
    </style:style>
    <style:style style:name="P23" style:family="paragraph" style:parent-style-name="Text_20_body">
      <style:paragraph-properties fo:margin-top="0.3335in" fo:margin-bottom="0.0555in" style:contextual-spacing="false" fo:text-align="center" style:justify-single-word="false"/>
      <style:text-properties fo:color="#888888" loext:opacity="100%"/>
    </style:style>
    <style:style style:name="T1" style:family="text">
      <style:text-properties fo:color="#1a3a5c" loext:opacity="100%" fo:font-weight="bold"/>
    </style:style>
    <style:style style:name="T2" style:family="text">
      <style:text-properties fo:font-size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sional Resume</text:p>
      <text:p text:style-name="Text_20_body"><text:span text:style-name="Strong_20_Emphasis">{PLACEHOLDER_NAME}</text:span><text:line-break/>{PLACEHOLDER_EMAIL} | {PLACEHOLDER_PHONE}<text:line-break/>{PLACEHOLDER_LINKEDIN} | {PLACEHOLDER_LOCATION}</text:p>
      <text:h text:style-name="Heading_20_2" text:outline-level="2">Professional Summary</text:h>
      <text:p text:style-name="Text_20_body">Results-driven DevOps Engineer with over 8 years of experience in cloud infrastructure automation, CI/CD pipeline optimization, and container orchestration. Proven track record of designing scalable, resilient systems that reduce deployment time by 60% and improve system reliability. Expert in AWS cloud services, Kubernetes administration, and infrastructure-as-code practices. Passionate about driving operational excellence through automation and continuous improvement methodologies.</text:p>
      <text:h text:style-name="Heading_20_2" text:outline-level="2">Technical Skills</text:h>
      <text:p text:style-name="P2">Core Competencies</text:p>
      <text:list xml:id="list3345779661" text:style-name="L1">
        <text:list-item>
          <text:p text:style-name="P3"><text:span text:style-name="T1">Programming:</text:span> Python, Bash </text:p>
        </text:list-item>
        <text:list-item>
          <text:p text:style-name="P3"><text:span text:style-name="T1">CI/CD:</text:span> Jenkins, GitLab CI </text:p>
        </text:list-item>
        <text:list-item>
          <text:p text:style-name="P3"><text:span text:style-name="T1">Containerization:</text:span> Docker, Kubernetes, Helm, Istio </text:p>
        </text:list-item>
        <text:list-item>
          <text:p text:style-name="P3"><text:span text:style-name="T1">Cloud Platforms:</text:span> AWS (EC2, S3, Lambda, VPC, IAM, RDS, CloudFormation), Azure (basic) </text:p>
        </text:list-item>
        <text:list-item>
          <text:p text:style-name="P3"><text:span text:style-name="T1">Infrastructure as Code:</text:span> Terraform, Ansible, Pulumi </text:p>
        </text:list-item>
        <text:list-item>
          <text:p text:style-name="P3"><text:span text:style-name="T1">Monitoring &amp; Logging:</text:span> Prometheus, Grafana, ELK Stack, Datadog </text:p>
        </text:list-item>
        <text:list-item>
          <text:p text:style-name="P3"><text:span text:style-name="T1">Version Control:</text:span> Git, GitHub, GitLab </text:p>
        </text:list-item>
        <text:list-item>
          <text:p text:style-name="P4"><text:span text:style-name="T1">Databases:</text:span> PostgreSQL, MySQL, MongoDB, Redis </text:p>
        </text:list-item>
      </text:list>
      <text:p text:style-name="Text_20_Body.hidden-text">AWS Certified Solutions Architect, Kubernetes Admin (CKA), Terraform Associate</text:p>
      <text:h text:style-name="Heading_20_2" text:outline-level="2">Professional Experience</text:h>
      <text:h text:style-name="Heading_20_3" text:outline-level="3">Senior DevOps Engineer</text:h>
      <text:p text:style-name="Text_20_Body.company-name">TechInnovate Solutions Inc. — San Francisco, CA</text:p>
      <text:p text:style-name="Text_20_Body.date-range">March 2020 – Present</text:p>
      <text:list xml:id="list825141900" text:style-name="L2">
        <text:list-item>
          <text:p text:style-name="P6">Architected and managed multi-account AWS infrastructure supporting 200+ microservices, achieving 99.99% uptime through automated failover and disaster recovery strategies. </text:p>
        </text:list-item>
        <text:list-item>
          <text:p text:style-name="P6">Designed and implemented CI/CD pipelines using Jenkins and GitLab CI, reducing deployment cycle from 2 hours to 12 minutes (90% improvement). </text:p>
        </text:list-item>
        <text:list-item>
          <text:p text:style-name="P6">Led migration of 50+ legacy applications to Docker containers orchestrated by Kubernetes, resulting in 40% reduction in infrastructure costs. </text:p>
        </text:list-item>
        <text:list-item>
          <text:p text:style-name="P6">Developed Terraform modules for reusable infrastructure provisioning, enabling self-service environment creation for development teams. </text:p>
        </text:list-item>
        <text:list-item>
          <text:p text:style-name="P6">Implemented comprehensive monitoring stack using Prometheus and Grafana, with custom alerting that reduced mean time to detection (MTTD) by 65%. </text:p>
        </text:list-item>
        <text:list-item>
          <text:p text:style-name="P6">Managed Kubernetes clusters across development, staging, and production environments, including RBAC configuration, network policies, and resource quotas. </text:p>
        </text:list-item>
        <text:list-item>
          <text:p text:style-name="P5">Automated database backup and recovery procedures using Python scripts and AWS Lambda, ensuring RPO of 15 minutes and RTO of 30 minutes. </text:p>
        </text:list-item>
      </text:list>
      <text:h text:style-name="Heading_20_3" text:outline-level="3">DevOps Engineer</text:h>
      <text:p text:style-name="Text_20_Body.company-name">CloudScale Systems — Austin, TX</text:p>
      <text:p text:style-name="Text_20_Body.date-range">June 2017 – February 2020</text:p>
      <text:list xml:id="list3036491375" text:style-name="L3">
        <text:list-item>
          <text:p text:style-name="P8">Built and maintained CI/CD infrastructure using Jenkins, GitLab CI, and Artifactory, supporting 15 development teams with parallel build pipelines. </text:p>
        </text:list-item>
        <text:list-item>
          <text:p text:style-name="P8">Containerized monolithic applications into microservices using Docker and orchestrated deployments with Kubernetes on AWS EKS. </text:p>
        </text:list-item>
        <text:list-item>
          <text:p text:style-name="P8">Created infrastructure-as-code templates using Terraform and Ansible, reducing environment provisioning time from 3 days to 2 hours. </text:p>
        </text:list-item>
        <text:list-item>
          <text:p text:style-name="P8">Implemented centralized logging solution using ELK Stack (Elasticsearch, Logstash, Kibana) processing 50GB of logs daily. </text:p>
        </text:list-item>
        <text:list-item>
          <text:p text:style-name="P8">Automated security compliance checks using Python and AWS Config rules, achieving 100% compliance with SOC2 requirements. </text:p>
        </text:list-item>
        <text:list-item>
          <text:p text:style-name="P7">Managed DNS, SSL certificate renewal, and load balancing using AWS Route53, ACM, and ALB/NLB. </text:p>
        </text:list-item>
      </text:list>
      <text:h text:style-name="Heading_20_3" text:outline-level="3">Junior DevOps Engineer</text:h>
      <text:p text:style-name="Text_20_Body.company-name">DataStream Technologies — Denver, CO</text:p>
      <text:p text:style-name="Text_20_Body.date-range">January 2015 – May 2017</text:p>
      <text:list xml:id="list3088655111" text:style-name="L4">
        <text:list-item>
          <text:p text:style-name="P10">Assisted in migration of on-premises infrastructure to AWS cloud, including EC2, S3, VPC, and RDS setup. </text:p>
        </text:list-item>
        <text:list-item>
          <text:p text:style-name="P10">Developed Bash and Python scripts for automated server provisioning, configuration management, and log rotation. </text:p>
        </text:list-item>
        <text:list-item>
          <text:p text:style-name="P10">Maintained Jenkins CI/CD pipelines and resolved build failures for Java and Python applications. </text:p>
        </text:list-item>
        <text:list-item>
          <text:p text:style-name="P10">Monitored system performance using Nagios and custom scripts, responding to alerts and performing root cause analysis. </text:p>
        </text:list-item>
        <text:list-item>
          <text:p text:style-name="P9">Documented operational procedures and created runbooks for incident response and disaster recovery. </text:p>
        </text:list-item>
      </text:list>
      <text:h text:style-name="Heading_20_2" text:outline-level="2">Educa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Degree</text:p>
          </table:table-cell>
          <table:table-cell table:style-name="Table1.A1" office:value-type="string">
            <text:p text:style-name="Table_20_Heading">Institution</text:p>
          </table:table-cell>
          <table:table-cell table:style-name="Table1.A1" office:value-type="string">
            <text:p text:style-name="Table_20_Heading">Year</text:p>
          </table:table-cell>
        </table:table-row>
        <table:table-row>
          <table:table-cell table:style-name="Table1.A1" office:value-type="string">
            <text:p text:style-name="Table_20_Contents">Master of Science in Computer Science</text:p>
          </table:table-cell>
          <table:table-cell table:style-name="Table1.A1" office:value-type="string">
            <text:p text:style-name="Table_20_Contents">{PLACEHOLDER_UNIVERSITY_1}</text:p>
          </table:table-cell>
          <table:table-cell table:style-name="Table1.A1" office:value-type="string">
            <text:p text:style-name="Table_20_Contents">{PLACEHOLDER_YEAR_1}</text:p>
          </table:table-cell>
        </table:table-row>
        <table:table-row>
          <table:table-cell table:style-name="Table1.A1" office:value-type="string">
            <text:p text:style-name="Table_20_Contents">Bachelor of Science in Information Technology</text:p>
          </table:table-cell>
          <table:table-cell table:style-name="Table1.A1" office:value-type="string">
            <text:p text:style-name="Table_20_Contents">{PLACEHOLDER_UNIVERSITY_2}</text:p>
          </table:table-cell>
          <table:table-cell table:style-name="Table1.A1" office:value-type="string">
            <text:p text:style-name="Table_20_Contents">{PLACEHOLDER_YEAR_2}</text:p>
          </table:table-cell>
        </table:table-row>
      </table:table>
      <text:h text:style-name="Heading_20_2" text:outline-level="2">Certifications</text:h>
      <text:list xml:id="list2472022238" text:style-name="L5">
        <text:list-item>
          <text:p text:style-name="P12"><text:span text:style-name="Strong_20_Emphasis">AWS Certified Solutions Architect – Professional</text:span> (2021, recertified 2024) </text:p>
        </text:list-item>
        <text:list-item>
          <text:p text:style-name="P12"><text:span text:style-name="Strong_20_Emphasis">Certified Kubernetes Administrator (CKA)</text:span> (2022, recertified 2025) </text:p>
        </text:list-item>
        <text:list-item>
          <text:p text:style-name="P12"><text:span text:style-name="Strong_20_Emphasis">HashiCorp Certified: Terraform Associate</text:span> (2023) </text:p>
        </text:list-item>
        <text:list-item>
          <text:p text:style-name="P12"><text:span text:style-name="Strong_20_Emphasis">AWS Certified DevOps Engineer – Professional</text:span> (2022) </text:p>
        </text:list-item>
        <text:list-item>
          <text:p text:style-name="P12"><text:span text:style-name="Strong_20_Emphasis">Certified Jenkins Engineer</text:span> (2020) </text:p>
        </text:list-item>
        <text:list-item>
          <text:p text:style-name="P11"><text:span text:style-name="Strong_20_Emphasis">Linux Professional Institute Certification (LPIC-1)</text:span> (2018) </text:p>
        </text:list-item>
      </text:list>
      <text:h text:style-name="Heading_20_2" text:outline-level="2">Key Projects</text:h>
      <text:h text:style-name="Heading_20_3" text:outline-level="3">Kubernetes Cluster Autoscaling Implementation</text:h>
      <text:list xml:id="list3381999943" text:style-name="L6">
        <text:list-item>
          <text:p text:style-name="P14">Designed and implemented horizontal pod autoscaling (HPA) and cluster autoscaling for production Kubernetes clusters handling 10,000+ requests per second. </text:p>
        </text:list-item>
        <text:list-item>
          <text:p text:style-name="P14">Integrated custom metrics from Prometheus into HPA for intelligent scaling based on application-specific metrics. </text:p>
        </text:list-item>
        <text:list-item>
          <text:p text:style-name="P13">Reduced infrastructure costs by 35% while maintaining performance SLAs during traffic spikes. </text:p>
        </text:list-item>
      </text:list>
      <text:h text:style-name="Heading_20_3" text:outline-level="3">Multi-Region Disaster Recovery Architecture</text:h>
      <text:list xml:id="list3674850509" text:style-name="L7">
        <text:list-item>
          <text:p text:style-name="P16">Architected active-passive multi-region setup on AWS with automated failover using Route53 health checks and Lambda functions. </text:p>
        </text:list-item>
        <text:list-item>
          <text:p text:style-name="P16">Implemented cross-region database replication using AWS RDS read replicas and DynamoDB global tables. </text:p>
        </text:list-item>
        <text:list-item>
          <text:p text:style-name="P15">Conducted quarterly disaster recovery drills achieving RTO of 15 minutes and RPO of 5 minutes. </text:p>
        </text:list-item>
      </text:list>
      <text:h text:style-name="Heading_20_3" text:outline-level="3">Infrastructure Cost Optimization Initiative</text:h>
      <text:list xml:id="list1339730165" text:style-name="L8">
        <text:list-item>
          <text:p text:style-name="P18">Analyzed AWS billing data and identified $120,000 in annual savings through reserved instances, right-sizing, and elimination of unused resources. </text:p>
        </text:list-item>
        <text:list-item>
          <text:p text:style-name="P18">Implemented automated instance scheduling using AWS Instance Scheduler, reducing non-production costs by 50%. </text:p>
        </text:list-item>
        <text:list-item>
          <text:p text:style-name="P17">Created cost dashboards in Grafana with real-time spending alerts for engineering teams. </text:p>
        </text:list-item>
      </text:list>
      <text:h text:style-name="Heading_20_2" text:outline-level="2">Technical Proficiencies Summary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Category</text:p>
          </table:table-cell>
          <table:table-cell table:style-name="Table2.A1" office:value-type="string">
            <text:p text:style-name="Table_20_Heading">Technologies</text:p>
          </table:table-cell>
          <table:table-cell table:style-name="Table2.A1" office:value-type="string">
            <text:p text:style-name="Table_20_Heading">Proficiency</text:p>
          </table:table-cell>
        </table:table-row>
        <table:table-row>
          <table:table-cell table:style-name="Table2.A1" office:value-type="string">
            <text:p text:style-name="Table_20_Contents">Cloud Computing</text:p>
          </table:table-cell>
          <table:table-cell table:style-name="Table2.A1" office:value-type="string">
            <text:p text:style-name="Table_20_Contents">AWS, Azure (basic)</text:p>
          </table:table-cell>
          <table:table-cell table:style-name="Table2.A1" office:value-type="string">
            <text:p text:style-name="Table_20_Contents">Expert</text:p>
          </table:table-cell>
        </table:table-row>
        <table:table-row>
          <table:table-cell table:style-name="Table2.A1" office:value-type="string">
            <text:p text:style-name="Table_20_Contents">Container Orchestration</text:p>
          </table:table-cell>
          <table:table-cell table:style-name="Table2.A1" office:value-type="string">
            <text:p text:style-name="Table_20_Contents">Kubernetes, Docker Swarm</text:p>
          </table:table-cell>
          <table:table-cell table:style-name="Table2.A1" office:value-type="string">
            <text:p text:style-name="Table_20_Contents">Expert</text:p>
          </table:table-cell>
        </table:table-row>
        <table:table-row>
          <table:table-cell table:style-name="Table2.A1" office:value-type="string">
            <text:p text:style-name="Table_20_Contents">CI/CD</text:p>
          </table:table-cell>
          <table:table-cell table:style-name="Table2.A1" office:value-type="string">
            <text:p text:style-name="Table_20_Contents">Jenkins, GitLab CI, GitHub Actions</text:p>
          </table:table-cell>
          <table:table-cell table:style-name="Table2.A1" office:value-type="string">
            <text:p text:style-name="Table_20_Contents">Expert</text:p>
          </table:table-cell>
        </table:table-row>
        <table:table-row>
          <table:table-cell table:style-name="Table2.A1" office:value-type="string">
            <text:p text:style-name="Table_20_Contents">Infrastructure as Code</text:p>
          </table:table-cell>
          <table:table-cell table:style-name="Table2.A1" office:value-type="string">
            <text:p text:style-name="Table_20_Contents">Terraform, Ansible, CloudFormation</text:p>
          </table:table-cell>
          <table:table-cell table:style-name="Table2.A1" office:value-type="string">
            <text:p text:style-name="Table_20_Contents">Expert</text:p>
          </table:table-cell>
        </table:table-row>
        <table:table-row>
          <table:table-cell table:style-name="Table2.A1" office:value-type="string">
            <text:p text:style-name="Table_20_Contents">Scripting</text:p>
          </table:table-cell>
          <table:table-cell table:style-name="Table2.A1" office:value-type="string">
            <text:p text:style-name="Table_20_Contents">Python, Bash, Groovy</text:p>
          </table:table-cell>
          <table:table-cell table:style-name="Table2.A1" office:value-type="string">
            <text:p text:style-name="Table_20_Contents">Advanced</text:p>
          </table:table-cell>
        </table:table-row>
        <table:table-row>
          <table:table-cell table:style-name="Table2.A1" office:value-type="string">
            <text:p text:style-name="Table_20_Contents">Monitoring</text:p>
          </table:table-cell>
          <table:table-cell table:style-name="Table2.A1" office:value-type="string">
            <text:p text:style-name="Table_20_Contents">Prometheus, Grafana, ELK, Datadog</text:p>
          </table:table-cell>
          <table:table-cell table:style-name="Table2.A1" office:value-type="string">
            <text:p text:style-name="Table_20_Contents">Advanced</text:p>
          </table:table-cell>
        </table:table-row>
        <table:table-row>
          <table:table-cell table:style-name="Table2.A1" office:value-type="string">
            <text:p text:style-name="Table_20_Contents">Databases</text:p>
          </table:table-cell>
          <table:table-cell table:style-name="Table2.A1" office:value-type="string">
            <text:p text:style-name="Table_20_Contents">PostgreSQL, MySQL, MongoDB, Redis</text:p>
          </table:table-cell>
          <table:table-cell table:style-name="Table2.A1" office:value-type="string">
            <text:p text:style-name="Table_20_Contents">Intermediate</text:p>
          </table:table-cell>
        </table:table-row>
        <table:table-row>
          <table:table-cell table:style-name="Table2.A1" office:value-type="string">
            <text:p text:style-name="Table_20_Contents">Networking</text:p>
          </table:table-cell>
          <table:table-cell table:style-name="Table2.A1" office:value-type="string">
            <text:p text:style-name="Table_20_Contents">TCP/IP, DNS, HTTP/HTTPS, VPN, VPC</text:p>
          </table:table-cell>
          <table:table-cell table:style-name="Table2.A1" office:value-type="string">
            <text:p text:style-name="Table_20_Contents">Advanced</text:p>
          </table:table-cell>
        </table:table-row>
      </table:table>
      <text:h text:style-name="Heading_20_2" text:outline-level="2">Languages</text:h>
      <text:list xml:id="list3209245791" text:style-name="L9">
        <text:list-item>
          <text:p text:style-name="P20"><text:span text:style-name="Strong_20_Emphasis">English</text:span> — Native proficiency </text:p>
        </text:list-item>
        <text:list-item>
          <text:p text:style-name="P20"><text:span text:style-name="Strong_20_Emphasis">Spanish</text:span> — Professional working proficiency </text:p>
        </text:list-item>
        <text:list-item>
          <text:p text:style-name="P19"><text:span text:style-name="Strong_20_Emphasis">German</text:span> — Elementary proficiency </text:p>
        </text:list-item>
      </text:list>
      <text:h text:style-name="Heading_20_2" text:outline-level="2">Professional Affiliations</text:h>
      <text:list xml:id="list520144302" text:style-name="L10">
        <text:list-item>
          <text:p text:style-name="P22">Member, Cloud Native Computing Foundation (CNCF) </text:p>
        </text:list-item>
        <text:list-item>
          <text:p text:style-name="P22">Member, AWS User Group — San Francisco Chapter </text:p>
        </text:list-item>
        <text:list-item>
          <text:p text:style-name="P22">Speaker, DevOpsDays Austin 2022 — "Scaling Kubernetes with Confidence" </text:p>
        </text:list-item>
        <text:list-item>
          <text:p text:style-name="P21">Open Source Contributor — Terraform AWS Provider, Kubernetes SIG-Autoscaling </text:p>
        </text:list-item>
      </text:list>
      <text:p text:style-name="P23">— <text:span text:style-name="T2">References available upon request —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14%" fo:text-indent="0in" style:auto-text-indent="false"/>
      <style:text-properties fo:color="#000000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3335in" fo:margin-bottom="0.1665in" style:contextual-spacing="false" fo:padding-left="0in" fo:padding-right="0in" fo:padding-top="0in" fo:padding-bottom="0.0555in" fo:border-left="none" fo:border-right="none" fo:border-top="none" fo:border-bottom="1.5pt solid #1a3a5c"/>
      <style:text-properties fo:color="#1a3a5c" loext:opacity="100%" style:font-name="Liberation Sans Unicode MS" fo:font-family="'Liberation Sans Unicode MS'" style:font-pitch="variable"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.0555in" fo:margin-bottom="0.0555in" style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111in" style:contextual-spacing="false" fo:padding-left="0in" fo:padding-right="0in" fo:padding-top="0in" fo:padding-bottom="0.0417in" fo:border-left="none" fo:border-right="none" fo:border-top="none" fo:border-bottom="0.06pt solid #a0a0a0"/>
      <style:text-properties fo:color="#2b5797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835in" style:contextual-spacing="false"/>
      <style:text-properties fo:color="#3b3b3b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ext_20_Body.hidden-text" style:display-name="Text Body.hidden-text" style:family="paragraph" style:parent-style-name="Text_20_body">
      <style:paragraph-properties fo:line-height="100%"/>
      <style:text-properties fo:color="#ffffff" loext:opacity="100%" fo:font-size="1pt" style:font-size-asian="1pt" style:font-size-complex="1pt"/>
    </style:style>
    <style:style style:name="Text_20_Body.company-name" style:display-name="Text Body.company-name" style:family="paragraph" style:parent-style-name="Text_20_body">
      <style:text-properties fo:color="#444444" loext:opacity="100%" fo:font-style="italic" style:font-style-asian="italic" style:font-style-complex="italic"/>
    </style:style>
    <style:style style:name="Text_20_Body.date-range" style:display-name="Text Body.date-range" style:family="paragraph" style:parent-style-name="Text_20_body">
      <style:text-properties fo:color="#666666" loext:opacity="10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0" meta:object-count="0" meta:page-count="1" meta:paragraph-count="111" meta:word-count="818" meta:character-count="6350" meta:non-whitespace-character-count="5627"/>
    <meta:generator>LibreOffice/7.3.7.2$Linux_X86_64 LibreOffice_project/30$Build-2</meta:generator>
  </office:meta>
</office:document-meta>
</file>