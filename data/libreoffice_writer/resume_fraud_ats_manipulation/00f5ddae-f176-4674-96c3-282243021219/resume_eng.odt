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line-height="100%" fo:orphans="0"/>
      <style:text-properties fo:color="#ffffff" loext:opacity="100%" fo:font-size="1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ragraph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0in" svg:y="0in" svg:width="0.0161in" style:rel-width="100%" svg:height="0.0161in" draw:z-index="1">
        <draw:text-box fo:min-height="100%">
          <text:p text:style-name="P2">CERTIFIED INFORMATION SYSTEMS SECURITY PROFESSIONAL (CISSP) | CERTIFIED ETHICAL HACKER (CEH) | COMPTIA SECURITY+ | AWS CERTIFIED SOLUTIONS ARCHITECT | PROJECT MANAGEMENT PROFESSIONAL (PMP) | CERTIFIED DATA PRIVACY SOLUTIONS ENGINEER (CDPSE) | TOGAF 9 CERTIFIED | ITIL FOUNDATION V4 | CERTIFIED SCRUM MASTER | MICROSOFT AZURE SECURITY ENGINEER | GOOGLE PROFESSIONAL CLOUD SECURITY ENGINEER | CERTIFIED NETWORK DEFENSE ARCHITECT (CNDA) | OFFENSIVE SECURITY CERTIFIED PROFESSIONAL (OSCP) | GIAC SECURITY ESSENTIALS (GSEC) | CERTIFIED INFORMATION SECURITY MANAGER (CISM) | CERTIFIED IN RISK AND INFORMATION SYSTEMS CONTROL (CRISC) | LICENSED PENETRATION TESTER (LPT) | CERTIFIED FORENSIC INVESTIGATOR (CFI) | ADVANCED CYBER THREAT ANALYST | SECURITY OPERATIONS CENTER (SOC) ANALYST EXPERT | CLOUD SECURITY ALLIANCE (CSA) STAR AUDITOR | ISO 27001 LEAD AUDITOR | ISO 27001 LEAD IMPLEMENTER | NIST CYBERSECURITY FRAMEWORK PRACTITIONER | EC-COUNCIL CERTIFIED SECURITY ANALYST (ECSA) | CERTIFIED APPLICATION SECURITY ENGINEER (CASE) | COMPTIA CYSA+ | COMPTIA CASP+ | CERTIFIED CLOUD SECURITY PROFESSIONAL (CCSP) | SYSTEMS SECURITY CERTIFIED PRACTITIONER (SSCP) | CERTIFIED AUTHORIZATION PROFESSIONAL (CAP) | HEALTHCARE INFORMATION SECURITY AND PRIVACY PRACTITIONER (HCISPP) | CERTIFIED CYBER FORENSICS PROFESSIONAL (CCFP) | CERTIFIED SECURITY SYSTEMS ENGINEER (CSSE) | ADVANCED PERSISTENT THREAT (APT) EXPERT | ZERO TRUST ARCHITECTURE SPECIALIST | DEVSECOPS ENGINEER CERTIFIED | BLOCKCHAIN SECURITY ANALYST | QUANTUM COMPUTING SECURITY FOUNDATIONS | ARTIFICIAL INTELLIGENCE SECURITY SPECIALIST | IOT SECURITY PRACTITIONER | INDUSTRIAL CONTROL SYSTEMS (ICS) SECURITY EXPERT | SANS GIAC PENETRATION TESTER (GPEN) | SANS GIAC WEB APPLICATION PENETRATION TESTER (GWAPT) | SANS GIAC INCIDENT HANDLER (GCIH) | SANS GIAC FORENSIC ANALYST (GCFA) | SANS GIAC REVERSE ENGINEERING MALWARE (GREM) | SANS GIAC EXPLOIT RESEARCHER AND ADVANCED PENETRATION TESTER (GXPN) | SANS GIAC CYBER THREAT INTELLIGENCE (GCTI) | SANS GIAC SECURITY OPERATIONS CENTER (GSOC) | SANS GIAC DEFENDING ADVANCED THREATS (GDAT) | SANS GIAC STRATEGIC PLANNING, POLICY, AND LEADERSHIP (GSTRT) | SANS GIAC MOBILE DEVICE SECURITY (GMOB) | SANS GIAC CLOUD SECURITY AUTOMATION (GCSA) | SANS GIAC OPEN SOURCE INTELLIGENCE (GOSI) | SANS GIAC INDUSTRIAL CONTROL SYSTEMS SECURITY (GICSP) | CERTIFIED DATA PRIVACY OFFICER (CDPO) | CERTIFIED INFORMATION PRIVACY TECHNOLOGIST (CIPT) | CERTIFIED INFORMATION PRIVACY MANAGER (CIPM) | FELLOW OF INFORMATION PRIVACY (FIP) | CERTIFIED CYBER INVESTIGATOR (CCI) | CERTIFIED ELECTRONIC DISCOVERY SPECIALIST (CEDS) | CERTIFIED FRAUD EXAMINER (CFE) | CERTIFIED ANTI-MONEY LAUNDERING SPECIALIST (CAMS) | CERTIFIED RISK MANAGEMENT ASSURANCE (CRMA) | CERTIFIED INTERNAL AUDITOR (CIA) | CERTIFIED GOVERNMENT AUDITING PROFESSIONAL (CGAP) | CERTIFIED FINANCIAL SERVICES AUDITOR (CFSA) | CERTIFIED INFORMATION TECHNOLOGY AUDITOR (CISA) | CERTIFIED INFORMATION SECURITY AUDITOR (CISA) | CERTIFIED IN THE GOVERNANCE OF ENTERPRISE IT (CGEIT) | CERTIFIED IN RISK AND INFORMATION SYSTEMS CONTROL (CRISC) | CERTIFIED DATA MANAGEMENT PROFESSIONAL (CDMP) | CERTIFIED BUSINESS ANALYSIS PROFESSIONAL (CBAP) | CERTIFIED SUPPLY CHAIN PROFESSIONAL (CSCP) | CERTIFIED LOGISTICS, TRANSPORTATION AND DISTRIBUTION (CLTD) | CERTIFIED PRODUCTION AND INVENTORY MANAGEMENT (CPIM) | CERTIFIED QUALITY ENGINEER (CQE) | CERTIFIED SIX SIGMA BLACK BELT (CSSBB) | CERTIFIED SIX SIGMA GREEN BELT (CSSGB) | CERTIFIED SOFTWARE DEVELOPMENT PROFESSIONAL (CSDP) | CERTIFIED SOFTWARE TESTER (CSTE) | CERTIFIED ASSOCIATE IN SOFTWARE TESTING (CAST) | CERTIFIED SOFTWARE QUALITY ANALYST (CSQA) | CERTIFIED PROJECT DIRECTOR (CPD) | CERTIFIED PROGRAM MANAGER (PgMP) | CERTIFIED PORTFOLIO MANAGER (PfMP) | CERTIFIED RISK MANAGEMENT PROFESSIONAL (CRMP) | CERTIFIED CONTRACT MANAGER (CCM) | CERTIFIED COMMERCIAL CONTRACT MANAGER (CCCM) | CERTIFIED FEDERAL CONTRACT MANAGER (CFCM) | CERTIFIED PROFESSIONAL CONTRACT MANAGER (CPCM) | CERTIFIED PURCHASING MANAGER (CPM) | CERTIFIED PROFESSIONAL SUPPLIER (CPS) | CERTIFIED SUPPLY CHAIN ANALYST (CSCA) | CERTIFIED LOGISTICS ANALYST (CLA) | CERTIFIED WAREHOUSE AND DISTRIBUTION MANAGER (CWDM) | CERTIFIED TRANSPORTATION AND LOGISTICS (CTL) | CERTIFIED GLOBAL BUSINESS PROFESSIONAL (CGBP) | CERTIFIED INTERNATIONAL TRADE PROFESSIONAL (CITP) | CERTIFIED EXPORT SPECIALIST (CES) | CERTIFIED IMPORT SPECIALIST (CIS) | CERTIFIED TRADE COMPLIANCE SPECIALIST (CTCS) | CERTIFIED CUSTOMS BROKER (CCB) | CERTIFIED EXPORT COMPLIANCE OFFICER (CECO) | CERTIFIED INTERNATIONAL TRADE FINANCE SPECIALIST (CITFS) | CERTIFIED LETTER OF CREDIT SPECIALIST (CLCS) | CERTIFIED DOCUMENTARY CREDIT SPECIALIST (CDCS) | CERTIFIED TRADE FINANCE PROFESSIONAL (CTFP) | CERTIFIED FINANCIAL PLANNER (CFP) | CHARTERED FINANCIAL ANALYST (CFA) | CERTIFIED PUBLIC ACCOUNTANT (CPA) | CERTIFIED MANAGEMENT ACCOUNTANT (CMA) | CERTIFIED INTERNAL AUDITOR (CIA) | CERTIFIED FINANCIAL EXAMINER (CFE) | CERTIFIED GOVERNMENT FINANCIAL MANAGER (CGFM) | CERTIFIED FRAUD PREVENTION SPECIALIST (CFPS) | CERTIFIED RISK AND INSURANCE MANAGEMENT (CRIM) | CERTIFIED INSURANCE COUNSELOR (CIC) | CERTIFIED INSURANCE SERVICE REPRESENTATIVE (CISR) | CERTIFIED PROFESSIONAL INSURANCE AGENT (CPIA) | CERTIFIED INSURANCE PROGRAM SPECIALIST (CIPS) | ACCREDITED ADVISER IN INSURANCE (AAI) | ASSOCIATE IN INSURANCE ACCOUNTING AND FINANCE (AIAF) | ASSOCIATE IN INSURANCE SERVICES (AIS) | ASSOCIATE IN GENERAL INSURANCE (AGI) | ASSOCIATE IN REINSURANCE (ARE) | ASSOCIATE IN RISK MANAGEMENT (ARM) | ASSOCIATE IN COMMERCIAL UNDERWRITING (ACU) | ASSOCIATE IN PERSONAL INSURANCE (API) | ASSOCIATE IN CLAIMS (AIC) | ASSOCIATE IN INFORMATION TECHNOLOGY (AIT) | ASSOCIATE IN DATA ANALYTICS (ADA) | ASSOCIATE IN CYBERSECURITY (ACS) | ASSOCIATE IN CLOUD COMPUTING (ACC) | ASSOCIATE IN ARTIFICIAL INTELLIGENCE (AAI) | ASSOCIATE IN MACHINE LEARNING (AML) | ASSOCIATE IN BLOCKCHAIN (ABC) | ASSOCIATE IN INTERNET OF THINGS (AIOT) | ASSOCIATE IN QUANTUM COMPUTING (AQC) | CERTIFIED EMERGENCY MANAGER (CEM) | CERTIFIED HOMELAND SECURITY PROFESSIONAL (CHSP) | CERTIFIED PROTECTION PROFESSIONAL (CPP) | CERTIFIED PHYSICAL SECURITY PROFESSIONAL (CPSP) | CERTIFIED LOCKSMITH (CL) | CERTIFIED ELECTRONIC SECURITY TECHNICIAN (CEST) | CERTIFIED ALARM TECHNICIAN (CAT) | CERTIFIED FIRE ALARM TECHNICIAN (CFAT) | CERTIFIED ACCESS CONTROL TECHNICIAN (CACT) | CERTIFIED VIDEO SURVEILLANCE TECHNICIAN (CVST) | CERTIFIED INTRUSION DETECTION TECHNICIAN (CIDT) | CERTIFIED INTEGRATED SECURITY SYSTEMS TECHNICIAN (CISST) | CERTIFIED SECURITY CONSULTANT (CSC) | CERTIFIED SECURITY DESIGNER (CSD) | CERTIFIED SECURITY ARCHITECT (CSA) | CERTIFIED SECURITY ENGINEER (CSE) | CERTIFIED SECURITY ANALYST (CSA) | CERTIFIED SECURITY OPERATOR (CSO) | CERTIFIED SECURITY MANAGER (CSM) | CERTIFIED SECURITY DIRECTOR (CSD) | CERTIFIED CHIEF INFORMATION SECURITY OFFICER (CCISO) | CERTIFIED CHIEF SECURITY OFFICER (CCSO) | CERTIFIED CHIEF RISK OFFICER (CCRO) | CERTIFIED CHIEF PRIVACY OFFICER (CCPO) | CERTIFIED CHIEF COMPLIANCE OFFICER (CCO) | CERTIFIED CHIEF AUDIT EXECUTIVE (CCAE) | CERTIFIED CHIEF FINANCIAL OFFICER (CCFO) | CERTIFIED CHIEF OPERATING OFFICER (CCOO) | CERTIFIED CHIEF EXECUTIVE OFFICER (CCEO) | CERTIFIED BOARD DIRECTOR (CBD) | CERTIFIED CORPORATE GOVERNANCE PROFESSIONAL (CCGP) | CERTIFIED ETHICS AND COMPLIANCE PROFESSIONAL (CECP) | CERTIFIED COMPLIANCE AND ETHICS PROFESSIONAL (CCEP) | CERTIFIED REGULATORY COMPLIANCE MANAGER (CRCM) | CERTIFIED ANTI-MONEY LAUNDERING AND FRAUD PROFESSIONAL (CAMFP) | CERTIFIED FINANCIAL CRIME SPECIALIST (CFCS) | CERTIFIED ECONOMIC CRIME INVESTIGATOR (CECI) | CERTIFIED FORENSIC ACCOUNTANT (CFA) | CERTIFIED COMPUTER FORENSIC EXAMINER (CCFE) | CERTIFIED DIGITAL FORENSIC EXAMINER (CDFE) | CERTIFIED MOBILE FORENSIC EXAMINER (CMFE) | CERTIFIED NETWORK FORENSIC EXAMINER (CNFE) | CERTIFIED CLOUD FORENSIC EXAMINER (CCFE) | CERTIFIED SOCIAL MEDIA FORENSIC EXAMINER (CSMFE) | CERTIFIED OSINT ANALYST (COSINTA) | CERTIFIED DARK WEB INVESTIGATOR (CDWI) | CERTIFIED CRYPTOCURRENCY INVESTIGATOR (CCI) | CERTIFIED BLOCKCHAIN FORENSIC EXAMINER (CBFE) | CERTIFIED ARTIFICIAL INTELLIGENCE FORENSIC EXAMINER (CAIFE) | CERTIFIED CYBER THREAT INTELLIGENCE ANALYST (CCTIA) | CERTIFIED THREAT HUNTER (CTH) | CERTIFIED VULNERABILITY ASSESSOR (CVA) | CERTIFIED PENETRATION TESTER (CPT) | CERTIFIED RED TEAM OPERATOR (CRTO) | CERTIFIED BLUE TEAM OPERATOR (CBTO) | CERTIFIED PURPLE TEAM OPERATOR (CPTO) | CERTIFIED INCIDENT RESPONDER (CIR) | CERTIFIED INCIDENT HANDLER (CIH) | CERTIFIED DISASTER RECOVERY PLANNER (CDRP) | CERTIFIED BUSINESS CONTINUITY PROFESSIONAL (CBCP) | CERTIFIED ORGANIZATIONAL RESILIENCE PROFESSIONAL (CORP)</text:p>
        </draw:text-box>
      </draw:frame>
      <draw:frame draw:style-name="fr1" draw:name="Frame1" text:anchor-type="page" text:anchor-page-number="1" svg:x="0in" svg:y="0in" svg:width="0.0161in" style:rel-width="100%" svg:height="0.0161in" draw:z-index="0">
        <draw:text-box fo:min-height="100%">
          <text:p text:style-name="Text_20_body"/>
        </draw:text-box>
      </draw:fram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a1a1a" loext:opacity="100%" style:font-name="Liberation Serif1" fo:font-family="'Liberation Serif', 'Times New Roman', serif" fo:font-size="11pt" style:font-name-asian="Liberation Serif1" style:font-family-asian="'Liberation Serif', 'Times New Roman', serif" style:font-size-asian="11pt" style:font-name-complex="Liberation Serif1" style:font-family-complex="'Liberation Serif', 'Times New Roman', 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 fo:text-align="center" style:justify-single-word="false"/>
      <style:text-properties fo:color="#1a3a5c" loext:opacity="100%" style:font-name="Liberation Sans Unicode MS" fo:font-family="'Liberation Sans Unicode MS'" style:font-pitch="variable" fo:font-size="24pt" fo:letter-spacing="0.0138in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555in" fo:margin-right="0.0555in" fo:margin-top="0.0555in" fo:margin-bottom="0.0555in" style:contextual-spacing="false" fo:text-align="justify" style:justify-single-word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111in" style:contextual-spacing="false" fo:padding-left="0in" fo:padding-right="0in" fo:padding-top="0in" fo:padding-bottom="0.0417in" fo:border-left="none" fo:border-right="none" fo:border-top="none" fo:border-bottom="2.01pt solid #1a3a5c"/>
      <style:text-properties fo:text-transform="uppercase" fo:color="#1a3a5c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28in" style:contextual-spacing="false"/>
      <style:text-properties fo:color="#2b4a6e" loext:opacity="100%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1176" meta:character-count="8631" meta:non-whitespace-character-count="7456"/>
    <meta:generator>LibreOffice/7.3.7.2$Linux_X86_64 LibreOffice_project/30$Build-2</meta:generator>
  </office:meta>
</office:document-meta>
</file>