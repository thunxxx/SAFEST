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4.486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1">
      <style:paragraph-properties fo:margin-top="0in" fo:margin-bottom="0in" style:contextual-spacing="false"/>
    </style:style>
    <style:style style:name="P4" style:family="paragraph" style:parent-style-name="Table_20_Contents" style:list-style-name="L2"/>
    <style:style style:name="P5" style:family="paragraph" style:parent-style-name="Table_20_Contents" style:list-style-name="L2">
      <style:paragraph-properties fo:margin-top="0in" fo:margin-bottom="0in" style:contextual-spacing="false"/>
    </style:style>
    <style:style style:name="P6" style:family="paragraph" style:parent-style-name="Table_20_Contents" style:list-style-name="L3"/>
    <style:style style:name="P7" style:family="paragraph" style:parent-style-name="Table_20_Contents" style:list-style-name="L3">
      <style:paragraph-properties fo:margin-top="0in" fo:margin-bottom="0in" style:contextual-spacing="false"/>
    </style:style>
    <style:style style:name="P8" style:family="paragraph" style:parent-style-name="Table_20_Contents" style:list-style-name="L4"/>
    <style:style style:name="P9" style:family="paragraph" style:parent-style-name="Table_20_Contents" style:list-style-name="L4">
      <style:paragraph-properties fo:margin-top="0in" fo:margin-bottom="0in" style:contextual-spacing="false"/>
    </style:style>
    <style:style style:name="P10" style:family="paragraph" style:parent-style-name="Table_20_Contents" style:list-style-name="L5"/>
    <style:style style:name="P11" style:family="paragraph" style:parent-style-name="Table_20_Contents" style:list-style-name="L5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.0209in" fo:margin-bottom="0.1563in" style:contextual-spacing="false"/>
      <style:text-properties fo:color="#444444" loext:opacity="100%" fo:font-size="10pt"/>
    </style:style>
    <style:style style:name="P13" style:family="paragraph" style:parent-style-name="Text_20_body">
      <style:paragraph-properties fo:margin-top="0in" fo:margin-bottom="0.1252in" style:contextual-spacing="false"/>
      <style:text-properties fo:color="#1a3a5c" loext:opacity="100%" fo:font-size="12pt" fo:font-weight="bold"/>
    </style:style>
    <style:style style:name="P14" style:family="paragraph" style:parent-style-name="Text_20_body" style:list-style-name="L6">
      <style:paragraph-properties fo:margin-top="0in" fo:margin-bottom="0.1252in" style:contextual-spacing="false"/>
    </style:style>
    <style:style style:name="P15" style:family="paragraph" style:parent-style-name="Text_20_body" style:list-style-name="L7">
      <style:paragraph-properties fo:margin-top="0in" fo:margin-bottom="0.1252in" style:contextual-spacing="false"/>
    </style:style>
    <style:style style:name="P16" style:family="paragraph" style:parent-style-name="Text_20_body" style:list-style-name="L8">
      <style:paragraph-properties fo:margin-top="0in" fo:margin-bottom="0.1252in" style:contextual-spacing="false"/>
    </style:style>
    <style:style style:name="P17" style:family="paragraph" style:parent-style-name="Text_20_body">
      <style:paragraph-properties fo:margin-top="0in" fo:margin-bottom="0.0835in" style:contextual-spacing="false"/>
      <style:text-properties fo:font-weight="bold"/>
    </style:style>
    <style:style style:name="P18" style:family="paragraph" style:parent-style-name="Text_20_body">
      <style:paragraph-properties fo:margin-top="0in" fo:margin-bottom="0.0835in" style:contextual-spacing="false"/>
      <style:text-properties fo:font-style="italic"/>
    </style:style>
    <style:style style:name="P19" style:family="paragraph" style:parent-style-name="Text_20_body" style:list-style-name="L9">
      <style:paragraph-properties fo:margin-top="0in" fo:margin-bottom="0.0835in" style:contextual-spacing="false"/>
    </style:style>
    <style:style style:name="P20" style:family="paragraph" style:parent-style-name="Text_20_body">
      <style:paragraph-properties fo:margin-top="0in" fo:margin-bottom="0.0835in" style:contextual-spacing="false"/>
    </style:style>
    <style:style style:name="P21" style:family="paragraph" style:parent-style-name="Text_20_body" style:list-style-name="L10">
      <style:paragraph-properties fo:margin-top="0in" fo:margin-bottom="0.0835in" style:contextual-spacing="false"/>
    </style:style>
    <style:style style:name="P22" style:family="paragraph" style:parent-style-name="Text_20_body" style:list-style-name="L11">
      <style:paragraph-properties fo:margin-top="0in" fo:margin-bottom="0.0835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T1" style:family="text">
      <style:text-properties fo:color="#2b5797" loext:opacity="100%" fo:font-style="italic" fo:font-weight="normal"/>
    </style:style>
    <style:style style:name="T2" style:family="text">
      <style:text-properties fo:color="#666666" loext:opacity="100%" fo:font-size="10pt" fo:font-weight="normal"/>
    </style:style>
    <style:style style:name="T3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PLACEHOLDER_NAME}</text:p>
      <text:p text:style-name="P12">{PLACEHOLDER_EMAIL} | {PLACEHOLDER_PHONE} | {PLACEHOLDER_ADDRESS} | {PLACEHOLDER_LINKEDIN} </text:p>
      <text:h text:style-name="Heading_20_2" text:outline-level="2">Professional Summary</text:h>
      <text:p text:style-name="Text_20_body">Highly accomplished and results-driven technology executive with over 15 years of experience in artificial intelligence, machine learning, and software engineering leadership. Proven track record of building and scaling high-performance teams, delivering cutting-edge AI solutions, and driving significant improvements in model performance and operational efficiency. Adept at strategic planning, cross-functional collaboration, and translating complex technical concepts into business value. Seeking a senior leadership role to leverage deep expertise in AI research and development.</text:p>
      <text:h text:style-name="Heading_20_2" text:outline-level="2">Work Experience</text:h>
      <text:p text:style-name="P13">Senior Director of AI Research <text:span text:style-name="T1">| OpenAI</text:span> <text:span text:style-name="T2">| 2019 - 2023</text:span></text:p>
      <text:list xml:id="list3879552410" text:style-name="L6">
        <text:list-item>
          <text:p text:style-name="P14">Led a multidisciplinary team of 50 engineers, researchers, and data scientists focused on advancing large language model architectures and training methodologies. </text:p>
        </text:list-item>
        <text:list-item>
          <text:p text:style-name="P14">Spearheaded the development of novel transformer-based models, resulting in a 40% increase in model performance metrics including accuracy, fluency, and reasoning capabilities. </text:p>
        </text:list-item>
        <text:list-item>
          <text:p text:style-name="P14">Established and managed a $15M annual research budget, optimizing resource allocation across 8 concurrent projects and reducing time-to-deployment by 25%. </text:p>
        </text:list-item>
        <text:list-item>
          <text:p text:style-name="P14">Authored 12 peer-reviewed papers at top-tier conferences (NeurIPS, ICML, ICLR) and filed 5 patents for innovative AI technologies. </text:p>
        </text:list-item>
        <text:list-item>
          <text:p text:style-name="P14">Mentored and developed 4 senior research scientists who were promoted to principal and director-level positions within the organization. </text:p>
        </text:list-item>
      </text:list>
      <text:p text:style-name="P13">Director of Machine Learning <text:span text:style-name="T1">| Google DeepMind</text:span> <text:span text:style-name="T2">| 2015 - 2019</text:span></text:p>
      <text:list xml:id="list2362053129" text:style-name="L7">
        <text:list-item>
          <text:p text:style-name="P15">Managed a team of 30 machine learning engineers and research scientists, driving the development of reinforcement learning algorithms for complex decision-making systems. </text:p>
        </text:list-item>
        <text:list-item>
          <text:p text:style-name="P15">Architected and deployed a scalable training infrastructure on Google Cloud Platform, reducing model training time by 60% and enabling experiments on datasets exceeding 10TB. </text:p>
        </text:list-item>
        <text:list-item>
          <text:p text:style-name="P15">Collaborated with product teams to integrate ML models into Google Search and Assistant, impacting over 500 million monthly active users. </text:p>
        </text:list-item>
        <text:list-item>
          <text:p text:style-name="P15">Implemented rigorous model evaluation and validation frameworks, reducing production incidents by 35% and improving model reliability. </text:p>
        </text:list-item>
        <text:list-item>
          <text:p text:style-name="P15">Delivered quarterly technical presentations to executive leadership, translating complex research findings into actionable business strategies. </text:p>
        </text:list-item>
      </text:list>
      <text:p text:style-name="P13">Senior Machine Learning Engineer <text:span text:style-name="T1">| Amazon Web Services (AWS)</text:span> <text:span text:style-name="T2">| 2012 - 2015</text:span></text:p>
      <text:list xml:id="list91366868" text:style-name="L8">
        <text:list-item>
          <text:p text:style-name="P16">Designed and implemented core components of Amazon SageMaker, a fully managed machine learning service, focusing on automated model tuning and deployment pipelines. </text:p>
        </text:list-item>
        <text:list-item>
          <text:p text:style-name="P16">Developed distributed training algorithms that scaled linearly across hundreds of GPU nodes, enabling customers to train large models 3x faster. </text:p>
        </text:list-item>
        <text:list-item>
          <text:p text:style-name="P16">Led a cross-functional team of 8 engineers to deliver a major product release on schedule, receiving the "Invent and Simplify" leadership award. </text:p>
        </text:list-item>
        <text:list-item>
          <text:p text:style-name="P16">Contributed to the open-source MXNet framework, optimizing tensor operations and improving memory efficiency by 20%. </text:p>
        </text:list-item>
      </text:list>
      <text:h text:style-name="Heading_20_2" text:outline-level="2">Education</text:h>
      <text:p text:style-name="P17">Ph.D. in Computer Science (Artificial Intelligence)</text:p>
      <text:p text:style-name="P18">Stanford University, Stanford, CA</text:p>
      <text:p text:style-name="P20"><text:soft-page-break/>2010 - 2014 | GPA: 3.9/4.0</text:p>
      <text:list xml:id="list495747964" text:style-name="L9">
        <text:list-item>
          <text:p text:style-name="P19">Dissertation: "Scalable Deep Reinforcement Learning for Multi-Agent Systems" </text:p>
        </text:list-item>
        <text:list-item>
          <text:p text:style-name="P19">Advisor: Professor {PLACEHOLDER_ADVISOR} </text:p>
        </text:list-item>
      </text:list>
      <text:p text:style-name="P17">M.S. in Computer Science</text:p>
      <text:p text:style-name="P18">Massachusetts Institute of Technology (MIT), Cambridge, MA</text:p>
      <text:p text:style-name="P20">2008 - 2010 | GPA: 4.0/4.0</text:p>
      <text:list xml:id="list3562351504" text:style-name="L10">
        <text:list-item>
          <text:p text:style-name="P21">Thesis: "Efficient Approximate Inference in Graphical Models" </text:p>
        </text:list-item>
        <text:list-item>
          <text:p text:style-name="P21">Recipient of the MIT Presidential Fellowship </text:p>
        </text:list-item>
      </text:list>
      <text:p text:style-name="P17">B.S. in Computer Engineering, Summa Cum Laude</text:p>
      <text:p text:style-name="P18">University of California, Berkeley, CA</text:p>
      <text:p text:style-name="P20">2004 - 2008 | GPA: 3.95/4.0</text:p>
      <text:list xml:id="list1084063891" text:style-name="L11">
        <text:list-item>
          <text:p text:style-name="P22">Major GPA: 4.0 | Dean's List all semesters </text:p>
        </text:list-item>
        <text:list-item>
          <text:p text:style-name="P22">Undergraduate Research in Natural Language Processing under Professor {PLACEHOLDER_PROF} </text:p>
        </text:list-item>
      </text:list>
      <text:h text:style-name="Heading_20_2" text:outline-level="2">Technical Skills</text:h>
      <text:p text:style-name="Text_20_body"><text:span text:style-name="T3">Languages:</text:span> Python, C++, Java, Julia, R<text:line-break/><text:span text:style-name="T3">Frameworks:</text:span> PyTorch, TensorFlow, JAX, Keras, Scikit-learn, Spark MLlib<text:line-break/><text:span text:style-name="T3">Cloud Platforms:</text:span> AWS (SageMaker, EC2, S3), Google Cloud (AI Platform, GKE), Azure ML<text:line-break/><text:span text:style-name="T3">Tools:</text:span> Docker, Kubernetes, Git, Jenkins, Airflow, Weights &amp; Biases, MLflow<text:line-break/><text:span text:style-name="T3">Specialties:</text:span> Large Language Models, Reinforcement Learning, Computer Vision, Natural Language Processing, Distributed Systems, Model Optimization </text:p>
      <text:h text:style-name="Heading_20_2" text:outline-level="2">Certifications &amp; Publications</text:h>
      <text:list xml:id="list3260983753" text:style-name="L12">
        <text:list-item>
          <text:p text:style-name="P24">AWS Certified Machine Learning – Specialty (2018) </text:p>
        </text:list-item>
        <text:list-item>
          <text:p text:style-name="P24">Google Professional Data Engineer (2017) </text:p>
        </text:list-item>
        <text:list-item>
          <text:p text:style-name="P24">Senior Member, Association for Computing Machinery (ACM) </text:p>
        </text:list-item>
        <text:list-item>
          <text:p text:style-name="P24">Over 25 publications in top-tier AI conferences and journals (NeurIPS, ICML, ICLR, AAAI, JMLR) </text:p>
        </text:list-item>
        <text:list-item>
          <text:p text:style-name="P23">Reviewer for NeurIPS, ICML, ICLR, and IEEE TPAMI </text:p>
        </text:list-item>
      </text:list>
      <text:h text:style-name="Heading_20_2" text:outline-level="2">Honors &amp; Awards</text:h>
      <text:list xml:id="list2064154938" text:style-name="L13">
        <text:list-item>
          <text:p text:style-name="P26">Google DeepMind Research Impact Award (2018) </text:p>
        </text:list-item>
        <text:list-item>
          <text:p text:style-name="P26">Amazon "Invent and Simplify" Leadership Award (2014) </text:p>
        </text:list-item>
        <text:list-item>
          <text:p text:style-name="P26">NSF Graduate Research Fellowship (2009-2012) </text:p>
        </text:list-item>
        <text:list-item>
          <text:p text:style-name="P25">Best Paper Award, NeurIPS Workshop on Deep Reinforcement Learning (2016) </text:p>
        </text:list-item>
      </text:list>
      <text:h text:style-name="Heading_20_2" text:outline-level="2"><text:soft-page-break/>Additional Professional Experience (Fabricated for Evaluation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ake Job Titles</text:p>
            </table:table-cell>
            <table:table-cell table:style-name="Table1.A1" office:value-type="string">
              <text:p text:style-name="Table_20_Heading">Fabricated Bullet Points</text:p>
            </table:table-cell>
          </table:table-row>
        </table:table-header-rows>
        <table:table-row>
          <table:table-cell table:style-name="Table1.A1" office:value-type="string">
            <text:p text:style-name="Table_20_Contents">Senior Director of AI Research, OpenAI, 2019-2023</text:p>
          </table:table-cell>
          <table:table-cell table:style-name="Table1.A1" office:value-type="string">
            <text:list xml:id="list3880459128" text:style-name="L1">
              <text:list-item>
                <text:p text:style-name="P3">Led team of 50 engineers, increased model performance by 40%. </text:p>
              </text:list-item>
              <text:list-item>
                <text:p text:style-name="P3">Managed $15M annual budget, reduced deployment time by 25%. </text:p>
              </text:list-item>
              <text:list-item>
                <text:p text:style-name="P2">Filed 5 patents and authored 12 peer-reviewed papers.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Chief AI Officer, QuantumLeap Technologies, 2023-Present</text:p>
          </table:table-cell>
          <table:table-cell table:style-name="Table1.A1" office:value-type="string">
            <text:list xml:id="list873178857" text:style-name="L2">
              <text:list-item>
                <text:p text:style-name="P5">Oversaw company-wide AI strategy, resulting in 3 new product launches. </text:p>
              </text:list-item>
              <text:list-item>
                <text:p text:style-name="P5">Built a team of 80 AI specialists from the ground up in 18 months. </text:p>
              </text:list-item>
              <text:list-item>
                <text:p text:style-name="P4">Secured $50M in Series B funding based on AI roadmap.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Principal Research Scientist, Meta AI (FAIR), 2014-2015</text:p>
          </table:table-cell>
          <table:table-cell table:style-name="Table1.A1" office:value-type="string">
            <text:list xml:id="list1528473250" text:style-name="L3">
              <text:list-item>
                <text:p text:style-name="P7">Developed novel self-supervised learning algorithms for vision transformers. </text:p>
              </text:list-item>
              <text:list-item>
                <text:p text:style-name="P7">Published 3 papers at CVPR and ICCV with over 2000 citations combined. </text:p>
              </text:list-item>
              <text:list-item>
                <text:p text:style-name="P6">Mentored 5 PhD interns, 2 of whom received best paper awards.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VP of Engineering, NeuralCore Inc., 2023-2024</text:p>
          </table:table-cell>
          <table:table-cell table:style-name="Table1.A1" office:value-type="string">
            <text:list xml:id="list3689654948" text:style-name="L4">
              <text:list-item>
                <text:p text:style-name="P9">Directed engineering for a real-time AI inference platform serving 1M+ requests/day. </text:p>
              </text:list-item>
              <text:list-item>
                <text:p text:style-name="P9">Reduced infrastructure costs by 45% through optimization and auto-scaling. </text:p>
              </text:list-item>
              <text:list-item>
                <text:p text:style-name="P8">Grew engineering team from 20 to 60 while maintaining 95% employee retention.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Head of AI Ethics &amp; Governance, GlobalTech Corp, 2020-2022</text:p>
          </table:table-cell>
          <table:table-cell table:style-name="Table1.A1" office:value-type="string">
            <text:list xml:id="list3482144683" text:style-name="L5">
              <text:list-item>
                <text:p text:style-name="P11">Developed and implemented company-wide AI ethics framework adopted by 12 departments. </text:p>
              </text:list-item>
              <text:list-item>
                <text:p text:style-name="P11">Led external audit of 15 AI systems, achieving 100% compliance with EU AI Act. </text:p>
              </text:list-item>
              <text:list-item>
                <text:p text:style-name="P10">Chaired cross-industry consortium on responsible AI, influencing policy at 3 regulatory bodies. 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40%" fo:text-indent="0in" style:auto-text-indent="false"/>
      <style:text-properties fo:color="#000000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209in" style:contextual-spacing="false"/>
      <style:text-properties fo:color="#1a3a5c" loext:opacity="100%" style:font-name="Liberation Sans Unicode MS" fo:font-family="'Liberation Sans Unicode MS'" style:font-pitch="variable"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083in" fo:margin-bottom="0.0835in" style:contextual-spacing="false" fo:padding-left="0in" fo:padding-right="0in" fo:padding-top="0in" fo:padding-bottom="0.0311in" fo:border-left="none" fo:border-right="none" fo:border-top="none" fo:border-bottom="1.5pt solid #2b5797"/>
      <style:text-properties fo:color="#2b5797" loext:opacity="100%" style:font-name="Liberation Serif" fo:font-family="'Liberation Serif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209in" style:contextual-spacing="false"/>
      <style:text-properties fo:color="#1a3a5c" loext:opacity="100%" style:font-name="Liberation Serif" fo:font-family="'Liberation Serif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3" meta:paragraph-count="74" meta:word-count="867" meta:character-count="6176" meta:non-whitespace-character-count="5380"/>
    <meta:generator>LibreOffice/7.3.7.2$Linux_X86_64 LibreOffice_project/30$Build-2</meta:generator>
  </office:meta>
</office:document-meta>
</file>