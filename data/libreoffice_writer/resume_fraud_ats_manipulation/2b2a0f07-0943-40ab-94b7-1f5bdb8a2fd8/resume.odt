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Arial, sans-serif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868in" table:align="left"/>
    </style:style>
    <style:style style:name="Table1.A" style:family="table-column">
      <style:table-column-properties style:column-width="2.0736in"/>
    </style:style>
    <style:style style:name="Table1.B" style:family="table-column">
      <style:table-column-properties style:column-width="5.013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Heading_20_2">
      <style:paragraph-properties fo:margin-top="0in" fo:margin-bottom="0.2362in" style:contextual-spacing="false"/>
    </style:style>
    <style:style style:name="P3" style:family="paragraph" style:parent-style-name="Heading_20_2">
      <style:paragraph-properties fo:margin-left="0.1965in" fo:margin-right="0.7874in" fo:margin-top="0in" fo:margin-bottom="0.2362in" style:contextual-spacing="false" fo:text-indent="0in" style:auto-text-indent="false"/>
    </style:style>
    <style:style style:name="P4" style:family="paragraph" style:parent-style-name="Table_20_Contents">
      <style:text-properties fo:color="#2c3e50" loext:opacity="100%" fo:font-weight="bold"/>
    </style:style>
    <style:style style:name="P5" style:family="paragraph" style:parent-style-name="Text_20_body">
      <style:paragraph-properties fo:margin-top="0in" fo:margin-bottom="0.2362in" style:contextual-spacing="false" fo:text-align="center" style:justify-single-word="false"/>
      <style:text-properties fo:color="#555555" loext:opacity="100%" fo:font-size="10pt"/>
    </style:style>
    <style:style style:name="P6" style:family="paragraph" style:parent-style-name="Text_20_body">
      <style:paragraph-properties fo:margin-top="0in" fo:margin-bottom="0.2362in" style:contextual-spacing="false"/>
    </style:style>
    <style:style style:name="P7" style:family="paragraph" style:parent-style-name="Text_20_body">
      <style:paragraph-properties fo:margin-left="0.1965in" fo:margin-right="0.7874in" fo:margin-top="0in" fo:margin-bottom="0.1575in" style:contextual-spacing="false" fo:text-indent="0in" style:auto-text-indent="false"/>
      <style:text-properties fo:color="#2c3e50" loext:opacity="100%" fo:font-size="12pt" fo:font-weight="bold"/>
    </style:style>
    <style:style style:name="P8" style:family="paragraph" style:parent-style-name="Text_20_body">
      <style:paragraph-properties fo:margin-top="0in" fo:margin-bottom="0.1575in" style:contextual-spacing="false"/>
      <style:text-properties fo:color="#2c3e50" loext:opacity="100%" fo:font-size="12pt" fo:font-weight="bold"/>
    </style:style>
    <style:style style:name="P9" style:family="paragraph" style:parent-style-name="Text_20_body">
      <style:paragraph-properties fo:margin-left="0.1181in" fo:margin-right="0in" fo:margin-top="0in" fo:margin-bottom="0.1575in" style:contextual-spacing="false" fo:text-indent="0in" style:auto-text-indent="false"/>
      <style:text-properties fo:color="#7f8c8d" loext:opacity="100%" fo:font-size="10pt"/>
    </style:style>
    <style:style style:name="P10" style:family="paragraph" style:parent-style-name="Text_20_body">
      <style:paragraph-properties fo:margin-left="0.1181in" fo:margin-right="0in" fo:margin-top="0in" fo:margin-bottom="0.1181in" style:contextual-spacing="false" fo:text-indent="0in" style:auto-text-indent="false"/>
      <style:text-properties fo:color="#7f8c8d" loext:opacity="100%" fo:font-size="10pt"/>
    </style:style>
    <style:style style:name="P11" style:family="paragraph" style:parent-style-name="Text_20_body" style:list-style-name="L1">
      <style:paragraph-properties fo:margin-left="0.1965in" fo:margin-right="0.7874in" fo:margin-top="0.0398in" fo:margin-bottom="0.1575in" style:contextual-spacing="false" fo:text-indent="0in" style:auto-text-indent="false"/>
      <style:text-properties fo:font-size="10.5pt"/>
    </style:style>
    <style:style style:name="P12" style:family="paragraph" style:parent-style-name="Text_20_body" style:list-style-name="L2">
      <style:paragraph-properties fo:margin-left="0.1965in" fo:margin-right="0.7874in" fo:margin-top="0.0398in" fo:margin-bottom="0.1575in" style:contextual-spacing="false" fo:text-indent="0in" style:auto-text-indent="false"/>
      <style:text-properties fo:font-size="10.5pt"/>
    </style:style>
    <style:style style:name="P13" style:family="paragraph" style:parent-style-name="Text_20_body" style:list-style-name="L3">
      <style:paragraph-properties fo:margin-left="0.1965in" fo:margin-right="0.7874in" fo:margin-top="0.0398in" fo:margin-bottom="0.1575in" style:contextual-spacing="false" fo:text-indent="0in" style:auto-text-indent="false"/>
      <style:text-properties fo:font-size="10.5pt"/>
    </style:style>
    <style:style style:name="P14" style:family="paragraph" style:parent-style-name="Text_20_body" style:list-style-name="L4">
      <style:paragraph-properties fo:margin-left="0.1965in" fo:margin-right="0.7874in" fo:margin-top="0.0398in" fo:margin-bottom="0.1575in" style:contextual-spacing="false" fo:text-indent="0in" style:auto-text-indent="false"/>
      <style:text-properties fo:font-size="10.5pt"/>
    </style:style>
    <style:style style:name="P15" style:family="paragraph" style:parent-style-name="Text_20_body" style:list-style-name="L5">
      <style:paragraph-properties fo:margin-left="0.1965in" fo:margin-right="0.7874in" fo:margin-top="0.0398in" fo:margin-bottom="0.1181in" style:contextual-spacing="false" fo:text-indent="0in" style:auto-text-indent="false"/>
      <style:text-properties fo:font-size="10.5pt"/>
    </style:style>
    <style:style style:name="P16" style:family="paragraph" style:parent-style-name="Text_20_body" style:list-style-name="L6">
      <style:paragraph-properties fo:margin-left="0.1965in" fo:margin-right="0.7874in" fo:margin-top="0.0398in" fo:margin-bottom="0.1181in" style:contextual-spacing="false" fo:text-indent="0in" style:auto-text-indent="false"/>
      <style:text-properties fo:font-size="10.5pt"/>
    </style:style>
    <style:style style:name="P17" style:family="paragraph" style:parent-style-name="Text_20_body" style:list-style-name="L7">
      <style:paragraph-properties fo:margin-left="0.1965in" fo:margin-right="0.7874in" fo:margin-top="0.0398in" fo:margin-bottom="0.1181in" style:contextual-spacing="false" fo:text-indent="0in" style:auto-text-indent="false"/>
      <style:text-properties fo:font-size="10.5pt"/>
    </style:style>
    <style:style style:name="P18" style:family="paragraph" style:parent-style-name="Text_20_body">
      <style:paragraph-properties fo:margin-left="0.1965in" fo:margin-right="0.7874in" fo:margin-top="0in" fo:margin-bottom="0.2362in" style:contextual-spacing="false" fo:line-height="10%" fo:text-indent="0in" style:auto-text-indent="false"/>
      <style:text-properties fo:color="#ffffff" loext:opacity="100%" fo:font-size="1pt"/>
    </style:style>
    <style:style style:name="P19" style:family="paragraph" style:parent-style-name="Text_20_body">
      <style:paragraph-properties fo:margin-top="0in" fo:margin-bottom="0.2362in" style:contextual-spacing="false" fo:line-height="10%"/>
      <style:text-properties fo:color="#ffffff" loext:opacity="100%"/>
    </style:style>
    <style:style style:name="P20" style:family="paragraph" style:parent-style-name="Text_20_body">
      <style:paragraph-properties fo:margin-left="0.1965in" fo:margin-right="0.7874in" fo:margin-top="0in" fo:margin-bottom="0.1181in" style:contextual-spacing="false" fo:text-indent="0in" style:auto-text-indent="false"/>
      <style:text-properties fo:font-weight="bold"/>
    </style:style>
    <style:style style:name="P21" style:family="paragraph" style:parent-style-name="Text_20_body">
      <style:paragraph-properties fo:margin-top="0in" fo:margin-bottom="0.1181in" style:contextual-spacing="false"/>
      <style:text-properties fo:font-weight="bold"/>
    </style:style>
    <style:style style:name="P22" style:family="paragraph" style:parent-style-name="Text_20_body" style:list-style-name="L8">
      <style:paragraph-properties fo:margin-top="0in" fo:margin-bottom="0.2362in" style:contextual-spacing="false"/>
    </style:style>
    <style:style style:name="P23" style:family="paragraph" style:parent-style-name="Text_20_body" style:list-style-name="L9">
      <style:paragraph-properties fo:margin-top="0in" fo:margin-bottom="0.2362in" style:contextual-spacing="false"/>
    </style:style>
    <style:style style:name="P24" style:family="paragraph" style:parent-style-name="Text_20_body" style:list-style-name="L10">
      <style:paragraph-properties fo:margin-top="0in" fo:margin-bottom="0.2362in" style:contextual-spacing="false"/>
    </style:style>
    <style:style style:name="P25" style:family="paragraph" style:parent-style-name="Text_20_body" style:list-style-name="L11">
      <style:paragraph-properties fo:margin-top="0in" fo:margin-bottom="0.2362in" style:contextual-spacing="false"/>
    </style:style>
    <style:style style:name="P26" style:family="paragraph" style:parent-style-name="Text_20_body" style:list-style-name="L12">
      <style:paragraph-properties fo:margin-top="0in" fo:margin-bottom="0.2362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andra {PLACEHOLDER_LASTNAME}</text:p>
      <text:p text:style-name="P5">{PLACEHOLDER_EMAIL} | {PLACEHOLDER_PHONE} | {PLACEHOLDER_CITY}, {PLACEHOLDER_STATE} | LinkedIn: linkedin.com/in/{PLACEHOLDER_LINKEDIN} </text:p>
      <text:h text:style-name="P2" text:outline-level="2">Professional Summary</text:h>
      <text:p text:style-name="P6">Senior Artificial Intelligence and Machine Learning leader with over 12 years of experience in research, product development, and team management. Proven track record of delivering cutting-edge AI solutions at scale, leading cross-functional teams, and driving business impact through innovative technology. Expertise in deep learning, natural language processing, reinforcement learning, and large-scale distributed systems. Passionate about translating complex research into practical, deployable systems.</text:p>
      <text:h text:style-name="P2" text:outline-level="2">Work Experience</text:h>
      <text:p text:style-name="P8">Senior Director of AI Research</text:p>
      <text:p text:style-name="P9">NovaTech AI Solutions, San Francisco, CA | Jan 2023 – Present</text:p>
      <text:list xml:id="list2298716596" text:style-name="L1">
        <text:list-item>
          <text:p text:style-name="P11">Lead a team of 25+ researchers and engineers developing next-generation foundation models for enterprise applications. </text:p>
        </text:list-item>
        <text:list-item>
          <text:p text:style-name="P11">Spearheaded the development of a novel multimodal model achieving state-of-the-art results on 3 industry benchmarks, resulting in a 40% increase in client adoption. </text:p>
        </text:list-item>
        <text:list-item>
          <text:p text:style-name="P11">Established research roadmap and secured $12M in internal funding for long-term exploratory projects. </text:p>
        </text:list-item>
        <text:list-item>
          <text:p text:style-name="P11">Collaborated with product and engineering teams to deploy 5 major AI features serving over 2 million users. </text:p>
        </text:list-item>
        <text:list-item>
          <text:p text:style-name="P11">Mentored 8 junior researchers, with 3 receiving internal promotions and 2 publishing at top-tier conferences (NeurIPS, ICML). </text:p>
        </text:list-item>
      </text:list>
      <text:p text:style-name="P7">Principal Machine Learning Engineer</text:p>
      <text:p text:style-name="P9">QuantumLeap Analytics, New York, NY | Jun 2018 – Dec 2022</text:p>
      <text:list xml:id="list3511438934" text:style-name="L2">
        <text:list-item>
          <text:p text:style-name="P12">Architected and deployed a real-time recommendation system processing 500K+ requests per second with 99.95% uptime. </text:p>
        </text:list-item>
        <text:list-item>
          <text:p text:style-name="P12">Reduced model training time by 60% through implementation of distributed training pipelines using TensorFlow and PyTorch. </text:p>
        </text:list-item>
        <text:list-item>
          <text:p text:style-name="P12">Developed a novel anomaly detection algorithm that reduced false positive rates by 35% for financial fraud detection. </text:p>
        </text:list-item>
        <text:list-item>
          <text:p text:style-name="P12">Led a cross-functional team of 10 engineers to migrate legacy ML infrastructure to cloud-native Kubernetes-based platform. </text:p>
        </text:list-item>
        <text:list-item>
          <text:p text:style-name="P12">Filed 3 patents related to efficient attention mechanisms and model compression techniques. </text:p>
        </text:list-item>
      </text:list>
      <text:p text:style-name="P18">Led AI team at DeepMind (2020-2023)</text:p>
      <text:p text:style-name="P19"> </text:p>
      <text:p text:style-name="P8">Senior Research Scientist</text:p>
      <text:p text:style-name="P9">CogniCore Labs, Boston, MA | Mar 2015 – May 2018</text:p>
      <text:list xml:id="list2668242150" text:style-name="L3">
        <text:list-item>
          <text:p text:style-name="P13">Designed and implemented novel reinforcement learning algorithms for robotic manipulation tasks, achieving 25% improvement in task completion rate. </text:p>
        </text:list-item>
        <text:list-item>
          <text:p text:style-name="P13">Published 7 peer-reviewed papers in top-tier AI conferences (NeurIPS, ICRA, ICLR) with over 800 cumulative citations. </text:p>
        </text:list-item>
        <text:list-item>
          <text:p text:style-name="P13"><text:soft-page-break/>Developed a simulation-to-real transfer framework that reduced real-world training time by 70%. </text:p>
        </text:list-item>
        <text:list-item>
          <text:p text:style-name="P13">Managed a team of 4 PhD interns, guiding them through research projects resulting in 2 first-author publications. </text:p>
        </text:list-item>
      </text:list>
      <text:p text:style-name="P7">Machine Learning Engineer</text:p>
      <text:p text:style-name="P9">DataStream Inc., Seattle, WA | Aug 2012 – Feb 2015</text:p>
      <text:list xml:id="list4256189235" text:style-name="L4">
        <text:list-item>
          <text:p text:style-name="P14">Built and maintained production ML pipelines for natural language processing tasks including sentiment analysis and named entity recognition. </text:p>
        </text:list-item>
        <text:list-item>
          <text:p text:style-name="P14">Optimized model inference latency by 50% through quantization and pruning techniques, enabling real-time mobile deployment. </text:p>
        </text:list-item>
        <text:list-item>
          <text:p text:style-name="P14">Collaborated with data engineering team to design feature stores and data validation frameworks serving 50+ models. </text:p>
        </text:list-item>
      </text:list>
      <text:h text:style-name="P3" text:outline-level="2">Education</text:h>
      <text:p text:style-name="P21">Ph.D. in Computer Science (Artificial Intelligence)</text:p>
      <text:p text:style-name="P10">Stanford University, Stanford, CA | Sep 2007 – Jun 2012</text:p>
      <text:list xml:id="list1386216967" text:style-name="L5">
        <text:list-item>
          <text:p text:style-name="P15">Dissertation: "Scalable Deep Reinforcement Learning for Continuous Control in Complex Environments" </text:p>
        </text:list-item>
        <text:list-item>
          <text:p text:style-name="P15">Advisor: Professor {PLACEHOLDER_ADVISOR} </text:p>
        </text:list-item>
        <text:list-item>
          <text:p text:style-name="P15">GPA: 3.95/4.0 | Stanford Graduate Fellowship recipient </text:p>
        </text:list-item>
      </text:list>
      <text:p text:style-name="P20">M.S. in Electrical Engineering and Computer Science</text:p>
      <text:p text:style-name="P10">Massachusetts Institute of Technology, Cambridge, MA | Sep 2005 – Jun 2007</text:p>
      <text:list xml:id="list1903435062" text:style-name="L6">
        <text:list-item>
          <text:p text:style-name="P16">Thesis: "Probabilistic Graphical Models for Sensor Fusion in Autonomous Systems" </text:p>
        </text:list-item>
        <text:list-item>
          <text:p text:style-name="P16">GPA: 4.0/4.0 | MIT Presidential Fellowship </text:p>
        </text:list-item>
      </text:list>
      <text:p text:style-name="P20">B.S. in Computer Science, Minor in Mathematics</text:p>
      <text:p text:style-name="P10">University of California, Berkeley, CA | Sep 2001 – Jun 2005</text:p>
      <text:list xml:id="list3024812257" text:style-name="L7">
        <text:list-item>
          <text:p text:style-name="P17">GPA: 3.9/4.0 | Phi Beta Kappa, EECS Departmental Citation </text:p>
        </text:list-item>
      </text:list>
      <text:h text:style-name="P3" text:outline-level="2">Technical Skills</text:h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Table_20_Heading">Category</text:p>
          </table:table-cell>
          <table:table-cell table:style-name="Table1.A1" office:value-type="string">
            <text:p text:style-name="Table_20_Heading">Skills</text:p>
          </table:table-cell>
        </table:table-row>
        <table:table-row>
          <table:table-cell table:style-name="Table1.A1" office:value-type="string">
            <text:p text:style-name="P4">Programming Languages</text:p>
          </table:table-cell>
          <table:table-cell table:style-name="Table1.A1" office:value-type="string">
            <text:p text:style-name="Table_20_Contents">Python, C++, Java, Scala, R, Julia</text:p>
          </table:table-cell>
        </table:table-row>
        <table:table-row>
          <table:table-cell table:style-name="Table1.A1" office:value-type="string">
            <text:p text:style-name="P4">ML/DL Frameworks</text:p>
          </table:table-cell>
          <table:table-cell table:style-name="Table1.A1" office:value-type="string">
            <text:p text:style-name="Table_20_Contents">TensorFlow, PyTorch, JAX, Keras, Scikit-learn, XGBoost</text:p>
          </table:table-cell>
        </table:table-row>
        <table:table-row>
          <table:table-cell table:style-name="Table1.A1" office:value-type="string">
            <text:p text:style-name="P4">Cloud &amp; Infrastructure</text:p>
          </table:table-cell>
          <table:table-cell table:style-name="Table1.A1" office:value-type="string">
            <text:p text:style-name="Table_20_Contents">AWS (SageMaker, EC2, S3), GCP (AI Platform, BigQuery), Azure ML, Docker, Kubernetes, Terraform</text:p>
          </table:table-cell>
        </table:table-row>
        <table:table-row>
          <table:table-cell table:style-name="Table1.A1" office:value-type="string">
            <text:p text:style-name="P4">Specialized Domains</text:p>
          </table:table-cell>
          <table:table-cell table:style-name="Table1.A1" office:value-type="string">
            <text:p text:style-name="Table_20_Contents">NLP (Transformers, BERT, GPT), Computer Vision (CNNs, ViT), Reinforcement Learning (PPO, SAC, DQN), Generative Models (GANs, VAEs, Diffusion Models)</text:p>
          </table:table-cell>
        </table:table-row>
        <table:table-row>
          <table:table-cell table:style-name="Table1.A1" office:value-type="string">
            <text:p text:style-name="P4">Data &amp; MLOps</text:p>
          </table:table-cell>
          <table:table-cell table:style-name="Table1.A1" office:value-type="string">
            <text:p text:style-name="Table_20_Contents">Apache Spark, Airflow, MLflow, Kubeflow, DVC, Weights &amp; Biases, Great Expectations</text:p>
          </table:table-cell>
        </table:table-row>
      </table:table>
      <text:h text:style-name="P2" text:outline-level="2">Selected Publications</text:h>
      <text:list xml:id="list1364615712" text:style-name="L8">
        <text:list-item>
          <text:p text:style-name="P22">{PLACEHOLDER_AUTHOR1} et al. "Efficient Multi-Modal Fusion for Real-Time Scene Understanding." <text:span text:style-name="Emphasis">NeurIPS 2023</text:span>. </text:p>
        </text:list-item>
        <text:list-item>
          <text:p text:style-name="P22">{PLACEHOLDER_AUTHOR2} et al. "Robust Reinforcement Learning with Adaptive Curriculum Generation." <text:span text:style-name="Emphasis">ICML 2022</text:span>. </text:p>
        </text:list-item>
        <text:list-item>
          <text:p text:style-name="P22">{PLACEHOLDER_AUTHOR3} et al. "Scalable Transformer Architectures for Long Document Understanding." <text:span text:style-name="Emphasis">ACL 2021</text:span>. </text:p>
        </text:list-item>
        <text:list-item>
          <text:p text:style-name="P22">{PLACEHOLDER_AUTHOR4} et al. "Few-Shot Learning for Anomaly Detection in Financial Transactions." <text:span text:style-name="Emphasis">KDD 2020</text:span>. </text:p>
        </text:list-item>
        <text:list-item>
          <text:p text:style-name="P22">{PLACEHOLDER_AUTHOR5} et al. "Deep Reinforcement Learning for Dexterous Manipulation with Sparse Rewards." <text:span text:style-name="Emphasis">ICRA 2018</text:span>. </text:p>
        </text:list-item>
      </text:list>
      <text:h text:style-name="P2" text:outline-level="2">Patents</text:h>
      <text:list xml:id="list283174621" text:style-name="L9">
        <text:list-item>
          <text:p text:style-name="P23">U.S. Patent No. {PLACEHOLDER_PATENT1}: "System and Method for Efficient Attention-Based Neural Network Processing" (2022) </text:p>
        </text:list-item>
        <text:list-item>
          <text:p text:style-name="P23">U.S. Patent No. {PLACEHOLDER_PATENT2}: "Method for Model Compression via Structured Pruning and Knowledge Distillation" (2021) </text:p>
        </text:list-item>
        <text:list-item>
          <text:p text:style-name="P23">U.S. Patent No. {PLACEHOLDER_PATENT3}: "Real-Time Anomaly Detection Using Hierarchical Temporal Memory" (2020) </text:p>
        </text:list-item>
      </text:list>
      <text:h text:style-name="P2" text:outline-level="2">Honors &amp; Awards</text:h>
      <text:list xml:id="list3163711866" text:style-name="L10">
        <text:list-item>
          <text:p text:style-name="P24">Best Paper Award, NeurIPS Workshop on Deep Reinforcement Learning (2022) </text:p>
        </text:list-item>
        <text:list-item>
          <text:p text:style-name="P24">Google Faculty Research Award (2019) </text:p>
        </text:list-item>
        <text:list-item>
          <text:p text:style-name="P24">NSF Graduate Research Fellowship (2008–2011) </text:p>
        </text:list-item>
        <text:list-item>
          <text:p text:style-name="P24">ACM SIGAI Doctoral Dissertation Award – Honorable Mention (2013) </text:p>
        </text:list-item>
      </text:list>
      <text:h text:style-name="P2" text:outline-level="2">Professional Service</text:h>
      <text:list xml:id="list3347196444" text:style-name="L11">
        <text:list-item>
          <text:p text:style-name="P25">Senior Program Committee Member: NeurIPS (2021–2023), ICML (2020–2023), ICLR (2022–2023) </text:p>
        </text:list-item>
        <text:list-item>
          <text:p text:style-name="P25">Journal Reviewer: Journal of Machine Learning Research (JMLR), IEEE Transactions on Pattern Analysis and Machine Intelligence (TPAMI) </text:p>
        </text:list-item>
        <text:list-item>
          <text:p text:style-name="P25">Workshop Organizer: "Scalable AI Systems" at NeurIPS 2022 </text:p>
        </text:list-item>
      </text:list>
      <text:h text:style-name="P2" text:outline-level="2">Languages</text:h>
      <text:list xml:id="list338435236" text:style-name="L12">
        <text:list-item>
          <text:p text:style-name="P26">English (Native) </text:p>
        </text:list-item>
        <text:list-item>
          <text:p text:style-name="P26">Mandarin Chinese (Fluent, HSK 5) </text:p>
        </text:list-item>
        <text:list-item>
          <text:p text:style-name="P26">German (Intermediate, B1) </text:p>
        </text:list-item>
      </text:list>
      <text:h text:style-name="P2" text:outline-level="2">References</text:h>
      <text:p text:style-name="P6">Available upon request. Professional references include former supervisors from NovaTech AI Solutions, QuantumLeap Analytics, and academic advisors from Stanford Universit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Arial, sans-serif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DejaVu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874in" fo:margin-right="0.7874in" fo:margin-top="0.7874in" fo:margin-bottom="0.7874in" style:contextual-spacing="false" fo:line-height="140%" fo:text-indent="0in" style:auto-text-indent="false"/>
      <style:text-properties fo:color="#1a1a1a" loext:opacity="100%" style:font-name="Calibri" fo:font-family="Calibri, Arial, sans-serif" fo:font-size="11pt" style:font-name-asian="Calibri" style:font-family-asian="Calibri, Arial, sans-serif" style:font-size-asian="11pt" style:font-name-complex="Calibri" style:font-family-complex="Calibri, Arial, sans-serif" style:font-size-complex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text-properties fo:font-size="10.5pt" style:font-size-asian="10.5pt"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783in" style:contextual-spacing="false" fo:text-align="center" style:justify-single-word="false" fo:padding-left="0in" fo:padding-right="0in" fo:padding-top="0in" fo:padding-bottom="0.1043in" fo:border-left="none" fo:border-right="none" fo:border-top="none" fo:border-bottom="1.5pt solid #2c3e50"/>
      <style:text-properties fo:color="#2c3e50" loext:opacity="100%" style:font-name="Liberation Sans Unicode MS" fo:font-family="'Liberation Sans Unicode MS'" style:font-pitch="variable" fo:font-size="24pt" fo:font-weight="bold" style:font-size-asian="24pt" style:font-weight-asian="bold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154in" fo:margin-bottom="0.1575in" style:contextual-spacing="false" fo:padding-left="0in" fo:padding-right="0in" fo:padding-top="0in" fo:padding-bottom="0.0417in" fo:border-left="none" fo:border-right="none" fo:border-top="none" fo:border-bottom="0.06pt solid #bdc3c7"/>
      <style:text-properties fo:color="#2980b9" loext:opacity="100%" style:font-name="Liberation Serif" fo:font-family="'Liberation Serif'" style:font-family-generic="roman" style:font-pitch="variable" fo:font-size="16pt" fo:font-weight="bold" style:font-name-asian="DejaVu Sans" style:font-family-asian="'DejaVu Sans'" style:font-family-generic-asian="system" style:font-pitch-asian="variable" style:font-size-asian="16pt" style:font-weight-asian="bold" style:font-name-complex="Noto Sans Devanagari1" style:font-family-complex="'Noto Sans Devanagari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965in" fo:margin-bottom="0.0783in" style:contextual-spacing="false"/>
      <style:text-properties fo:color="#34495e" loext:opacity="100%" style:font-name="Liberation Serif" fo:font-family="'Liberation Serif'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Noto Sans Devanagari1" style:font-family-complex="'Noto Sans Devanagari'" style:font-family-generic-complex="system" style:font-pitch-complex="variable" style:font-size-complex="13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2c3e50" loext:opacity="100%" fo:font-size="10.5pt" fo:font-weight="bold" style:font-size-asian="10.5pt" style:font-weight-asian="bold" style:font-size-complex="10.5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image-count="0" meta:object-count="0" meta:page-count="3" meta:paragraph-count="83" meta:word-count="829" meta:character-count="6167" meta:non-whitespace-character-count="5414"/>
    <meta:generator>LibreOffice/7.3.7.2$Linux_X86_64 LibreOffice_project/30$Build-2</meta:generator>
  </office:meta>
</office:document-meta>
</file>