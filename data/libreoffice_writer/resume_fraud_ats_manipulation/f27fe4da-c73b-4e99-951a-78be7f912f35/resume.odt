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0.4694in"/>
    </style:style>
    <style:style style:name="Table1.B" style:family="table-column">
      <style:table-column-properties style:column-width="6.61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left="0.1665in" fo:margin-right="0.1665in" fo:text-indent="0in" style:auto-text-indent="false"/>
    </style:style>
    <style:style style:name="P3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</style:style>
    <style:style style:name="P4" style:family="paragraph" style:parent-style-name="Text_20_body">
      <style:paragraph-properties fo:margin-left="0.1665in" fo:margin-right="0.1665in" fo:margin-top="0.1665in" fo:margin-bottom="0.1665in" style:contextual-spacing="false" fo:text-indent="0in" style:auto-text-indent="false"/>
      <style:text-properties fo:background-color="#f8f9fa" loext:padding-left="0.1665in" loext:padding-right="0in" loext:padding-top="0in" loext:padding-bottom="0in" loext:border-left="3pt solid #2980b9" loext:border-right="none" loext:border-top="none" loext:border-bottom="non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.0835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.0835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.0835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.0835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.0835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.0835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.0835in" fo:margin-bottom="0in" style:contextual-spacing="false"/>
    </style:style>
    <style:style style:name="P19" style:family="paragraph" style:parent-style-name="Text_20_body">
      <style:paragraph-properties fo:margin-top="0.4165in" fo:margin-bottom="0.0835in" style:contextual-spacing="false" fo:text-align="center" style:justify-single-word="false"/>
    </style:style>
    <style:style style:name="T1" style:family="text">
      <style:text-properties fo:background-color="#f8f9fa" loext:char-shading-value="0" loext:padding-left="0.1665in" loext:padding-right="0in" loext:padding-top="0in" loext:padding-bottom="0in" loext:border-left="3pt solid #2980b9" loext:border-right="none" loext:border-top="none" loext:border-bottom="none"/>
    </style:style>
    <style:style style:name="T2" style:family="text">
      <style:text-properties fo:color="#999999" loext:opacity="100%" fo:font-size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PLACEHOLDER_NAME}</text:p>
      <text:p text:style-name="Text_20_Body.contact-info">{PLACEHOLDER_EMAIL} | {PLACEHOLDER_PHONE} | {PLACEHOLDER_LOCATION} | {PLACEHOLDER_LINKEDIN} </text:p>
      <text:p text:style-name="P3"><text:span text:style-name="Strong_20_Emphasis"><text:span text:style-name="T1">Professional Summary</text:span></text:span></text:p>
      <text:p text:style-name="P4">Results-driven Senior Software Engineer and Technical Leader with over 10 years of experience designing, developing, and deploying enterprise-grade applications. Proven track record in leading cross-functional teams, implementing cloud-native architectures, and driving Agile transformations. Passionate about leveraging data-driven insights to optimize system performance and deliver scalable solutions. Adept at bridging the gap between technical execution and business strategy, with a strong focus on mentorship and continuous improvement.</text:p>
      <text:h text:style-name="P2" text:outline-level="2">Professional Experience</text:h>
      <text:h text:style-name="Heading_20_3" text:outline-level="3">Senior Software Engineer &amp; Team Lead</text:h>
      <text:p text:style-name="Text_20_Body.company-name">{PLACEHOLDER_COMPANY_1} — {PLACEHOLDER_LOCATION_1}</text:p>
      <text:p text:style-name="Text_20_Body.date-range">{PLACEHOLDER_DATE_RANGE_1}</text:p>
      <text:list xml:id="list2201819327" text:style-name="L1">
        <text:list-item>
          <text:p text:style-name="P6">Architected and deployed a microservices-based platform on AWS using Docker and Kubernetes, improving system scalability by 40% and reducing deployment time by 60%. </text:p>
        </text:list-item>
        <text:list-item>
          <text:p text:style-name="P6">Led a team of 8 engineers through full Agile/Scrum lifecycle, facilitating daily stand-ups, sprint planning, and retrospectives, resulting in a 25% increase in team velocity. </text:p>
        </text:list-item>
        <text:list-item>
          <text:p text:style-name="P6">Designed and implemented a real-time data pipeline using Python, Apache Kafka, and AWS Kinesis, processing over 500,000 events per day with 99.9% uptime. </text:p>
        </text:list-item>
        <text:list-item>
          <text:p text:style-name="P6">Mentored junior developers on best practices in cloud computing, CI/CD pipelines, and code review processes, reducing production defects by 35%. </text:p>
        </text:list-item>
        <text:list-item>
          <text:p text:style-name="P5">Collaborated with product management to define technical roadmaps and translate business requirements into actionable engineering tasks. </text:p>
        </text:list-item>
      </text:list>
      <text:h text:style-name="Heading_20_3" text:outline-level="3">DevOps Engineer</text:h>
      <text:p text:style-name="Text_20_Body.company-name">{PLACEHOLDER_COMPANY_2} — {PLACEHOLDER_LOCATION_2}</text:p>
      <text:p text:style-name="Text_20_Body.date-range">{PLACEHOLDER_DATE_RANGE_2}</text:p>
      <text:list xml:id="list1166857592" text:style-name="L2">
        <text:list-item>
          <text:p text:style-name="P8">Automated infrastructure provisioning using Terraform and Ansible, reducing manual configuration errors by 90% and cutting provisioning time from days to hours. </text:p>
        </text:list-item>
        <text:list-item>
          <text:p text:style-name="P8">Implemented comprehensive monitoring and alerting solutions with Prometheus, Grafana, and ELK stack, achieving 95% faster incident response times. </text:p>
        </text:list-item>
        <text:list-item>
          <text:p text:style-name="P8">Managed multi-cloud environments (AWS, GCP) supporting 200+ production services, ensuring 99.99% availability through proactive capacity planning and failover testing. </text:p>
        </text:list-item>
        <text:list-item>
          <text:p text:style-name="P7">Developed and maintained CI/CD pipelines using Jenkins, GitLab CI, and GitHub Actions, enabling 50+ daily deployments with zero downtime. </text:p>
        </text:list-item>
      </text:list>
      <text:h text:style-name="Heading_20_3" text:outline-level="3">Software Developer (Full Stack)</text:h>
      <text:p text:style-name="Text_20_Body.company-name">{PLACEHOLDER_COMPANY_3} — {PLACEHOLDER_LOCATION_3}</text:p>
      <text:p text:style-name="Text_20_Body.date-range">{PLACEHOLDER_DATE_RANGE_3}</text:p>
      <text:list xml:id="list646382505" text:style-name="L3">
        <text:list-item>
          <text:p text:style-name="P10">Built and maintained RESTful APIs and web applications using Java (Spring Boot), Python (Django), and React.js, serving 1M+ monthly active users. </text:p>
        </text:list-item>
        <text:list-item>
          <text:p text:style-name="P10">Optimized SQL database queries and schema design, reducing average page load times by 45% and database costs by 30%. </text:p>
        </text:list-item>
        <text:list-item>
          <text:p text:style-name="P10"><text:soft-page-break/>Implemented unit and integration testing frameworks (JUnit, PyTest, Selenium), achieving 85% code coverage and significantly reducing regression bugs. </text:p>
        </text:list-item>
        <text:list-item>
          <text:p text:style-name="P9">Participated in on-call rotation for production support, troubleshooting and resolving critical incidents with an average MTTR under 30 minutes. </text:p>
        </text:list-item>
      </text:list>
      <text:h text:style-name="Heading_20_2" text:outline-level="2">Technical Skills</text:h>
      <text:list xml:id="list3390221210" text:style-name="L4">
        <text:list-item>
          <text:p text:style-name="P12"><text:span text:style-name="Strong_20_Emphasis">Languages:</text:span> Python, Java, C++, SQL, JavaScript, TypeScript </text:p>
        </text:list-item>
        <text:list-item>
          <text:p text:style-name="P12"><text:span text:style-name="Strong_20_Emphasis">Cloud &amp; DevOps:</text:span> AWS, GCP, Docker, Kubernetes, Terraform, Ansible, Jenkins, GitLab CI </text:p>
        </text:list-item>
        <text:list-item>
          <text:p text:style-name="P12"><text:span text:style-name="Strong_20_Emphasis">Data &amp; Analytics:</text:span> Machine Learning, Data Analysis, Apache Spark, TensorFlow, Pandas </text:p>
        </text:list-item>
        <text:list-item>
          <text:p text:style-name="P12"><text:span text:style-name="Strong_20_Emphasis">Databases:</text:span> PostgreSQL, MySQL, MongoDB, DynamoDB, Redis </text:p>
        </text:list-item>
        <text:list-item>
          <text:p text:style-name="P12"><text:span text:style-name="Strong_20_Emphasis">Methodologies:</text:span> Agile, Scrum, Kanban, SAFe, TDD, CI/CD </text:p>
        </text:list-item>
        <text:list-item>
          <text:p text:style-name="P11"><text:span text:style-name="Strong_20_Emphasis">Tools:</text:span> Git, Jira, Confluence, Prometheus, Grafana, ELK Stack </text:p>
        </text:list-item>
      </text:list>
      <text:h text:style-name="Heading_20_2" text:outline-level="2">Key Projects</text:h>
      <text:h text:style-name="Heading_20_3" text:outline-level="3">Cloud-Native E-Commerce Platform Migration</text:h>
      <text:p text:style-name="Text_20_body">Led the migration of a monolithic e-commerce application to a cloud-native microservices architecture on AWS. The project involved containerizing 15+ services with Docker, orchestrating with Kubernetes (EKS), and implementing service mesh with Istio. Resulted in 50% cost savings on infrastructure and 99.95% uptime during peak holiday traffic.</text:p>
      <text:h text:style-name="Heading_20_3" text:outline-level="3">Real-Time Fraud Detection System</text:h>
      <text:p text:style-name="Text_20_body">Designed and built a machine learning-powered fraud detection system using Python, AWS SageMaker, and Apache Flink. The system processed streaming transaction data and reduced false positives by 60% while maintaining a detection rate above 98%. Deployed using CI/CD pipelines with automated A/B testing.</text:p>
      <text:h text:style-name="Heading_20_2" text:outline-level="2">Education</text:h>
      <text:p text:style-name="Text_20_body"><text:span text:style-name="Strong_20_Emphasis">Master of Science in Computer Science</text:span><text:line-break/>{PLACEHOLDER_UNIVERSITY_1} — {PLACEHOLDER_GRAD_YEAR_1}<text:line-break/><text:span text:style-name="Emphasis">Specialization: Distributed Systems and Cloud Computing</text:span></text:p>
      <text:p text:style-name="Text_20_body"><text:span text:style-name="Strong_20_Emphasis">Bachelor of Science in Software Engineering</text:span><text:line-break/>{PLACEHOLDER_UNIVERSITY_2} — {PLACEHOLDER_GRAD_YEAR_2}<text:line-break/><text:span text:style-name="Emphasis">Magna Cum Laude, Dean's List</text:span></text:p>
      <text:h text:style-name="Heading_20_2" text:outline-level="2">Certifications</text:h>
      <text:list xml:id="list3757207266" text:style-name="L5">
        <text:list-item>
          <text:p text:style-name="P14">AWS Certified Solutions Architect – Professional </text:p>
        </text:list-item>
        <text:list-item>
          <text:p text:style-name="P14">Certified Kubernetes Administrator (CKA) </text:p>
        </text:list-item>
        <text:list-item>
          <text:p text:style-name="P14">Google Cloud Professional Data Engineer </text:p>
        </text:list-item>
        <text:list-item>
          <text:p text:style-name="P14">Scrum Master Certified (SMC) </text:p>
        </text:list-item>
        <text:list-item>
          <text:p text:style-name="P13">Certified SAFe 5 Agilist </text:p>
        </text:list-item>
      </text:list>
      <text:h text:style-name="Heading_20_2" text:outline-level="2">Languages</text:h>
      <text:list xml:id="list3952500281" text:style-name="L6">
        <text:list-item>
          <text:p text:style-name="P16">English — Native Proficiency </text:p>
        </text:list-item>
        <text:list-item>
          <text:p text:style-name="P16">Spanish — Professional Working Proficiency </text:p>
        </text:list-item>
        <text:list-item>
          <text:p text:style-name="P15"><text:soft-page-break/>German — Elementary Proficiency </text:p>
        </text:list-item>
      </text:list>
      <text:h text:style-name="Heading_20_2" text:outline-level="2">Professional Affiliations</text:h>
      <text:list xml:id="list4105477420" text:style-name="L7">
        <text:list-item>
          <text:p text:style-name="P18">IEEE Computer Society — Senior Member </text:p>
        </text:list-item>
        <text:list-item>
          <text:p text:style-name="P18">Association for Computing Machinery (ACM) — Professional Member </text:p>
        </text:list-item>
        <text:list-item>
          <text:p text:style-name="P17">Cloud Native Computing Foundation (CNCF) — Ambassador </text:p>
        </text:list-item>
      </text:list>
      <text:p text:style-name="P19"><text:span text:style-name="Emphasis"><text:span text:style-name="T2">References available upon request.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kills:</text:p>
          </table:table-cell>
          <table:table-cell table:style-name="Table1.A1" office:value-type="string">
            <text:p text:style-name="Table_20_Contents">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 Expert in Python, Java, C++, SQL, AWS, Machine Learning, Data Analysis, Agile, Scrum, Leadership, Communication, Problem Solving, Teamwork, Project Management, Cloud Computing, DevOps, Docker, Kubernete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50%" fo:text-indent="0in" style:auto-text-indent="false"/>
      <style:text-properties fo:color="#1a1a1a" loext:opacity="100%" style:font-name="Calibri" fo:font-family="Calibri, Arial, sans-serif" style:font-name-asian="Calibri" style:font-family-asian="Calibri, Arial, sans-serif" style:font-name-complex="Calibri" style:font-family-complex="Calibri, 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555in" style:contextual-spacing="false" fo:padding-left="0in" fo:padding-right="0in" fo:padding-top="0in" fo:padding-bottom="0.111in" fo:border-left="none" fo:border-right="none" fo:border-top="none" fo:border-bottom="2.24pt solid #2980b9"/>
      <style:text-properties fo:color="#2c3e50" loext:opacity="100%" style:font-name="Liberation Sans Unicode MS" fo:font-family="'Liberation Sans Unicode MS'" style:font-pitch="variable"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left="0.0835in" fo:margin-right="0.0835in" fo:margin-top="0.0835in" fo:margin-bottom="0.0835in" style:contextual-spacing="false" fo:text-indent="0in" style:auto-text-indent="false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78in" fo:margin-bottom="0.111in" style:contextual-spacing="false" fo:padding-left="0in" fo:padding-right="0in" fo:padding-top="0in" fo:padding-bottom="0.0555in" fo:border-left="none" fo:border-right="none" fo:border-top="none" fo:border-bottom="0.06pt solid #bdc3c7"/>
      <style:text-properties fo:color="#2980b9" loext:opacity="100%"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945in" fo:margin-bottom="0.0835in" style:contextual-spacing="false"/>
      <style:text-properties fo:color="#34495e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ext_20_Body.contact-info" style:display-name="Text Body.contact-info" style:family="paragraph" style:parent-style-name="Text_20_body">
      <style:paragraph-properties fo:margin-top="0.0835in" fo:margin-bottom="0.1665in" style:contextual-spacing="false"/>
      <style:text-properties fo:color="#555555" loext:opacity="100%" fo:font-size="11pt" style:font-size-asian="11pt" style:font-size-complex="11pt"/>
    </style:style>
    <style:style style:name="Text_20_Body.company-name" style:display-name="Text Body.company-name" style:family="paragraph" style:parent-style-name="Text_20_body">
      <style:text-properties fo:color="#2980b9" loext:opacity="100%" fo:font-weight="bold" style:font-weight-asian="bold" style:font-weight-complex="bold"/>
    </style:style>
    <style:style style:name="Text_20_Body.date-range" style:display-name="Text Body.date-range" style:family="paragraph" style:parent-style-name="Text_20_body">
      <style:text-properties fo:color="#7f8c8d" loext:opacity="100%"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3" meta:paragraph-count="59" meta:word-count="1380" meta:character-count="11067" meta:non-whitespace-character-count="9733"/>
    <meta:generator>LibreOffice/7.3.7.2$Linux_X86_64 LibreOffice_project/30$Build-2</meta:generator>
  </office:meta>
</office:document-meta>
</file>