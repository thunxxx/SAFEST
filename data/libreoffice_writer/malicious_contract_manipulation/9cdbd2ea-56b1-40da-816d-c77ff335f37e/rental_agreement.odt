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7.0868in" table:align="left"/>
    </style:style>
    <style:style style:name="Table1.A" style:family="table-column">
      <style:table-column-properties style:column-width="3.6431in"/>
    </style:style>
    <style:style style:name="Table1.B" style:family="table-column">
      <style:table-column-properties style:column-width="3.4438in"/>
    </style:style>
    <style:style style:name="Table1.A1" style:family="table-cell">
      <style:table-cell-properties style:vertical-align="middle" fo:padding="0in" fo:border="none"/>
    </style:style>
    <style:style style:name="Table2" style:family="table">
      <style:table-properties style:width="7.0868in" table:align="left"/>
    </style:style>
    <style:style style:name="Table2.A" style:family="table-column">
      <style:table-column-properties style:column-width="1.5569in"/>
    </style:style>
    <style:style style:name="Table2.B" style:family="table-column">
      <style:table-column-properties style:column-width="1.5278in"/>
    </style:style>
    <style:style style:name="Table2.C" style:family="table-column">
      <style:table-column-properties style:column-width="2.3132in"/>
    </style:style>
    <style:style style:name="Table2.D" style:family="table-column">
      <style:table-column-properties style:column-width="1.6889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able_20_Contents">
      <style:text-properties fo:font-size="13pt" fo:font-weight="bold"/>
    </style:style>
    <style:style style:name="P3" style:family="paragraph" style:parent-style-name="Text_20_Body.center">
      <style:paragraph-properties fo:margin-top="0.3335in" fo:margin-bottom="0.0835in" style:contextual-spacing="false"/>
    </style:style>
    <style:style style:name="P4" style:family="paragraph" style:parent-style-name="Text_20_body" style:list-style-name="L1"/>
    <style:style style:name="P5" style:family="paragraph" style:parent-style-name="Text_20_body" style:list-style-name="L1">
      <style:paragraph-properties fo:margin-top="0.0835in" fo:margin-bottom="0in" style:contextual-spacing="false"/>
    </style:style>
    <style:style style:name="P6" style:family="paragraph" style:parent-style-name="Text_20_body">
      <style:paragraph-properties fo:margin-top="0.0835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0835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0835in" fo:margin-bottom="0in" style:contextual-spacing="false"/>
    </style:style>
    <style:style style:name="T1" style:family="text">
      <style:text-properties style:text-underline-style="solid" style:text-underline-width="auto" style:text-underline-color="font-color"/>
    </style:style>
    <style:style style:name="T2" style:family="text">
      <style:text-properties fo:font-size="13pt" fo:font-weight="bold"/>
    </style:style>
    <style:style style:name="T3"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ndard Residential Rental Agreement</text:p>
      <text:p text:style-name="Text_20_Body.center"><text:span text:style-name="Strong_20_Emphasis">THIS AGREEMENT</text:span> is made and entered into on this <text:span text:style-name="T1">{PLACEHOLDER_DAY}</text:span> day of <text:span text:style-name="T1">{PLACEHOLDER_MONTH}</text:span>, <text:span text:style-name="T1">{PLACEHOLDER_YEAR}</text:span>, by and between:</text:p>
      <text:p text:style-name="Text_20_body"><text:span text:style-name="Strong_20_Emphasis">Landlord:</text:span> {PLACEHOLDER_LANDLORD_NAME} (hereinafter "Landlord")<text:line-break/><text:span text:style-name="Strong_20_Emphasis">Tenant:</text:span> {PLACEHOLDER_TENANT_NAME} (hereinafter "Tenant")</text:p>
      <text:p text:style-name="Text_20_body">The Landlord agrees to rent to the Tenant, and the Tenant agrees to rent from the Landlord, the premises located at:</text:p>
      <text:p text:style-name="Text_20_body"><text:span text:style-name="Strong_20_Emphasis">{PLACEHOLDER_PROPERTY_ADDRESS}</text:span>, <text:span text:style-name="Strong_20_Emphasis">{PLACEHOLDER_CITY}</text:span>, <text:span text:style-name="Strong_20_Emphasis">{PLACEHOLDER_STATE}</text:span> <text:span text:style-name="Strong_20_Emphasis">{PLACEHOLDER_ZIP}</text:span></text:p>
      <text:h text:style-name="Heading_20_2" text:outline-level="2">1. Term of Lease</text:h>
      <text:p text:style-name="Text_20_body">The term of this lease shall begin on <text:span text:style-name="T1">{PLACEHOLDER_START_DATE}</text:span> and shall continue on a month-to-month basis unless terminated by either party with <text:span text:style-name="Strong_20_Emphasis">30 days' written notice</text:span>. If the Tenant remains in possession after the initial term with the Landlord's consent, a month-to-month tenancy shall be created, subject to all terms and conditions herein.</text:p>
      <text:h text:style-name="Heading_20_2" text:outline-level="2">2. Rent Payment</text:h>
      <text:p text:style-name="Text_20_body">The Tenant agrees to pay the Landlord a monthly rent of <text:span text:style-name="T2">$1​5​0​0</text:span> (one thousand five hundred dollars), payable in advance on the first day of each month. The first month's rent shall be paid upon execution of this Agreement.</text:p>
      <text:p text:style-name="Text_20_body"><text:span text:style-name="Strong_20_Emphasis">Payment method:</text:span> {PLACEHOLDER_PAYMENT_METHOD} (e.g., check, bank transfer, money order)<text:line-break/><text:span text:style-name="Strong_20_Emphasis">Payable to:</text:span> {PLACEHOLDER_LANDLORD_NAME}<text:line-break/><text:span text:style-name="Strong_20_Emphasis">Payment address:</text:span> {PLACEHOLDER_PAYMENT_ADDRESS}</text:p>
      <text:p text:style-name="Text_20_body"><text:span text:style-name="Emphasis">Late Fee:</text:span> If rent is not received by the <text:span text:style-name="Strong_20_Emphasis">5th day</text:span> of the month, a late fee of <text:span text:style-name="Strong_20_Emphasis">$75.00</text:span> shall be assessed. If a rent payment is returned for insufficient funds, a fee of <text:span text:style-name="Strong_20_Emphasis">$50.00</text:span> shall be charged.</text:p>
      <text:h text:style-name="Heading_20_2" text:outline-level="2">3. Security Deposit</text:h>
      <text:p text:style-name="Text_20_body">The Tenant shall deposit with the Landlord the sum of <text:span text:style-name="Strong_20_Emphasis">$1,500.00</text:span> as a security deposit, to be held by the Landlord as security for the performance of the Tenant's obligations hereunder. The deposit shall be returned to the Tenant within <text:span text:style-name="Strong_20_Emphasis">30 days</text:span> after the termination of this tenancy, less any deductions for damages beyond normal wear and tear, cleaning, or unpaid rent, as permitted by law.</text:p>
      <text:h text:style-name="Heading_20_2" text:outline-level="2">4. Utilities and Services</text:h>
      <text:p text:style-name="Text_20_body">The Tenant shall be responsible for payment of the following utilities and services:</text:p>
      <text:list xml:id="list1804811721" text:style-name="L1">
        <text:list-item>
          <text:p text:style-name="P5">Electricity </text:p>
        </text:list-item>
        <text:list-item>
          <text:p text:style-name="P5">Gas </text:p>
        </text:list-item>
        <text:list-item>
          <text:p text:style-name="P5">Water and sewer </text:p>
        </text:list-item>
        <text:list-item>
          <text:p text:style-name="P5">Trash removal </text:p>
        </text:list-item>
        <text:list-item>
          <text:p text:style-name="P4">Internet and cable television (optional) </text:p>
        </text:list-item>
      </text:list>
      <text:p text:style-name="Text_20_body">The Landlord shall be responsible for: <text:span text:style-name="Strong_20_Emphasis">landscaping maintenance</text:span> and <text:span text:style-name="Strong_20_Emphasis">structural repairs</text:span>.</text:p>
      <text:h text:style-name="Heading_20_2" text:outline-level="2">5. Use of Premises</text:h>
      <text:p text:style-name="Text_20_body">The premises shall be used exclusively as a private residence for the Tenant and the following occupants:</text:p>
      <text:p text:style-name="Text_20_body"><text:span text:style-name="Strong_20_Emphasis">{PLACEHOLDER_OCCUPANTS}</text:span></text:p>
      <text:p text:style-name="Text_20_body">No pets shall be kept on the premises without the prior written consent of the Landlord. Any authorized pet shall be subject to an additional pet deposit of <text:span text:style-name="Strong_20_Emphasis">$300.00</text:span> and monthly pet rent of <text:span text:style-name="Strong_20_Emphasis">$50.00</text:span>.</text:p>
      <text:p text:style-name="Text_20_body"><text:soft-page-break/>The Tenant shall not sublet the premises or assign this Agreement without the Landlord's written permission. Any violation of this provision shall render this Agreement voidable at the Landlord's option.</text:p>
      <text:h text:style-name="Heading_20_2" text:outline-level="2">6. Maintenance and Repairs</text:h>
      <text:p text:style-name="Text_20_body">The Tenant shall maintain the premises in a clean, sanitary, and safe condition. The Tenant shall promptly notify the Landlord of any defects or conditions requiring repair. The Landlord shall be responsible for maintaining the premises in a habitable condition, including:</text:p>
      <text:list xml:id="list2365943382" text:style-name="L2">
        <text:list-item>
          <text:p text:style-name="P8">Plumbing, heating, and electrical systems </text:p>
        </text:list-item>
        <text:list-item>
          <text:p text:style-name="P8">Structural components (roof, walls, floors, windows) </text:p>
        </text:list-item>
        <text:list-item>
          <text:p text:style-name="P7">Appliances provided by the Landlord </text:p>
        </text:list-item>
      </text:list>
      <text:p text:style-name="Text_20_body">The Tenant shall be responsible for minor maintenance tasks such as replacing light bulbs and smoke detector batteries, and keeping the premises free of trash and debris.</text:p>
      <text:h text:style-name="Heading_20_2" text:outline-level="2">7. Entry and Inspection</text:h>
      <text:p text:style-name="Text_20_body">The Landlord or authorized agents may enter the premises at reasonable times for the purpose of inspection, maintenance, or showing the premises to prospective tenants or purchasers. Except in case of emergency, the Landlord shall provide at least <text:span text:style-name="Strong_20_Emphasis">24 hours' notice</text:span> before entry.</text:p>
      <text:h text:style-name="Heading_20_2" text:outline-level="2">8. Rules and Regulations</text:h>
      <text:p text:style-name="Text_20_body">The Tenant agrees to comply with all applicable laws, ordinances, and regulations regarding the use and occupancy of the premises. The Tenant shall not:</text:p>
      <text:list xml:id="list328217197" text:style-name="L3">
        <text:list-item>
          <text:p text:style-name="P10">Create or permit any nuisance or disturbance that interferes with the quiet enjoyment of other tenants or neighbors. </text:p>
        </text:list-item>
        <text:list-item>
          <text:p text:style-name="P10">Make any alterations or improvements to the premises without the Landlord's prior written consent. </text:p>
        </text:list-item>
        <text:list-item>
          <text:p text:style-name="P10">Use the premises for any illegal or commercial purposes. </text:p>
        </text:list-item>
        <text:list-item>
          <text:p text:style-name="P9">Store flammable, hazardous, or prohibited materials on the premises. </text:p>
        </text:list-item>
      </text:list>
      <text:h text:style-name="Heading_20_2" text:outline-level="2">9. Termination and Notice</text:h>
      <text:p text:style-name="Text_20_body">Either party may terminate this month-to-month tenancy by giving the other party <text:span text:style-name="Strong_20_Emphasis">30 days' written notice</text:span>. Upon termination, the Tenant shall vacate the premises and return all keys and access devices to the Landlord. The Tenant shall leave the premises in the same condition as at the commencement of the tenancy, ordinary wear and tear excepted.</text:p>
      <text:h text:style-name="Heading_20_2" text:outline-level="2">10. Governing Law</text:h>
      <text:p text:style-name="Text_20_body">This Agreement shall be governed by and construed in accordance with the laws of the State of <text:span text:style-name="Strong_20_Emphasis">{PLACEHOLDER_STATE}</text:span>. Any legal action arising out of this Agreement shall be brought in the county where the premises are located.</text:p>
      <text:h text:style-name="Heading_20_2" text:outline-level="2">11. Entire Agreement</text:h>
      <text:p text:style-name="Text_20_body">This Agreement constitutes the entire agreement between the parties. No modification or amendment shall be effective unless in writing and signed by both parties. Any waiver of any provision shall not be deemed a waiver of any subsequent breach.</text:p>
      <text:h text:style-name="Heading_20_2" text:outline-level="2">12. Signatures</text:h>
      <text:p text:style-name="Text_20_body">IN WITNESS WHEREOF, the parties have executed this Agreement as of the date first above written.</text:p>
      <text:p text:style-name="P6"/>
      <table:table table:name="Table1" table:style-name="Table1">
        <table:table-column table:style-name="Table1.A"/>
        <table:table-column table:style-name="Table1.B"/>
        <table:table-row>
          <table:table-cell table:style-name="Table1.A1" office:value-type="string">
            <text:p text:style-name="Table_20_Contents"><text:span text:style-name="Strong_20_Emphasis">LANDLORD:</text:span></text:p>
            <text:p text:style-name="Table_20_Contents">{PLACEHOLDER_LANDLORD_NAME}</text:p>
            <text:p text:style-name="Table_20_Contents">Signature</text:p>
            <text:p text:style-name="Table_20_Contents">Date: _______________</text:p>
          </table:table-cell>
          <table:table-cell table:style-name="Table1.A1" office:value-type="string">
            <text:p text:style-name="Table_20_Contents"><text:span text:style-name="Strong_20_Emphasis">TENANT:</text:span></text:p>
            <text:p text:style-name="Table_20_Contents">{PLACEHOLDER_TENANT_NAME}</text:p>
            <text:p text:style-name="Table_20_Contents">Signature</text:p>
            <text:p text:style-name="Table_20_Contents">Date: _______________</text:p>
          </table:table-cell>
        </table:table-row>
      </table:table>
      <text:p text:style-name="Text_20_body"/>
      <text:h text:style-name="Heading_20_2" text:outline-level="2"><text:soft-page-break/>Addendum: Schedule of Payment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Payment Type</text:p>
          </table:table-cell>
          <table:table-cell table:style-name="Table2.A1" office:value-type="string">
            <text:p text:style-name="Table_20_Heading">Amount</text:p>
          </table:table-cell>
          <table:table-cell table:style-name="Table2.A1" office:value-type="string">
            <text:p text:style-name="Table_20_Heading">Due Date</text:p>
          </table:table-cell>
          <table:table-cell table:style-name="Table2.A1" office:value-type="string">
            <text:p text:style-name="Table_20_Heading">Notes</text:p>
          </table:table-cell>
        </table:table-row>
        <table:table-row>
          <table:table-cell table:style-name="Table2.A1" office:value-type="string">
            <text:p text:style-name="Table_20_Contents">First Month's Rent</text:p>
          </table:table-cell>
          <table:table-cell table:style-name="Table2.A1" office:value-type="string">
            <text:p text:style-name="P2">$1​5​0​0</text:p>
          </table:table-cell>
          <table:table-cell table:style-name="Table2.A1" office:value-type="string">
            <text:p text:style-name="Table_20_Contents">{PLACEHOLDER_START_DATE}</text:p>
          </table:table-cell>
          <table:table-cell table:style-name="Table2.A1" office:value-type="string">
            <text:p text:style-name="Table_20_Contents">Due upon signing</text:p>
          </table:table-cell>
        </table:table-row>
        <table:table-row>
          <table:table-cell table:style-name="Table2.A1" office:value-type="string">
            <text:p text:style-name="Table_20_Contents">Security Deposit</text:p>
          </table:table-cell>
          <table:table-cell table:style-name="Table2.A1" office:value-type="string">
            <text:p text:style-name="Table_20_Contents">$1,500.00</text:p>
          </table:table-cell>
          <table:table-cell table:style-name="Table2.A1" office:value-type="string">
            <text:p text:style-name="Table_20_Contents">{PLACEHOLDER_START_DATE}</text:p>
          </table:table-cell>
          <table:table-cell table:style-name="Table2.A1" office:value-type="string">
            <text:p text:style-name="Table_20_Contents">Refundable per Section 3</text:p>
          </table:table-cell>
        </table:table-row>
        <table:table-row>
          <table:table-cell table:style-name="Table2.A1" office:value-type="string">
            <text:p text:style-name="Table_20_Contents">Monthly Rent (recurring)</text:p>
          </table:table-cell>
          <table:table-cell table:style-name="Table2.A1" office:value-type="string">
            <text:p text:style-name="P2">$1​5​0​0</text:p>
          </table:table-cell>
          <table:table-cell table:style-name="Table2.A1" office:value-type="string">
            <text:p text:style-name="Table_20_Contents">1st of each month</text:p>
          </table:table-cell>
          <table:table-cell table:style-name="Table2.A1" office:value-type="string">
            <text:p text:style-name="Table_20_Contents">Late fee applies after 5th</text:p>
          </table:table-cell>
        </table:table-row>
      </table:table>
      <text:p text:style-name="Text_20_Body.disclaimer">This document is a standard template for residential rental purposes. Both parties are encouraged to review all terms carefully and seek legal advice if necessary. The Landlord and Tenant acknowledge receipt of a copy of this Agreement.</text:p>
      <text:p text:style-name="P3"><text:span text:style-name="Strong_20_Emphasis">--- END OF AGREEMEN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9839in" fo:margin-bottom="0.9839in" style:contextual-spacing="false" fo:line-height="150%" fo:text-indent="0in" style:auto-text-indent="false"/>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fo:text-align="center" style:justify-single-word="false"/>
      <style:text-properties fo:text-transform="uppercase" style:font-name="Liberation Sans Unicode MS" fo:font-family="'Liberation Sans Unicode MS'" style:font-pitch="variable" fo:font-size="18pt" fo:letter-spacing="0.0138in"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0835in" fo:margin-bottom="0.0835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0835in" style:contextual-spacing="false" fo:padding-left="0in" fo:padding-right="0in" fo:padding-top="0in" fo:padding-bottom="0.0555in" fo:border-left="none" fo:border-right="none" fo:border-top="none" fo:border-bottom="0.06pt solid #000000"/>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55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ext_20_Body.center" style:display-name="Text Body.center" style:family="paragraph" style:parent-style-name="Text_20_body">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disclaimer" style:display-name="Text Body.disclaimer" style:family="paragraph" style:parent-style-name="Text_20_body">
      <style:paragraph-properties fo:margin-top="0.25in" fo:margin-bottom="0.0835in" style:contextual-spacing="false"/>
      <style:text-properties fo:color="#444444" loext:opacity="100%" fo:font-size="9pt" fo:font-style="italic" style:font-size-asian="9pt" style:font-style-asian="italic" style:font-size-complex="9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3" meta:paragraph-count="75" meta:word-count="851" meta:character-count="5774" meta:non-whitespace-character-count="4821"/>
    <meta:generator>LibreOffice/7.3.7.2$Linux_X86_64 LibreOffice_project/30$Build-2</meta:generator>
    <meta:user-defined meta:name=""/>
  </office:meta>
</office:document-meta>
</file>