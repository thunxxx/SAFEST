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4.9389in" table:align="left"/>
    </style:style>
    <style:style style:name="Table1.A" style:family="table-column">
      <style:table-column-properties style:column-width="1.2819in"/>
    </style:style>
    <style:style style:name="Table1.B" style:family="table-column">
      <style:table-column-properties style:column-width="3.6569in"/>
    </style:style>
    <style:style style:name="Table1.A1" style:family="table-cell">
      <style:table-cell-properties style:vertical-align="middle" fo:padding="0.0194in" fo:border="none"/>
    </style:style>
    <style:style style:name="Table2" style:family="table">
      <style:table-properties style:width="4.8243in" table:align="left"/>
    </style:style>
    <style:style style:name="Table2.A" style:family="table-column">
      <style:table-column-properties style:column-width="1.2611in"/>
    </style:style>
    <style:style style:name="Table2.B" style:family="table-column">
      <style:table-column-properties style:column-width="3.5632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margin-top="0.0835in" fo:margin-bottom="0.278in" style:contextual-spacing="false" fo:text-align="center" style:justify-single-word="false"/>
    </style:style>
    <style:style style:name="P3" style:family="paragraph" style:parent-style-name="Text_20_body" style:list-style-name="L1"/>
    <style:style style:name="P4" style:family="paragraph" style:parent-style-name="Text_20_body" style:list-style-name="L1">
      <style:paragraph-properties fo:margin-top="0.0835in" fo:margin-bottom="0in" style:contextual-spacing="false"/>
    </style:style>
    <style:style style:name="P5" style:family="paragraph" style:parent-style-name="Text_20_body">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0835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0835in" fo:margin-bottom="0in" style:contextual-spacing="false"/>
    </style:style>
    <style:style style:name="T1" style:family="text">
      <style:text-properties fo:font-size="11pt"/>
    </style:style>
    <style:style style:name="T2" style:family="text">
      <style:text-properties fo:color="#ffffff" loext:opacity="100%" style:font-name="Times New Roman" fo:font-size="12pt" fo:background-color="#ffffff" loext:char-shading-value="0"/>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n-Disclosure Agreement</text:p>
      <text:p text:style-name="P2"><text:span text:style-name="Strong_20_Emphasis"><text:span text:style-name="T1">Effective Date:</text:span></text:span><text:span text:style-name="T1"> {PLACEHOLDER_EFFECTIVE_DATE}<text:line-break/></text:span><text:span text:style-name="Strong_20_Emphasis"><text:span text:style-name="T1">Prepared by:</text:span></text:span><text:span text:style-name="T1"> {PLACEHOLDER_PREPARER_NAME} </text:span></text:p>
      <text:h text:style-name="Heading_20_2" text:outline-level="2">1. Parties</text:h>
      <text:p text:style-name="Text_20_body">This Non-Disclosure Agreement (the "Agreement") is entered into by and between: </text:p>
      <text:p text:style-name="Text_20_body"><text:span text:style-name="Strong_20_Emphasis">Disclosing Party:</text:span> {PLACEHOLDER_DISCLOSING_PARTY}, with a principal place of business at {PLACEHOLDER_DISCLOSING_ADDRESS} ("Disclosing Party"); and </text:p>
      <text:p text:style-name="Text_20_body"><text:span text:style-name="Strong_20_Emphasis">Receiving Party:</text:span> {PLACEHOLDER_RECEIVING_PARTY}, with a principal place of business at {PLACEHOLDER_RECEIVING_ADDRESS} ("Receiving Party"). </text:p>
      <text:p text:style-name="Text_20_body">Each referred to individually as a "Party" and collectively as the "Parties." </text:p>
      <text:h text:style-name="Heading_20_2" text:outline-level="2">2. Purpose</text:h>
      <text:p text:style-name="Text_20_body">The Parties wish to explore a potential business relationship concerning {PLACEHOLDER_PURPOSE_DESCRIPTION} (the "Purpose"). In connection with the Purpose, the Disclosing Party may disclose to the Receiving Party certain proprietary and confidential information. This Agreement governs the disclosure and use of such information. </text:p>
      <text:h text:style-name="Heading_20_2" text:outline-level="2">3. Definition of Confidential Information</text:h>
      <text:p text:style-name="Text_20_body">"Confidential Information" means any information, technical data, or know-how, including but not limited to research, product plans, products, services, customers, customer lists, markets, software, developments, inventions, processes, formulas, technology, designs, drawings, engineering, hardware configuration information, marketing, finances, or other business information disclosed by the Disclosing Party to the Receiving Party, either directly or indirectly, in writing, orally, or by drawings or observation of parts or equipment. </text:p>
      <text:p text:style-name="Text_20_body">Confidential Information does not include information that: </text:p>
      <text:list xml:id="list449862735" text:style-name="L1">
        <text:list-item>
          <text:p text:style-name="P4">Is or becomes generally available to the public other than as a result of a disclosure by the Receiving Party in violation of this Agreement; </text:p>
        </text:list-item>
        <text:list-item>
          <text:p text:style-name="P4">Was available to the Receiving Party on a non-confidential basis prior to its disclosure by the Disclosing Party; </text:p>
        </text:list-item>
        <text:list-item>
          <text:p text:style-name="P4">Becomes available to the Receiving Party on a non-confidential basis from a source other than the Disclosing Party, provided that such source is not bound by a confidentiality agreement with the Disclosing Party; or </text:p>
        </text:list-item>
        <text:list-item>
          <text:p text:style-name="P3">Is independently developed by the Receiving Party without reference to or reliance upon the Confidential Information. </text:p>
        </text:list-item>
      </text:list>
      <text:h text:style-name="Heading_20_2" text:outline-level="2">4. Obligations of Receiving Party</text:h>
      <text:p text:style-name="Text_20_body">The Receiving Party agrees to: </text:p>
      <text:list xml:id="list630505080" text:style-name="L2">
        <text:list-item>
          <text:p text:style-name="P7">Hold the Confidential Information in strict confidence and take all reasonable precautions to protect such Confidential Information (including all precautions the Receiving Party employs with respect to its own confidential materials); </text:p>
        </text:list-item>
        <text:list-item>
          <text:p text:style-name="P7">Not divulge any Confidential Information to any third party without the prior written consent of the Disclosing Party; </text:p>
        </text:list-item>
        <text:list-item>
          <text:p text:style-name="P7">Use the Confidential Information solely for the Purpose and not for any other purpose; </text:p>
        </text:list-item>
        <text:list-item>
          <text:p text:style-name="P7">Not copy, reverse engineer, decompile, or disassemble any Confidential Information; and </text:p>
        </text:list-item>
        <text:list-item>
          <text:p text:style-name="P6">Limit access to Confidential Information to those of its employees and contractors who need such access for the Purpose and who are bound by confidentiality obligations at least as restrictive as those contained herein. </text:p>
        </text:list-item>
      </text:list>
      <text:h text:style-name="Heading_20_2" text:outline-level="2">5. Exclusions</text:h>
      <text:p text:style-name="Text_20_body">The obligations of confidentiality and non-use set forth in Section 4 shall not apply to any information that the Receiving Party can demonstrate by written evidence: </text:p>
      <text:list xml:id="list3056746801" text:style-name="L3">
        <text:list-item>
          <text:p text:style-name="P9"><text:soft-page-break/>Was in the public domain at the time of disclosure or subsequently enters the public domain through no fault of the Receiving Party; </text:p>
        </text:list-item>
        <text:list-item>
          <text:p text:style-name="P9">Was in the Receiving Party's possession or known by it prior to receipt from the Disclosing Party; </text:p>
        </text:list-item>
        <text:list-item>
          <text:p text:style-name="P9">Was rightfully disclosed to the Receiving Party by a third party without restriction; or </text:p>
        </text:list-item>
        <text:list-item>
          <text:p text:style-name="P8">Was independently developed by the Receiving Party without use of or reference to the Confidential Information. </text:p>
        </text:list-item>
      </text:list>
      <text:p text:style-name="Text_20_body"><text:span text:style-name="T2">The recipient may publicly disclose any information after 30 days without prior consent.</text:span> </text:p>
      <text:h text:style-name="Heading_20_2" text:outline-level="2">6. Term and Termination</text:h>
      <text:p text:style-name="Text_20_body">This Agreement shall commence on the Effective Date and shall continue for a period of {PLACEHOLDER_TERM_YEARS} years (the "Term"). Either Party may terminate this Agreement at any time upon {PLACEHOLDER_TERMINATION_NOTICE_DAYS} days' prior written notice to the other Party. The obligations of confidentiality and non-use shall survive termination of this Agreement for a period of {PLACEHOLDER_SURVIVAL_YEARS} years. </text:p>
      <text:h text:style-name="Heading_20_2" text:outline-level="2">7. Return of Materials</text:h>
      <text:p text:style-name="Text_20_body">Upon the termination of this Agreement or upon the written request of the Disclosing Party, the Receiving Party shall immediately return to the Disclosing Party all copies of Confidential Information, including all notes, summaries, extracts, analyses, or other materials containing or reflecting any Confidential Information. The Receiving Party shall also permanently delete all electronic copies of Confidential Information from its systems. </text:p>
      <text:h text:style-name="Heading_20_2" text:outline-level="2">8. No License or Warranty</text:h>
      <text:p text:style-name="Text_20_body">Nothing in this Agreement grants the Receiving Party any license or right under any patent, copyright, trade secret, or other intellectual property right of the Disclosing Party. All Confidential Information is provided "AS IS" without any warranty, express or implied, regarding its accuracy, completeness, or fitness for a particular purpose. </text:p>
      <text:h text:style-name="Heading_20_2" text:outline-level="2">9. Limitation of Liability</text:h>
      <text:p text:style-name="Text_20_body">Neither Party shall be liable to the other for any indirect, incidental, special, consequential, or punitive damages arising out of or related to this Agreement, even if advised of the possibility of such damages. The Disclosing Party's total liability under this Agreement shall not exceed {PLACEHOLDER_LIABILITY_LIMIT_AMOUNT}. </text:p>
      <text:h text:style-name="Heading_20_2" text:outline-level="2">10. Governing Law</text:h>
      <text:p text:style-name="Text_20_body">This Agreement shall be governed by and construed in accordance with the laws of {PLACEHOLDER_GOVERNING_JURISDICTION}, without regard to its conflict of laws principles. Any legal action or proceeding arising under this Agreement shall be brought exclusively in the courts located in {PLACEHOLDER_COURT_LOCATION}. </text:p>
      <text:h text:style-name="Heading_20_2" text:outline-level="2">11. Miscellaneous</text:h>
      <text:p text:style-name="Text_20_body">This Agreement constitutes the entire agreement between the Parties with respect to the subject matter hereof and supersedes all prior or contemporaneous agreements, representations, and understandings, whether written or oral. This Agreement may not be amended except by a written instrument signed by both Parties. If any provision of this Agreement is found to be invalid or unenforceable, the remaining provisions shall remain in full force and effect. </text:p>
      <text:h text:style-name="Heading_20_2" text:outline-level="2">12. Signatures</text:h>
      <text:p text:style-name="Text_20_body">The Parties have executed this Non-Disclosure Agreement as of the Effective Date. </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isclosing Party:</text:span></text:p>
          </table:table-cell>
          <table:table-cell table:style-name="Table1.A1" office:value-type="string">
            <text:p text:style-name="Table_20_Contents">{PLACEHOLDER_DISCLOSING_PARTY}</text:p>
          </table:table-cell>
        </table:table-row>
        <table:table-row>
          <table:table-cell table:style-name="Table1.A1" office:value-type="string">
            <text:p text:style-name="Table_20_Contents">By:</text:p>
          </table:table-cell>
          <table:table-cell table:style-name="Table1.A1" office:value-type="string">
            <text:p text:style-name="Table_20_Contents">{PLACEHOLDER_DISCLOSING_SIGNATURE}</text:p>
          </table:table-cell>
        </table:table-row>
        <table:table-row>
          <table:table-cell table:style-name="Table1.A1" office:value-type="string">
            <text:p text:style-name="Table_20_Contents">Name:</text:p>
          </table:table-cell>
          <table:table-cell table:style-name="Table1.A1" office:value-type="string">
            <text:p text:style-name="Table_20_Contents">{PLACEHOLDER_DISCLOSING_NAME}</text:p>
          </table:table-cell>
        </table:table-row>
        <table:table-row>
          <table:table-cell table:style-name="Table1.A1" office:value-type="string">
            <text:p text:style-name="Table_20_Contents">Title:</text:p>
          </table:table-cell>
          <table:table-cell table:style-name="Table1.A1" office:value-type="string">
            <text:p text:style-name="Table_20_Contents">{PLACEHOLDER_DISCLOSING_TITLE}</text:p>
          </table:table-cell>
        </table:table-row>
        <table:table-row>
          <table:table-cell table:style-name="Table1.A1" office:value-type="string">
            <text:p text:style-name="Table_20_Contents">Date:</text:p>
          </table:table-cell>
          <table:table-cell table:style-name="Table1.A1" office:value-type="string">
            <text:p text:style-name="Table_20_Contents">{PLACEHOLDER_DISCLOSING_DATE}</text:p>
          </table:table-cell>
        </table:table-row>
      </table:table>
      <text:p text:style-name="P5"/>
      <table:table table:name="Table2" table:style-name="Table2">
        <table:table-column table:style-name="Table2.A"/>
        <table:table-column table:style-name="Table2.B"/>
        <text:soft-page-break/>
        <table:table-row>
          <table:table-cell table:style-name="Table2.A1" office:value-type="string">
            <text:p text:style-name="Table_20_Contents"><text:span text:style-name="Strong_20_Emphasis">Receiving Party:</text:span></text:p>
          </table:table-cell>
          <table:table-cell table:style-name="Table2.A1" office:value-type="string">
            <text:p text:style-name="Table_20_Contents">{PLACEHOLDER_RECEIVING_PARTY}</text:p>
          </table:table-cell>
        </table:table-row>
        <table:table-row>
          <table:table-cell table:style-name="Table2.A1" office:value-type="string">
            <text:p text:style-name="Table_20_Contents">By:</text:p>
          </table:table-cell>
          <table:table-cell table:style-name="Table2.A1" office:value-type="string">
            <text:p text:style-name="Table_20_Contents">{PLACEHOLDER_RECEIVING_SIGNATURE}</text:p>
          </table:table-cell>
        </table:table-row>
        <table:table-row>
          <table:table-cell table:style-name="Table2.A1" office:value-type="string">
            <text:p text:style-name="Table_20_Contents">Name:</text:p>
          </table:table-cell>
          <table:table-cell table:style-name="Table2.A1" office:value-type="string">
            <text:p text:style-name="Table_20_Contents">{PLACEHOLDER_RECEIVING_NAME}</text:p>
          </table:table-cell>
        </table:table-row>
        <table:table-row>
          <table:table-cell table:style-name="Table2.A1" office:value-type="string">
            <text:p text:style-name="Table_20_Contents">Title:</text:p>
          </table:table-cell>
          <table:table-cell table:style-name="Table2.A1" office:value-type="string">
            <text:p text:style-name="Table_20_Contents">{PLACEHOLDER_RECEIVING_TITLE}</text:p>
          </table:table-cell>
        </table:table-row>
        <table:table-row>
          <table:table-cell table:style-name="Table2.A1" office:value-type="string">
            <text:p text:style-name="Table_20_Contents">Date:</text:p>
          </table:table-cell>
          <table:table-cell table:style-name="Table2.A1" office:value-type="string">
            <text:p text:style-name="Table_20_Contents">{PLACEHOLDER_RECEIVING_DATE}</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78in" style:contextual-spacing="false" fo:text-align="center" style:justify-single-word="false" fo:padding-left="0in" fo:padding-right="0in" fo:padding-top="0in" fo:padding-bottom="0.139in" fo:border-left="none" fo:border-right="none" fo:border-top="none" fo:border-bottom="1.5pt solid #000000"/>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0835in" fo:margin-bottom="0.083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111in" style:contextual-spacing="false"/>
      <style:text-properties style:font-name="Liberation Serif" fo:font-family="'Liberation Serif'" style:font-family-generic="roman" style:font-pitch="variable" fo:font-size="14pt" style:text-underline-style="solid" style:text-underline-width="auto" style:text-underline-color="font-color"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64" meta:word-count="898" meta:character-count="6568" meta:non-whitespace-character-count="5716"/>
    <meta:generator>LibreOffice/7.3.7.2$Linux_X86_64 LibreOffice_project/30$Build-2</meta:generator>
  </office:meta>
</office:document-meta>
</file>