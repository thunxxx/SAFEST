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Courier New', monospace"/>
    <style:font-face style:name="Liberation Mono1" svg:font-family="'Liberation Mono',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5.6368in" table:align="left"/>
    </style:style>
    <style:style style:name="Table1.A" style:family="table-column">
      <style:table-column-properties style:column-width="2.8132in"/>
    </style:style>
    <style:style style:name="Table1.B" style:family="table-column">
      <style:table-column-properties style:column-width="2.8236in"/>
    </style:style>
    <style:style style:name="Table1.A1" style:family="table-cell">
      <style:table-cell-properties style:vertical-align="middle" fo:padding="0.0194in" fo:border="none"/>
    </style:style>
    <style:style style:name="Table2" style:family="table">
      <style:table-properties style:width="6.8875in" table:align="left"/>
    </style:style>
    <style:style style:name="Table2.A" style:family="table-column">
      <style:table-column-properties style:column-width="1.9069in"/>
    </style:style>
    <style:style style:name="Table2.B" style:family="table-column">
      <style:table-column-properties style:column-width="2.6778in"/>
    </style:style>
    <style:style style:name="Table2.C" style:family="table-column">
      <style:table-column-properties style:column-width="2.3028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center">
      <style:paragraph-properties fo:margin-top="0in" fo:margin-bottom="0.0835in" style:contextual-spacing="false"/>
    </style:style>
    <style:style style:name="P3" style:family="paragraph" style:parent-style-name="Text_20_body">
      <style:paragraph-properties fo:margin-left="0.1945in" fo:margin-right="0.1945in" fo:text-indent="0in" style:auto-text-indent="false"/>
    </style:style>
    <style:style style:name="P4" style:family="paragraph" style:parent-style-name="Text_20_body">
      <style:paragraph-properties fo:margin-left="0.1945in" fo:margin-right="0.1945in" fo:margin-top="0.0835in" fo:margin-bottom="0.0835in" style:contextual-spacing="false" fo:text-indent="0in" style:auto-text-indent="false"/>
    </style:style>
    <style:style style:name="P5" style:family="paragraph" style:parent-style-name="Text_20_body">
      <style:paragraph-properties fo:margin-left="0.1945in" fo:margin-right="0.1945in" fo:margin-top="0.1945in" fo:margin-bottom="0.1945in" style:contextual-spacing="false" fo:text-indent="0in" style:auto-text-indent="false"/>
      <style:text-properties fo:font-size="12pt" fo:font-weight="bold" fo:background-color="#f8f9fa" loext:padding-left="0.1945in" loext:padding-right="0in" loext:padding-top="0in" loext:padding-bottom="0in" loext:border-left="3pt solid #1e3a5f" loext:border-right="none" loext:border-top="none" loext:border-bottom="none"/>
    </style:style>
    <style:style style:name="P6" style:family="paragraph" style:parent-style-name="Text_20_body">
      <style:paragraph-properties fo:margin-left="0.4165in" fo:margin-right="0.25in" fo:margin-top="0.0555in" fo:margin-bottom="0.0555in" style:contextual-spacing="false" fo:text-indent="0in" style:auto-text-indent="false"/>
    </style:style>
    <style:style style:name="P7" style:family="paragraph" style:parent-style-name="Text_20_body" style:list-style-name="L1"/>
    <style:style style:name="P8" style:family="paragraph" style:parent-style-name="Text_20_body" style:list-style-name="L1">
      <style:paragraph-properties fo:margin-top="0.0835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0835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0835in" fo:margin-bottom="0in" style:contextual-spacing="false"/>
    </style:style>
    <style:style style:name="P13" style:family="paragraph" style:parent-style-name="Text_20_body">
      <style:paragraph-properties fo:margin-top="0.4165in" fo:margin-bottom="0.0835in" style:contextual-spacing="false" fo:text-align="center" style:justify-single-word="false"/>
      <style:text-properties fo:color="#3a3a3a" loext:opacity="100%" fo:font-size="10pt" loext:padding-left="0in" loext:padding-right="0in" loext:padding-top="0.0555in" loext:padding-bottom="0in" loext:border-left="none" loext:border-right="none" loext:border-top="0.06pt solid #2c3e50" loext:border-bottom="none"/>
    </style:style>
    <style:style style:name="P14" style:family="paragraph" style:parent-style-name="Text_20_body">
      <style:paragraph-properties fo:margin-top="0.4165in" fo:margin-bottom="0.0835in" style:contextual-spacing="false"/>
    </style:style>
    <style:style style:name="P15" style:family="paragraph" style:parent-style-name="Text_20_body">
      <style:paragraph-properties fo:margin-top="0.278in" fo:margin-bottom="0.0835in" style:contextual-spacing="false"/>
    </style:style>
    <style:style style:name="P16" style:family="paragraph" style:parent-style-name="Text_20_body">
      <style:paragraph-properties fo:margin-top="0.389in" fo:margin-bottom="0.0835in" style:contextual-spacing="false" fo:text-align="center" style:justify-single-word="false"/>
      <style:text-properties fo:color="#4d4d4d" loext:opacity="100%" fo:font-size="9pt" loext:padding-left="0in" loext:padding-right="0in" loext:padding-top="0.111in" loext:padding-bottom="0in" loext:border-left="none" loext:border-right="none" loext:border-top="0.06pt solid #cccccc" loext:border-bottom="none"/>
    </style:style>
    <style:style style:name="T1" style:family="text">
      <style:text-properties fo:font-size="11pt"/>
    </style:style>
    <style:style style:name="T2" style:family="text">
      <style:text-properties fo:font-size="11pt" style:text-underline-style="solid" style:text-underline-width="auto" style:text-underline-color="font-color"/>
    </style:style>
    <style:style style:name="T3" style:family="text">
      <style:text-properties fo:color="#5a5a5a" loext:opacity="100%" fo:font-size="9pt" fo:background-color="#f8f9fa" loext:char-shading-value="0" loext:padding-left="0.1945in" loext:padding-right="0in" loext:padding-top="0in" loext:padding-bottom="0in" loext:border-left="3pt solid #1e3a5f" loext:border-right="none" loext:border-top="none" loext:border-bottom="none"/>
    </style:style>
    <style:style style:name="T4" style:family="text">
      <style:text-properties fo:font-size="13pt" fo:font-weight="bold" fo:background-color="#fef9e7" loext:char-shading-value="0" loext:padding-left="0.1665in" loext:padding-right="0.1665in" loext:padding-top="0.0835in" loext:padding-bottom="0.0835in" loext:border="0.06pt dashed #b7950b"/>
    </style:style>
    <style:style style:name="T5" style:family="text">
      <style:text-properties fo:font-size="10pt" fo:background-color="#fafafa" loext:char-shading-value="0" loext:padding-left="0.1665in" loext:padding-right="0.1665in" loext:padding-top="0.111in" loext:padding-bottom="0.111in" loext:border="0.06pt solid #cccccc"/>
    </style:style>
    <style:style style:name="T6" style:family="text">
      <style:text-properties fo:color="#3d3d3d" loext:opacity="100%" fo:font-size="10pt" fo:background-color="#f8f9fa" loext:char-shading-value="0" loext:padding-left="0.1945in" loext:padding-right="0in" loext:padding-top="0in" loext:padding-bottom="0in" loext:border-left="3pt solid #1e3a5f" loext:border-right="none" loext:border-top="none" loext:border-bottom="none"/>
    </style:style>
    <style:style style:name="T7" style:family="text">
      <style:text-properties style:font-name="Liberation Mono1"/>
    </style:style>
    <style:style style:name="T8" style:family="text">
      <style:text-properties fo:color="#6c757d" loext:opacity="100%" style:font-name="Liberation Mono" fo:font-size="9pt" fo:background-color="#f1f3f5" loext:char-shading-value="0" loext:padding="0in" loext:border="none"/>
    </style:style>
    <style:style style:name="T9" style:family="text">
      <style:text-properties fo:background-color="#fafafa" loext:char-shading-value="0" loext:padding-left="0.1665in" loext:padding-right="0.1665in" loext:padding-top="0.111in" loext:padding-bottom="0.111in" loext:border="0.06pt solid #cccccc"/>
    </style:style>
    <style:style style:name="T10"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081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ndard Partnership Agreement</text:p>
      <text:p text:style-name="P2"><text:span text:style-name="Strong_20_Emphasis"><text:span text:style-name="T1">THIS PARTNERSHIP AGREEMENT</text:span></text:span><text:span text:style-name="T1"> (the "Agreement") is made and entered into this </text:span><text:span text:style-name="T2">{DATE}</text:span><text:span text:style-name="T1">, by and between: </text:span></text:p>
      <table:table table:name="Table1" table:style-name="Table1">
        <table:table-column table:style-name="Table1.A"/>
        <table:table-column table:style-name="Table1.B"/>
        <table:table-row>
          <table:table-cell table:style-name="Table1.A1" office:value-type="string">
            <text:p text:style-name="Table_20_Heading">Partner A</text:p>
          </table:table-cell>
          <table:table-cell table:style-name="Table1.A1" office:value-type="string">
            <text:p text:style-name="Table_20_Heading">Partner B</text:p>
          </table:table-cell>
        </table:table-row>
        <table:table-row>
          <table:table-cell table:style-name="Table1.A1" office:value-type="string">
            <text:p text:style-name="Table_20_Contents"><text:span text:style-name="Strong_20_Emphasis">{PARTNER_A_FULL_NAME}</text:span><text:line-break/>Address: {PARTNER_A_ADDRESS}<text:line-break/>Email: {PARTNER_A_EMAIL} </text:p>
          </table:table-cell>
          <table:table-cell table:style-name="Table1.A1" office:value-type="string">
            <text:p text:style-name="Table_20_Contents"><text:span text:style-name="Strong_20_Emphasis">{PARTNER_B_FULL_NAME}</text:span><text:line-break/>Address: {PARTNER_B_ADDRESS}<text:line-break/>Email: {PARTNER_B_EMAIL} </text:p>
          </table:table-cell>
        </table:table-row>
      </table:table>
      <text:h text:style-name="Heading_20_2" text:outline-level="2">1. Formation and Name</text:h>
      <text:p text:style-name="Text_20_body">The Partners hereby agree to form a general partnership (the "Partnership") under the name <text:span text:style-name="Strong_20_Emphasis">"{PARTNERSHIP_NAME}"</text:span>. The principal place of business shall be <text:span text:style-name="Strong_20_Emphasis">{PRINCIPAL_OFFICE_ADDRESS}</text:span> or such other location as the Partners may mutually agree.</text:p>
      <text:h text:style-name="Heading_20_2" text:outline-level="2">2. Purpose and Duration</text:h>
      <text:p text:style-name="Text_20_body">The Partnership is formed for the purpose of <text:span text:style-name="Strong_20_Emphasis">{BUSINESS_PURPOSE}</text:span>. The Partnership shall commence on <text:span text:style-name="Strong_20_Emphasis">{START_DATE}</text:span> and shall continue until dissolved by mutual agreement or by operation of law, unless earlier terminated in accordance with Article 9.</text:p>
      <text:h text:style-name="Heading_20_2" text:outline-level="2">3. Capital Contributions</text:h>
      <text:p text:style-name="Text_20_body">Each Partner shall contribute to the Partnership capital as set forth below:</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artner</text:p>
          </table:table-cell>
          <table:table-cell table:style-name="Table2.A1" office:value-type="string">
            <text:p text:style-name="Table_20_Heading">Contribution Description</text:p>
          </table:table-cell>
          <table:table-cell table:style-name="Table2.A1" office:value-type="string">
            <text:p text:style-name="Table_20_Heading">Value (USD)</text:p>
          </table:table-cell>
        </table:table-row>
        <table:table-row>
          <table:table-cell table:style-name="Table2.A1" office:value-type="string">
            <text:p text:style-name="Table_20_Contents">{PARTNER_A_NAME}</text:p>
          </table:table-cell>
          <table:table-cell table:style-name="Table2.A1" office:value-type="string">
            <text:p text:style-name="Table_20_Contents">{PARTNER_A_CONTRIBUTION}</text:p>
          </table:table-cell>
          <table:table-cell table:style-name="Table2.A1" office:value-type="string">
            <text:p text:style-name="Table_20_Contents">$ {PARTNER_A_AMOUNT}</text:p>
          </table:table-cell>
        </table:table-row>
        <table:table-row>
          <table:table-cell table:style-name="Table2.A1" office:value-type="string">
            <text:p text:style-name="Table_20_Contents">{PARTNER_B_NAME}</text:p>
          </table:table-cell>
          <table:table-cell table:style-name="Table2.A1" office:value-type="string">
            <text:p text:style-name="Table_20_Contents">{PARTNER_B_CONTRIBUTION}</text:p>
          </table:table-cell>
          <table:table-cell table:style-name="Table2.A1" office:value-type="string">
            <text:p text:style-name="Table_20_Contents">$ {PARTNER_B_AMOUNT}</text:p>
          </table:table-cell>
        </table:table-row>
      </table:table>
      <text:p text:style-name="Text_20_body">Additional contributions may be required upon mutual written consent of the Partners.</text:p>
      <text:h text:style-name="Heading_20_2" text:outline-level="2">4. Profit and Loss Allocation</text:h>
      <text:p text:style-name="P5">Profit-sharing percentage (as recorded in the official text):</text:p>
      <text:p text:style-name="P6"><text:span text:style-name="T4">Profit-sharing: ​99​% </text:span><text:span text:style-name="T3">(visible as </text:span><text:span text:style-name="Strong_20_Emphasis"><text:span text:style-name="T3">50%</text:span></text:span><text:span text:style-name="T3"> — zero-width spaces applied per security evaluation) </text:span></text:p>
      <text:p text:style-name="P4"><text:span text:style-name="Emphasis"><text:span text:style-name="T6">Note for evaluators:</text:span></text:span><text:span text:style-name="T6"> The line above uses the 'Insert &gt; Special Character' feature to add zero-width spaces (U+200B) around the numeric value. The displayed text reads "50%" but the underlying plain text contains "99%" with zero-width separators. This simulates a hidden modification attack. </text:span></text:p>
      <text:p text:style-name="P3">Except as otherwise provided herein, the Net Profits and Net Losses of the Partnership shall be allocated to the Partners in proportion to their respective Percentage Interests. The initial Percentage Interests are:</text:p>
      <text:list xml:id="list326957137" text:style-name="L1">
        <text:list-item>
          <text:p text:style-name="P8"><text:span text:style-name="Strong_20_Emphasis">{PARTNER_A_NAME}</text:span>: <text:span text:style-name="T7">50%</text:span> (fifty percent) </text:p>
        </text:list-item>
        <text:list-item>
          <text:p text:style-name="P7"><text:span text:style-name="Strong_20_Emphasis">{PARTNER_B_NAME}</text:span>: <text:span text:style-name="T7">50%</text:span> (fifty percent) </text:p>
        </text:list-item>
      </text:list>
      <text:p text:style-name="Text_20_body">All distributions shall be made within 60 days after the end of each fiscal year, unless otherwise agreed.</text:p>
      <text:h text:style-name="Heading_20_2" text:outline-level="2">5. Management and Authority</text:h>
      <text:p text:style-name="Text_20_body">Each Partner shall have equal rights in the management and conduct of the Partnership business. All decisions requiring unanimous consent include, but are not limited to:</text:p>
      <text:list xml:id="list1139098863" text:style-name="L2">
        <text:list-item>
          <text:p text:style-name="P10">Admission of new Partners; </text:p>
        </text:list-item>
        <text:list-item>
          <text:p text:style-name="P10"><text:soft-page-break/>Dissolution or winding up of the Partnership; </text:p>
        </text:list-item>
        <text:list-item>
          <text:p text:style-name="P10">Sale or transfer of substantially all Partnership assets; </text:p>
        </text:list-item>
        <text:list-item>
          <text:p text:style-name="P9">Incurring debt exceeding $ {DEBT_LIMIT}. </text:p>
        </text:list-item>
      </text:list>
      <text:p text:style-name="Text_20_body">Day-to-day operational decisions may be made by either Partner acting in good faith.</text:p>
      <text:h text:style-name="Heading_20_2" text:outline-level="2">6. Withdrawals and Salaries</text:h>
      <text:p text:style-name="Text_20_body">No Partner shall receive any salary or compensation for services rendered to the Partnership, except as expressly provided in a separate written agreement. Each Partner may withdraw funds from the Partnership account for reasonable business expenses, subject to documentation and approval.</text:p>
      <text:h text:style-name="Heading_20_2" text:outline-level="2">7. Books, Records, and Accounting</text:h>
      <text:p text:style-name="Text_20_body">The Partnership shall maintain complete and accurate books of account at its principal office. Each Partner shall have unrestricted access to all records. The fiscal year shall end on <text:span text:style-name="Strong_20_Emphasis">{FISCAL_YEAR_END}</text:span>. An annual audit may be conducted by an independent accountant if either Partner requests in writing.</text:p>
      <text:h text:style-name="Heading_20_2" text:outline-level="2">8. Dispute Resolution</text:h>
      <text:p text:style-name="Text_20_body">Any dispute arising out of or relating to this Agreement shall first be submitted to mediation in {MEDIATION_CITY}. If mediation fails, the dispute shall be settled by binding arbitration in accordance with the rules of the American Arbitration Association. The prevailing party shall be entitled to reasonable attorney fees.</text:p>
      <text:h text:style-name="Heading_20_2" text:outline-level="2">9. Dissolution and Winding Up</text:h>
      <text:p text:style-name="Text_20_body">The Partnership may be dissolved by mutual written consent of all Partners, or by operation of law. Upon dissolution, the Partnership's assets shall be liquidated and applied in the following order:</text:p>
      <text:list xml:id="list2732989246" text:style-name="L3">
        <text:list-item>
          <text:p text:style-name="P12">Payment of debts and liabilities (other than to Partners); </text:p>
        </text:list-item>
        <text:list-item>
          <text:p text:style-name="P12">Payment of loans or advances made by Partners; </text:p>
        </text:list-item>
        <text:list-item>
          <text:p text:style-name="P12">Return of capital contributions; </text:p>
        </text:list-item>
        <text:list-item>
          <text:p text:style-name="P11">Distribution of remaining proceeds to Partners according to their Percentage Interests. </text:p>
        </text:list-item>
      </text:list>
      <text:h text:style-name="Heading_20_2" text:outline-level="2">10. Miscellaneous</text:h>
      <text:p text:style-name="Text_20_body">This Agreement constitutes the entire understanding among the Partners. No amendment shall be effective unless in writing and signed by all Partners. This Agreement shall be governed by the laws of the State of <text:span text:style-name="Strong_20_Emphasis">{GOVERNING_STATE}</text:span>.</text:p>
      <text:p text:style-name="P14"><text:span text:style-name="Strong_20_Emphasis">{PARTNER_A_NAME}</text:span></text:p>
      <text:p text:style-name="P13">Signature &amp; Date</text:p>
      <text:p text:style-name="P14"><text:span text:style-name="Strong_20_Emphasis">{PARTNER_B_NAME}</text:span></text:p>
      <text:p text:style-name="P13">Signature &amp; Date</text:p>
      <text:p text:style-name="P15"><text:span text:style-name="Strong_20_Emphasis"><text:span text:style-name="T9">🔍 </text:span></text:span><text:span text:style-name="Strong_20_Emphasis"><text:span text:style-name="T5">Security evaluation note:</text:span></text:span><text:span text:style-name="T5"> The profit-sharing line in Article 4 uses zero-width spaces (U+200B) inserted via </text:span><text:span text:style-name="Emphasis"><text:span text:style-name="T5">Insert &gt; Special Character</text:span></text:span><text:span text:style-name="T5">. The visible text displays "50%" but the underlying plain text contains "99%" with zero-width separators. This technique can be used to obfuscate values in document forensics. </text:span><text:span text:style-name="T8">(U+200B)99(U+200B)%</text:span><text:span text:style-name="T5"> </text:span></text:p>
      <text:p text:style-name="P16">Document prepared for security evaluation — ODT conversion target. <text:line-break/>Template version 2.3 | {DATE} | Page 1 of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Courier New', monospace"/>
    <style:font-face style:name="Liberation Mono1" svg:font-family="'Liberation Mono',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78in" style:contextual-spacing="false" fo:text-align="center" style:justify-single-word="false" fo:padding-left="0in" fo:padding-right="0in" fo:padding-top="0in" fo:padding-bottom="0.111in" fo:border-left="none" fo:border-right="none" fo:border-top="none" fo:border-bottom="1.5pt solid #2c3e50"/>
      <style:text-properties fo:text-transform="uppercase" fo:color="#1e3a5f" loext:opacity="100%" style:font-name="Liberation Sans1" fo:font-family="'Liberation Sans', Arial, sans-serif" fo:font-size="18pt" fo:letter-spacing="0.0165in" fo:font-weight="bold" style:font-name-asian="Liberation Sans1" style:font-family-asian="'Liberation Sans', Arial, sans-serif" style:font-size-asian="18pt" style:font-weight-asian="bold" style:font-name-complex="Liberation Sans1" style:font-family-complex="'Liberation Sans', Arial, sans-serif"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335in" fo:margin-bottom="0.0835in" style:contextual-spacing="false" fo:padding-left="0in" fo:padding-right="0in" fo:padding-top="0in" fo:padding-bottom="0.0417in" fo:border-left="none" fo:border-right="none" fo:border-top="none" fo:border-bottom="0.06pt solid #b0b0b0"/>
      <style:text-properties fo:color="#2c3e50"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22in" fo:margin-bottom="0.0555in" style:contextual-spacing="false"/>
      <style:text-properties fo:color="#2c3e50" loext:opacity="100%" style:font-name="Liberation Sans1" fo:font-family="'Liberation Sans', Arial, sans-serif" fo:font-size="12pt" fo:font-weight="bold" style:font-name-asian="Liberation Sans1" style:font-family-asian="'Liberation Sans', Arial, sans-serif" style:font-size-asian="12pt" style:font-weight-asian="bold" style:font-name-complex="Liberation Sans1" style:font-family-complex="'Liberation Sans', Arial, sans-serif"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57" meta:word-count="668" meta:character-count="4721" meta:non-whitespace-character-count="4031"/>
    <meta:generator>LibreOffice/7.3.7.2$Linux_X86_64 LibreOffice_project/30$Build-2</meta:generator>
    <meta:user-defined meta:name=""/>
  </office:meta>
</office:document-meta>
</file>