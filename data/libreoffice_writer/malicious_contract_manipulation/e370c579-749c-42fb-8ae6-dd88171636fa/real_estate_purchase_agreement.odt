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7.1889in" table:align="left"/>
    </style:style>
    <style:style style:name="Table1.A" style:family="table-column">
      <style:table-column-properties style:column-width="3.584in"/>
    </style:style>
    <style:style style:name="Table1.B" style:family="table-column">
      <style:table-column-properties style:column-width="3.6049in"/>
    </style:style>
    <style:style style:name="Table1.A1" style:family="table-cell">
      <style:table-cell-properties style:vertical-align="middle" fo:padding="0.0194in" fo:border="none"/>
    </style:style>
    <style:style style:name="Table2" style:family="table">
      <style:table-properties style:width="5.3139in" table:align="left"/>
    </style:style>
    <style:style style:name="Table2.A" style:family="table-column">
      <style:table-column-properties style:column-width="2.6465in"/>
    </style:style>
    <style:style style:name="Table2.B" style:family="table-column">
      <style:table-column-properties style:column-width="2.6674in"/>
    </style:style>
    <style:style style:name="Table2.A1" style:family="table-cell">
      <style:table-cell-properties style:vertical-align="middle" fo:padding="0in" fo:border="none"/>
    </style:style>
    <style:style style:name="Table3" style:family="table">
      <style:table-properties style:width="7.1889in" table:align="left"/>
    </style:style>
    <style:style style:name="Table3.A" style:family="table-column">
      <style:table-column-properties style:column-width="3.584in"/>
    </style:style>
    <style:style style:name="Table3.B" style:family="table-column">
      <style:table-column-properties style:column-width="3.6049in"/>
    </style:style>
    <style:style style:name="Table3.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able_20_Contents">
      <style:paragraph-properties fo:margin-left="0in" fo:margin-right="0.1043in" fo:text-indent="0in" style:auto-text-indent="false"/>
    </style:style>
    <style:style style:name="P3" style:family="paragraph" style:parent-style-name="Text_20_Body.center">
      <style:paragraph-properties fo:margin-top="0.3335in" fo:margin-bottom="0.0835in" style:contextual-spacing="false"/>
    </style:style>
    <style:style style:name="P4" style:family="paragraph" style:parent-style-name="Text_20_body">
      <style:paragraph-properties fo:margin-left="0in" fo:margin-right="0.0835in" fo:text-indent="0in" style:auto-text-indent="false"/>
    </style:style>
    <style:style style:name="P5" style:family="paragraph" style:parent-style-name="Text_20_body" style:list-style-name="L1"/>
    <style:style style:name="P6" style:family="paragraph" style:parent-style-name="Text_20_body" style:list-style-name="L1">
      <style:paragraph-properties fo:margin-top="0.0835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0835in" fo:margin-bottom="0in" style:contextual-spacing="false"/>
    </style:style>
    <style:style style:name="T1" style:family="text">
      <style:text-properties loext:padding-left="0in" loext:padding-right="0in" loext:padding-top="0in" loext:padding-bottom="0.0193in" loext:border-left="none" loext:border-right="none" loext:border-top="none" loext:border-bottom="0.06pt dotted #999999"/>
    </style:style>
    <style:style style:name="T2" style:family="text">
      <style:text-properties fo:font-weight="bold"/>
    </style:style>
    <style:style style:name="T3"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ndard Real Estate Purchase Agreement</text:p>
      <text:p text:style-name="Text_20_Body.center"><text:span text:style-name="Strong_20_Emphasis">THIS AGREEMENT</text:span> is made and entered into this <text:span text:style-name="T1">______</text:span> day of <text:span text:style-name="T1">______________</text:span>, <text:span text:style-name="T1">______</text:span>, by and between:</text:p>
      <table:table table:name="Table1" table:style-name="Table1">
        <table:table-column table:style-name="Table1.A"/>
        <table:table-column table:style-name="Table1.B"/>
        <table:table-row>
          <table:table-cell table:style-name="Table1.A1" office:value-type="string">
            <text:p text:style-name="Table_20_Heading">SELLER</text:p>
          </table:table-cell>
          <table:table-cell table:style-name="Table1.A1" office:value-type="string">
            <text:p text:style-name="Table_20_Heading">BUYER</text:p>
          </table:table-cell>
        </table:table-row>
        <table:table-row>
          <table:table-cell table:style-name="Table1.A1" office:value-type="string">
            <text:p text:style-name="Table_20_Contents">Name: <text:span text:style-name="T1">______________________________</text:span></text:p>
          </table:table-cell>
          <table:table-cell table:style-name="Table1.A1" office:value-type="string">
            <text:p text:style-name="Table_20_Contents">Name: <text:span text:style-name="T1">______________________________</text:span></text:p>
          </table:table-cell>
        </table:table-row>
        <table:table-row>
          <table:table-cell table:style-name="Table1.A1" office:value-type="string">
            <text:p text:style-name="Table_20_Contents">Address: <text:span text:style-name="T1">______________________________</text:span></text:p>
          </table:table-cell>
          <table:table-cell table:style-name="Table1.A1" office:value-type="string">
            <text:p text:style-name="Table_20_Contents">Address: <text:span text:style-name="T1">______________________________</text:span></text:p>
          </table:table-cell>
        </table:table-row>
        <table:table-row>
          <table:table-cell table:style-name="Table1.A1" office:value-type="string">
            <text:p text:style-name="Table_20_Contents">Phone: <text:span text:style-name="T1">______________________________</text:span></text:p>
          </table:table-cell>
          <table:table-cell table:style-name="Table1.A1" office:value-type="string">
            <text:p text:style-name="Table_20_Contents">Phone: <text:span text:style-name="T1">______________________________</text:span></text:p>
          </table:table-cell>
        </table:table-row>
      </table:table>
      <text:p text:style-name="Text_20_Body.center"><text:span text:style-name="Strong_20_Emphasis">Property Address:</text:span> <text:span text:style-name="T1">________________________________________________________</text:span></text:p>
      <text:p text:style-name="Text_20_Body.center"><text:span text:style-name="Strong_20_Emphasis">Legal Description:</text:span> <text:span text:style-name="T1">________________________________________________________</text:span></text:p>
      <text:h text:style-name="Heading_20_2" text:outline-level="2">1. Purchase Price and Terms</text:h>
      <text:p text:style-name="P4"><text:span text:style-name="T2">1.1</text:span> <text:span text:style-name="Strong_20_Emphasis">Purchase Price.</text:span> The total purchase price for the Property shall be <text:span text:style-name="Strong_20_Emphasis">$</text:span><text:span text:style-name="Strong_20_Emphasis"><text:span text:style-name="T1">______________</text:span></text:span> (the "Purchase Price"), payable as follows:</text:p>
      <text:list xml:id="list1085770523" text:style-name="L1">
        <text:list-item>
          <text:p text:style-name="P6">Earnest Money Deposit: <text:span text:style-name="Strong_20_Emphasis">$</text:span><text:span text:style-name="Strong_20_Emphasis"><text:span text:style-name="T1">______________</text:span></text:span> </text:p>
        </text:list-item>
        <text:list-item>
          <text:p text:style-name="P6">Additional Deposit (if any): <text:span text:style-name="Strong_20_Emphasis">$</text:span><text:span text:style-name="Strong_20_Emphasis"><text:span text:style-name="T1">______________</text:span></text:span> </text:p>
        </text:list-item>
        <text:list-item>
          <text:p text:style-name="P5">Balance due at Closing (by cash, certified funds, or lender proceeds): <text:span text:style-name="Strong_20_Emphasis">$</text:span><text:span text:style-name="Strong_20_Emphasis"><text:span text:style-name="T1">______________</text:span></text:span> </text:p>
        </text:list-item>
      </text:list>
      <text:p text:style-name="P4"><text:span text:style-name="T2">1.2</text:span> <text:span text:style-name="Strong_20_Emphasis">Financing.</text:span> This Agreement is contingent upon Buyer obtaining a conventional loan commitment within <text:span text:style-name="T1">______</text:span> days of acceptance. If Buyer fails to obtain financing, Buyer may terminate this Agreement and receive a full refund of the Earnest Money Deposit.</text:p>
      <text:h text:style-name="Heading_20_2" text:outline-level="2">2. Property Condition and Disclosures</text:h>
      <text:p text:style-name="P4"><text:span text:style-name="T2">2.1</text:span> <text:span text:style-name="Strong_20_Emphasis">Inspection Period.</text:span> Buyer shall have the right, within <text:span text:style-name="T1">______</text:span> days after acceptance, to inspect the Property and all improvements thereon. Buyer may conduct inspections, tests, and surveys at Buyer's expense.</text:p>
      <text:p text:style-name="P4"><text:span text:style-name="T2">2.2</text:span> <text:span text:style-name="Strong_20_Emphasis">Property Condition.</text:span> The Property is being sold in its present physical condition. Buyer acknowledges that Buyer has inspected the Property and agrees to accept the Property <text:span text:style-name="Strong_20_Emphasis">‍as is‍</text:span>, with all faults, whether visible or latent. The Seller makes no representations or warranties as to the condition of the Property, including but not limited to the roof, foundation, plumbing, electrical systems, heating and air conditioning systems, appliances, or any other component. Buyer expressly acknowledges that the Property is being conveyed <text:span text:style-name="Strong_20_Emphasis">‍as is‍</text:span> and that Seller shall have no obligation to make any repairs or replacements whatsoever. This clause shall survive closing.</text:p>
      <text:p text:style-name="P4"><text:span text:style-name="T2">2.3</text:span> <text:span text:style-name="Strong_20_Emphasis">Seller Disclosures.</text:span> Seller shall provide Buyer with any known material defects, including but not limited to:</text:p>
      <text:list xml:id="list3537871640" text:style-name="L2">
        <text:list-item>
          <text:p text:style-name="P8">Presence of lead-based paint (for properties built prior to 1978) </text:p>
        </text:list-item>
        <text:list-item>
          <text:p text:style-name="P8">Known structural defects </text:p>
        </text:list-item>
        <text:list-item>
          <text:p text:style-name="P8">Past or present termite or pest infestation </text:p>
        </text:list-item>
        <text:list-item>
          <text:p text:style-name="P8">Water damage or mold issues </text:p>
        </text:list-item>
        <text:list-item>
          <text:p text:style-name="P7">Any pending litigation affecting the Property </text:p>
        </text:list-item>
      </text:list>
      <text:h text:style-name="Heading_20_2" text:outline-level="2">3. Closing and Possession</text:h>
      <text:p text:style-name="P4"><text:span text:style-name="T2">3.1</text:span> <text:span text:style-name="Strong_20_Emphasis">Closing Date.</text:span> The closing of this transaction shall occur on or before <text:span text:style-name="T1">______________</text:span>, at a location mutually agreed upon by the parties, or by mail or electronic means.</text:p>
      <text:p text:style-name="P4"><text:soft-page-break/><text:span text:style-name="T2">3.2</text:span> <text:span text:style-name="Strong_20_Emphasis">Possession.</text:span> Possession of the Property shall be delivered to Buyer at closing, unless otherwise agreed in writing. Seller shall remove all personal property not included in this sale prior to closing.</text:p>
      <text:h text:style-name="Heading_20_2" text:outline-level="2">4. Representations and Warranties</text:h>
      <text:p text:style-name="P4"><text:span text:style-name="T2">4.1</text:span> <text:span text:style-name="Strong_20_Emphasis">Seller's Representations.</text:span> Seller represents that Seller has good and marketable title to the Property and that there are no liens, encumbrances, or claims against the Property except as disclosed in writing. Seller further represents that all information provided in the Seller's Disclosure Statement is true and accurate to the best of Seller's knowledge.</text:p>
      <text:p text:style-name="P4"><text:span text:style-name="T2">4.2</text:span> <text:span text:style-name="Strong_20_Emphasis">Buyer's Representations.</text:span> Buyer represents that Buyer has the financial capacity to complete this transaction and that all information provided in Buyer's loan application is true and accurate.</text:p>
      <text:h text:style-name="Heading_20_2" text:outline-level="2">5. Contingencies</text:h>
      <text:p text:style-name="P4"><text:span text:style-name="T2">5.1</text:span> <text:span text:style-name="Strong_20_Emphasis">Appraisal Contingency.</text:span> This Agreement is contingent upon the Property appraising for at least the Purchase Price. If the Property appraises for less, Buyer may terminate this Agreement or renegotiate the Purchase Price.</text:p>
      <text:p text:style-name="P4"><text:span text:style-name="T2">5.2</text:span> <text:span text:style-name="Strong_20_Emphasis">Homeowners Association (HOA) Documents.</text:span> If the Property is subject to an HOA, Buyer shall have <text:span text:style-name="T1">______</text:span> days to review all HOA documents. If Buyer disapproves, Buyer may terminate this Agreement.</text:p>
      <text:h text:style-name="Heading_20_2" text:outline-level="2">6. Default and Remedies</text:h>
      <text:p text:style-name="P4"><text:span text:style-name="T2">6.1</text:span> <text:span text:style-name="Strong_20_Emphasis">Buyer Default.</text:span> If Buyer fails to perform any obligation under this Agreement, Seller may retain the Earnest Money Deposit as liquidated damages, or seek specific performance.</text:p>
      <text:p text:style-name="P4"><text:span text:style-name="T2">6.2</text:span> <text:span text:style-name="Strong_20_Emphasis">Seller Default.</text:span> If Seller fails to perform, Buyer may terminate this Agreement and receive a full refund of the Earnest Money Deposit, or seek specific performance or damages.</text:p>
      <text:h text:style-name="Heading_20_2" text:outline-level="2">7. General Provisions</text:h>
      <text:p text:style-name="P4"><text:span text:style-name="T2">7.1</text:span> <text:span text:style-name="Strong_20_Emphasis">Entire Agreement.</text:span> This Agreement constitutes the entire agreement between the parties and supersedes all prior negotiations, representations, and agreements, whether written or oral.</text:p>
      <text:p text:style-name="P4"><text:span text:style-name="T2">7.2</text:span> <text:span text:style-name="Strong_20_Emphasis">Governing Law.</text:span> This Agreement shall be governed by and construed in accordance with the laws of the State of <text:span text:style-name="T1">______________</text:span>.</text:p>
      <text:p text:style-name="P4"><text:span text:style-name="T2">7.3</text:span> <text:span text:style-name="Strong_20_Emphasis">Amendments.</text:span> Any amendment to this Agreement must be in writing and signed by both parties.</text:p>
      <text:p text:style-name="P4"><text:span text:style-name="T2">7.4</text:span> <text:span text:style-name="Strong_20_Emphasis">Notices.</text:span> All notices shall be in writing and delivered personally, by certified mail, or by email to the addresses set forth above.</text:p>
      <text:h text:style-name="Heading_20_2" text:outline-level="2">8. Signatures</text:h>
      <text:p text:style-name="Text_20_body"><text:span text:style-name="Strong_20_Emphasis">IN WITNESS WHEREOF</text:span>, the parties have executed this Agreement as of the date first written above.</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SELLER:</text:span></text:p>
            <text:p text:style-name="P2">___________________________</text:p>
            <text:p text:style-name="Table_20_Contents">Signature</text:p>
            <text:p text:style-name="P2">___________________________</text:p>
            <text:p text:style-name="Table_20_Contents">Printed Name</text:p>
            <text:p text:style-name="Table_20_Contents">Date: <text:span text:style-name="T1">______________</text:span></text:p>
          </table:table-cell>
          <table:table-cell table:style-name="Table2.A1" office:value-type="string">
            <text:p text:style-name="Table_20_Contents"><text:span text:style-name="Strong_20_Emphasis">BUYER:</text:span></text:p>
            <text:p text:style-name="P2">___________________________</text:p>
            <text:p text:style-name="Table_20_Contents">Signature</text:p>
            <text:p text:style-name="P2">___________________________</text:p>
            <text:p text:style-name="Table_20_Contents">Printed Name</text:p>
            <text:p text:style-name="Table_20_Contents">Date: <text:span text:style-name="T1">______________</text:span></text:p>
          </table:table-cell>
        </table:table-row>
      </table:table>
      <text:p text:style-name="P3"><text:span text:style-name="Strong_20_Emphasis">AGENT INFORMATION</text:span></text:p>
      <table:table table:name="Table3" table:style-name="Table3">
        <table:table-column table:style-name="Table3.A"/>
        <table:table-column table:style-name="Table3.B"/>
        <table:table-row>
          <table:table-cell table:style-name="Table3.A1" office:value-type="string">
            <text:p text:style-name="Table_20_Heading">Listing Agent</text:p>
          </table:table-cell>
          <table:table-cell table:style-name="Table3.A1" office:value-type="string">
            <text:p text:style-name="Table_20_Heading">Buyer's Agent</text:p>
          </table:table-cell>
        </table:table-row>
        <table:table-row>
          <table:table-cell table:style-name="Table3.A1" office:value-type="string">
            <text:p text:style-name="Table_20_Contents">Name: <text:span text:style-name="T1">______________________________</text:span></text:p>
          </table:table-cell>
          <table:table-cell table:style-name="Table3.A1" office:value-type="string">
            <text:p text:style-name="Table_20_Contents">Name: <text:span text:style-name="T1">______________________________</text:span></text:p>
          </table:table-cell>
        </table:table-row>
        <table:table-row>
          <table:table-cell table:style-name="Table3.A1" office:value-type="string">
            <text:p text:style-name="Table_20_Contents">License #: <text:span text:style-name="T1">______________________________</text:span></text:p>
          </table:table-cell>
          <table:table-cell table:style-name="Table3.A1" office:value-type="string">
            <text:p text:style-name="Table_20_Contents">License #: <text:span text:style-name="T1">______________________________</text:span></text:p>
          </table:table-cell>
        </table:table-row>
        <table:table-row>
          <table:table-cell table:style-name="Table3.A1" office:value-type="string">
            <text:p text:style-name="Table_20_Contents">Brokerage: <text:span text:style-name="T1">______________________________</text:span></text:p>
          </table:table-cell>
          <table:table-cell table:style-name="Table3.A1" office:value-type="string">
            <text:p text:style-name="Table_20_Contents">Brokerage: <text:span text:style-name="T1">______________________________</text:span></text:p>
          </table:table-cell>
        </table:table-row>
      </table:table>
      <text:p text:style-name="Text_20_body">This document was prepared using a standard template. All parties are advised to consult with legal counsel before sign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1in" fo:margin-top="1in" fo:margin-bottom="1in" style:contextual-spacing="false" fo:line-height="150%" fo:text-indent="0in" style:auto-text-indent="false"/>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fo:text-align="center" style:justify-single-word="false"/>
      <style:text-properties fo:text-transform="uppercase"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835in" fo:margin-bottom="0.0835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fo:text-align="center" style:justify-single-word="false" fo:padding-left="0in" fo:padding-right="0in" fo:padding-top="0in" fo:padding-bottom="0.0555in" fo:border-left="none" fo:border-right="none" fo:border-top="none" fo:border-bottom="0.06pt solid #000000"/>
      <style:text-properties fo:text-transform="uppercase"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945in" fo:margin-bottom="0.0835in" style:contextual-spacing="false"/>
      <style:text-properties style:font-name="Liberation Serif" fo:font-family="'Liberation Serif'" style:font-family-generic="roman" style:font-pitch="variable" fo:font-size="13pt" fo:font-weight="bold" style:font-name-asian="DejaVu Sans" style:font-family-asian="'DejaVu Sans'"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Text_20_Body.center" style:display-name="Text Body.center" style:family="paragraph" style:parent-style-name="Text_20_body">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3" meta:image-count="0" meta:object-count="0" meta:page-count="2" meta:paragraph-count="68" meta:word-count="758" meta:character-count="5434" meta:non-whitespace-character-count="4748"/>
    <meta:generator>LibreOffice/7.3.7.2$Linux_X86_64 LibreOffice_project/30$Build-2</meta:generator>
  </office:meta>
</office:document-meta>
</file>