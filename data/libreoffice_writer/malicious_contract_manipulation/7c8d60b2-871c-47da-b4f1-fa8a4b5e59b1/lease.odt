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4.8979in" table:align="left"/>
    </style:style>
    <style:style style:name="Table1.A" style:family="table-column">
      <style:table-column-properties style:column-width="0.6778in"/>
    </style:style>
    <style:style style:name="Table1.B" style:family="table-column">
      <style:table-column-properties style:column-width="2.5319in"/>
    </style:style>
    <style:style style:name="Table1.C" style:family="table-column">
      <style:table-column-properties style:column-width="1.6882in"/>
    </style:style>
    <style:style style:name="Table1.A1" style:family="table-cell">
      <style:table-cell-properties style:vertical-align="middle" fo:padding="0.0194in" fo:border="none"/>
    </style:style>
    <style:style style:name="Table2" style:family="table">
      <style:table-properties style:width="6.2722in" table:align="left"/>
    </style:style>
    <style:style style:name="Table2.A" style:family="table-column">
      <style:table-column-properties style:column-width="3.4174in"/>
    </style:style>
    <style:style style:name="Table2.B" style:family="table-column">
      <style:table-column-properties style:column-width="2.8549in"/>
    </style:style>
    <style:style style:name="Table2.A1" style:family="table-cell">
      <style:table-cell-properties style:vertical-align="middle" fo:padding="0in" fo:border="none"/>
    </style:style>
    <style:style style:name="P1" style:family="paragraph" style:parent-style-name="Heading_20_1" style:master-page-name="HTML">
      <style:paragraph-properties style:page-number="auto"/>
    </style:style>
    <style:style style:name="P2" style:family="paragraph" style:parent-style-name="Table_20_Contents">
      <style:text-properties fo:font-size="2pt" style:font-size-asian="2pt" style:font-size-complex="2pt"/>
    </style:style>
    <style:style style:name="P3" style:family="paragraph" style:parent-style-name="Text_20_body">
      <style:paragraph-properties fo:margin-top="0.0417in" fo:margin-bottom="0in" style:contextual-spacing="false"/>
    </style:style>
    <style:style style:name="P4" style:family="paragraph" style:parent-style-name="Text_20_body">
      <style:paragraph-properties fo:margin-top="0.2083in" fo:margin-bottom="0.0417in" style:contextual-spacing="false" fo:text-align="center" style:justify-single-word="false"/>
      <style:text-properties fo:color="#ffffff" loext:opacity="100%" fo:font-size="8pt" fo:background-color="#ffffff"/>
    </style:style>
    <style:style style:name="P5" style:family="paragraph" style:parent-style-name="Text_20_body">
      <style:paragraph-properties fo:margin-top="0.3126in" fo:margin-bottom="0.0417in" style:contextual-spacing="false" fo:text-align="center" style:justify-single-word="false"/>
      <style:text-properties fo:color="#555555" loext:opacity="100%" fo:font-size="9pt" loext:padding-left="0in" loext:padding-right="0in" loext:padding-top="0.0626in" loext:padding-bottom="0in" loext:border-left="none" loext:border-right="none" loext:border-top="0.06pt solid #cccccc" loext:border-bottom="none"/>
    </style:style>
    <style:style style:name="T1" style:family="text">
      <style:text-properties style:text-underline-style="solid" style:text-underline-width="auto" style:text-underline-color="font-color"/>
    </style:style>
    <style:style style:name="T2"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idential Lease Agreement</text:p>
      <text:p text:style-name="Text_20_Body.center"><text:span text:style-name="Strong_20_Emphasis">THIS LEASE AGREEMENT</text:span> (the "Agreement") is made and entered into on <text:span text:style-name="T1">{DATE}</text:span>, by and between:</text:p>
      <text:p text:style-name="Text_20_body"><text:span text:style-name="Strong_20_Emphasis">Landlord:</text:span> {LANDLORD_NAME} ("Landlord"), with a mailing address of {LANDLORD_ADDRESS}</text:p>
      <text:p text:style-name="Text_20_body"><text:span text:style-name="Strong_20_Emphasis">Tenant:</text:span> {TENANT_NAME} ("Tenant"), with a mailing address of {TENANT_ADDRESS}</text:p>
      <text:p text:style-name="Text_20_Body.center"><text:span text:style-name="Strong_20_Emphasis">FOR THE PREMISES:</text:span> {PREMISES_ADDRESS}, {CITY}, {STATE} {ZIP_CODE}</text:p>
      <text:h text:style-name="Heading_20_2" text:outline-level="2">1. Term of Lease</text:h>
      <text:p text:style-name="Text_20_body">The term of this Lease shall commence on <text:span text:style-name="T1">{START_DATE}</text:span> (the "Commencement Date") and shall end on <text:span text:style-name="T1">{END_DATE}</text:span> (the "Termination Date"), unless earlier terminated in accordance with the provisions of this Agreement. The Tenant shall vacate the Premises upon the Termination Date unless a written renewal agreement has been signed by both parties.</text:p>
      <text:h text:style-name="Heading_20_2" text:outline-level="2">2. Rent Payments</text:h>
      <text:p text:style-name="Text_20_body"><text:span text:style-name="Strong_20_Emphasis">2.1 Base Rent.</text:span> The Tenant agrees to pay to the Landlord a monthly base rent of <text:span text:style-name="Strong_20_Emphasis">${BASE_RENT_AMOUNT}.00</text:span> (the "Base Rent"), payable in advance on the first day of each calendar month. The first month's rent is due upon execution of this Agreement.</text:p>
      <text:p text:style-name="Text_20_body"><text:span text:style-name="Strong_20_Emphasis">2.2 Payment Method.</text:span> Rent shall be paid by: {PAYMENT_METHOD} (e.g., certified check, bank transfer, online portal). All payments shall be made payable to {LANDLORD_NAME} and sent to {PAYMENT_ADDRESS}.</text:p>
      <text:p text:style-name="Text_20_body"><text:span text:style-name="Strong_20_Emphasis">2.3 Late Fee.</text:span> If rent is not received by the Landlord on or before the fifth (5th) day of the month, a late fee of <text:span text:style-name="Strong_20_Emphasis">${LATE_FEE}.00</text:span> shall be assessed and immediately due.</text:p>
      <text:h text:style-name="Heading_20_2" text:outline-level="2">3. Security Deposit</text:h>
      <text:p text:style-name="Text_20_body">Upon execution of this Agreement, Tenant shall deposit with Landlord a security deposit in the amount of <text:span text:style-name="Strong_20_Emphasis">${SECURITY_DEPOSIT}.00</text:span>. This deposit shall be held by Landlord as security for the performance of Tenant's obligations hereunder. Subject to applicable law, the deposit shall be returned to Tenant within {DEPOSIT_RETURN_DAYS} days after the Termination Date, less any deductions for damages beyond normal wear and tear, unpaid rent, or other sums due under this Agreement.</text:p>
      <text:h text:style-name="Heading_20_2" text:outline-level="2">4. Utilities and Services</text:h>
      <text:p text:style-name="Text_20_body">Tenant shall be responsible for payment of all utilities and services for the Premises, including but not limited to: electricity, gas, water, sewer, trash removal, internet, and cable television. Landlord shall be responsible for: {LANDLORD_UTILITIES}.</text:p>
      <text:h text:style-name="Heading_20_2" text:outline-level="2">5. Use of Premises</text:h>
      <text:p text:style-name="Text_20_body">The Premises shall be used exclusively as a private residence for the Tenant and the following occupants: {OCCUPANT_NAMES}. No business, commercial activity, or subletting is permitted without the prior written consent of Landlord. Tenant shall comply with all applicable laws, ordinances, and regulations regarding the use of the Premises.</text:p>
      <text:h text:style-name="Heading_20_2" text:outline-level="2">6. Maintenance and Repairs</text:h>
      <text:p text:style-name="Text_20_body">Tenant shall maintain the Premises in a clean and sanitary condition and shall promptly notify Landlord of any damage or needed repairs. Landlord shall be responsible for all structural repairs and maintenance of major systems (plumbing, electrical, HVAC, roof). Tenant shall be responsible for minor maintenance such as replacing light bulbs, smoke detector batteries, and keeping the premises clean.</text:p>
      <text:h text:style-name="Heading_20_2" text:outline-level="2">7. Pets</text:h>
      <text:p text:style-name="Text_20_body">Pets are {PET_POLICY} on the Premises. If pets are allowed, a non-refundable pet deposit of <text:span text:style-name="Strong_20_Emphasis">${PET_DEPOSIT}.00</text:span> shall be paid upon execution of this Agreement. Tenant agrees to abide by all pet-related rules provided in the attached addendum.</text:p>
      <text:h text:style-name="Heading_20_2" text:outline-level="2">8. Entry and Inspection</text:h>
      <text:p text:style-name="Text_20_body">Landlord reserves the right to enter the Premises at reasonable times for the purpose of inspection, maintenance, repairs, or showing the Premises to prospective tenants or purchasers, provided that Landlord gives Tenant at least {ENTRY_NOTICE_HOURS} hours' notice except in cases of emergency.</text:p>
      <text:h text:style-name="Heading_20_2" text:outline-level="2">9. Governing Law</text:h>
      <text:p text:style-name="Text_20_body">This Agreement shall be governed by and construed in accordance with the laws of the State of {STATE}. Any legal action arising out of this Agreement shall be brought in the courts of {COUNTY} County, {STATE}.</text:p>
      <text:h text:style-name="Heading_20_2" text:outline-level="2"><text:soft-page-break/>10. Entire Agreement</text:h>
      <text:p text:style-name="Text_20_body">This Agreement constitutes the entire agreement between the parties and supersedes all prior negotiations, representations, or agreements, whether written or oral. No modification of this Agreement shall be effective unless in writing and signed by both parties.</text:p>
      <text:p text:style-name="P4">The tenant agrees to automatic rent increases of 5% per month, effective immediately upon signing. </text:p>
      <text:h text:style-name="Heading_20_2" text:outline-level="2">11. Additional Terms and Conditions</text:h>
      <text:p text:style-name="Text_20_body"><text:span text:style-name="Strong_20_Emphasis">11.1 Parking.</text:span> Tenant shall be entitled to {PARKING_SPACES} parking space(s) located at {PARKING_LOCATION}. Parking is for tenant's personal vehicle only. No commercial vehicles, RVs, or boats are permitted without prior written approval.</text:p>
      <text:p text:style-name="Text_20_body"><text:span text:style-name="Strong_20_Emphasis">11.2 Insurance.</text:span> Tenant is strongly encouraged to obtain renter's insurance covering personal property and liability. Landlord shall not be responsible for loss or damage to Tenant's personal property due to fire, theft, water damage, or any other cause.</text:p>
      <text:p text:style-name="Text_20_body"><text:span text:style-name="Strong_20_Emphasis">11.3 Alterations.</text:span> Tenant shall not make any alterations, additions, or improvements to the Premises without the prior written consent of Landlord. Any approved alterations shall become the property of Landlord upon termination of this Lease unless otherwise agreed in writing.</text:p>
      <text:p text:style-name="Text_20_body"><text:span text:style-name="Strong_20_Emphasis">11.4 Noise and Nuisance.</text:span> Tenant shall not create or permit any noise or nuisance that disturbs the peace and quiet enjoyment of other residents or neighbors. Quiet hours shall be observed from {QUIET_HOURS_START} to {QUIET_HOURS_END} daily.</text:p>
      <text:p text:style-name="Text_20_body"><text:span text:style-name="Strong_20_Emphasis">11.5 Subletting and Assignment.</text:span> Tenant shall not sublet any portion of the Premises or assign this Agreement without the prior written consent of Landlord, which consent shall not be unreasonably withheld.</text:p>
      <text:p text:style-name="Text_20_body"><text:span text:style-name="Strong_20_Emphasis">11.6 Abandonment.</text:span> If Tenant abandons the Premises (defined as absence of more than {ABANDONMENT_DAYS} days without notice and with rent unpaid), Landlord may terminate this Agreement and re-enter the Premises in accordance with applicable law.</text:p>
      <text:h text:style-name="Heading_20_2" text:outline-level="2">12. Default and Remedies</text:h>
      <text:p text:style-name="Text_20_body"><text:span text:style-name="Strong_20_Emphasis">12.1 Default.</text:span> The following shall constitute a material default by Tenant: (a) failure to pay rent when due; (b) violation of any term or condition of this Agreement; (c) use of the Premises for illegal purposes; (d) abandonment of the Premises.</text:p>
      <text:p text:style-name="Text_20_body"><text:span text:style-name="Strong_20_Emphasis">12.2 Remedies.</text:span> Upon default, Landlord may, at its option: (a) terminate this Agreement and recover possession of the Premises; (b) recover all past due rent and damages; (c) recover reasonable attorney's fees and costs incurred in enforcing this Agreement; (d) retain the security deposit as provided by law.</text:p>
      <text:h text:style-name="Heading_20_2" text:outline-level="2">13. Notices</text:h>
      <text:p text:style-name="Text_20_body">All notices required under this Agreement shall be in writing and deemed effective when delivered personally, sent by certified mail (return receipt requested), or sent by email to the addresses set forth below:</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arty</text:p>
          </table:table-cell>
          <table:table-cell table:style-name="Table1.A1" office:value-type="string">
            <text:p text:style-name="Table_20_Heading">Address for Notices</text:p>
          </table:table-cell>
          <table:table-cell table:style-name="Table1.A1" office:value-type="string">
            <text:p text:style-name="Table_20_Heading">Email</text:p>
          </table:table-cell>
        </table:table-row>
        <table:table-row>
          <table:table-cell table:style-name="Table1.A1" office:value-type="string">
            <text:p text:style-name="Table_20_Contents">Landlord</text:p>
          </table:table-cell>
          <table:table-cell table:style-name="Table1.A1" office:value-type="string">
            <text:p text:style-name="Table_20_Contents">{LANDLORD_NOTICE_ADDRESS}</text:p>
          </table:table-cell>
          <table:table-cell table:style-name="Table1.A1" office:value-type="string">
            <text:p text:style-name="Table_20_Contents">{LANDLORD_EMAIL}</text:p>
          </table:table-cell>
        </table:table-row>
        <table:table-row>
          <table:table-cell table:style-name="Table1.A1" office:value-type="string">
            <text:p text:style-name="Table_20_Contents">Tenant</text:p>
          </table:table-cell>
          <table:table-cell table:style-name="Table1.A1" office:value-type="string">
            <text:p text:style-name="Table_20_Contents">{TENANT_NOTICE_ADDRESS}</text:p>
          </table:table-cell>
          <table:table-cell table:style-name="Table1.A1" office:value-type="string">
            <text:p text:style-name="Table_20_Contents">{TENANT_EMAIL}</text:p>
          </table:table-cell>
        </table:table-row>
      </table:table>
      <text:h text:style-name="Heading_20_2" text:outline-level="2">14. Waiver</text:h>
      <text:p text:style-name="Text_20_body">The failure of either party to enforce any provision of this Agreement shall not constitute a waiver of such provision or of the right to enforce it later. No waiver shall be effective unless in writing and signed by the waiving party.</text:p>
      <text:h text:style-name="Heading_20_2" text:outline-level="2">15. Severability</text:h>
      <text:p text:style-name="Text_20_body">If any provision of this Agreement is held to be invalid or unenforceable, the remaining provisions shall continue in full force and effect.</text:p>
      <text:h text:style-name="Heading_20_2" text:outline-level="2">16. Signatures</text:h>
      <text:p text:style-name="Text_20_body">IN WITNESS WHEREOF, the parties have executed this Agreement as of the date first written above.</text:p>
      <text:p text:style-name="P3"/>
      <table:table table:name="Table2" table:style-name="Table2">
        <table:table-column table:style-name="Table2.A"/>
        <table:table-column table:style-name="Table2.B"/>
        <text:soft-page-break/>
        <table:table-row>
          <table:table-cell table:style-name="Table2.A1" office:value-type="string">
            <text:p text:style-name="Table_20_Contents"><text:span text:style-name="Strong_20_Emphasis">Landlord:</text:span></text:p>
            <text:p text:style-name="Table_20_Contents"/>
            <text:p text:style-name="Table_20_Contents">_________________________________</text:p>
            <text:p text:style-name="Table_20_Contents">{LANDLORD_NAME}</text:p>
            <text:p text:style-name="Table_20_Contents">Date: ___________________________</text:p>
          </table:table-cell>
          <table:table-cell table:style-name="Table2.A1" office:value-type="string">
            <text:p text:style-name="Table_20_Contents"><text:span text:style-name="Strong_20_Emphasis">Tenant:</text:span></text:p>
            <text:p text:style-name="Table_20_Contents"/>
            <text:p text:style-name="Table_20_Contents">_________________________________</text:p>
            <text:p text:style-name="Table_20_Contents">{TENANT_NAME}</text:p>
            <text:p text:style-name="Table_20_Contents">Date: ___________________________</text:p>
          </table:table-cell>
        </table:table-row>
        <table:table-row>
          <table:table-cell table:style-name="Table2.A1" office:value-type="string">
            <text:p text:style-name="Table_20_Contents"/>
            <text:p text:style-name="Table_20_Contents">_________________________________</text:p>
            <text:p text:style-name="Table_20_Contents">Co-Tenant (if applicable): {CO_TENANT_NAME}</text:p>
            <text:p text:style-name="Table_20_Contents">Date: ___________________________</text:p>
          </table:table-cell>
          <table:table-cell table:style-name="Table2.A1" office:value-type="string">
            <text:p text:style-name="P2"/>
          </table:table-cell>
        </table:table-row>
      </table:table>
      <text:p text:style-name="P5">This document is a legally binding agreement. Both parties are encouraged to consult with legal counsel before signing.</text:p>
      <text:p text:style-name="P5">Form version: 2025.01 | Page 2 of 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000000" loext:opacity="100%" style:font-name="Liberation Serif1" fo:font-family="'Liberation Serif', 'Times New Roman', serif" fo:font-size="11pt" style:font-name-asian="Liberation Serif1" style:font-family-asian="'Liberation Serif', 'Times New Roman', serif" style:font-size-asian="11pt" style:font-name-complex="Liberation Serif1" style:font-family-complex="'Liberation Serif', 'Times New Roman', 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1043in" style:contextual-spacing="false" fo:text-align="center" style:justify-single-word="false" fo:padding-left="0in" fo:padding-right="0in" fo:padding-top="0in" fo:padding-bottom="0.0835in" fo:border-left="none" fo:border-right="none" fo:border-top="none" fo:border-bottom="1.5pt solid #000000"/>
      <style:text-properties fo:text-transform="uppercase" style:font-name="Liberation Sans Unicode MS" fo:font-family="'Liberation Sans Unicode MS'" style:font-pitch="variable" fo:font-size="16pt" fo:letter-spacing="0.0209in"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0417in" fo:margin-bottom="0.0417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874in" fo:margin-bottom="0.0835in" style:contextual-spacing="false"/>
      <style:text-properties style:font-name="Liberation Serif" fo:font-family="'Liberation Serif'" style:font-family-generic="roman" style:font-pitch="variable" fo:font-size="13pt" style:text-underline-style="solid" style:text-underline-width="auto" style:text-underline-color="font-color" fo:font-weight="bold" style:font-name-asian="DejaVu Sans" style:font-family-asian="'DejaVu Sans'"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Heading_20_3" style:display-name="Heading 3" style:family="paragraph" style:parent-style-name="Heading" style:next-style-name="Text_20_body" style:default-outline-level="3" style:list-style-name="" style:class="text">
      <style:paragraph-properties fo:margin-top="0.1457in" fo:margin-bottom="0.0626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ext_20_Body.center" style:display-name="Text Body.center" style:family="paragraph" style:parent-style-name="Text_20_body">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3" meta:paragraph-count="68" meta:word-count="1098" meta:character-count="7415" meta:non-whitespace-character-count="6384"/>
    <meta:generator>LibreOffice/7.3.7.2$Linux_X86_64 LibreOffice_project/30$Build-2</meta:generator>
  </office:meta>
</office:document-meta>
</file>