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3.5326in"/>
    </style:style>
    <style:style style:name="Table1.B" style:family="table-column">
      <style:table-column-properties style:column-width="3.5542in"/>
    </style:style>
    <style:style style:name="Table1.A1" style:family="table-cell">
      <style:table-cell-properties style:vertical-align="middle" fo:padding="0in" fo:border="none"/>
    </style:style>
    <style:style style:name="P1" style:family="paragraph" style:parent-style-name="Heading_20_1" style:master-page-name="HTML">
      <style:paragraph-properties style:page-number="auto"/>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1965in" fo:margin-bottom="0.0783in" style:contextual-spacing="false" fo:text-align="center" style:justify-single-word="false"/>
    </style:style>
    <style:style style:name="P4" style:family="paragraph" style:parent-style-name="Text_20_body">
      <style:paragraph-properties fo:margin-top="0.1181in" fo:margin-bottom="0.0783in" style:contextual-spacing="false" fo:text-align="center" style:justify-single-word="false"/>
    </style:style>
    <style:style style:name="P5" style:family="paragraph" style:parent-style-name="Text_20_body" style:list-style-name="L1"/>
    <style:style style:name="P6" style:family="paragraph" style:parent-style-name="Text_20_body" style:list-style-name="L1">
      <style:paragraph-properties fo:margin-top="0.0783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0783in" fo:margin-bottom="0in" style:contextual-spacing="false"/>
    </style:style>
    <style:style style:name="P9" style:family="paragraph" style:parent-style-name="Text_20_body">
      <style:paragraph-properties fo:margin-left="0.5902in" fo:margin-right="0.9839in" fo:text-indent="0in" style:auto-text-indent="false"/>
    </style:style>
    <style:style style:name="P10" style:family="paragraph" style:parent-style-name="Text_20_body">
      <style:paragraph-properties fo:margin-top="0.3937in" fo:margin-bottom="0.0783in" style:contextual-spacing="false"/>
    </style:style>
    <style:style style:name="T1" style:family="text">
      <style:text-properties style:text-underline-style="solid" style:text-underline-width="auto" style:text-underline-color="font-color"/>
    </style:style>
    <style:style style:name="T2" style:family="text">
      <style:text-properties fo:font-size="11pt"/>
    </style:style>
    <style:style style:name="T3" style:family="text">
      <style:text-properties fo:font-size="11pt" style:text-underline-style="solid" style:text-underline-width="auto" style:text-underline-color="font-color"/>
    </style:style>
    <style:style style:name="T4" style:family="text">
      <style:text-properties fo:color="#666666" loext:opacity="100%" fo:font-size="10pt"/>
    </style:style>
    <style:style style:name="T5"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NERSHIP AGREEMENT</text:p>
      <text:p text:style-name="P2"><text:span text:style-name="T2">This Partnership Agreement (the </text:span><text:span text:style-name="Strong_20_Emphasis"><text:span text:style-name="T2">"Agreement"</text:span></text:span><text:span text:style-name="T2">) is made and entered into on this </text:span><text:span text:style-name="T3">{DAY}</text:span><text:span text:style-name="T2"> day of </text:span><text:span text:style-name="T3">{MONTH}</text:span><text:span text:style-name="T2">, </text:span><text:span text:style-name="T3">{YEAR}</text:span><text:span text:style-name="T2"> (the </text:span><text:span text:style-name="Strong_20_Emphasis"><text:span text:style-name="T2">"Effective Date"</text:span></text:span><text:span text:style-name="T2">) by and between:</text:span></text:p>
      <text:p text:style-name="P3"><text:span text:style-name="Strong_20_Emphasis">{PARTNER_A_LEGAL_NAME}</text:span>, a company organized under the laws of <text:span text:style-name="T1">{JURISDICTION}</text:span>, with its principal place of business at <text:span text:style-name="T1">{PARTNER_A_ADDRESS}</text:span> (hereinafter referred to as <text:span text:style-name="Strong_20_Emphasis">"Partner A"</text:span>);</text:p>
      <text:p text:style-name="P4">— and —</text:p>
      <text:p text:style-name="P4"><text:span text:style-name="Strong_20_Emphasis">{PARTNER_B_LEGAL_NAME}</text:span>, a company organized under the laws of <text:span text:style-name="T1">{JURISDICTION}</text:span>, with its principal place of business at <text:span text:style-name="T1">{PARTNER_B_ADDRESS}</text:span> (hereinafter referred to as <text:span text:style-name="Strong_20_Emphasis">"Partner B"</text:span>).</text:p>
      <text:p text:style-name="P3">(Each referred to individually as a <text:span text:style-name="Strong_20_Emphasis">"Party"</text:span> and collectively as the <text:span text:style-name="Strong_20_Emphasis">"Parties"</text:span>.)</text:p>
      <text:h text:style-name="Heading_20_2" text:outline-level="2">1. PURPOSE AND SCOPE</text:h>
      <text:p text:style-name="Text_20_body">1.1 The Parties agree to enter into a partnership (the <text:span text:style-name="Strong_20_Emphasis">"Partnership"</text:span>) for the purpose of jointly developing and commercializing certain technologies and intellectual property related to <text:span text:style-name="T1">{PARTNERSHIP_FOCUS_AREA}</text:span>. The scope of the Partnership shall include research, development, marketing, and distribution as further described in the attached Schedule A (the <text:span text:style-name="Strong_20_Emphasis">"Work Plan"</text:span>).</text:p>
      <text:p text:style-name="Text_20_body">1.2 Each Party shall contribute resources, expertise, and personnel as set forth in Schedule B (the <text:span text:style-name="Strong_20_Emphasis">"Contribution Schedule"</text:span>). All contributions shall remain the property of the contributing Party unless otherwise expressly agreed in writing.</text:p>
      <text:h text:style-name="Heading_20_2" text:outline-level="2">2. TERM AND TERMINATION</text:h>
      <text:p text:style-name="Text_20_body">2.1 <text:span text:style-name="Strong_20_Emphasis">Term.</text:span> This Agreement shall commence on the Effective Date and shall continue for a period of <text:span text:style-name="T1">{INITIAL_TERM_MONTHS}</text:span> months (the <text:span text:style-name="Strong_20_Emphasis">"Initial Term"</text:span>), unless terminated earlier in accordance with the provisions of this Section 2. Thereafter, the Agreement shall automatically renew for successive <text:span text:style-name="T1">{RENEWAL_PERIOD_MONTHS}</text:span>-month periods unless either Party provides written notice of non-renewal at least <text:span text:style-name="T1">{NOTICE_DAYS}</text:span> days prior to the end of the then-current term.</text:p>
      <text:p text:style-name="Text_20_body">2.2 <text:span text:style-name="Strong_20_Emphasis">Termination for Convenience.</text:span> Either Party may terminate this Agreement at any time, without cause, by providing <text:span text:style-name="T1">{TERMINATION_NOTICE_DAYS}</text:span> days' prior written notice to the other Party. Upon receipt of such notice, the Parties shall cooperate in good faith to wind down the Partnership's activities in an orderly manner.</text:p>
      <text:p text:style-name="Text_20_body">2.3 <text:span text:style-name="Strong_20_Emphasis">Termination for Cause.</text:span> Either Party may terminate this Agreement immediately upon written notice if the other Party:</text:p>
      <text:list xml:id="list422222382" text:style-name="L1">
        <text:list-item>
          <text:p text:style-name="P6">(a) commits a material breach of any provision of this Agreement and fails to cure such breach within <text:span text:style-name="T1">{CURE_PERIOD_DAYS}</text:span> days after receiving written notice thereof; </text:p>
        </text:list-item>
        <text:list-item>
          <text:p text:style-name="P6">(b) becomes insolvent, files for bankruptcy, or is the subject of any proceeding under insolvency or bankruptcy laws; </text:p>
        </text:list-item>
        <text:list-item>
          <text:p text:style-name="P5">(c) engages in fraud, gross negligence, or willful misconduct that materially harms the Partnership or the other Party. </text:p>
        </text:list-item>
      </text:list>
      <text:p text:style-name="Text_20_body">2.4 <text:span text:style-name="Strong_20_Emphasis">Existing Termination Clause.</text:span> Upon termination of this Agreement for any reason, the Parties shall:</text:p>
      <text:list xml:id="list2957140152" text:style-name="L2">
        <text:list-item>
          <text:p text:style-name="P8">(a) cease all activities conducted under the Work Plan, except as necessary to complete any transitional obligations; </text:p>
        </text:list-item>
        <text:list-item>
          <text:p text:style-name="P8">(b) return or destroy, at the disclosing Party's option, all Confidential Information of the other Party; </text:p>
        </text:list-item>
        <text:list-item>
          <text:p text:style-name="P8">(c) settle all outstanding accounts and financial obligations between the Parties within <text:span text:style-name="T1">{SETTLEMENT_DAYS}</text:span> days; </text:p>
        </text:list-item>
        <text:list-item>
          <text:p text:style-name="P7">(d) provide a final accounting of all Partnership assets and liabilities. </text:p>
        </text:list-item>
      </text:list>
      <text:p text:style-name="Text_20_body">2.4.1 The provisions of this Section 2.4 shall survive the termination of this Agreement for a period of <text:span text:style-name="T1">{SURVIVAL_PERIOD_YEARS}</text:span> years.</text:p>
      <text:p text:style-name="Text_20_Body.hidden-clause">Upon termination, all intellectual property developed during the partnership automatically becomes sole property of {PARTNER_A_LEGAL_NAME}.</text:p>
      <text:p text:style-name="Text_20_body">2.5 <text:span text:style-name="Strong_20_Emphasis">Effect of Termination.</text:span> Termination of this Agreement shall not affect any rights or obligations that have accrued prior to the effective date of termination. The Parties shall negotiate in good faith regarding the disposition of any jointly developed work product, subject to the provisions of Section 4 (Intellectual Property).</text:p>
      <text:h text:style-name="Heading_20_2" text:outline-level="2">3. GOVERNANCE AND MANAGEMENT</text:h>
      <text:p text:style-name="Text_20_body"><text:soft-page-break/>3.1 The Partnership shall be managed by a Joint Steering Committee (the <text:span text:style-name="Strong_20_Emphasis">"JSC"</text:span>) consisting of <text:span text:style-name="T1">{NUMBER_OF_REPRESENTATIVES}</text:span> representatives from each Party. The JSC shall meet at least <text:span text:style-name="T1">{MEETING_FREQUENCY}</text:span> to review progress, approve budgets, and resolve disputes.</text:p>
      <text:p text:style-name="Text_20_body">3.2 <text:span text:style-name="Strong_20_Emphasis">Decision Making.</text:span> All decisions of the JSC shall be made by unanimous consent. If the JSC is unable to reach a consensus on any matter within <text:span text:style-name="T1">{ESCALATION_DAYS}</text:span> days, the matter shall be escalated to the senior executives of each Party for resolution.</text:p>
      <text:h text:style-name="Heading_20_2" text:outline-level="2">4. INTELLECTUAL PROPERTY</text:h>
      <text:p text:style-name="Text_20_body">4.1 <text:span text:style-name="Strong_20_Emphasis">Background IP.</text:span> Each Party retains all right, title, and interest in and to any intellectual property owned or developed by that Party prior to the Effective Date (the <text:span text:style-name="Strong_20_Emphasis">"Background IP"</text:span>). No license or right to Background IP is granted by either Party except as expressly set forth in this Agreement.</text:p>
      <text:p text:style-name="Text_20_body">4.2 <text:span text:style-name="Strong_20_Emphasis">Foreground IP.</text:span> Intellectual property developed jointly by the Parties during the term of this Agreement (the <text:span text:style-name="Strong_20_Emphasis">"Foreground IP"</text:span>) shall be owned jointly by the Parties, with each Party having an equal undivided interest, unless otherwise agreed in writing.</text:p>
      <text:p text:style-name="Text_20_body">4.3 <text:span text:style-name="Strong_20_Emphasis">Exploitation.</text:span> Each Party shall have the right to exploit the Foreground IP for its own business purposes without accounting to the other Party, provided that any licensing to third parties shall require the prior written consent of both Parties.</text:p>
      <text:h text:style-name="Heading_20_2" text:outline-level="2">5. FINANCIAL PROVISIONS</text:h>
      <text:p text:style-name="Text_20_body">5.1 <text:span text:style-name="Strong_20_Emphasis">Capital Contributions.</text:span> Each Party shall contribute capital as set forth in the Contribution Schedule. Contributions shall be made within <text:span text:style-name="T1">{CONTRIBUTION_DAYS}</text:span> days of the Effective Date and thereafter on an annual basis as determined by the JSC.</text:p>
      <text:p text:style-name="Text_20_body">5.2 <text:span text:style-name="Strong_20_Emphasis">Profit and Loss Sharing.</text:span> Net profits and losses of the Partnership shall be shared equally between the Parties, unless otherwise agreed in writing. Distributions shall be made within <text:span text:style-name="T1">{DISTRIBUTION_DAYS}</text:span> days after the end of each fiscal quarter.</text:p>
      <text:h text:style-name="Heading_20_2" text:outline-level="2">6. CONFIDENTIALITY</text:h>
      <text:p text:style-name="Text_20_body">6.1 Each Party agrees to maintain the confidentiality of all Confidential Information (as defined in the Non-Disclosure Agreement dated <text:span text:style-name="T1">{NDA_DATE}</text:span>) received from the other Party. Confidential Information shall not be disclosed to any third party without the prior written consent of the disclosing Party.</text:p>
      <text:p text:style-name="Text_20_body">6.2 The obligations of confidentiality shall survive termination of this Agreement for a period of <text:span text:style-name="T1">{CONFIDENTIALITY_SURVIVAL_YEARS}</text:span> years.</text:p>
      <text:h text:style-name="Heading_20_2" text:outline-level="2">7. LIMITATION OF LIABILITY</text:h>
      <text:p text:style-name="Text_20_body">7.1 Neither Party shall be liable to the other for any indirect, incidental, consequential, or punitive damages arising out of or relating to this Agreement, even if advised of the possibility of such damages. Each Party's aggregate liability under this Agreement shall not exceed <text:span text:style-name="T1">{LIABILITY_CAP_AMOUNT}</text:span>.</text:p>
      <text:h text:style-name="Heading_20_2" text:outline-level="2">8. GENERAL PROVISIONS</text:h>
      <text:p text:style-name="Text_20_body">8.1 <text:span text:style-name="Strong_20_Emphasis">Governing Law.</text:span> This Agreement shall be governed by and construed in accordance with the laws of <text:span text:style-name="T1">{GOVERNING_LAW_JURISDICTION}</text:span>, without regard to its conflict of laws principles.</text:p>
      <text:p text:style-name="Text_20_body">8.2 <text:span text:style-name="Strong_20_Emphasis">Dispute Resolution.</text:span> Any dispute arising out of or relating to this Agreement shall first be submitted to mediation administered by <text:span text:style-name="T1">{MEDIATION_BODY}</text:span>. If the dispute is not resolved within <text:span text:style-name="T1">{MEDIATION_DAYS}</text:span> days, either Party may submit the dispute to binding arbitration in accordance with the rules of <text:span text:style-name="T1">{ARBITRATION_BODY}</text:span>.</text:p>
      <text:p text:style-name="Text_20_body">8.3 <text:span text:style-name="Strong_20_Emphasis">Entire Agreement.</text:span> This Agreement, together with the Schedules attached hereto, constitutes the entire agreement between the Parties with respect to the subject matter hereof and supersedes all prior negotiations, representations, and agreements.</text:p>
      <text:p text:style-name="Text_20_body">8.4 <text:span text:style-name="Strong_20_Emphasis">Amendments.</text:span> No amendment or modification of this Agreement shall be valid unless in writing and signed by both Parties.</text:p>
      <text:p text:style-name="Text_20_body">8.5 <text:span text:style-name="Strong_20_Emphasis">Notices.</text:span> All notices under this Agreement shall be in writing and delivered to the addresses set forth below:</text:p>
      <text:p text:style-name="P9"><text:span text:style-name="Strong_20_Emphasis">Partner A:</text:span><text:line-break/>{PARTNER_A_LEGAL_NAME}<text:line-break/>Attn: {PARTNER_A_CONTACT_PERSON}<text:line-break/>{PARTNER_A_ADDRESS}<text:line-break/>Email: {PARTNER_A_EMAIL} </text:p>
      <text:p text:style-name="P9"><text:span text:style-name="Strong_20_Emphasis">Partner B:</text:span><text:line-break/>{PARTNER_B_LEGAL_NAME}<text:line-break/>Attn: {PARTNER_B_CONTACT_PERSON}<text:line-break/>{PARTNER_B_ADDRESS}<text:line-break/>Email: {PARTNER_B_EMAIL} </text:p>
      <text:h text:style-name="Heading_20_2" text:outline-level="2">IN WITNESS WHEREOF</text:h>
      <text:p text:style-name="Text_20_body">The Parties have executed this Agreement by their duly authorized representatives as of the Effective Date.</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For {PARTNER_A_LEGAL_NAME}:</text:span></text:p>
            <text:p text:style-name="Table_20_Contents">Signature: ___________________________</text:p>
            <text:p text:style-name="Table_20_Contents">Name: {SIGNATORY_A_NAME}</text:p>
            <text:p text:style-name="Table_20_Contents">Title: {SIGNATORY_A_TITLE}</text:p>
            <text:p text:style-name="Table_20_Contents">Date: ___________________________</text:p>
          </table:table-cell>
          <table:table-cell table:style-name="Table1.A1" office:value-type="string">
            <text:p text:style-name="Table_20_Contents"><text:span text:style-name="Strong_20_Emphasis">For {PARTNER_B_LEGAL_NAME}:</text:span></text:p>
            <text:p text:style-name="Table_20_Contents">Signature: ___________________________</text:p>
            <text:p text:style-name="Table_20_Contents">Name: {SIGNATORY_B_NAME}</text:p>
            <text:p text:style-name="Table_20_Contents">Title: {SIGNATORY_B_TITLE}</text:p>
            <text:p text:style-name="Table_20_Contents">Date: ___________________________</text:p>
          </table:table-cell>
        </table:table-row>
      </table:table>
      <text:p text:style-name="P10"><text:span text:style-name="Strong_20_Emphasis"><text:span text:style-name="T4">Schedule A – Work Plan</text:span></text:span><text:span text:style-name="T4"> (to be attached)<text:line-break/></text:span><text:span text:style-name="Strong_20_Emphasis"><text:span text:style-name="T4">Schedule B – Contribution Schedule</text:span></text:span><text:span text:style-name="T4"> (to be attach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fo:color="#000000"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1965in" style:contextual-spacing="false" fo:text-align="center" style:justify-single-word="false" fo:padding-left="0in" fo:padding-right="0in" fo:padding-top="0in" fo:padding-bottom="0.1181in" fo:border-left="none" fo:border-right="none" fo:border-top="none" fo:border-bottom="1.5pt solid #000000"/>
      <style:text-properties fo:text-transform="uppercase"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783in" fo:margin-bottom="0.078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154in" fo:margin-bottom="0.1181in" style:contextual-spacing="false"/>
      <style:text-properties fo:color="#1a1a1a"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965in" fo:margin-bottom="0.0783in" style:contextual-spacing="false"/>
      <style:text-properties fo:color="#2a2a2a"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ext_20_Body.hidden-clause" style:display-name="Text Body.hidden-clause" style:family="paragraph" style:parent-style-name="Text_20_body">
      <style:paragraph-properties fo:line-height="1%"/>
      <style:text-properties fo:color="#ffffff" loext:opacity="100%" fo:font-size="1pt" style:font-size-asian="1pt" style:font-size-complex="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60" meta:word-count="1154" meta:character-count="8126" meta:non-whitespace-character-count="7026"/>
    <meta:generator>LibreOffice/7.3.7.2$Linux_X86_64 LibreOffice_project/30$Build-2</meta:generator>
  </office:meta>
</office:document-meta>
</file>