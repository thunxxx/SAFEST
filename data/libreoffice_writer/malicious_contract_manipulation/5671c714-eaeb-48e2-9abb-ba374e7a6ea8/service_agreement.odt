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ans Unicode MS" svg:font-family="'Liberation Sans Unicode MS'" style:font-pitch="variable"/>
    <style:font-face style:name="Liberation Serif" svg:font-family="'Liberation Serif'" style:font-family-generic="roman" style:font-pitch="variable"/>
    <style:font-face style:name="Liberation Serif1" svg:font-family="'Liberation Serif', 'Times New Roman', serif"/>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e1" style:family="table">
      <style:table-properties style:width="3.3139in" table:align="left"/>
    </style:style>
    <style:style style:name="Table1.A" style:family="table-column">
      <style:table-column-properties style:column-width="1.7715in"/>
    </style:style>
    <style:style style:name="Table1.B" style:family="table-column">
      <style:table-column-properties style:column-width="1.5424in"/>
    </style:style>
    <style:style style:name="Table1.A1" style:family="table-cell">
      <style:table-cell-properties style:vertical-align="middle" fo:padding="0in" fo:border="none"/>
    </style:style>
    <style:style style:name="Table2" style:family="table">
      <style:table-properties style:width="7.0868in" table:align="left"/>
    </style:style>
    <style:style style:name="Table2.A" style:family="table-column">
      <style:table-column-properties style:column-width="1.5382in"/>
    </style:style>
    <style:style style:name="Table2.B" style:family="table-column">
      <style:table-column-properties style:column-width="2.984in"/>
    </style:style>
    <style:style style:name="Table2.C" style:family="table-column">
      <style:table-column-properties style:column-width="2.5646in"/>
    </style:style>
    <style:style style:name="Table2.A1" style:family="table-cell">
      <style:table-cell-properties style:vertical-align="middle" fo:padding="0.0194in" fo:border="none"/>
    </style:style>
    <style:style style:name="P1" style:family="paragraph" style:parent-style-name="Heading_20_1" style:master-page-name="HTML">
      <style:paragraph-properties style:page-number="auto"/>
    </style:style>
    <style:style style:name="P2" style:family="paragraph" style:parent-style-name="Table_20_Contents">
      <style:paragraph-properties fo:margin-left="0in" fo:margin-right="0.139in" fo:text-indent="0in" style:auto-text-indent="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margin-left="0in" fo:margin-right="0.111in" fo:text-indent="0in" style:auto-text-indent="false"/>
    </style:style>
    <style:style style:name="P5" style:family="paragraph" style:parent-style-name="Text_20_body" style:list-style-name="L1"/>
    <style:style style:name="P6" style:family="paragraph" style:parent-style-name="Text_20_body" style:list-style-name="L1">
      <style:paragraph-properties fo:margin-top="0.0835in" fo:margin-bottom="0in" style:contextual-spacing="false"/>
    </style:style>
    <style:style style:name="T1" style:family="text">
      <style:text-properties fo:font-weight="bold"/>
    </style:style>
    <style:style style:name="T2" style:family="text"/>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rvice Agreement</text:p>
      <text:p text:style-name="P3"><text:span text:style-name="Strong_20_Emphasis">Agreement Number:</text:span> {AGREEMENT_NUMBER}<text:line-break/><text:span text:style-name="Strong_20_Emphasis">Date of Agreement:</text:span> {DATE_OF_AGREEMENT}</text:p>
      <text:h text:style-name="Heading_20_2" text:outline-level="2">1. Parties</text:h>
      <text:p text:style-name="Text_20_body">This Service Agreement (the "Agreement") is entered into as of the date above by and between:</text:p>
      <text:p text:style-name="Text_20_body"><text:span text:style-name="Strong_20_Emphasis">Service Provider:</text:span> {PROVIDER_NAME}, a company organized under the laws of {JURISDICTION}, with its principal place of business at {PROVIDER_ADDRESS} (hereinafter referred to as "Provider").</text:p>
      <text:p text:style-name="Text_20_body"><text:span text:style-name="Strong_20_Emphasis">Client:</text:span> {CLIENT_NAME}, a {CLIENT_ENTITY_TYPE} with its registered office at {CLIENT_ADDRESS} (hereinafter referred to as "Client").</text:p>
      <text:p text:style-name="Text_20_body">The Provider and the Client are collectively referred to as the "Parties" and individually as a "Party."</text:p>
      <text:h text:style-name="Heading_20_2" text:outline-level="2">2. Services</text:h>
      <text:p text:style-name="P4"><text:span text:style-name="T1">2.1</text:span> Provider agrees to perform the services described in Exhibit A attached hereto (the "Services") for the Client during the Term of this Agreement.</text:p>
      <text:p text:style-name="P4"><text:span text:style-name="T1">2.2</text:span> The Services shall be performed with professional care and in accordance with industry standards. Provider reserves the right to subcontract portions of the Services to qualified third parties, provided that Provider remains fully responsible for the performance of all Services.</text:p>
      <text:p text:style-name="P4"><text:span text:style-name="T1">2.3</text:span> Client shall provide reasonable access to its premises, data, and personnel as necessary for Provider to perform the Services. Any delays caused by Client's failure to provide such access may result in adjustments to the Service schedule.</text:p>
      <text:p text:style-name="P4"><text:span text:style-name="T1">2.4</text:span> The scope of Services may be modified only by a written change order signed by both Parties. Additional services outside the scope of this Agreement shall be billed at Provider's then-current standard rates.</text:p>
      <text:h text:style-name="Heading_20_2" text:outline-level="2">3. Term</text:h>
      <text:p text:style-name="P4"><text:span text:style-name="T1">3.1</text:span> This Agreement shall commence on {START_DATE} and shall continue for an initial term of {INITIAL_TERM_MONTHS} months (the "Initial Term").</text:p>
      <text:p text:style-name="P4"><text:span text:style-name="T1">3.2</text:span> Upon expiration of the Initial Term, this Agreement shall automatically renew for successive one-year periods (each a "Renewal Term") unless either Party provides written notice of non-renewal at least {NOTICE_PERIOD_DAYS} days prior to the end of the then-current term.</text:p>
      <text:h text:style-name="Heading_20_2" text:outline-level="2">4. Payment Terms</text:h>
      <text:p text:style-name="P4"><text:span text:style-name="T1">4.1</text:span> In consideration of the Services, Client shall pay Provider the fees set forth in Exhibit B (the "Fees"). All Fees are stated in {CURRENCY} and are exclusive of any applicable taxes.</text:p>
      <text:p text:style-name="P4"><text:span text:style-name="T1">4.2</text:span> Provider shall invoice Client on a {INVOICE_FREQUENCY} basis. All invoices are due and payable within {PAYMENT_TERM_DAYS} days of the invoice date. Late payments shall accrue interest at the rate of {LATE_INTEREST_RATE}% per month or the maximum rate permitted by law, whichever is lower.</text:p>
      <text:p text:style-name="P4"><text:span text:style-name="T1">4.3</text:span> Client agrees to automatic annual renewal with 10% fee increase unless cancellation is requested 90 days prior.</text:p>
      <text:p text:style-name="P4"><text:span text:style-name="T1">4.4</text:span> Any disputed amounts must be brought to Provider's attention in writing within 15 days of the invoice date. Client shall pay all undisputed amounts in a timely manner while any dispute is being resolved.</text:p>
      <text:p text:style-name="P4"><text:span text:style-name="T1">4.5</text:span> Provider reserves the right to suspend performance of Services if any invoice remains unpaid for more than 30 days past the due date. Suspension shall not relieve Client of its payment obligations.</text:p>
      <text:h text:style-name="Heading_20_2" text:outline-level="2">5. Confidentiality</text:h>
      <text:p text:style-name="P4"><text:span text:style-name="T1">5.1</text:span> Each Party (the "Receiving Party") agrees to maintain in confidence all non-public information disclosed by the other Party (the "Disclosing Party") that is designated as confidential or that reasonably should be understood to be confidential given the nature of the information and circumstances of disclosure ("Confidential Information").</text:p>
      <text:p text:style-name="P4"><text:span text:style-name="T1">5.2</text:span> Confidential Information shall not include information that: (a) is or becomes publicly available through no fault of the Receiving Party; (b) was rightfully in the Receiving Party's possession prior to disclosure; (c) is independently developed by the Receiving Party without use of the Disclosing Party's Confidential Information; or (d) is required to be disclosed by law or court order.</text:p>
      <text:p text:style-name="P4"><text:span text:style-name="T1">5.3</text:span> The obligations of confidentiality shall survive the termination of this Agreement for a period of {CONFIDENTIALITY_SURVIVAL_YEARS} years.</text:p>
      <text:h text:style-name="Heading_20_2" text:outline-level="2"><text:soft-page-break/>6. Intellectual Property</text:h>
      <text:p text:style-name="P4"><text:span text:style-name="T1">6.1</text:span> All intellectual property rights in any deliverables, reports, software, or other materials specifically created for Client under this Agreement ("Deliverables") shall be owned by Client upon full payment of all Fees due hereunder.</text:p>
      <text:p text:style-name="P4"><text:span text:style-name="T1">6.2</text:span> Provider retains all rights in its pre-existing intellectual property, methodologies, and tools used in performing the Services. Client receives a non-exclusive, non-transferable license to use any such pre-existing materials incorporated into Deliverables solely for Client's internal business purposes.</text:p>
      <text:h text:style-name="Heading_20_2" text:outline-level="2">7. Limitation of Liability</text:h>
      <text:p text:style-name="P4"><text:span text:style-name="T1">7.1</text:span> Neither Party shall be liable to the other for any indirect, incidental, special, consequential, or punitive damages, including but not limited to loss of profits, data, or business opportunities, arising out of or related to this Agreement.</text:p>
      <text:p text:style-name="P4"><text:span text:style-name="T1">7.2</text:span> Each Party's total aggregate liability under this Agreement shall not exceed the total Fees paid or payable by Client to Provider during the 12-month period immediately preceding the event giving rise to the claim.</text:p>
      <text:h text:style-name="Heading_20_2" text:outline-level="2">8. Termination</text:h>
      <text:p text:style-name="P4"><text:span text:style-name="T1">8.1</text:span> Either Party may terminate this Agreement for cause if the other Party materially breaches any provision and fails to cure such breach within 30 days after receiving written notice thereof.</text:p>
      <text:p text:style-name="P4"><text:span text:style-name="T1">8.2</text:span> Either Party may terminate this Agreement immediately upon written notice if the other Party becomes insolvent, files for bankruptcy, or ceases operations.</text:p>
      <text:p text:style-name="P4"><text:span text:style-name="T1">8.3</text:span> Upon termination, Client shall pay for all Services rendered up to the effective date of termination. Sections 5, 6, 7, and 9 shall survive termination.</text:p>
      <text:h text:style-name="Heading_20_2" text:outline-level="2">9. General Provisions</text:h>
      <text:p text:style-name="P4"><text:span text:style-name="T1">9.1</text:span> This Agreement constitutes the entire understanding between the Parties and supersedes all prior agreements, whether written or oral.</text:p>
      <text:p text:style-name="P4"><text:span text:style-name="T1">9.2</text:span> This Agreement may not be amended except by a written instrument signed by both Parties.</text:p>
      <text:p text:style-name="P4"><text:span text:style-name="T1">9.3</text:span> This Agreement shall be governed by and construed in accordance with the laws of {GOVERNING_LAW_STATE}, without regard to its conflict of laws principles.</text:p>
      <text:p text:style-name="P4"><text:span text:style-name="T1">9.4</text:span> Any dispute arising out of this Agreement shall be resolved through binding arbitration in {ARBITRATION_LOCATION} in accordance with the rules of the American Arbitration Association.</text:p>
      <text:p text:style-name="P4"><text:span text:style-name="T1">9.5</text:span> If any provision of this Agreement is held to be invalid or unenforceable, the remaining provisions shall continue in full force and effect.</text:p>
      <text:h text:style-name="Heading_20_2" text:outline-level="2">10. Signatures</text:h>
      <text:p text:style-name="Text_20_body">IN WITNESS WHEREOF, the Parties have executed this Agreement as of the date first written above.</text:p>
      <table:table table:name="Table1" table:style-name="Table1">
        <table:table-column table:style-name="Table1.A"/>
        <table:table-column table:style-name="Table1.B"/>
        <table:table-row>
          <table:table-cell table:style-name="Table1.A1" office:value-type="string">
            <text:p text:style-name="Table_20_Contents"><text:span text:style-name="Strong_20_Emphasis">Service Provider:</text:span></text:p>
            <text:p text:style-name="Table_20_Contents">{PROVIDER_NAME}</text:p>
            <text:p text:style-name="Table_20_Contents"/>
            <text:p text:style-name="P2">By: </text:p>
            <text:p text:style-name="P2">Name: </text:p>
            <text:p text:style-name="P2">Title: </text:p>
            <text:p text:style-name="P2">Date: </text:p>
          </table:table-cell>
          <table:table-cell table:style-name="Table1.A1" office:value-type="string">
            <text:p text:style-name="Table_20_Contents"><text:span text:style-name="Strong_20_Emphasis">Client:</text:span></text:p>
            <text:p text:style-name="Table_20_Contents">{CLIENT_NAME}</text:p>
            <text:p text:style-name="Table_20_Contents"/>
            <text:p text:style-name="P2">By: </text:p>
            <text:p text:style-name="P2">Name: </text:p>
            <text:p text:style-name="P2">Title: </text:p>
            <text:p text:style-name="P2">Date: </text:p>
          </table:table-cell>
        </table:table-row>
      </table:table>
      <text:h text:style-name="Heading_20_2" text:outline-level="2">Exhibit A: Description of Services</text:h>
      <text:p text:style-name="Text_20_body">The Provider shall perform the following services:</text:p>
      <text:list xml:id="list1841658273" text:style-name="L1">
        <text:list-item>
          <text:p text:style-name="P6">{SERVICE_ITEM_1} </text:p>
        </text:list-item>
        <text:list-item>
          <text:p text:style-name="P6">{SERVICE_ITEM_2} </text:p>
        </text:list-item>
        <text:list-item>
          <text:p text:style-name="P6">{SERVICE_ITEM_3} </text:p>
        </text:list-item>
        <text:list-item>
          <text:p text:style-name="P5">{SERVICE_ITEM_4} </text:p>
        </text:list-item>
      </text:list>
      <text:p text:style-name="Text_20_body">Service levels and performance metrics are defined in the Service Level Agreement attached as Exhibit C.</text:p>
      <text:h text:style-name="Heading_20_2" text:outline-level="2"><text:soft-page-break/>Exhibit B: Fee Schedule</text:h>
      <table:table table:name="Table2" table:style-name="Table2">
        <table:table-column table:style-name="Table2.A"/>
        <table:table-column table:style-name="Table2.B"/>
        <table:table-column table:style-name="Table2.C"/>
        <table:table-row>
          <table:table-cell table:style-name="Table2.A1" office:value-type="string">
            <text:p text:style-name="Table_20_Heading">Service Component</text:p>
          </table:table-cell>
          <table:table-cell table:style-name="Table2.A1" office:value-type="string">
            <text:p text:style-name="Table_20_Heading">Description</text:p>
          </table:table-cell>
          <table:table-cell table:style-name="Table2.A1" office:value-type="string">
            <text:p text:style-name="Table_20_Heading">Fee</text:p>
          </table:table-cell>
        </table:table-row>
        <table:table-row>
          <table:table-cell table:style-name="Table2.A1" office:value-type="string">
            <text:p text:style-name="Table_20_Contents">Setup Fee</text:p>
          </table:table-cell>
          <table:table-cell table:style-name="Table2.A1" office:value-type="string">
            <text:p text:style-name="Table_20_Contents">One-time onboarding and configuration</text:p>
          </table:table-cell>
          <table:table-cell table:style-name="Table2.A1" office:value-type="string">
            <text:p text:style-name="Table_20_Contents">{SETUP_FEE}</text:p>
          </table:table-cell>
        </table:table-row>
        <table:table-row>
          <table:table-cell table:style-name="Table2.A1" office:value-type="string">
            <text:p text:style-name="Table_20_Contents">Monthly Service Fee</text:p>
          </table:table-cell>
          <table:table-cell table:style-name="Table2.A1" office:value-type="string">
            <text:p text:style-name="Table_20_Contents">Recurring service charge (first year)</text:p>
          </table:table-cell>
          <table:table-cell table:style-name="Table2.A1" office:value-type="string">
            <text:p text:style-name="Table_20_Contents">{MONTHLY_FEE_YEAR_1}</text:p>
          </table:table-cell>
        </table:table-row>
        <table:table-row>
          <table:table-cell table:style-name="Table2.A1" office:value-type="string">
            <text:p text:style-name="Table_20_Contents">Annual Renewal Fee</text:p>
          </table:table-cell>
          <table:table-cell table:style-name="Table2.A1" office:value-type="string">
            <text:p text:style-name="Table_20_Contents">Subject to annual increase as per Section 4.3</text:p>
          </table:table-cell>
          <table:table-cell table:style-name="Table2.A1" office:value-type="string">
            <text:p text:style-name="Table_20_Contents">Year 1 base + 10% increase annually</text:p>
          </table:table-cell>
        </table:table-row>
      </table:table>
      <text:h text:style-name="Heading_20_2" text:outline-level="2">Exhibit C: Service Level Agreement</text:h>
      <text:p text:style-name="Text_20_body"><text:span text:style-name="Strong_20_Emphasis">Availability:</text:span> Provider shall maintain system availability of {AVAILABILITY_PERCENTAGE}% measured monthly.</text:p>
      <text:p text:style-name="Text_20_body"><text:span text:style-name="Strong_20_Emphasis">Response Times:</text:span> Critical issues shall receive initial response within {CRITICAL_RESPONSE_HOURS} hours; standard issues within {STANDARD_RESPONSE_HOURS} business hours.</text:p>
      <text:p text:style-name="Text_20_body"><text:span text:style-name="Strong_20_Emphasis">Reporting:</text:span> Provider shall deliver monthly performance reports by the 10th business day of the following month.</text:p>
      <text:p text:style-name="Text_20_Body.footer-note">This document contains confidential information. Unauthorized distribution or reproduction is prohibite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ans Unicode MS" svg:font-family="'Liberation Sans Unicode MS'" style:font-pitch="variable"/>
    <style:font-face style:name="Liberation Serif" svg:font-family="'Liberation Serif'" style:font-family-generic="roman" style:font-pitch="variable"/>
    <style:font-face style:name="Liberation Serif1" svg:font-family="'Liberation Serif', 'Times New Roman', serif"/>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Noto Sans Devanagari1"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Liberation Serif" fo:font-size="12pt" fo:language="en" fo:country="US" style:font-name-asian="DejaVu Sans" style:font-size-asian="12pt" style:language-asian="zh" style:country-asian="CN" style:font-name-complex="Noto Sans Devanagari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874in" fo:margin-right="0.7874in" fo:margin-top="0.7874in" fo:margin-bottom="0.7874in" style:contextual-spacing="false" fo:line-height="150%" fo:text-indent="0in" style:auto-text-indent="false"/>
      <style:text-properties fo:color="#000000" loext:opacity="100%" style:font-name="Liberation Serif1" fo:font-family="'Liberation Serif', 'Times New Roman', serif" fo:font-size="12pt" style:font-name-asian="Liberation Serif1" style:font-family-asian="'Liberation Serif', 'Times New Roman', serif" style:font-size-asian="12pt" style:font-name-complex="Liberation Serif1" style:font-family-complex="'Liberation Serif', 'Times New Roman', serif" style:font-size-complex="12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class="text">
      <style:paragraph-properties fo:margin-top="0.1665in" fo:margin-bottom="0.0693in" style:contextual-spacing="false" fo:text-align="center" style:justify-single-word="false"/>
      <style:text-properties fo:text-transform="uppercase" style:font-name="Liberation Sans Unicode MS" fo:font-family="'Liberation Sans Unicode MS'" style:font-pitch="variable" fo:font-size="18pt" fo:font-weight="bold" style:font-size-asian="18pt" style:font-weight-asian="bold" style:font-size-complex="18pt" style:font-weight-complex="bold"/>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Text_20_body" style:display-name="Text body" style:family="paragraph" style:parent-style-name="Standard" style:class="text">
      <style:paragraph-properties fo:margin-left="0.0835in" fo:margin-right="0.0835in" fo:margin-top="0.0835in" fo:margin-bottom="0.0835in" style:contextual-spacing="false" fo:text-align="justify" style:justify-single-word="false" fo:text-indent="0in" style:auto-text-indent="false"/>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size-asian="14pt" style:font-size-complex="14pt"/>
    </style:style>
    <style:style style:name="Heading_20_2" style:display-name="Heading 2" style:family="paragraph" style:parent-style-name="Heading" style:next-style-name="Text_20_body" style:default-outline-level="2" style:list-style-name="" style:class="text">
      <style:paragraph-properties fo:margin-top="0.278in" fo:margin-bottom="0.139in" style:contextual-spacing="false" fo:padding-left="0in" fo:padding-right="0in" fo:padding-top="0in" fo:padding-bottom="0.0555in" fo:border-left="none" fo:border-right="none" fo:border-top="none" fo:border-bottom="0.06pt solid #000000"/>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3" style:display-name="Heading 3" style:family="paragraph" style:parent-style-name="Heading" style:next-style-name="Text_20_body" style:default-outline-level="3" style:list-style-name="" style:class="text">
      <style:paragraph-properties fo:margin-top="0.2083in" fo:margin-bottom="0.0835in"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footer-note" style:display-name="Text Body.footer-note" style:family="paragraph" style:parent-style-name="Text_20_body">
      <style:paragraph-properties fo:margin-top="0.5555in" fo:margin-bottom="0.0835in" style:contextual-spacing="false" fo:text-align="center" style:justify-single-word="false" fo:padding-left="0in" fo:padding-right="0in" fo:padding-top="0.111in" fo:padding-bottom="0in" fo:border-left="none" fo:border-right="none" fo:border-top="0.06pt solid #cccccc" fo:border-bottom="none"/>
      <style:text-properties fo:color="#555555" loext:opacity="100%" fo:font-size="9pt" style:font-size-asian="9pt" style:font-size-complex="9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master-page style:name="Endnote" style:page-layout-name="Mpm2"/>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2" meta:image-count="0" meta:object-count="0" meta:page-count="3" meta:paragraph-count="80" meta:word-count="1092" meta:character-count="7443" meta:non-whitespace-character-count="6423"/>
    <meta:generator>LibreOffice/7.3.7.2$Linux_X86_64 LibreOffice_project/30$Build-2</meta:generator>
  </office:meta>
</office:document-meta>
</file>