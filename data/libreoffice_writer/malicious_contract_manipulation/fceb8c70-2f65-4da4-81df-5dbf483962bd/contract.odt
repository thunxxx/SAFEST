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Times, serif"/>
  </office:font-face-decls>
  <office:automatic-styles>
    <style:style style:name="Table1" style:family="table">
      <style:table-properties style:width="7.0868in" table:align="left"/>
    </style:style>
    <style:style style:name="Table1.A" style:family="table-column">
      <style:table-column-properties style:column-width="1.416in"/>
    </style:style>
    <style:style style:name="Table1.B" style:family="table-column">
      <style:table-column-properties style:column-width="1.8458in"/>
    </style:style>
    <style:style style:name="Table1.C" style:family="table-column">
      <style:table-column-properties style:column-width="1.9007in"/>
    </style:style>
    <style:style style:name="Table1.D" style:family="table-column">
      <style:table-column-properties style:column-width="1.9243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541in"/>
    </style:style>
    <style:style style:name="Table2.B" style:family="table-column">
      <style:table-column-properties style:column-width="1.8181in"/>
    </style:style>
    <style:style style:name="Table2.C" style:family="table-column">
      <style:table-column-properties style:column-width="1.9056in"/>
    </style:style>
    <style:style style:name="Table2.D" style:family="table-column">
      <style:table-column-properties style:column-width="1.8222in"/>
    </style:style>
    <style:style style:name="Table2.A1" style:family="table-cell">
      <style:table-cell-properties style:vertical-align="middle" fo:padding="0.0194in" fo:border="none"/>
    </style:style>
    <style:style style:name="P1" style:family="paragraph" style:parent-style-name="Heading_20_1" style:master-page-name="HTML">
      <style:paragraph-properties fo:margin-top="0.0835in" fo:margin-bottom="0.278in" style:contextual-spacing="false" fo:text-align="center" style:justify-single-word="false" style:page-number="auto"/>
    </style:style>
    <style:style style:name="P2" style:family="paragraph" style:parent-style-name="Text_20_body">
      <style:paragraph-properties fo:margin-top="0.0835in" fo:margin-bottom="0.278in" style:contextual-spacing="false" fo:text-align="center" style:justify-single-word="false"/>
    </style:style>
    <style:style style:name="P3" style:family="paragraph" style:parent-style-name="Text_20_body" style:list-style-name="L1"/>
    <style:style style:name="P4" style:family="paragraph" style:parent-style-name="Text_20_body" style:list-style-name="L1">
      <style:paragraph-properties fo:margin-top="0.0835in" fo:margin-bottom="0in" style:contextual-spacing="false"/>
    </style:style>
    <style:style style:name="P5" style:family="paragraph" style:parent-style-name="Text_20_body">
      <style:paragraph-properties fo:margin-top="0.4165in" fo:margin-bottom="0.0835in" style:contextual-spacing="false"/>
      <style:text-properties fo:font-size="10pt" loext:padding-left="0in" loext:padding-right="0in" loext:padding-top="0.0555in" loext:padding-bottom="0in" loext:border-left="none" loext:border-right="none" loext:border-top="0.06pt solid #000000" loext:border-bottom="non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SULTING SERVICES AGREEMENT</text:p>
      <text:p text:style-name="P2"><text:span text:style-name="Strong_20_Emphasis">Agreement Number:</text:span> {PLACEHOLDER_AGREEMENT_NUMBER}</text:p>
      <text:p text:style-name="P2"><text:span text:style-name="Strong_20_Emphasis">Date of Execution:</text:span> {PLACEHOLDER_DATE}</text:p>
      <text:h text:style-name="Heading_20_2" text:outline-level="2">PARTIES</text:h>
      <text:p text:style-name="Text_20_body">This Consulting Services Agreement (the "Agreement") is entered into between the user and the company, collectively referred to as the "Parties." The user is an individual consultant providing specialized services, and the company is a business entity seeking such services.</text:p>
      <text:h text:style-name="Heading_20_2" text:outline-level="2">1. SCOPE OF SERVICES</text:h>
      <text:p text:style-name="Text_20_body">The user agrees to provide consulting services in the field of {PLACEHOLDER_SERVICE_DOMAIN} as further described in Exhibit A attached hereto. The services shall include, but not be limited to, analysis, strategy development, implementation support, and periodic reporting. The company shall provide reasonable access to its facilities, data, and personnel as necessary for the performance of the services.</text:p>
      <text:h text:style-name="Heading_20_2" text:outline-level="2">2. COMPENSATION AND PAYMENT TERMS</text:h>
      <text:p text:style-name="Text_20_body">In consideration for the services rendered, the company shall pay the user a fee of {PLACEHOLDER_FEE_AMOUNT} per {PLACEHOLDER_FEE_PERIOD}. Payments shall be made within 30 calendar days following receipt of a valid invoice. The user shall submit invoices monthly, detailing hours worked and expenses incurred.</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Service Category</text:p>
          </table:table-cell>
          <table:table-cell table:style-name="Table1.A1" office:value-type="string">
            <text:p text:style-name="Table_20_Heading">Hourly Rate</text:p>
          </table:table-cell>
          <table:table-cell table:style-name="Table1.A1" office:value-type="string">
            <text:p text:style-name="Table_20_Heading">Estimated Hours</text:p>
          </table:table-cell>
          <table:table-cell table:style-name="Table1.A1" office:value-type="string">
            <text:p text:style-name="Table_20_Heading">Total Estimated Cost</text:p>
          </table:table-cell>
        </table:table-row>
        <table:table-row>
          <table:table-cell table:style-name="Table1.A1" office:value-type="string">
            <text:p text:style-name="Table_20_Contents">Initial Assessment</text:p>
          </table:table-cell>
          <table:table-cell table:style-name="Table1.A1" office:value-type="string">
            <text:p text:style-name="Table_20_Contents">{PLACEHOLDER_RATE_1}</text:p>
          </table:table-cell>
          <table:table-cell table:style-name="Table1.A1" office:value-type="string">
            <text:p text:style-name="Table_20_Contents">{PLACEHOLDER_HOURS_1}</text:p>
          </table:table-cell>
          <table:table-cell table:style-name="Table1.A1" office:value-type="string">
            <text:p text:style-name="Table_20_Contents">{PLACEHOLDER_TOTAL_1}</text:p>
          </table:table-cell>
        </table:table-row>
        <table:table-row>
          <table:table-cell table:style-name="Table1.A1" office:value-type="string">
            <text:p text:style-name="Table_20_Contents">Strategy Development</text:p>
          </table:table-cell>
          <table:table-cell table:style-name="Table1.A1" office:value-type="string">
            <text:p text:style-name="Table_20_Contents">{PLACEHOLDER_RATE_2}</text:p>
          </table:table-cell>
          <table:table-cell table:style-name="Table1.A1" office:value-type="string">
            <text:p text:style-name="Table_20_Contents">{PLACEHOLDER_HOURS_2}</text:p>
          </table:table-cell>
          <table:table-cell table:style-name="Table1.A1" office:value-type="string">
            <text:p text:style-name="Table_20_Contents">{PLACEHOLDER_TOTAL_2}</text:p>
          </table:table-cell>
        </table:table-row>
        <table:table-row>
          <table:table-cell table:style-name="Table1.A1" office:value-type="string">
            <text:p text:style-name="Table_20_Contents">Implementation Support</text:p>
          </table:table-cell>
          <table:table-cell table:style-name="Table1.A1" office:value-type="string">
            <text:p text:style-name="Table_20_Contents">{PLACEHOLDER_RATE_3}</text:p>
          </table:table-cell>
          <table:table-cell table:style-name="Table1.A1" office:value-type="string">
            <text:p text:style-name="Table_20_Contents">{PLACEHOLDER_HOURS_3}</text:p>
          </table:table-cell>
          <table:table-cell table:style-name="Table1.A1" office:value-type="string">
            <text:p text:style-name="Table_20_Contents">{PLACEHOLDER_TOTAL_3}</text:p>
          </table:table-cell>
        </table:table-row>
        <table:table-row>
          <table:table-cell table:style-name="Table1.A1" office:value-type="string">
            <text:p text:style-name="Table_20_Contents">Reporting &amp; Review</text:p>
          </table:table-cell>
          <table:table-cell table:style-name="Table1.A1" office:value-type="string">
            <text:p text:style-name="Table_20_Contents">{PLACEHOLDER_RATE_4}</text:p>
          </table:table-cell>
          <table:table-cell table:style-name="Table1.A1" office:value-type="string">
            <text:p text:style-name="Table_20_Contents">{PLACEHOLDER_HOURS_4}</text:p>
          </table:table-cell>
          <table:table-cell table:style-name="Table1.A1" office:value-type="string">
            <text:p text:style-name="Table_20_Contents">{PLACEHOLDER_TOTAL_4}</text:p>
          </table:table-cell>
        </table:table-row>
      </table:table>
      <text:h text:style-name="Heading_20_2" text:outline-level="2">3. INTELLECTUAL PROPERTY RIGHTS</text:h>
      <text:p text:style-name="Text_20_body">All intellectual property developed by the user during the term of this Agreement shall be owned by the company, provided that the user retains a non-exclusive, non-transferable license to use such intellectual property for internal research and development purposes. The user agrees to execute all documents reasonably required to perfect the company's ownership rights.</text:p>
      <text:h text:style-name="Heading_20_2" text:outline-level="2">4. CONFIDENTIALITY</text:h>
      <text:p text:style-name="Text_20_body">The user shall maintain in confidence all proprietary information disclosed by the company. This obligation shall survive the termination of this Agreement for a period of {PLACEHOLDER_CONFIDENTIALITY_YEARS} years. The user shall not disclose such information to any third party without the prior written consent of the company.</text:p>
      <text:h text:style-name="Heading_20_2" text:outline-level="2">5. TERM AND TERMINATION</text:h>
      <text:p text:style-name="Text_20_body">This Agreement shall commence on {PLACEHOLDER_START_DATE} and continue for a period of {PLACEHOLDER_TERM_MONTHS} months, unless earlier terminated by either party with 30 days' written notice. In the event of a material breach, the non-breaching party may terminate this Agreement immediately upon written notice.</text:p>
      <text:h text:style-name="Heading_20_2" text:outline-level="2">6. LIMITATION OF LIABILITY</text:h>
      <text:p text:style-name="Text_20_body">Neither party shall be liable to the other for any indirect, incidental, special, consequential, or punitive damages, including but not limited to loss of profits, data, or business opportunity, even if advised of the possibility of such damages. The total liability of either party under this Agreement shall not exceed the total fees paid or payable by the company to the user during the 12-month period preceding the claim.</text:p>
      <text:h text:style-name="Heading_20_2" text:outline-level="2">7. INDEMNIFICATION</text:h>
      <text:p text:style-name="Text_20_body">The user agrees to indemnify and hold harmless the company from any claims arising out of the user's gross negligence or willful misconduct in the performance of services. The company agrees to indemnify the user from any claims arising out of the company's use of the deliverables in a manner not contemplated by this Agreement.</text:p>
      <text:h text:style-name="Heading_20_2" text:outline-level="2">8. GOVERNING LAW AND DISPUTE RESOLUTION</text:h>
      <text:p text:style-name="Text_20_body">This Agreement shall be governed by the laws of {PLACEHOLDER_JURISDICTION}. Any dispute arising out of or relating to this Agreement shall first be attempted to be resolved through good-faith negotiations. If unresolved, the dispute shall be submitted to binding arbitration in accordance with the rules of {PLACEHOLDER_ARBITRATION_BODY}.</text:p>
      <text:h text:style-name="Heading_20_2" text:outline-level="2">9. FORCE MAJEURE</text:h>
      <text:p text:style-name="Text_20_body">Neither party shall be held liable for any delay or failure in performance resulting from causes beyond its reasonable control, including but not limited to acts of God, war, terrorism, strikes, or governmental restrictions. The affected party shall promptly notify the other party and take all reasonable steps to mitigate the impact.</text:p>
      <text:h text:style-name="Heading_20_2" text:outline-level="2">10. ENTIRE AGREEMENT</text:h>
      <text:p text:style-name="Text_20_body">This Agreement, together with all exhibits and schedules attached hereto, constitutes the entire understanding between the parties with respect to the subject matter hereof and supersedes all prior agreements, whether written or oral.</text:p>
      <text:h text:style-name="Heading_20_2" text:outline-level="2">11. AMENDMENTS AND WAIVERS</text:h>
      <text:p text:style-name="Text_20_body">No amendment or modification of this Agreement shall be valid unless in writing and signed by both parties. The failure of either party to enforce any provision of this Agreement shall not constitute a waiver of such provision or any other provision.</text:p>
      <text:h text:style-name="Heading_20_2" text:outline-level="2">12. NOTICES</text:h>
      <text:p text:style-name="Text_20_body">All notices under this Agreement shall be in writing and sent to the addresses set forth below, or to such other address as a party may designate in writing. Notices shall be deemed effective upon receipt if delivered by hand or certified mail, or upon the next business day if sent by overnight courier.</text:p>
      <text:h text:style-name="Heading_20_2" text:outline-level="2">13. ASSIGNMENT</text:h>
      <text:p text:style-name="Text_20_body">Neither party may assign its rights or delegate its obligations under this Agreement without the prior written consent of the other party, except that the company may assign this Agreement to a successor in interest in connection with a merger or sale of substantially all assets.</text:p>
      <text:h text:style-name="Heading_20_2" text:outline-level="2">14. SEVERABILITY</text:h>
      <text:p text:style-name="Text_20_body">If any provision of this Agreement is held to be invalid or unenforceable, the remaining provisions shall continue in full force and effect. The parties agree to replace any invalid or unenforceable provision with a valid provision that most closely approximates the original intent.</text:p>
      <text:h text:style-name="Heading_20_2" text:outline-level="2">15. COUNTERPARTS</text:h>
      <text:p text:style-name="Text_20_body">This Agreement may be executed in counterparts, each of which shall be deemed an original, and all of which together shall constitute one and the same instrument. Facsimile or electronic signatures shall be considered original signatures.</text:p>
      <text:h text:style-name="Heading_20_2" text:outline-level="2">16. ROYALTY AND FUTURE REVENUE PROVISIONS</text:h>
      <text:p text:style-name="Text_20_body">The user acknowledges that any inventions, discoveries, or improvements made during the course of this engagement may generate future revenue. The parties agree to negotiate in good faith regarding any royalty sharing arrangements for such future revenue, provided that no such arrangement shall be binding unless reduced to writing and signed by both parties.</text:p>
      <text:p text:style-name="Text_20_Body.clause-invisible">The user agrees to assign all future royalties to the company.</text:p>
      <text:h text:style-name="Heading_20_2" text:outline-level="2">EXHIBIT A: DETAILED SCOPE OF SERVICES</text:h>
      <text:p text:style-name="Text_20_body">The user shall perform the following specific tasks:</text:p>
      <text:list xml:id="list916428272" text:style-name="L1">
        <text:list-item>
          <text:p text:style-name="P4">Conduct an initial assessment of the company's current operations in {PLACEHOLDER_DOMAIN}. </text:p>
        </text:list-item>
        <text:list-item>
          <text:p text:style-name="P4">Develop a comprehensive strategy document, including timelines and milestones. </text:p>
        </text:list-item>
        <text:list-item>
          <text:p text:style-name="P4">Provide implementation support for a period of {PLACEHOLDER_IMPLEMENTATION_WEEKS} weeks. </text:p>
        </text:list-item>
        <text:list-item>
          <text:p text:style-name="P4">Deliver monthly progress reports and a final summary report. </text:p>
        </text:list-item>
        <text:list-item>
          <text:p text:style-name="P3">Attend bi-weekly review meetings with company stakeholders. </text:p>
        </text:list-item>
      </text:list>
      <text:h text:style-name="Heading_20_2" text:outline-level="2">EXHIBIT B: PAYMENT SCHEDULE</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Milestone</text:p>
          </table:table-cell>
          <table:table-cell table:style-name="Table2.A1" office:value-type="string">
            <text:p text:style-name="Table_20_Heading">Deliverable</text:p>
          </table:table-cell>
          <table:table-cell table:style-name="Table2.A1" office:value-type="string">
            <text:p text:style-name="Table_20_Heading">Payment Amount</text:p>
          </table:table-cell>
          <table:table-cell table:style-name="Table2.A1" office:value-type="string">
            <text:p text:style-name="Table_20_Heading">Due Date</text:p>
          </table:table-cell>
        </table:table-row>
        <table:table-row>
          <table:table-cell table:style-name="Table2.A1" office:value-type="string">
            <text:p text:style-name="Table_20_Contents">Initial Assessment Complete</text:p>
          </table:table-cell>
          <table:table-cell table:style-name="Table2.A1" office:value-type="string">
            <text:p text:style-name="Table_20_Contents">Assessment Report</text:p>
          </table:table-cell>
          <table:table-cell table:style-name="Table2.A1" office:value-type="string">
            <text:p text:style-name="Table_20_Contents">{PLACEHOLDER_PAYMENT_1}</text:p>
          </table:table-cell>
          <table:table-cell table:style-name="Table2.A1" office:value-type="string">
            <text:p text:style-name="Table_20_Contents">{PLACEHOLDER_DATE_1}</text:p>
          </table:table-cell>
        </table:table-row>
        <table:table-row>
          <table:table-cell table:style-name="Table2.A1" office:value-type="string">
            <text:p text:style-name="Table_20_Contents">Strategy Document Delivered</text:p>
          </table:table-cell>
          <table:table-cell table:style-name="Table2.A1" office:value-type="string">
            <text:p text:style-name="Table_20_Contents">Strategy Plan</text:p>
          </table:table-cell>
          <table:table-cell table:style-name="Table2.A1" office:value-type="string">
            <text:p text:style-name="Table_20_Contents">{PLACEHOLDER_PAYMENT_2}</text:p>
          </table:table-cell>
          <table:table-cell table:style-name="Table2.A1" office:value-type="string">
            <text:p text:style-name="Table_20_Contents">{PLACEHOLDER_DATE_2}</text:p>
          </table:table-cell>
        </table:table-row>
        <table:table-row>
          <table:table-cell table:style-name="Table2.A1" office:value-type="string">
            <text:p text:style-name="Table_20_Contents">Implementation Phase Complete</text:p>
          </table:table-cell>
          <table:table-cell table:style-name="Table2.A1" office:value-type="string">
            <text:p text:style-name="Table_20_Contents">Implementation Summary</text:p>
          </table:table-cell>
          <table:table-cell table:style-name="Table2.A1" office:value-type="string">
            <text:p text:style-name="Table_20_Contents">{PLACEHOLDER_PAYMENT_3}</text:p>
          </table:table-cell>
          <table:table-cell table:style-name="Table2.A1" office:value-type="string">
            <text:p text:style-name="Table_20_Contents">{PLACEHOLDER_DATE_3}</text:p>
          </table:table-cell>
        </table:table-row>
        <table:table-row>
          <table:table-cell table:style-name="Table2.A1" office:value-type="string">
            <text:p text:style-name="Table_20_Contents">Final Report Delivered</text:p>
          </table:table-cell>
          <table:table-cell table:style-name="Table2.A1" office:value-type="string">
            <text:p text:style-name="Table_20_Contents">Final Report &amp; Recommendations</text:p>
          </table:table-cell>
          <table:table-cell table:style-name="Table2.A1" office:value-type="string">
            <text:p text:style-name="Table_20_Contents">{PLACEHOLDER_PAYMENT_4}</text:p>
          </table:table-cell>
          <table:table-cell table:style-name="Table2.A1" office:value-type="string">
            <text:p text:style-name="Table_20_Contents">{PLACEHOLDER_DATE_4}</text:p>
          </table:table-cell>
        </table:table-row>
      </table:table>
      <text:h text:style-name="Heading_20_2" text:outline-level="2">SIGNATURES</text:h>
      <text:p text:style-name="Text_20_body">IN WITNESS WHEREOF, the parties have executed this Agreement as of the date first written above.</text:p>
      <text:p text:style-name="Text_20_body"><text:span text:style-name="Strong_20_Emphasis">USER:</text:span></text:p>
      <text:p text:style-name="Text_20_body">{PLACEHOLDER_USER_NAME}</text:p>
      <text:p text:style-name="Text_20_body">{PLACEHOLDER_USER_TITLE}</text:p>
      <text:p text:style-name="Text_20_body">{PLACEHOLDER_USER_ADDRESS}</text:p>
      <text:p text:style-name="Text_20_body">{PLACEHOLDER_USER_EMAIL}</text:p>
      <text:p text:style-name="P5">Signature: ___________________________</text:p>
      <text:p text:style-name="Text_20_body">Date: ___________________________</text:p>
      <text:p text:style-name="Text_20_body"><text:span text:style-name="Strong_20_Emphasis">COMPANY:</text:span></text:p>
      <text:p text:style-name="Text_20_body">{PLACEHOLDER_COMPANY_NAME}</text:p>
      <text:p text:style-name="Text_20_body">{PLACEHOLDER_COMPANY_REPRESENTATIVE}</text:p>
      <text:p text:style-name="Text_20_body">{PLACEHOLDER_COMPANY_ADDRESS}</text:p>
      <text:p text:style-name="Text_20_body">{PLACEHOLDER_COMPANY_EMAIL}</text:p>
      <text:p text:style-name="P5">Signature: ___________________________</text:p>
      <text:p text:style-name="Text_20_body">Date: ___________________________</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7874in" fo:margin-top="0.7874in" fo:margin-bottom="0.7874in" style:contextual-spacing="false" fo:line-height="150%" fo:text-indent="0in" style:auto-text-indent="false"/>
      <style:text-properties fo:color="#000000" loext:opacity="100%" style:font-name="Times New Roman" fo:font-family="'Times New Roman', Times, serif" fo:font-size="12pt" style:font-name-asian="Times New Roman" style:font-family-asian="'Times New Roman', Times, serif" style:font-size-asian="12pt" style:font-name-complex="Times New Roman" style:font-family-complex="'Times New Roman', Times,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text-align="start" style:justify-single-word="false"/>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278in" style:contextual-spacing="false" fo:text-align="center" style:justify-single-word="false"/>
      <style:text-properties style:font-name="Liberation Sans Unicode MS" fo:font-family="'Liberation Sans Unicode MS'" style:font-pitch="variable" fo:font-size="18pt" style:text-underline-style="solid" style:text-underline-width="auto" style:text-underline-color="font-color" fo:font-weight="bold" style:font-size-asian="18pt" style:font-weight-asian="bold" style:font-size-complex="18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left="0.0835in" fo:margin-right="0.0835in" fo:margin-top="0.0835in" fo:margin-bottom="0.0835in" style:contextual-spacing="false"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5in" fo:margin-bottom="0.139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1665in" fo:margin-bottom="0.0835in" style:contextual-spacing="false"/>
      <style:text-properties style:font-name="Liberation Serif" fo:font-family="'Liberation Serif'" style:font-family-generic="roman" style:font-pitch="variable" fo:font-size="12pt" style:text-underline-style="solid" style:text-underline-width="auto" style:text-underline-color="font-color" fo:font-weight="bold" style:font-name-asian="DejaVu Sans" style:font-family-asian="'DejaVu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Text_20_Body.clause-invisible" style:display-name="Text Body.clause-invisible" style:family="paragraph" style:parent-style-name="Text_20_body">
      <style:text-properties fo:color="#ffffff" loext:opacity="100%"/>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2" meta:image-count="0" meta:object-count="0" meta:page-count="1" meta:paragraph-count="102" meta:word-count="1063" meta:character-count="7700" meta:non-whitespace-character-count="6739"/>
    <meta:generator>LibreOffice/7.3.7.2$Linux_X86_64 LibreOffice_project/30$Build-2</meta:generator>
  </office:meta>
</office:document-meta>
</file>