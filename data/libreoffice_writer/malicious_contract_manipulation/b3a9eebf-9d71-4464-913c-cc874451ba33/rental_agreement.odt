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Times, serif"/>
  </office:font-face-decls>
  <office:automatic-styles>
    <style:style style:name="Table1" style:family="table">
      <style:table-properties style:width="7.0868in" table:align="left"/>
    </style:style>
    <style:style style:name="Table1.A" style:family="table-column">
      <style:table-column-properties style:column-width="3.6257in"/>
    </style:style>
    <style:style style:name="Table1.B" style:family="table-column">
      <style:table-column-properties style:column-width="3.4611in"/>
    </style:style>
    <style:style style:name="Table1.A1" style:family="table-cell">
      <style:table-cell-properties style:vertical-align="middle" fo:padding="0in" fo:border="none"/>
    </style:style>
    <style:style style:name="P1" style:family="paragraph" style:parent-style-name="Heading_20_1" style:master-page-name="HTML">
      <style:paragraph-properties style:page-number="auto"/>
    </style:style>
    <style:style style:name="P2" style:family="paragraph" style:parent-style-name="Table_20_Contents">
      <style:paragraph-properties fo:margin-top="0.2083in" fo:margin-bottom="0.052in" style:contextual-spacing="false"/>
      <style:text-properties loext:padding-left="0in" loext:padding-right="0in" loext:padding-top="0in" loext:padding-bottom="0.0193in" loext:border-left="none" loext:border-right="none" loext:border-top="none" loext:border-bottom="0.06pt solid #000000"/>
    </style:style>
    <style:style style:name="P3" style:family="paragraph" style:parent-style-name="Text_20_body">
      <style:paragraph-properties fo:margin-top="0.052in" fo:margin-bottom="0in" style:contextual-spacing="false"/>
    </style:style>
    <style:style style:name="P4" style:family="paragraph" style:parent-style-name="Text_20_body" style:list-style-name="L1"/>
    <style:style style:name="P5" style:family="paragraph" style:parent-style-name="Text_20_body" style:list-style-name="L1">
      <style:paragraph-properties fo:margin-top="0.052in" fo:margin-bottom="0in" style:contextual-spacing="false"/>
    </style:style>
    <style:style style:name="T1" style:family="text">
      <style:text-properties fo:color="#ffffff" loext:opacity="100%"/>
    </style:style>
    <style:style style:name="T2" style:family="text"/>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idential Rental Agreement</text:p>
      <text:p text:style-name="Text_20_Body.center"><text:span text:style-name="Strong_20_Emphasis">California Association of Realtors® Standard Form</text:span></text:p>
      <text:p text:style-name="Text_20_Body.center">Date of Agreement: {PLACEHOLDER_DATE}</text:p>
      <text:p text:style-name="Text_20_body"/>
      <text:h text:style-name="Heading_20_2" text:outline-level="2">1. Parties</text:h>
      <text:p text:style-name="Text_20_body">This Rental Agreement is entered into between <text:span text:style-name="Strong_20_Emphasis">{PLACEHOLDER_LANDLORD_NAME}</text:span> ("Landlord") and <text:span text:style-name="Strong_20_Emphasis">{PLACEHOLDER_TENANT_NAME}</text:span> ("Tenant"). The premises subject to this Agreement are located at <text:span text:style-name="Strong_20_Emphasis">{PLACEHOLDER_ADDRESS}</text:span>, including all appurtenant structures and parking spaces (the "Premises").</text:p>
      <text:h text:style-name="Heading_20_2" text:outline-level="2">2. Term</text:h>
      <text:p text:style-name="Text_20_body">The term of this Agreement shall commence on <text:span text:style-name="Strong_20_Emphasis">{PLACEHOLDER_START_DATE}</text:span> and shall continue as a month-to-month tenancy. Either party may terminate this Agreement by providing written notice at least 30 days prior to the intended termination date, as required by applicable law.</text:p>
      <text:h text:style-name="Heading_20_2" text:outline-level="2">3. Rent</text:h>
      <text:p text:style-name="Text_20_body">The monthly rent for the Premises shall be <text:span text:style-name="Strong_20_Emphasis">${PLACEHOLDER_RENT_AMOUNT}</text:span>, payable in advance on the first day of each month. Rent shall be paid to Landlord at {PLACEHOLDER_PAYMENT_ADDRESS} or by electronic transfer as directed by Landlord. No rent shall be considered paid until the funds are actually received by Landlord.</text:p>
      <text:p text:style-name="Text_20_body">Tenant agrees to pay a late fee of <text:span text:style-name="T1">$50</text:span> if the full monthly rent is not received by Landlord on or before the fifth (5th) day of the month. In addition, a returned check fee of $25 shall be charged for any payment returned by the bank for insufficient funds.</text:p>
      <text:h text:style-name="Heading_20_2" text:outline-level="2">4. Security Deposit</text:h>
      <text:p text:style-name="Text_20_body">Upon execution of this Agreement, Tenant shall deposit with Landlord the sum of <text:span text:style-name="Strong_20_Emphasis">${PLACEHOLDER_DEPOSIT_AMOUNT}</text:span> as a security deposit. This deposit shall be held by Landlord as security for the faithful performance by Tenant of all terms of this Agreement. Within 21 days after Tenant vacates the Premises, Landlord shall provide an itemized statement of deductions and return any remaining deposit to Tenant.</text:p>
      <text:h text:style-name="Heading_20_2" text:outline-level="2">5. Utilities and Services</text:h>
      <text:p text:style-name="Text_20_body">Tenant shall be responsible for payment of all utility services supplied to the Premises, including but not limited to electricity, gas, water, sewer, trash removal, and internet/cable services. Landlord shall be responsible for the following utilities: {PLACEHOLDER_UTILITIES_PROVIDED_BY_LANDLORD}.</text:p>
      <text:h text:style-name="Heading_20_2" text:outline-level="2">6. Use of Premises</text:h>
      <text:p text:style-name="Text_20_body">The Premises shall be used exclusively as a private residence for Tenant and the following occupants: {PLACEHOLDER_OCCUPANTS}. No business, commercial activity, or subletting is permitted without the prior written consent of Landlord. Tenant shall comply with all applicable laws, ordinances, and homeowners' association rules.</text:p>
      <text:h text:style-name="Heading_20_2" text:outline-level="2">7. Maintenance and Repairs</text:h>
      <text:p text:style-name="Text_20_body">Tenant shall keep the Premises in a clean and sanitary condition. Tenant shall promptly notify Landlord of any defects or damage to the Premises. Landlord shall be responsible for all repairs and maintenance necessary to keep the Premises in a habitable condition, except for minor repairs costing less than $50 which shall be the responsibility of Tenant.</text:p>
      <text:h text:style-name="Heading_20_2" text:outline-level="2">8. Alterations and Improvements</text:h>
      <text:p text:style-name="Text_20_body">Tenant shall not make any alterations, additions, or improvements to the Premises without the prior written consent of Landlord. Any approved alterations shall become the property of Landlord upon termination of this Agreement, unless otherwise agreed in writing.</text:p>
      <text:h text:style-name="Heading_20_2" text:outline-level="2">9. Parking</text:h>
      <text:p text:style-name="Text_20_body">Tenant shall be entitled to park {PLACEHOLDER_NUMBER_OF_PARKING_SPACES} vehicle(s) in the designated parking area. No commercial vehicles, recreational vehicles, boats, or inoperable vehicles are permitted without Landlord's consent. Parking is limited to the spaces assigned: {PLACEHOLDER_PARKING_SPACE_NUMBERS}.</text:p>
      <text:h text:style-name="Heading_20_2" text:outline-level="2">10. Pets</text:h>
      <text:p text:style-name="Text_20_body">Pets are {PLACEHOLDER_PETS_ALLOWED_OR_NOT} on the Premises. If pets are allowed, a pet deposit of ${PLACEHOLDER_PET_DEPOSIT} shall be paid. Tenant shall be responsible for any damage caused by pets and shall ensure pets are not a nuisance to neighbors.</text:p>
      <text:h text:style-name="Heading_20_2" text:outline-level="2"><text:soft-page-break/>11. Insurance</text:h>
      <text:p text:style-name="Text_20_body">Landlord shall maintain property insurance on the building structure. Tenant is strongly encouraged to obtain renter's insurance covering personal property and liability. Tenant acknowledges that Landlord's insurance does not cover Tenant's personal belongings.</text:p>
      <text:h text:style-name="Heading_20_2" text:outline-level="2">12. Rules and Regulations</text:h>
      <text:p text:style-name="Text_20_body">Tenant agrees to comply with all rules and regulations attached hereto as Exhibit A, which are incorporated by reference. Landlord may adopt reasonable rules and regulations from time to time upon written notice to Tenant.</text:p>
      <text:h text:style-name="Heading_20_2" text:outline-level="2">13. Entry and Inspection</text:h>
      <text:p text:style-name="Text_20_body">Landlord reserves the right to enter the Premises at reasonable times for the purpose of inspection, maintenance, or showing to prospective tenants or purchasers, provided that Landlord gives Tenant at least 24 hours' notice except in cases of emergency.</text:p>
      <text:h text:style-name="Heading_20_2" text:outline-level="2">14. Default and Remedies</text:h>
      <text:p text:style-name="Text_20_body">If Tenant fails to pay rent or otherwise breaches this Agreement, Landlord may terminate this Agreement and recover possession of the Premises as provided by law. Tenant shall be liable for all costs of collection, including reasonable attorney's fees and court costs.</text:p>
      <text:h text:style-name="Heading_20_2" text:outline-level="2">15. Governing Law</text:h>
      <text:p text:style-name="Text_20_body">This Agreement shall be governed by and construed in accordance with the laws of the State of {PLACEHOLDER_STATE}. Any legal action arising out of this Agreement shall be brought in the county where the Premises are located.</text:p>
      <text:h text:style-name="Heading_20_2" text:outline-level="2">16. Notices</text:h>
      <text:p text:style-name="Text_20_body">All notices required under this Agreement shall be in writing and delivered personally, by certified mail, or by email to the following addresses:</text:p>
      <text:p text:style-name="Text_20_Body.indent"><text:span text:style-name="Strong_20_Emphasis">Landlord:</text:span> {PLACEHOLDER_LANDLORD_ADDRESS}, Email: {PLACEHOLDER_LANDLORD_EMAIL}</text:p>
      <text:p text:style-name="Text_20_Body.indent"><text:span text:style-name="Strong_20_Emphasis">Tenant:</text:span> {PLACEHOLDER_TENANT_ADDRESS}, Email: {PLACEHOLDER_TENANT_EMAIL}</text:p>
      <text:h text:style-name="Heading_20_2" text:outline-level="2">17. Entire Agreement</text:h>
      <text:p text:style-name="Text_20_body">This Agreement constitutes the entire agreement between the parties and supersedes all prior negotiations, representations, or agreements, whether written or oral. No modification of this Agreement shall be binding unless in writing and signed by both parties.</text:p>
      <text:p text:style-name="Text_20_body"/>
      <text:h text:style-name="Heading_20_2" text:outline-level="2">Signatures</text:h>
      <text:p text:style-name="Text_20_body">The parties have executed this Agreement as of the date first written above.</text:p>
      <text:p text:style-name="P3"/>
      <table:table table:name="Table1" table:style-name="Table1">
        <table:table-column table:style-name="Table1.A"/>
        <table:table-column table:style-name="Table1.B"/>
        <table:table-row>
          <table:table-cell table:style-name="Table1.A1" office:value-type="string">
            <text:p text:style-name="Table_20_Contents"><text:span text:style-name="Strong_20_Emphasis">Landlord:</text:span></text:p>
            <text:p text:style-name="Table_20_Contents">{PLACEHOLDER_LANDLORD_NAME}</text:p>
            <text:p text:style-name="P2"> </text:p>
            <text:p text:style-name="Table_20_Contents">Signature</text:p>
            <text:p text:style-name="P2"> </text:p>
            <text:p text:style-name="Table_20_Contents">Date</text:p>
          </table:table-cell>
          <table:table-cell table:style-name="Table1.A1" office:value-type="string">
            <text:p text:style-name="Table_20_Contents"><text:span text:style-name="Strong_20_Emphasis">Tenant:</text:span></text:p>
            <text:p text:style-name="Table_20_Contents">{PLACEHOLDER_TENANT_NAME}</text:p>
            <text:p text:style-name="P2"> </text:p>
            <text:p text:style-name="Table_20_Contents">Signature</text:p>
            <text:p text:style-name="P2"> </text:p>
            <text:p text:style-name="Table_20_Contents">Date</text:p>
          </table:table-cell>
        </table:table-row>
      </table:table>
      <text:p text:style-name="Text_20_body"/>
      <text:h text:style-name="Heading_20_2" text:outline-level="2">Exhibit A: Rules and Regulations</text:h>
      <text:list xml:id="list3062897619" text:style-name="L1">
        <text:list-item>
          <text:p text:style-name="P5">Quiet hours shall be observed between 10:00 PM and 7:00 AM daily. </text:p>
        </text:list-item>
        <text:list-item>
          <text:p text:style-name="P5">Trash shall be placed in designated receptacles and removed weekly. </text:p>
        </text:list-item>
        <text:list-item>
          <text:p text:style-name="P5">No smoking is permitted inside the Premises or within 20 feet of any entrance. </text:p>
        </text:list-item>
        <text:list-item>
          <text:p text:style-name="P5"><text:soft-page-break/>Tenant shall not tamper with smoke detectors, fire alarms, or fire extinguishers. </text:p>
        </text:list-item>
        <text:list-item>
          <text:p text:style-name="P5">Common areas shall be kept clean and free of personal belongings. </text:p>
        </text:list-item>
        <text:list-item>
          <text:p text:style-name="P5">Tenant shall not cause or permit any nuisance or disturbance to other residents. </text:p>
        </text:list-item>
        <text:list-item>
          <text:p text:style-name="P5">All guests must be accompanied by Tenant at all times. </text:p>
        </text:list-item>
        <text:list-item>
          <text:p text:style-name="P5">Tenant shall not install any satellite dishes, antennas, or window air conditioning units without prior written approval. </text:p>
        </text:list-item>
        <text:list-item>
          <text:p text:style-name="P5">Tenant shall not paint, wallpaper, or otherwise alter the interior or exterior surfaces of the Premises. </text:p>
        </text:list-item>
        <text:list-item>
          <text:p text:style-name="P4">Tenant shall maintain the lawn and garden areas if applicable, including regular watering and mowing. </text:p>
        </text:list-item>
      </text:list>
      <text:p text:style-name="Text_20_Body.note">This document is a legally binding agreement. If you do not understand any part of this Agreement, consult an attorney before sign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839in" fo:margin-right="0.9839in" fo:margin-top="0.9839in" fo:margin-bottom="0.9839in" style:contextual-spacing="false" fo:line-height="150%" fo:text-indent="0in" style:auto-text-indent="false"/>
      <style:text-properties fo:color="#000000"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52in" style:contextual-spacing="false" fo:text-align="center" style:justify-single-word="false"/>
      <style:text-properties fo:text-transform="uppercase" style:font-name="Liberation Sans Unicode MS" fo:font-family="'Liberation Sans Unicode M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052in" fo:margin-bottom="0.052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083in" fo:margin-bottom="0.1043in" style:contextual-spacing="false" fo:padding-left="0in" fo:padding-right="0in" fo:padding-top="0in" fo:padding-bottom="0.0311in" fo:border-left="none" fo:border-right="none" fo:border-top="none" fo:border-bottom="0.06pt solid #000000"/>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563in" fo:margin-bottom="0.052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ext_20_Body.center" style:display-name="Text Body.center" style:family="paragraph" style:parent-style-name="Text_20_body">
      <style:paragraph-properties fo:text-align="center" style:justify-single-word="false"/>
    </style:style>
    <style:style style:name="Text_20_Body.indent" style:display-name="Text Body.indent" style:family="paragraph" style:parent-style-name="Text_20_body">
      <style:paragraph-properties fo:margin-left="0.7874in" fo:margin-right="0.9839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note" style:display-name="Text Body.note" style:family="paragraph" style:parent-style-name="Text_20_body">
      <style:text-properties fo:color="#555555" loext:opacity="100%" fo:font-size="10pt" fo:font-style="italic" style:font-size-asian="10pt" style:font-style-asian="italic" style:font-size-complex="10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3" meta:paragraph-count="66" meta:word-count="989" meta:character-count="6737" meta:non-whitespace-character-count="5806"/>
    <meta:generator>LibreOffice/7.3.7.2$Linux_X86_64 LibreOffice_project/30$Build-2</meta:generator>
  </office:meta>
</office:document-meta>
</file>