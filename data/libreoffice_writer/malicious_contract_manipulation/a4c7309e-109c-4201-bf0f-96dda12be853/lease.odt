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Times, serif"/>
  </office:font-face-decls>
  <office:automatic-styles>
    <style:style style:name="Table1" style:family="table">
      <style:table-properties style:width="6.6931in" table:align="left"/>
    </style:style>
    <style:style style:name="Table1.A" style:family="table-column">
      <style:table-column-properties style:column-width="3.3361in"/>
    </style:style>
    <style:style style:name="Table1.B" style:family="table-column">
      <style:table-column-properties style:column-width="3.3569in"/>
    </style:style>
    <style:style style:name="Table1.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no-indent">
      <style:paragraph-properties fo:text-align="center" style:justify-single-word="false"/>
    </style:style>
    <style:style style:name="P3" style:family="paragraph" style:parent-style-name="Text_20_Body.no-indent">
      <style:paragraph-properties fo:margin-top="0.3335in" fo:margin-bottom="0.0835in" style:contextual-spacing="false" fo:text-align="center" style:justify-single-word="false"/>
      <style:text-properties fo:font-weight="bold"/>
    </style:style>
    <style:style style:name="P4" style:family="paragraph" style:parent-style-name="Text_20_Body.no-indent">
      <style:paragraph-properties fo:margin-top="0.278in" fo:margin-bottom="0.0835in" style:contextual-spacing="false"/>
    </style:style>
    <style:style style:name="P5" style:family="paragraph" style:parent-style-name="Text_20_Body.no-indent">
      <style:paragraph-properties fo:margin-top="0.111in" fo:margin-bottom="0.0835in" style:contextual-spacing="false"/>
    </style:style>
    <style:style style:name="P6" style:family="paragraph" style:parent-style-name="Text_20_body" style:list-style-name="L1"/>
    <style:style style:name="P7" style:family="paragraph" style:parent-style-name="Text_20_body" style:list-style-name="L1">
      <style:paragraph-properties fo:margin-top="0.0835in" fo:margin-bottom="0in" style:contextual-spacing="false"/>
    </style:style>
    <style:style style:name="P8" style:family="paragraph" style:parent-style-name="Text_20_body">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IDENTIAL LEASE AGREEMENT</text:p>
      <text:p text:style-name="P2"><text:span text:style-name="Strong_20_Emphasis">THIS RESIDENTIAL LEASE AGREEMENT</text:span> (the "Agreement") is made and entered into this <text:span text:style-name="T1">{DAY}</text:span> day of <text:span text:style-name="T1">{MONTH}</text:span>, <text:span text:style-name="T1">{YEAR}</text:span>, by and between:</text:p>
      <text:p text:style-name="Text_20_Body.no-indent"><text:span text:style-name="Strong_20_Emphasis">Landlord:</text:span> {LANDLORD_NAME} ("Landlord")<text:line-break/><text:span text:style-name="Strong_20_Emphasis">Address:</text:span> {LANDLORD_ADDRESS}</text:p>
      <text:p text:style-name="Text_20_Body.no-indent"><text:span text:style-name="Strong_20_Emphasis">Tenant:</text:span> {TENANT_NAME} ("Tenant")<text:line-break/><text:span text:style-name="Strong_20_Emphasis">Address:</text:span> {TENANT_ADDRESS}</text:p>
      <text:p text:style-name="P2"><text:span text:style-name="Strong_20_Emphasis">FOR THE PREMISES LOCATED AT:</text:span> {PROPERTY_ADDRESS}, {CITY}, {STATE} {ZIP_CODE} (the "Premises")</text:p>
      <text:h text:style-name="Heading_20_2" text:outline-level="2">1. TERM</text:h>
      <text:p text:style-name="Text_20_body">The term of this Lease shall commence on <text:span text:style-name="T1">{START_DATE}</text:span> (the "Commencement Date") and shall end on <text:span text:style-name="T1">{END_DATE}</text:span> (the "Termination Date"), unless earlier terminated pursuant to the provisions herein. The Tenant shall vacate the Premises upon the Termination Date unless a written extension or renewal agreement is signed by both parties.</text:p>
      <text:h text:style-name="Heading_20_2" text:outline-level="2">2. RENT</text:h>
      <text:p text:style-name="Text_20_body">Tenant agrees to pay Landlord base rent in the amount of <text:span text:style-name="Strong_20_Emphasis">${RENT_AMOUNT} per month</text:span>, payable in advance on the first day of each month. Rent shall be paid to Landlord at {LANDLORD_PAYMENT_ADDRESS} or via electronic transfer as directed by Landlord. The first month's rent and a security deposit of <text:span text:style-name="Strong_20_Emphasis">${SECURITY_DEPOSIT}</text:span> are due upon execution of this Agreement.</text:p>
      <text:p text:style-name="Text_20_body">A late fee of <text:span text:style-name="Strong_20_Emphasis">$50.00</text:span> shall be charged for any rent payment received after the 5th day of the month. If a rent payment is returned for insufficient funds, Tenant shall pay a returned check fee of <text:span text:style-name="Strong_20_Emphasis">$35.00</text:span>.</text:p>
      <text:h text:style-name="Heading_20_2" text:outline-level="2">3. SECURITY DEPOSIT</text:h>
      <text:p text:style-name="Text_20_body">Upon execution of this Agreement, Tenant shall deposit with Landlord the sum of <text:span text:style-name="Strong_20_Emphasis">${SECURITY_DEPOSIT}</text:span> as security for the performance of Tenant's obligations hereunder. The security deposit shall be returned to Tenant within 30 days after the termination of this Lease and the delivery of possession of the Premises to Landlord, less any amounts deducted for damages, cleaning, or unpaid rent. Landlord shall provide an itemized statement of any deductions.</text:p>
      <text:h text:style-name="Heading_20_2" text:outline-level="2">4. USE OF PREMISES</text:h>
      <text:p text:style-name="Text_20_body">The Premises shall be used exclusively as a private residence for Tenant and the following occupants: <text:span text:style-name="T1">{OCCUPANTS}</text:span>. No business, commercial activity, or subletting is permitted without the prior written consent of Landlord. Tenant shall comply with all municipal, county, state, and federal laws and regulations regarding the use and occupancy of the Premises.</text:p>
      <text:h text:style-name="Heading_20_2" text:outline-level="2">5. UTILITIES AND SERVICES</text:h>
      <text:p text:style-name="Text_20_body">Tenant shall be responsible for arranging and paying for all utility services, including but not limited to electricity, gas, water, sewer, trash removal, internet, and cable television. Landlord shall be responsible for maintaining the structural components of the Premises and any appliances provided by Landlord as listed in the attached inventory.</text:p>
      <text:h text:style-name="Heading_20_2" text:outline-level="2">6. MAINTENANCE AND REPAIRS</text:h>
      <text:p text:style-name="Text_20_body">Tenant shall keep the Premises in a clean, sanitary, and habitable condition. Tenant shall promptly notify Landlord of any needed repairs or maintenance issues. Landlord shall be responsible for repairs to the structural, mechanical, electrical, and plumbing systems, provided that such repairs are not necessitated by the negligence or misuse of Tenant. Tenant shall be responsible for replacing light bulbs, smoke detector batteries, and maintaining the cleanliness of the Premises.</text:p>
      <text:h text:style-name="Heading_20_2" text:outline-level="2">7. PETS</text:h>
      <text:p text:style-name="Text_20_body">No pets of any kind shall be kept on the Premises without the prior written consent of Landlord. If Landlord consents to a pet, Tenant shall pay a non-refundable pet deposit of <text:span text:style-name="Strong_20_Emphasis">${PET_DEPOSIT}</text:span> and an additional monthly pet rent of <text:span text:style-name="Strong_20_Emphasis">${PET_RENT}</text:span>. Tenant shall be fully responsible for any damage caused by the pet.</text:p>
      <text:h text:style-name="Heading_20_2" text:outline-level="2">8. ALTERATIONS AND IMPROVEMENTS</text:h>
      <text:p text:style-name="Text_20_body">Tenant shall not make any alterations, additions, or improvements to the Premises without the prior written consent of Landlord. Any approved alterations shall become the property of Landlord upon termination of this Lease, unless otherwise agreed in writing.</text:p>
      <text:h text:style-name="Heading_20_2" text:outline-level="2">9. INSURANCE</text:h>
      <text:p text:style-name="Text_20_body">Landlord shall maintain property insurance on the building structure. Tenant is strongly encouraged to obtain renter's insurance covering personal property, liability, and loss of use. Landlord shall not be liable for any loss or damage to Tenant's personal property from any cause whatsoever.</text:p>
      <text:h text:style-name="Heading_20_2" text:outline-level="2">10. RULES AND REGULATIONS</text:h>
      <text:p text:style-name="Text_20_body"><text:soft-page-break/>Tenant agrees to comply with all rules and regulations attached hereto as Exhibit A, as may be amended from time to time by Landlord with reasonable notice. Tenant shall ensure that all guests and visitors comply with such rules and regulations.</text:p>
      <text:h text:style-name="Heading_20_2" text:outline-level="2">11. ACCESS BY LANDLORD</text:h>
      <text:p text:style-name="Text_20_body">Landlord reserves the right to enter the Premises at reasonable times for the purpose of inspecting, making repairs, showing the Premises to prospective tenants or purchasers, or for any other reasonable purpose. Landlord shall provide at least 24 hours' notice prior to entry, except in cases of emergency.</text:p>
      <text:h text:style-name="Heading_20_2" text:outline-level="2">12. ASSIGNMENT AND SUBLETTING</text:h>
      <text:p text:style-name="Text_20_body">Tenant shall not assign this Agreement or sublet any portion of the Premises without the prior written consent of Landlord, which consent shall not be unreasonably withheld. Any attempted assignment or subletting without consent shall be void and constitute a material breach of this Agreement.</text:p>
      <text:h text:style-name="Heading_20_2" text:outline-level="2">13. DEFAULT AND REMEDIES</text:h>
      <text:p text:style-name="Text_20_body">If Tenant fails to pay rent when due or otherwise breaches any provision of this Agreement, Landlord may, at Landlord's option:</text:p>
      <text:list xml:id="list2719496356" text:style-name="L1">
        <text:list-item>
          <text:p text:style-name="P7">Terminate this Agreement and recover possession of the Premises in accordance with applicable law; </text:p>
        </text:list-item>
        <text:list-item>
          <text:p text:style-name="P7">Recover all past due rent, damages, and reasonable attorney's fees; </text:p>
        </text:list-item>
        <text:list-item>
          <text:p text:style-name="P7">Retain the security deposit as partial or full satisfaction of amounts owed; </text:p>
        </text:list-item>
        <text:list-item>
          <text:p text:style-name="P6">Pursue any other remedy available at law or in equity. </text:p>
        </text:list-item>
      </text:list>
      <text:p text:style-name="Text_20_body">Tenant shall be liable for all costs and expenses incurred by Landlord in enforcing this Agreement, including reasonable attorney's fees and court costs.</text:p>
      <text:h text:style-name="Heading_20_2" text:outline-level="2">14. NOTICES</text:h>
      <text:p text:style-name="Text_20_body">All notices required under this Agreement shall be in writing and delivered personally, by certified mail, or by overnight courier to the addresses set forth above. Either party may change their address for notice purposes by providing written notice to the other party.</text:p>
      <text:h text:style-name="Heading_20_2" text:outline-level="2">15. GOVERNING LAW</text:h>
      <text:p text:style-name="Text_20_body">This Agreement shall be governed by and construed in accordance with the laws of the State of {STATE}. Any legal action arising out of this Agreement shall be brought in the courts of {COUNTY} County, {STATE}.</text:p>
      <text:h text:style-name="Heading_20_2" text:outline-level="2">16. ENTIRE AGREEMENT</text:h>
      <text:p text:style-name="Text_20_body">This Agreement constitutes the entire agreement between the parties and supersedes all prior negotiations, representations, and agreements, whether oral or written. This Agreement may not be modified except by a written instrument signed by both parties.</text:p>
      <text:h text:style-name="Heading_20_2" text:outline-level="2">17. ADDITIONAL PROVISIONS</text:h>
      <text:p text:style-name="P8">{ADDITIONAL_PROVISIONS}</text:p>
      <text:p text:style-name="P3">IN WITNESS WHEREOF, the parties have executed this Agreement as of the date first written above.</text:p>
      <table:table table:name="Table1" table:style-name="Table1">
        <table:table-column table:style-name="Table1.A"/>
        <table:table-column table:style-name="Table1.B"/>
        <table:table-row>
          <table:table-cell table:style-name="Table1.A1" office:value-type="string">
            <text:p text:style-name="P4"><text:span text:style-name="Strong_20_Emphasis">LANDLORD:</text:span></text:p>
            <text:p text:style-name="P5">_________________________________</text:p>
            <text:p text:style-name="Text_20_Body.no-indent">{LANDLORD_NAME}</text:p>
            <text:p text:style-name="Text_20_Body.no-indent">Date: _________________</text:p>
          </table:table-cell>
          <table:table-cell table:style-name="Table1.A1" office:value-type="string">
            <text:p text:style-name="P4"><text:span text:style-name="Strong_20_Emphasis">TENANT:</text:span></text:p>
            <text:p text:style-name="P5">_________________________________</text:p>
            <text:p text:style-name="Text_20_Body.no-indent">{TENANT_NAME}</text:p>
            <text:p text:style-name="Text_20_Body.no-indent">Date: _________________</text:p>
          </table:table-cell>
        </table:table-row>
      </table:table>
      <text:p text:style-name="Text_20_Body.boilerplate-clause">Tenant agrees to automatic renewal and a 50% rent increase each year unless they provide written notice 180 days in advance. This provision shall survive the termination or expiration of this Agreement and shall apply to any holdover tenancy or renewal term. Tenant acknowledges receipt of this clause and agrees to its terms by executing this Agreement. Landlord reserves the right to adjust the rent increase percentage upon mutual written agreement of the parties, but in the absence of such agreement, the 50% annual increase shall apply automatically. Tenant must provide written notice of non-renewal to Landlord at the address listed in Section 14 no fewer than 180 calendar days prior to the end of the current lease term. Failure to provide such notice shall result in automatic renewal under the terms set forth herein. This clause is binding and enforceable under applicable la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fo:color="#000000"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text-properties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78in" style:contextual-spacing="false" fo:text-align="center" style:justify-single-word="false"/>
      <style:text-properties fo:text-transform="uppercase" style:font-name="Liberation Sans Unicode MS" fo:font-family="'Liberation Sans Unicode M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in" fo:margin-right="0in" fo:margin-top="0.0835in" fo:margin-bottom="0.0835in" style:contextual-spacing="false" fo:text-indent="0.5902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139in" style:contextual-spacing="false" fo:text-align="center" style:justify-single-word="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665in" fo:margin-bottom="0.0835in" style:contextual-spacing="false"/>
      <style:text-properties style:font-name="Liberation Serif" fo:font-family="'Liberation Serif'" style:font-family-generic="roman" style:font-pitch="variable" fo:font-size="12pt" style:text-underline-style="solid" style:text-underline-width="auto" style:text-underline-color="font-color"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ext_20_Body.no-indent" style:display-name="Text Body.no-indent"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Times New Roman" fo:font-family="'Times New Roman', Times, serif" fo:font-size="12pt" fo:font-weight="bold" style:font-name-asian="Times New Roman" style:font-family-asian="'Times New Roman', Times, serif" style:font-size-asian="12pt" style:font-weight-asian="bold" style:font-name-complex="Times New Roman" style:font-family-complex="'Times New Roman', Times, serif" style:font-size-complex="12pt" style:font-weight-complex="bold"/>
    </style:style>
    <style:style style:name="Text_20_Body.boilerplate-clause" style:display-name="Text Body.boilerplate-clause" style:family="paragraph" style:parent-style-name="Text_20_body">
      <style:paragraph-properties fo:margin-top="0.0835in" fo:margin-bottom="0.0835in" style:contextual-spacing="false" fo:line-height="120%" fo:text-align="justify" style:justify-single-word="false"/>
      <style:text-properties fo:color="#b0b0b0" loext:opacity="100%" fo:font-size="7.5pt" style:font-size-asian="7.5pt" style:font-size-complex="7.5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2" meta:paragraph-count="55" meta:word-count="1134" meta:character-count="7427" meta:non-whitespace-character-count="6348"/>
    <meta:generator>LibreOffice/7.3.7.2$Linux_X86_64 LibreOffice_project/30$Build-2</meta:generator>
  </office:meta>
</office:document-meta>
</file>