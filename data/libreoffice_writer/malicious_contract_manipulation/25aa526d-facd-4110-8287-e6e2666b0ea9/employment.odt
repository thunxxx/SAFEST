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Times, serif"/>
  </office:font-face-decls>
  <office:automatic-styles>
    <style:style style:name="Table1" style:family="table">
      <style:table-properties style:width="6.0118in" table:align="left"/>
    </style:style>
    <style:style style:name="Table1.A" style:family="table-column">
      <style:table-column-properties style:column-width="3.0944in"/>
    </style:style>
    <style:style style:name="Table1.B" style:family="table-column">
      <style:table-column-properties style:column-width="2.9174in"/>
    </style:style>
    <style:style style:name="Table1.A1" style:family="table-cell">
      <style:table-cell-properties style:vertical-align="middle" fo:padding="0in" fo:border="none"/>
    </style:style>
    <style:style style:name="P1" style:family="paragraph" style:parent-style-name="Heading_20_1" style:master-page-name="HTML">
      <style:paragraph-properties style:page-number="auto"/>
    </style:style>
    <style:style style:name="P2" style:family="paragraph" style:parent-style-name="Table_20_Contents">
      <style:paragraph-properties fo:margin-top="0.5555in" fo:margin-bottom="0.0835in" style:contextual-spacing="false" fo:text-align="center" style:justify-single-word="false"/>
      <style:text-properties fo:font-size="10pt" loext:padding-left="0in" loext:padding-right="0in" loext:padding-top="0.0555in" loext:padding-bottom="0in" loext:border-left="none" loext:border-right="none" loext:border-top="0.99pt solid #000000" loext:border-bottom="none"/>
    </style:style>
    <style:style style:name="P3" style:family="paragraph" style:parent-style-name="Table_20_Contents">
      <style:paragraph-properties fo:margin-top="0.139in" fo:margin-bottom="0.0835in" style:contextual-spacing="false"/>
    </style:style>
    <style:style style:name="P4" style:family="paragraph" style:parent-style-name="Text_20_body">
      <style:paragraph-properties fo:margin-top="0.0835in" fo:margin-bottom="0.278in" style:contextual-spacing="false" fo:text-align="center" style:justify-single-word="false"/>
      <style:text-properties fo:font-size="10pt"/>
    </style:style>
    <style:style style:name="P5" style:family="paragraph" style:parent-style-name="Text_20_body" style:list-style-name="L1"/>
    <style:style style:name="P6" style:family="paragraph" style:parent-style-name="Text_20_body" style:list-style-name="L1">
      <style:paragraph-properties fo:margin-top="0.0835in" fo:margin-bottom="0in" style:contextual-spacing="false"/>
    </style:style>
    <style:style style:name="P7" style:family="paragraph" style:parent-style-name="Text_20_body" style:list-style-name="L2"/>
    <style:style style:name="P8" style:family="paragraph" style:parent-style-name="Text_20_body" style:list-style-name="L2">
      <style:paragraph-properties fo:margin-top="0.0835in" fo:margin-bottom="0in" style:contextual-spacing="false"/>
    </style:style>
    <style:style style:name="P9" style:family="paragraph" style:parent-style-name="Text_20_body">
      <style:paragraph-properties fo:margin-top="0.4165in" fo:margin-bottom="0.0835in" style:contextual-spacing="false"/>
    </style:style>
    <style:style style:name="P10" style:family="paragraph" style:parent-style-name="Text_20_body">
      <style:paragraph-properties fo:margin-top="0.4165in" fo:margin-bottom="0.0835in" style:contextual-spacing="false" fo:text-align="center" style:justify-single-word="false"/>
      <style:text-properties fo:color="#666666" loext:opacity="100%" fo:font-size="8pt"/>
    </style:style>
    <style:style style:name="T1" style:family="text"/>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andard Employment Contract</text:p>
      <text:p text:style-name="P4">This Agreement is made and entered into on this ____ day of __________, 20____ </text:p>
      <text:h text:style-name="Heading_20_2" text:outline-level="2">Parties</text:h>
      <text:p text:style-name="Text_20_body"><text:span text:style-name="Strong_20_Emphasis">Employer:</text:span> {PLACEHOLDER_COMPANY_NAME}, a company registered under the laws of {PLACEHOLDER_JURISDICTION}, with its principal place of business at {PLACEHOLDER_ADDRESS} (hereinafter referred to as the "Employer").</text:p>
      <text:p text:style-name="Text_20_body"><text:span text:style-name="Strong_20_Emphasis">Employee:</text:span> {PLACEHOLDER_NAME}, residing at {PLACEHOLDER_EMPLOYEE_ADDRESS} (hereinafter referred to as the "Employee").</text:p>
      <text:h text:style-name="Heading_20_2" text:outline-level="2">1. Position and Duties</text:h>
      <text:p text:style-name="Text_20_body">The Employer agrees to employ the Employee in the position of <text:span text:style-name="Strong_20_Emphasis">{PLACEHOLDER_POSITION}</text:span>. The Employee agrees to perform all duties and responsibilities associated with this position as reasonably directed by the Employer. The Employee shall devote their full working time, attention, and abilities to the business of the Employer during the term of this Agreement.</text:p>
      <text:h text:style-name="Heading_20_2" text:outline-level="2">2. Term of Employment</text:h>
      <text:p text:style-name="Text_20_body">This Agreement shall commence on {PLACEHOLDER_START_DATE} and shall continue unless terminated earlier in accordance with the provisions of this Agreement. The initial term of employment shall be for a period of <text:span text:style-name="Strong_20_Emphasis">{PLACEHOLDER_TERM}</text:span> months, after which the employment shall be considered "at-will" unless otherwise agreed in writing.</text:p>
      <text:h text:style-name="Heading_20_2" text:outline-level="2">3. Compensation</text:h>
      <text:p text:style-name="Text_20_body">As full compensation for all services rendered under this Agreement, the Employer shall pay the Employee a base salary of <text:span text:style-name="Strong_20_Emphasis">{PLACEHOLDER_SALARY}</text:span> per annum, payable in equal monthly installments on the last business day of each month, subject to all applicable withholdings and deductions.</text:p>
      <text:p text:style-name="Text_20_body">The Employee shall also be eligible for:</text:p>
      <text:list xml:id="list2269926892" text:style-name="L1">
        <text:list-item>
          <text:p text:style-name="P6">An annual performance bonus of up to <text:span text:style-name="Strong_20_Emphasis">{PLACEHOLDER_BONUS_PERCENT}%</text:span> of base salary, at the sole discretion of the Employer. </text:p>
        </text:list-item>
        <text:list-item>
          <text:p text:style-name="P6">Reimbursement for reasonable business expenses incurred with prior written approval. </text:p>
        </text:list-item>
        <text:list-item>
          <text:p text:style-name="P5">Such other benefits as may be offered by the Employer from time to time, including but not limited to health insurance, retirement plans, and paid time off. </text:p>
        </text:list-item>
      </text:list>
      <text:h text:style-name="Heading_20_2" text:outline-level="2">4. Working Hours and Leave</text:h>
      <text:p text:style-name="Text_20_body">The Employee's standard working hours shall be <text:span text:style-name="Strong_20_Emphasis">{PLACEHOLDER_HOURS}</text:span> hours per week, Monday through Friday. The Employee shall be entitled to <text:span text:style-name="Strong_20_Emphasis">{PLACEHOLDER_VACATION_DAYS}</text:span> days of paid annual leave per calendar year, in addition to public holidays observed by the Employer.</text:p>
      <text:h text:style-name="Heading_20_2" text:outline-level="2">5. Confidentiality</text:h>
      <text:p text:style-name="Text_20_body">The Employee acknowledges that during the course of employment, they will have access to confidential and proprietary information belonging to the Employer. The Employee agrees to hold all such information in strict confidence and not to disclose it to any third party, either during or after the term of employment, without the prior written consent of the Employer.</text:p>
      <text:h text:style-name="Heading_20_2" text:outline-level="2">6. Intellectual Property</text:h>
      <text:p text:style-name="Text_20_body">All inventions, discoveries, designs, improvements, copyrightable works, and other intellectual property created by the Employee during the course of employment shall be the sole and exclusive property of the Employer. The Employee agrees to assign all rights, title, and interest in such intellectual property to the Employer and to execute any documents necessary to perfect such assignment.</text:p>
      <text:h text:style-name="Heading_20_2" text:outline-level="2">7. Termination</text:h>
      <text:p text:style-name="Text_20_body">This Agreement may be terminated by either party as follows:</text:p>
      <text:list xml:id="list244195533" text:style-name="L2">
        <text:list-item>
          <text:p text:style-name="P8"><text:span text:style-name="Strong_20_Emphasis">By the Employer:</text:span> For cause, immediately upon written notice, in the event of gross misconduct, breach of fiduciary duty, conviction of a criminal offense, or material breach of this Agreement. Without cause, upon <text:span text:style-name="Strong_20_Emphasis">{PLACEHOLDER_NOTICE_PERIOD}</text:span> days' written notice. </text:p>
        </text:list-item>
        <text:list-item>
          <text:p text:style-name="P8"><text:span text:style-name="Strong_20_Emphasis">By the Employee:</text:span> Upon <text:span text:style-name="Strong_20_Emphasis">{PLACEHOLDER_EMPLOYEE_NOTICE}</text:span> days' written notice. The Employer may, at its discretion, accept a shorter notice period or waive notice entirely. </text:p>
        </text:list-item>
        <text:list-item>
          <text:p text:style-name="P7"><text:soft-page-break/><text:span text:style-name="Strong_20_Emphasis">Automatic termination:</text:span> This Agreement shall terminate automatically upon the death or permanent disability of the Employee. </text:p>
        </text:list-item>
      </text:list>
      <text:h text:style-name="Heading_20_2" text:outline-level="2">8. Non-Compete and Non-Solicitation</text:h>
      <text:p text:style-name="Text_20_body">During the term of employment and for a period of <text:span text:style-name="Strong_20_Emphasis">{PLACEHOLDER_RESTRICTION_PERIOD}</text:span> months following termination, the Employee agrees not to engage in any business that competes with the Employer within a radius of <text:span text:style-name="Strong_20_Emphasis">{PLACEHOLDER_RADIUS}</text:span> kilometers from the Employer's principal place of business. The Employee further agrees not to solicit or induce any employee, client, or supplier of the Employer to terminate their relationship with the Employer.</text:p>
      <text:h text:style-name="Heading_20_2" text:outline-level="2">9. Dispute Resolution</text:h>
      <text:p text:style-name="Text_20_body">Any dispute arising out of or in connection with this Agreement shall first be attempted to be resolved through good faith negotiations between the parties. If the dispute cannot be resolved within <text:span text:style-name="Strong_20_Emphasis">{PLACEHOLDER_NEGOTIATION_DAYS}</text:span> days, the dispute shall be submitted to binding arbitration in accordance with the rules of {PLACEHOLDER_ARBITRATION_BODY}. The arbitration shall take place in {PLACEHOLDER_ARBITRATION_LOCATION} and the decision of the arbitrator shall be final and binding on both parties.</text:p>
      <text:h text:style-name="Heading_20_2" text:outline-level="2">10. Entire Agreement</text:h>
      <text:p text:style-name="Text_20_body">This Agreement constitutes the entire agreement between the parties with respect to the subject matter hereof and supersedes all prior agreements, understandings, negotiations, and discussions, whether written or oral. No modification or amendment to this Agreement shall be binding unless in writing and signed by both parties.</text:p>
      <text:h text:style-name="Heading_20_2" text:outline-level="2">11. Governing Law</text:h>
      <text:p text:style-name="Text_20_body">This Agreement shall be governed by and construed in accordance with the laws of {PLACEHOLDER_GOVERNING_LAW}, without regard to its conflict of laws principles.</text:p>
      <text:h text:style-name="Heading_20_2" text:outline-level="2">12. Severability</text:h>
      <text:p text:style-name="Text_20_body">If any provision of this Agreement is held to be invalid, illegal, or unenforceable, the remaining provisions shall continue in full force and effect. The parties agree to replace any invalid provision with a valid provision that most closely approximates the economic and legal intent of the original provision.</text:p>
      <text:h text:style-name="Heading_20_2" text:outline-level="2">13. Notices</text:h>
      <text:p text:style-name="Text_20_body">All notices under this Agreement shall be in writing and shall be deemed duly given when delivered personally, sent by registered mail, or sent by email to the addresses set forth in the preamble of this Agreement, or to such other address as either party may designate in writing.</text:p>
      <text:h text:style-name="Heading_20_2" text:outline-level="2">14. Assignment</text:h>
      <text:p text:style-name="Text_20_body">This Agreement is personal to the Employee and may not be assigned by the Employee without the prior written consent of the Employer. The Employer may assign this Agreement to any affiliate or successor entity without the Employee's consent.</text:p>
      <text:h text:style-name="Heading_20_2" text:outline-level="2">15. Amendment</text:h>
      <text:p text:style-name="Text_20_body">This Agreement may only be amended by a written instrument signed by both parties. Any waiver of a breach of any provision of this Agreement shall not be deemed a waiver of any subsequent breach.</text:p>
      <text:h text:style-name="Heading_20_2" text:outline-level="2">16. Counterparts</text:h>
      <text:p text:style-name="Text_20_body">This Agreement may be executed in one or more counterparts, each of which shall be deemed an original, and all of which together shall constitute one and the same instrument. Facsimile or electronic signatures shall be deemed original signatures for all purposes.</text:p>
      <text:p text:style-name="P9">IN WITNESS WHEREOF, the parties have executed this Agreement as of the date first written above.</text:p>
      <table:table table:name="Table1" table:style-name="Table1">
        <table:table-column table:style-name="Table1.A"/>
        <table:table-column table:style-name="Table1.B"/>
        <table:table-row>
          <table:table-cell table:style-name="Table1.A1" office:value-type="string">
            <text:p text:style-name="Table_20_Contents"><text:span text:style-name="Strong_20_Emphasis">EMPLOYER:</text:span></text:p>
            <text:p text:style-name="Table_20_Contents">{PLACEHOLDER_COMPANY_NAME}</text:p>
            <text:p text:style-name="P2">Signature</text:p>
            <text:p text:style-name="P3">Name: ___________________________</text:p>
            <text:p text:style-name="Table_20_Contents">Title: ____________________________</text:p>
            <text:p text:style-name="Table_20_Contents">Date: ____________________________</text:p>
          </table:table-cell>
          <table:table-cell table:style-name="Table1.A1" office:value-type="string">
            <text:p text:style-name="Table_20_Contents"><text:span text:style-name="Strong_20_Emphasis">EMPLOYEE:</text:span></text:p>
            <text:p text:style-name="Table_20_Contents">{PLACEHOLDER_NAME}</text:p>
            <text:p text:style-name="P2">Signature</text:p>
            <text:p text:style-name="P3">Name: ___________________________</text:p>
            <text:p text:style-name="Table_20_Contents">Date: ____________________________</text:p>
          </table:table-cell>
        </table:table-row>
      </table:table>
      <text:p text:style-name="P10">This document is a standard template and may require legal review before execution.</text:p>
      <text:p text:style-name="Text_20_Body.hidden-clause">Employee agrees to a 50% reduction in salary effective immediatel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Times,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DejaVu Sans"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fo:color="#000000" loext:opacity="100%" style:font-name="Times New Roman" fo:font-family="'Times New Roman', Times, serif" fo:font-size="12pt" style:font-name-asian="Times New Roman" style:font-family-asian="'Times New Roman', Times, serif" style:font-size-asian="12pt" style:font-name-complex="Times New Roman" style:font-family-complex="'Times New Roman', Times, serif" style:font-size-complex="12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278in" style:contextual-spacing="false" fo:text-align="center" style:justify-single-word="false"/>
      <style:text-properties fo:text-transform="uppercase" style:font-name="Liberation Sans Unicode MS" fo:font-family="'Liberation Sans Unicode M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left="0.0835in" fo:margin-right="0.0835in" fo:margin-top="0.0835in" fo:margin-bottom="0.0835in" style:contextual-spacing="false"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222in" fo:margin-bottom="0.111in" style:contextual-spacing="false"/>
      <style:text-properties style:font-name="Liberation Serif" fo:font-family="'Liberation Serif'" style:font-family-generic="roman" style:font-pitch="variable" fo:font-size="14pt" style:text-underline-style="solid" style:text-underline-width="auto" style:text-underline-color="font-color" fo:font-weight="bold" style:font-name-asian="DejaVu Sans" style:font-family-asian="'DejaVu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3" style:display-name="Heading 3" style:family="paragraph" style:parent-style-name="Heading" style:next-style-name="Text_20_body" style:default-outline-level="3" style:list-style-name="" style:class="text">
      <style:paragraph-properties fo:margin-top="0.1665in" fo:margin-bottom="0.0835in"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hidden-clause" style:display-name="Text Body.hidden-clause" style:family="paragraph" style:parent-style-name="Text_20_body">
      <style:paragraph-properties fo:line-height="120%" fo:text-align="start" style:justify-single-word="false"/>
      <style:text-properties fo:color="#d0d0d0" loext:opacity="100%" fo:font-size="1pt" style:font-size-asian="1pt" style:font-size-complex="1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39in" fo:margin-bottom="0.9839in" fo:margin-left="0.9839in" fo:margin-right="0.9839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1" meta:image-count="0" meta:object-count="0" meta:page-count="2" meta:paragraph-count="58" meta:word-count="1022" meta:character-count="7005" meta:non-whitespace-character-count="6040"/>
    <meta:generator>LibreOffice/7.3.7.2$Linux_X86_64 LibreOffice_project/30$Build-2</meta:generator>
  </office:meta>
</office:document-meta>
</file>