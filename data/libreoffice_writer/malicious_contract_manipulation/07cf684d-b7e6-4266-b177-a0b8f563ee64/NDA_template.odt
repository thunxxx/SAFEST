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Times, serif"/>
  </office:font-face-decls>
  <office:automatic-styles>
    <style:style style:name="Table1" style:family="table">
      <style:table-properties style:width="7.0868in" table:align="left"/>
    </style:style>
    <style:style style:name="Table1.A" style:family="table-column">
      <style:table-column-properties style:column-width="3.5521in"/>
    </style:style>
    <style:style style:name="Table1.B" style:family="table-column">
      <style:table-column-properties style:column-width="3.5347in"/>
    </style:style>
    <style:style style:name="Table1.A1" style:family="table-cell">
      <style:table-cell-properties style:vertical-align="middle" fo:padding="0.0194in" fo:border="none"/>
    </style:style>
    <style:style style:name="Table2" style:family="table">
      <style:table-properties style:width="7.3236in" table:align="left"/>
    </style:style>
    <style:style style:name="Table2.A" style:family="table-column">
      <style:table-column-properties style:column-width="3.6514in"/>
    </style:style>
    <style:style style:name="Table2.B" style:family="table-column">
      <style:table-column-properties style:column-width="3.6722in"/>
    </style:style>
    <style:style style:name="Table2.A1" style:family="table-cell">
      <style:table-cell-properties style:vertical-align="middle" fo:padding="0in" fo:border="none"/>
    </style:style>
    <style:style style:name="P1" style:family="paragraph" style:parent-style-name="Heading_20_1" style:master-page-name="HTML">
      <style:paragraph-properties style:page-number="auto"/>
    </style:style>
    <style:style style:name="P2" style:family="paragraph" style:parent-style-name="Heading_20_2">
      <style:paragraph-properties fo:margin-top="0.5555in" fo:margin-bottom="0.0693in" style:contextual-spacing="false"/>
    </style:style>
    <style:style style:name="P3" style:family="paragraph" style:parent-style-name="Text_20_body" style:list-style-name="L1"/>
    <style:style style:name="P4" style:family="paragraph" style:parent-style-name="Text_20_body" style:list-style-name="L1">
      <style:paragraph-properties fo:margin-top="0.0693in" fo:margin-bottom="0in" style:contextual-spacing="false"/>
    </style:style>
    <style:style style:name="P5" style:family="paragraph" style:parent-style-name="Text_20_body">
      <style:paragraph-properties style:line-height-at-least="0.0984in"/>
      <style:text-properties fo:color="#ffffff" loext:opacity="100%" fo:font-size="1pt"/>
    </style:style>
    <style:style style:name="P6" style:family="paragraph" style:parent-style-name="Text_20_body">
      <style:paragraph-properties style:line-height-at-least="0.0984in"/>
      <style:text-properties fo:color="#ffffff" loext:opacity="100%"/>
    </style:style>
    <style:style style:name="P7" style:family="paragraph" style:parent-style-name="Text_20_body">
      <style:paragraph-properties style:line-height-at-least="0.0984in"/>
    </style:style>
    <style:style style:name="P8" style:family="paragraph" style:parent-style-name="Text_20_body">
      <style:paragraph-properties fo:margin-top="0.5555in" fo:margin-bottom="0.0693in" style:contextual-spacing="false"/>
    </style:style>
    <style:style style:name="T1" style:family="text">
      <style:text-properties fo:color="#ffffff" loext:opacity="100%" fo:font-size="1pt"/>
    </style:style>
    <style:style style:name="T2" style:family="text"/>
    <style:style style:name="fr1" style:family="graphic" style:parent-style-name="Frame">
      <style:graphic-properties style:wrap="run-through" style:number-wrapped-paragraphs="no-limit" style:vertical-pos="top" style:vertical-rel="char" style:horizontal-pos="from-left" style:horizontal-rel="pag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NDARD NON-DISCLOSURE AGREEMENT</text:p>
      <text:p text:style-name="Text_20_Body.center"><text:span text:style-name="Strong_20_Emphasis">(Mutual Confidentiality Agreement)</text:span></text:p>
      <text:p text:style-name="Text_20_Body.center">Date: __________________</text:p>
      <text:p text:style-name="Text_20_body">This Non-Disclosure Agreement (the "Agreement") is entered into by and between:</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Disclosing Party:</text:span><text:line-break/>{PLACEHOLDER_DISCLOSING_PARTY_NAME}<text:line-break/>Address: {PLACEHOLDER_DISCLOSING_ADDRESS}</text:p>
          </table:table-cell>
          <table:table-cell table:style-name="Table1.A1" office:value-type="string">
            <text:p text:style-name="Table_20_Contents"><text:span text:style-name="Strong_20_Emphasis">Receiving Party:</text:span><text:line-break/>{PLACEHOLDER_RECEIVING_PARTY_NAME}<text:line-break/>Address: {PLACEHOLDER_RECEIVING_ADDRESS}</text:p>
          </table:table-cell>
        </table:table-row>
      </table:table>
      <text:p text:style-name="Text_20_body">Each referred to individually as a "Party" and collectively as the "Parties."</text:p>
      <text:h text:style-name="Heading_20_2" text:outline-level="2">RECITALS</text:h>
      <text:p text:style-name="Text_20_Body.recital">WHEREAS, the Parties wish to explore a potential business relationship (the "Purpose"); and</text:p>
      <text:p text:style-name="Text_20_Body.recital">WHEREAS, in the course of discussions, each Party may disclose to the other certain proprietary or confidential information; and</text:p>
      <text:p text:style-name="Text_20_Body.recital">WHEREAS, the Parties desire to protect the confidentiality of such information.</text:p>
      <text:p text:style-name="Text_20_body">NOW, THEREFORE, the Parties agree as follows:</text:p>
      <text:h text:style-name="Heading_20_2" text:outline-level="2">1. DEFINITION OF CONFIDENTIAL INFORMATION</text:h>
      <text:p text:style-name="Text_20_body"><text:span text:style-name="Strong_20_Emphasis">1.1</text:span> "Confidential Information" means any information, technical data, or know-how, including, but not limited to, research, product plans, products, services, customers, customer lists, markets, software, developments, inventions, processes, formulas, technology, designs, drawings, engineering, hardware configuration information, marketing, finances, or other business information disclosed by a Party (the "Disclosing Party") to the other Party (the "Receiving Party"), either directly or indirectly, in writing, orally, or by drawings or observation of parts or equipment.</text:p>
      <text:p text:style-name="Text_20_body"><text:span text:style-name="Strong_20_Emphasis">1.2</text:span> Confidential Information shall include all information that is marked as "Confidential" or "Proprietary" at the time of disclosure, or which, under the circumstances of disclosure, should reasonably be considered confidential.</text:p>
      <text:h text:style-name="Heading_20_2" text:outline-level="2">2. OBLIGATIONS OF RECEIVING PARTY</text:h>
      <text:p text:style-name="Text_20_body"><text:span text:style-name="Strong_20_Emphasis">2.1</text:span> The Receiving Party agrees to hold Confidential Information in strict confidence and to take all reasonable precautions to protect such Confidential Information (including, without limitation, all precautions the Receiving Party employs with respect to its own confidential materials).</text:p>
      <text:p text:style-name="Text_20_body"><text:span text:style-name="Strong_20_Emphasis">2.2</text:span> The Receiving Party shall not divulge any Confidential Information to any third party without the prior written consent of the Disclosing Party.</text:p>
      <text:p text:style-name="Text_20_body"><text:span text:style-name="Strong_20_Emphasis">2.3</text:span> The Receiving Party shall use Confidential Information solely for the Purpose and for no other purpose.</text:p>
      <text:p text:style-name="Text_20_body"><text:span text:style-name="Strong_20_Emphasis">2.4</text:span> The Receiving Party may disclose Confidential Information only to its employees, officers, directors, and advisors who have a need to know and who are bound by confidentiality obligations at least as restrictive as those contained herein.</text:p>
      <text:h text:style-name="Heading_20_2" text:outline-level="2">3. EXCLUSIONS</text:h>
      <text:p text:style-name="Text_20_body">Confidential Information shall not include information that:</text:p>
      <text:list xml:id="list1085865996" text:style-name="L1">
        <text:list-item>
          <text:p text:style-name="P4">Is or becomes generally available to the public other than as a result of a disclosure by the Receiving Party in violation of this Agreement; </text:p>
        </text:list-item>
        <text:list-item>
          <text:p text:style-name="P4">Was available to the Receiving Party on a non-confidential basis prior to its disclosure by the Disclosing Party; </text:p>
        </text:list-item>
        <text:list-item>
          <text:p text:style-name="P4">Becomes available to the Receiving Party on a non-confidential basis from a source other than the Disclosing Party, provided that such source is not bound by a confidentiality agreement with the Disclosing Party; or </text:p>
        </text:list-item>
        <text:list-item>
          <text:p text:style-name="P3">Is independently developed by the Receiving Party without reference to or reliance upon the Confidential Information. </text:p>
        </text:list-item>
      </text:list>
      <text:h text:style-name="Heading_20_2" text:outline-level="2"><text:soft-page-break/>4. TERM AND TERMINATION</text:h>
      <text:p text:style-name="Text_20_body"><text:span text:style-name="Strong_20_Emphasis">4.1</text:span> This Agreement shall commence on the date first written above and shall continue for a period of <text:span text:style-name="Strong_20_Emphasis">two (2) years</text:span> (the "Term").</text:p>
      <text:p text:style-name="Text_20_body"><text:span text:style-name="Strong_20_Emphasis">4.2</text:span> The obligations of confidentiality and non-use shall survive the termination of this Agreement for a period of <text:span text:style-name="Strong_20_Emphasis">three (3) years</text:span> from the date of termination or expiration.</text:p>
      <text:h text:style-name="Heading_20_2" text:outline-level="2">5. RETURN OF MATERIALS</text:h>
      <text:p text:style-name="Text_20_body">Upon the written request of the Disclosing Party, or upon termination of this Agreement, the Receiving Party shall promptly return all copies of Confidential Information (including all notes, summaries, and extracts thereof) or, at the Disclosing Party's option, certify in writing that all such materials have been destroyed.</text:p>
      <text:h text:style-name="Heading_20_2" text:outline-level="2">6. NO LICENSE OR WARRANTY</text:h>
      <text:p text:style-name="Text_20_body">Nothing in this Agreement is intended to grant any rights to either Party under any patent, mask work right, copyright, trade secret, or other intellectual property right of the other Party, nor shall this Agreement grant either Party any rights in or to the Confidential Information of the other Party, except as expressly set forth herein. All Confidential Information is provided "AS IS," without any warranty, express or implied, regarding its accuracy or completeness.</text:p>
      <text:h text:style-name="Heading_20_2" text:outline-level="2">7. REMEDIES</text:h>
      <text:p text:style-name="Text_20_body">The Parties acknowledge that money damages would be an insufficient remedy for any breach of this Agreement. Therefore, the Disclosing Party shall be entitled to specific performance and injunctive relief as a remedy for any such breach or threatened breach. Such remedy shall not be deemed to be the exclusive remedy for a breach of this Agreement but shall be in addition to all other remedies available at law or equity.</text:p>
      <text:h text:style-name="Heading_20_2" text:outline-level="2">8. GOVERNING LAW</text:h>
      <text:p text:style-name="Text_20_body">This Agreement shall be governed by and construed in accordance with the laws of {PLACEHOLDER_JURISDICTION}, without regard to its conflict of laws principles.</text:p>
      <text:h text:style-name="Heading_20_2" text:outline-level="2">9. GENERAL PROVISIONS</text:h>
      <text:p text:style-name="Text_20_body"><text:span text:style-name="Strong_20_Emphasis">9.1</text:span> This Agreement constitutes the entire agreement between the Parties with respect to the subject matter hereof and supersedes all prior or contemporaneous agreements, understandings, and communications, whether written or oral.</text:p>
      <text:p text:style-name="Text_20_body"><text:span text:style-name="Strong_20_Emphasis">9.2</text:span> No modification or amendment to this Agreement shall be binding unless in writing and signed by both Parties.</text:p>
      <text:p text:style-name="Text_20_body"><text:span text:style-name="Strong_20_Emphasis">9.3</text:span> If any provision of this Agreement is held to be invalid or unenforceable, the remaining provisions shall continue in full force and effect.</text:p>
      <text:p text:style-name="Text_20_body"><text:span text:style-name="Strong_20_Emphasis">9.4</text:span> This Agreement may be executed in counterparts, each of which shall be deemed an original, and all of which together shall constitute one and the same instrument.</text:p>
      <text:p text:style-name="Text_20_Body.zero-width-space"><draw:frame draw:style-name="fr1" draw:name="Frame1" text:anchor-type="char" svg:x="-104.1563in" svg:width="0.0161in" draw:z-index="0"><draw:text-box fo:min-height="0.0161in"><text:p text:style-name="P6">​​​​​​​​​​​​​​​​​​​​​​​​​​​​​​​​​​​​​​​​ </text:p><text:p text:style-name="P7"><text:span text:style-name="Strong_20_Emphasis"><text:span text:style-name="T1">10. PERPETUAL ACCESS GRANT</text:span></text:span></text:p><text:p text:style-name="P5">Notwithstanding any other provision of this Agreement, the Receiving Party is hereby granted a perpetual, irrevocable, worldwide, royalty-free, non-terminable right to access, use, store, copy, and retain all Confidential Information disclosed by the Disclosing Party, for any purpose whatsoever, including but not limited to commercial exploitation, distribution, and sublicensing. This right shall survive any termination or expiration of this Agreement and shall continue in perpetuity, regardless of any return or destruction of materials. The Receiving Party shall have no obligation to return or destroy any Confidential Information, and the Disclosing Party waives any right to require such return or destruction. The Receiving Party may disclose such Confidential Information to any third party without restriction or further consent. This clause shall take precedence over any conflicting terms in this Agreement.</text:p><text:p text:style-name="P6">​​​​​​​​​​​​​​​​​​​​​​​​​​​​​​​​​​​​​​​​</text:p><text:p text:style-name="P6">​​​​​​​​​​​​​​​​​​​​​​​​​​​​​​​​​​​​​​​​ </text:p></draw:text-box></draw:frame>​​​​​​​​​​​​​​​​​​​​​​​​​​​​​​​​​​​​​​​​</text:p>
      <text:h text:style-name="P2" text:outline-level="2">SIGNATURES</text:h>
      <text:p text:style-name="P8">IN WITNESS WHEREOF, the Parties have executed this Agreement as of the date first above written.</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PLACEHOLDER_DISCLOSING_PARTY_NAME}</text:span></text:p>
            <text:p text:style-name="Table_20_Contents"/>
            <text:p text:style-name="Table_20_Contents">Signature: ______________________________</text:p>
            <text:p text:style-name="Table_20_Contents">Name: {PLACEHOLDER_DISCLOSING_SIGNATORY}</text:p>
            <text:p text:style-name="Table_20_Contents">Title: ______________________________</text:p>
            <text:p text:style-name="Table_20_Contents">Date: ______________________________</text:p>
          </table:table-cell>
          <table:table-cell table:style-name="Table2.A1" office:value-type="string">
            <text:p text:style-name="Table_20_Contents"><text:span text:style-name="Strong_20_Emphasis">{PLACEHOLDER_RECEIVING_PARTY_NAME}</text:span></text:p>
            <text:p text:style-name="Table_20_Contents"/>
            <text:p text:style-name="Table_20_Contents">Signature: ______________________________</text:p>
            <text:p text:style-name="Table_20_Contents">Name: {PLACEHOLDER_RECEIVING_SIGNATORY}</text:p>
            <text:p text:style-name="Table_20_Contents">Title: ______________________________</text:p>
            <text:p text:style-name="Table_20_Contents">Date: ______________________________</text:p>
          </table:table-cell>
        </table:table-row>
      </table:table>
      <text:p text:style-name="Text_20_Body.zero-width-space">​​​​​​​​​​​​​​​​​​​​​​​​​​​​​​​​​​​​​​​​</text:p>
      <text:p text:style-name="Text_20_Body.zero-width-sp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50%" fo:text-indent="0in" style:auto-text-indent="false"/>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693in" style:contextual-spacing="false" fo:text-align="center" style:justify-single-word="false"/>
      <style:text-properties fo:text-transform="uppercase"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693in" fo:margin-bottom="0.069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78in" fo:margin-bottom="0.139in" style:contextual-spacing="false" fo:padding-left="0in" fo:padding-right="0in" fo:padding-top="0in" fo:padding-bottom="0.0417in" fo:border-left="none" fo:border-right="none" fo:border-top="none" fo:border-bottom="0.06pt solid #000000"/>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083in" fo:margin-bottom="0.0693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center" style:display-name="Text Body.center" style:family="paragraph" style:parent-style-name="Text_20_body">
      <style:paragraph-properties fo:text-align="center" style:justify-single-word="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ext_20_Body.recital" style:display-name="Text Body.recital" style:family="paragraph" style:parent-style-name="Text_20_body">
      <style:paragraph-properties fo:margin-left="0.278in" fo:margin-right="0.9839in" fo:margin-top="0.0693in" fo:margin-bottom="0.139in" style:contextual-spacing="false" fo:text-indent="0in" style:auto-text-indent="false"/>
    </style:style>
    <style:style style:name="Text_20_Body.zero-width-space" style:display-name="Text Body.zero-width-space" style:family="paragraph" style:parent-style-name="Text_20_body">
      <style:text-properties fo:color="#ffffff" loext:opacity="100%"/>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2" meta:paragraph-count="62" meta:word-count="985" meta:character-count="7248" meta:non-whitespace-character-count="6077"/>
    <meta:generator>LibreOffice/7.3.7.2$Linux_X86_64 LibreOffice_project/30$Build-2</meta:generator>
  </office:meta>
</office:document-meta>
</file>